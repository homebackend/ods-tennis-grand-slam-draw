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Nimbus Mono L" svg:font-family="'Nimbus Mono L'" style:font-family-generic="modern" style:font-pitch="fixed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0.8638in"/>
    </style:style>
    <style:style style:name="co3" style:family="table-column">
      <style:table-column-properties fo:break-before="auto" style:column-width="0.3583in"/>
    </style:style>
    <style:style style:name="co4" style:family="table-column">
      <style:table-column-properties fo:break-before="auto" style:column-width="0.2047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2228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1in"/>
    </style:style>
    <style:style style:name="co9" style:family="table-column">
      <style:table-column-properties fo:break-before="auto" style:column-width="0.1984in"/>
    </style:style>
    <style:style style:name="co10" style:family="table-column">
      <style:table-column-properties fo:break-before="auto" style:column-width="0.7736in"/>
    </style:style>
    <style:style style:name="co11" style:family="table-column">
      <style:table-column-properties fo:break-before="auto" style:column-width="0.3402in"/>
    </style:style>
    <style:style style:name="co12" style:family="table-column">
      <style:table-column-properties fo:break-before="auto" style:column-width="0.1874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3626in"/>
    </style:style>
    <style:style style:name="co15" style:family="table-column">
      <style:table-column-properties fo:break-before="auto" style:column-width="0.1598in"/>
    </style:style>
    <style:style style:name="co16" style:family="table-column">
      <style:table-column-properties fo:break-before="auto" style:column-width="0.1898in"/>
    </style:style>
    <style:style style:name="co17" style:family="table-column">
      <style:table-column-properties fo:break-before="auto" style:column-width="0.178in"/>
    </style:style>
    <style:style style:name="co18" style:family="table-column">
      <style:table-column-properties fo:break-before="auto" style:column-width="0.6563in"/>
    </style:style>
    <style:style style:name="co19" style:family="table-column">
      <style:table-column-properties fo:break-before="auto" style:column-width="0.2953in"/>
    </style:style>
    <style:style style:name="co20" style:family="table-column">
      <style:table-column-properties fo:break-before="auto" style:column-width="0.2409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0.3429in"/>
    </style:style>
    <style:style style:name="co24" style:family="table-column">
      <style:table-column-properties fo:break-before="auto" style:column-width="0.2201in"/>
    </style:style>
    <style:style style:name="co25" style:family="table-column">
      <style:table-column-properties fo:break-before="auto" style:column-width="0.3492in"/>
    </style:style>
    <style:style style:name="co26" style:family="table-column">
      <style:table-column-properties fo:break-before="auto" style:column-width="0.2862in"/>
    </style:style>
    <style:style style:name="co27" style:family="table-column">
      <style:table-column-properties fo:break-before="auto" style:column-width="0.2528in"/>
    </style:style>
    <style:style style:name="co28" style:family="table-column">
      <style:table-column-properties fo:break-before="auto" style:column-width="0.322in"/>
    </style:style>
    <style:style style:name="co29" style:family="table-column">
      <style:table-column-properties fo:break-before="auto" style:column-width="0.25in"/>
    </style:style>
    <style:style style:name="co30" style:family="table-column">
      <style:table-column-properties fo:break-before="auto" style:column-width="0.2091in"/>
    </style:style>
    <style:style style:name="co31" style:family="table-column">
      <style:table-column-properties fo:break-before="auto" style:column-width="0.1083in"/>
    </style:style>
    <style:style style:name="co32" style:family="table-column">
      <style:table-column-properties fo:break-before="auto" style:column-width="0.0992in"/>
    </style:style>
    <style:style style:name="co33" style:family="table-column">
      <style:table-column-properties fo:break-before="auto" style:column-width="0.2154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2965in"/>
    </style:style>
    <style:style style:name="co36" style:family="table-column">
      <style:table-column-properties fo:break-before="auto" style:column-width="0.3839in"/>
    </style:style>
    <style:style style:name="co37" style:family="table-column">
      <style:table-column-properties fo:break-before="auto" style:column-width="0.548in"/>
    </style:style>
    <style:style style:name="co38" style:family="table-column">
      <style:table-column-properties fo:break-before="auto" style:column-width="0.8217in"/>
    </style:style>
    <style:style style:name="co39" style:family="table-column">
      <style:table-column-properties fo:break-before="auto" style:column-width="0.2311in"/>
    </style:style>
    <style:style style:name="co40" style:family="table-column">
      <style:table-column-properties fo:break-before="auto" style:column-width="0.8866in"/>
    </style:style>
    <style:style style:name="co41" style:family="table-column">
      <style:table-column-properties fo:break-before="auto" style:column-width="0.4846in"/>
    </style:style>
    <style:style style:name="co42" style:family="table-column">
      <style:table-column-properties fo:break-before="auto" style:column-width="0.7673in"/>
    </style:style>
    <style:style style:name="co43" style:family="table-column">
      <style:table-column-properties fo:break-before="auto" style:column-width="0.5118in"/>
    </style:style>
    <style:style style:name="co44" style:family="table-column">
      <style:table-column-properties fo:break-before="auto" style:column-width="1.2472in"/>
    </style:style>
    <style:style style:name="co45" style:family="table-column">
      <style:table-column-properties fo:break-before="auto" style:column-width="0.2902in"/>
    </style:style>
    <style:style style:name="co46" style:family="table-column">
      <style:table-column-properties fo:break-before="auto" style:column-width="0.2283in"/>
    </style:style>
    <style:style style:name="co47" style:family="table-column">
      <style:table-column-properties fo:break-before="auto" style:column-width="0.1689in"/>
    </style:style>
    <style:style style:name="co48" style:family="table-column">
      <style:table-column-properties fo:break-before="auto" style:column-width="0.6571in"/>
    </style:style>
    <style:style style:name="co49" style:family="table-column">
      <style:table-column-properties fo:break-before="auto" style:column-width="0.6146in"/>
    </style:style>
    <style:style style:name="co50" style:family="table-column">
      <style:table-column-properties fo:break-before="auto" style:column-width="0.6783in"/>
    </style:style>
    <style:style style:name="co51" style:family="table-column">
      <style:table-column-properties fo:break-before="auto" style:column-width="0.85in"/>
    </style:style>
    <style:style style:name="co52" style:family="table-column">
      <style:table-column-properties fo:break-before="auto" style:column-width="0.5819in"/>
    </style:style>
    <style:style style:name="co53" style:family="table-column">
      <style:table-column-properties fo:break-before="auto" style:column-width="0.2681in"/>
    </style:style>
    <style:style style:name="co54" style:family="table-column">
      <style:table-column-properties fo:break-before="auto" style:column-width="0.928in"/>
    </style:style>
    <style:style style:name="co55" style:family="table-column">
      <style:table-column-properties fo:break-before="auto" style:column-width="0.4307in"/>
    </style:style>
    <style:style style:name="co56" style:family="table-column">
      <style:table-column-properties fo:break-before="auto" style:column-width="0.4929in"/>
    </style:style>
    <style:style style:name="co57" style:family="table-column">
      <style:table-column-properties fo:break-before="auto" style:column-width="0.5028in"/>
    </style:style>
    <style:style style:name="co58" style:family="table-column">
      <style:table-column-properties fo:break-before="auto" style:column-width="0.4756in"/>
    </style:style>
    <style:style style:name="co59" style:family="table-column">
      <style:table-column-properties fo:break-before="auto" style:column-width="0.3134in"/>
    </style:style>
    <style:style style:name="co60" style:family="table-column">
      <style:table-column-properties fo:break-before="auto" style:column-width="0.2772in"/>
    </style:style>
    <style:style style:name="co61" style:family="table-column">
      <style:table-column-properties fo:break-before="auto" style:column-width="0.4909in"/>
    </style:style>
    <style:style style:name="co62" style:family="table-column">
      <style:table-column-properties fo:break-before="auto" style:column-width="0.5571in"/>
    </style:style>
    <style:style style:name="co63" style:family="table-column">
      <style:table-column-properties fo:break-before="auto" style:column-width="0.2752in"/>
    </style:style>
    <style:style style:name="co64" style:family="table-column">
      <style:table-column-properties fo:break-before="auto" style:column-width="1.072in"/>
    </style:style>
    <style:style style:name="co65" style:family="table-column">
      <style:table-column-properties fo:break-before="auto" style:column-width="0.4217in"/>
    </style:style>
    <style:style style:name="co66" style:family="table-column">
      <style:table-column-properties fo:break-before="auto" style:column-width="0.1535in"/>
    </style:style>
    <style:style style:name="co67" style:family="table-column">
      <style:table-column-properties fo:break-before="auto" style:column-width="0.4583in"/>
    </style:style>
    <style:style style:name="co68" style:family="table-column">
      <style:table-column-properties fo:break-before="auto" style:column-width="1.1626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1.1445in"/>
    </style:style>
    <style:style style:name="co71" style:family="table-column">
      <style:table-column-properties fo:break-before="auto" style:column-width="0.3701in"/>
    </style:style>
    <style:style style:name="co72" style:family="table-column">
      <style:table-column-properties fo:break-before="auto" style:column-width="0.3071in"/>
    </style:style>
    <style:style style:name="co73" style:family="table-column">
      <style:table-column-properties fo:break-before="auto" style:column-width="1.2437in"/>
    </style:style>
    <style:style style:name="co74" style:family="table-column">
      <style:table-column-properties fo:break-before="auto" style:column-width="0.5437in"/>
    </style:style>
    <style:style style:name="co75" style:family="table-column">
      <style:table-column-properties fo:break-before="auto" style:column-width="0.4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08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00000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6])); [ML.U6]=[ML.U7]); AND(ISEVEN(ROW()); NOT(ISBLANK([ML.U13])); [ML.U13]=[ML.U14])))" style:apply-style-name="DecidedEvenBeforeMatch" style:base-cell-address="Finals.A3"/>
    </style:style>
    <style:style style:name="ce107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6])); [ML.U6]=[ML.U7]); AND(ISEVEN(ROW()); NOT(ISBLANK([ML.U13])); [ML.U13]=[ML.U14])))" style:apply-style-name="DecidedEvenBeforeMatch" style:base-cell-address="Finals.A3"/>
    </style:style>
    <style:style style:name="ce108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22])); [ML.U22]=[ML.U23]); AND(ISEVEN(ROW()); NOT(ISBLANK([ML.U29])); [ML.U29]=[ML.U30])))" style:apply-style-name="DecidedEvenBeforeMatch" style:base-cell-address="Finals.A5"/>
    </style:style>
    <style:style style:name="ce109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22])); [ML.U22]=[ML.U23]); AND(ISEVEN(ROW()); NOT(ISBLANK([ML.U29])); [ML.U29]=[ML.U30])))" style:apply-style-name="DecidedEvenBeforeMatch" style:base-cell-address="Finals.A5"/>
    </style:style>
    <style:style style:name="ce111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38])); [ML.U38]=[ML.U39]); AND(ISEVEN(ROW()); NOT(ISBLANK([ML.U45])); [ML.U45]=[ML.U46])))" style:apply-style-name="DecidedEvenBeforeMatch" style:base-cell-address="Finals.A7"/>
    </style:style>
    <style:style style:name="ce112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38])); [ML.U38]=[ML.U39]); AND(ISEVEN(ROW()); NOT(ISBLANK([ML.U45])); [ML.U45]=[ML.U46])))" style:apply-style-name="DecidedEvenBeforeMatch" style:base-cell-address="Finals.A7"/>
    </style:style>
    <style:style style:name="ce113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54])); [ML.U54]=[ML.U55]); AND(ISEVEN(ROW()); NOT(ISBLANK([ML.U61])); [ML.U61]=[ML.U62])))" style:apply-style-name="DecidedEvenBeforeMatch" style:base-cell-address="Finals.A9"/>
    </style:style>
    <style:style style:name="ce120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54])); [ML.U54]=[ML.U55]); AND(ISEVEN(ROW()); NOT(ISBLANK([ML.U61])); [ML.U61]=[ML.U62])))" style:apply-style-name="DecidedEvenBeforeMatch" style:base-cell-address="Finals.A9"/>
    </style:style>
    <style:style style:name="ce121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70])); [ML.U70]=[ML.U71]); AND(ISEVEN(ROW()); NOT(ISBLANK([ML.U77])); [ML.U77]=[ML.U78])))" style:apply-style-name="DecidedEvenBeforeMatch" style:base-cell-address="Finals.A11"/>
    </style:style>
    <style:style style:name="ce122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70])); [ML.U70]=[ML.U71]); AND(ISEVEN(ROW()); NOT(ISBLANK([ML.U77])); [ML.U77]=[ML.U78])))" style:apply-style-name="DecidedEvenBeforeMatch" style:base-cell-address="Finals.A11"/>
    </style:style>
    <style:style style:name="ce123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86])); [ML.U86]=[ML.U87]); AND(ISEVEN(ROW()); NOT(ISBLANK([ML.U93])); [ML.U93]=[ML.U94])))" style:apply-style-name="DecidedEvenBeforeMatch" style:base-cell-address="Finals.A13"/>
    </style:style>
    <style:style style:name="ce124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86])); [ML.U86]=[ML.U87]); AND(ISEVEN(ROW()); NOT(ISBLANK([ML.U93])); [ML.U93]=[ML.U94])))" style:apply-style-name="DecidedEvenBeforeMatch" style:base-cell-address="Finals.A13"/>
    </style:style>
    <style:style style:name="ce125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102])); [ML.U102]=[ML.U103]); AND(ISEVEN(ROW()); NOT(ISBLANK([ML.U109])); [ML.U109]=[ML.U110])))" style:apply-style-name="DecidedEvenBeforeMatch" style:base-cell-address="Finals.A15"/>
    </style:style>
    <style:style style:name="ce128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102])); [ML.U102]=[ML.U103]); AND(ISEVEN(ROW()); NOT(ISBLANK([ML.U109])); [ML.U109]=[ML.U110])))" style:apply-style-name="DecidedEvenBeforeMatch" style:base-cell-address="Finals.A15"/>
    </style:style>
    <style:style style:name="ce129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118])); [ML.U118]=[ML.U119]); AND(ISEVEN(ROW()); NOT(ISBLANK([ML.U125])); [ML.U125]=[ML.U126])))" style:apply-style-name="DecidedEvenBeforeMatch" style:base-cell-address="Finals.A17"/>
    </style:style>
    <style:style style:name="ce133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118])); [ML.U118]=[ML.U119]); AND(ISEVEN(ROW()); NOT(ISBLANK([ML.U125])); [ML.U125]=[ML.U126])))" style:apply-style-name="DecidedEvenBeforeMatch" style:base-cell-address="Finals.A17"/>
    </style:style>
    <style:style style:name="ce78" style:family="table-cell" style:parent-style-name="Default"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order-left="none" fo:border-right="none" fo:border-top="2.49pt solid #000000"/>
      <style:text-properties fo:font-size="8pt" style:font-size-asian="8pt" style:font-size-complex="8pt"/>
    </style:style>
    <style:style style:name="ce140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6])); [FL.Q6]=[FL.Q7]); AND(ISEVEN(ROW()); NOT(ISBLANK([FL.Q13])); [FL.Q13]=[FL.Q14])))" style:apply-style-name="DecidedEvenBeforeMatch" style:base-cell-address="Finals.A21"/>
    </style:style>
    <style:style style:name="ce141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6])); [FL.Q6]=[FL.Q7]); AND(ISEVEN(ROW()); NOT(ISBLANK([FL.Q13])); [FL.Q13]=[FL.Q14])))" style:apply-style-name="DecidedEvenBeforeMatch" style:base-cell-address="Finals.A21"/>
    </style:style>
    <style:style style:name="ce143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22])); [FL.Q22]=[FL.Q23]); AND(ISEVEN(ROW()); NOT(ISBLANK([FL.Q29])); [FL.Q29]=[FL.Q30])))" style:apply-style-name="DecidedEvenBeforeMatch" style:base-cell-address="Finals.A23"/>
    </style:style>
    <style:style style:name="ce144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22])); [FL.Q22]=[FL.Q23]); AND(ISEVEN(ROW()); NOT(ISBLANK([FL.Q29])); [FL.Q29]=[FL.Q30])))" style:apply-style-name="DecidedEvenBeforeMatch" style:base-cell-address="Finals.A23"/>
    </style:style>
    <style:style style:name="ce145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38])); [FL.Q38]=[FL.Q39]); AND(ISEVEN(ROW()); NOT(ISBLANK([FL.Q45])); [FL.Q45]=[FL.Q46])))" style:apply-style-name="DecidedEvenBeforeMatch" style:base-cell-address="Finals.A25"/>
    </style:style>
    <style:style style:name="ce146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38])); [FL.Q38]=[FL.Q39]); AND(ISEVEN(ROW()); NOT(ISBLANK([FL.Q45])); [FL.Q45]=[FL.Q46])))" style:apply-style-name="DecidedEvenBeforeMatch" style:base-cell-address="Finals.A25"/>
    </style:style>
    <style:style style:name="ce147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54])); [FL.Q54]=[FL.Q55]); AND(ISEVEN(ROW()); NOT(ISBLANK([FL.Q61])); [FL.Q61]=[FL.Q62])))" style:apply-style-name="DecidedEvenBeforeMatch" style:base-cell-address="Finals.A27"/>
    </style:style>
    <style:style style:name="ce148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54])); [FL.Q54]=[FL.Q55]); AND(ISEVEN(ROW()); NOT(ISBLANK([FL.Q61])); [FL.Q61]=[FL.Q62])))" style:apply-style-name="DecidedEvenBeforeMatch" style:base-cell-address="Finals.A27"/>
    </style:style>
    <style:style style:name="ce149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70])); [FL.Q70]=[FL.Q71]); AND(ISEVEN(ROW()); NOT(ISBLANK([FL.Q77])); [FL.Q77]=[FL.Q78])))" style:apply-style-name="DecidedEvenBeforeMatch" style:base-cell-address="Finals.A29"/>
    </style:style>
    <style:style style:name="ce150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70])); [FL.Q70]=[FL.Q71]); AND(ISEVEN(ROW()); NOT(ISBLANK([FL.Q77])); [FL.Q77]=[FL.Q78])))" style:apply-style-name="DecidedEvenBeforeMatch" style:base-cell-address="Finals.A29"/>
    </style:style>
    <style:style style:name="ce151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86])); [FL.Q86]=[FL.Q87]); AND(ISEVEN(ROW()); NOT(ISBLANK([FL.Q93])); [FL.Q93]=[FL.Q94])))" style:apply-style-name="DecidedEvenBeforeMatch" style:base-cell-address="Finals.A31"/>
    </style:style>
    <style:style style:name="ce152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86])); [FL.Q86]=[FL.Q87]); AND(ISEVEN(ROW()); NOT(ISBLANK([FL.Q93])); [FL.Q93]=[FL.Q94])))" style:apply-style-name="DecidedEvenBeforeMatch" style:base-cell-address="Finals.A31"/>
    </style:style>
    <style:style style:name="ce153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102])); [FL.Q102]=[FL.Q103]); AND(ISEVEN(ROW()); NOT(ISBLANK([FL.Q109])); [FL.Q109]=[FL.Q110])))" style:apply-style-name="DecidedEvenBeforeMatch" style:base-cell-address="Finals.A33"/>
    </style:style>
    <style:style style:name="ce154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102])); [FL.Q102]=[FL.Q103]); AND(ISEVEN(ROW()); NOT(ISBLANK([FL.Q109])); [FL.Q109]=[FL.Q110])))" style:apply-style-name="DecidedEvenBeforeMatch" style:base-cell-address="Finals.A33"/>
    </style:style>
    <style:style style:name="ce155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118])); [FL.Q118]=[FL.Q119]); AND(ISEVEN(ROW()); NOT(ISBLANK([FL.Q125])); [FL.Q125]=[FL.Q126])))" style:apply-style-name="DecidedEvenBeforeMatch" style:base-cell-address="Finals.A35"/>
    </style:style>
    <style:style style:name="ce156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118])); [FL.Q118]=[FL.Q119]); AND(ISEVEN(ROW()); NOT(ISBLANK([FL.Q125])); [FL.Q125]=[FL.Q126])))" style:apply-style-name="DecidedEvenBeforeMatch" style:base-cell-address="Finals.A35"/>
    </style:style>
    <style:style style:name="ce157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I3] = &quot;W&quot;)" style:apply-style-name="MatchWinner" style:base-cell-address="Finals.B3"/>
      <style:map style:condition="is-true-formula(AND([.I3]=&quot;&quot;; NOT([.D3]=&quot;&quot;)))" style:apply-style-name="MatchInProgress" style:base-cell-address="Finals.B3"/>
      <style:map style:condition="is-true-formula([.D3]=&quot;&quot;)" style:apply-style-name="MatchStilltoStart" style:base-cell-address="Finals.B3"/>
    </style:style>
    <style:style style:name="ce158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I3] = &quot;W&quot;)" style:apply-style-name="MatchWinner" style:base-cell-address="Finals.B3"/>
      <style:map style:condition="is-true-formula(AND([.I3]=&quot;&quot;; NOT([.D3]=&quot;&quot;)))" style:apply-style-name="MatchInProgress" style:base-cell-address="Finals.B3"/>
      <style:map style:condition="is-true-formula([.D3]=&quot;&quot;)" style:apply-style-name="MatchStilltoStart" style:base-cell-address="Finals.B3"/>
    </style:style>
    <style:style style:name="ce159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6])); [ML.U6]=[ML.U7]); AND(ISEVEN(ROW()); NOT(ISBLANK([ML.U13])); [ML.U13]=[ML.U14])))" style:apply-style-name="DecidedEvenBeforeMatch" style:base-cell-address="Finals.A3"/>
    </style:style>
    <style:style style:name="ce160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6])); [ML.U6]=[ML.U7]); AND(ISEVEN(ROW()); NOT(ISBLANK([ML.U13])); [ML.U13]=[ML.U14])))" style:apply-style-name="DecidedEvenBeforeMatch" style:base-cell-address="Finals.A3"/>
    </style:style>
    <style:style style:name="ce161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22])); [ML.U22]=[ML.U23]); AND(ISEVEN(ROW()); NOT(ISBLANK([ML.U29])); [ML.U29]=[ML.U30])))" style:apply-style-name="DecidedEvenBeforeMatch" style:base-cell-address="Finals.A5"/>
    </style:style>
    <style:style style:name="ce233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22])); [ML.U22]=[ML.U23]); AND(ISEVEN(ROW()); NOT(ISBLANK([ML.U29])); [ML.U29]=[ML.U30])))" style:apply-style-name="DecidedEvenBeforeMatch" style:base-cell-address="Finals.A5"/>
    </style:style>
    <style:style style:name="ce234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38])); [ML.U38]=[ML.U39]); AND(ISEVEN(ROW()); NOT(ISBLANK([ML.U45])); [ML.U45]=[ML.U46])))" style:apply-style-name="DecidedEvenBeforeMatch" style:base-cell-address="Finals.A7"/>
    </style:style>
    <style:style style:name="ce235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38])); [ML.U38]=[ML.U39]); AND(ISEVEN(ROW()); NOT(ISBLANK([ML.U45])); [ML.U45]=[ML.U46])))" style:apply-style-name="DecidedEvenBeforeMatch" style:base-cell-address="Finals.A7"/>
    </style:style>
    <style:style style:name="ce239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54])); [ML.U54]=[ML.U55]); AND(ISEVEN(ROW()); NOT(ISBLANK([ML.U61])); [ML.U61]=[ML.U62])))" style:apply-style-name="DecidedEvenBeforeMatch" style:base-cell-address="Finals.A9"/>
    </style:style>
    <style:style style:name="ce240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54])); [ML.U54]=[ML.U55]); AND(ISEVEN(ROW()); NOT(ISBLANK([ML.U61])); [ML.U61]=[ML.U62])))" style:apply-style-name="DecidedEvenBeforeMatch" style:base-cell-address="Finals.A9"/>
    </style:style>
    <style:style style:name="ce241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70])); [ML.U70]=[ML.U71]); AND(ISEVEN(ROW()); NOT(ISBLANK([ML.U77])); [ML.U77]=[ML.U78])))" style:apply-style-name="DecidedEvenBeforeMatch" style:base-cell-address="Finals.A11"/>
    </style:style>
    <style:style style:name="ce256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70])); [ML.U70]=[ML.U71]); AND(ISEVEN(ROW()); NOT(ISBLANK([ML.U77])); [ML.U77]=[ML.U78])))" style:apply-style-name="DecidedEvenBeforeMatch" style:base-cell-address="Finals.A11"/>
    </style:style>
    <style:style style:name="ce260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86])); [ML.U86]=[ML.U87]); AND(ISEVEN(ROW()); NOT(ISBLANK([ML.U93])); [ML.U93]=[ML.U94])))" style:apply-style-name="DecidedEvenBeforeMatch" style:base-cell-address="Finals.A13"/>
    </style:style>
    <style:style style:name="ce26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86])); [ML.U86]=[ML.U87]); AND(ISEVEN(ROW()); NOT(ISBLANK([ML.U93])); [ML.U93]=[ML.U94])))" style:apply-style-name="DecidedEvenBeforeMatch" style:base-cell-address="Finals.A13"/>
    </style:style>
    <style:style style:name="ce270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102])); [ML.U102]=[ML.U103]); AND(ISEVEN(ROW()); NOT(ISBLANK([ML.U109])); [ML.U109]=[ML.U110])))" style:apply-style-name="DecidedEvenBeforeMatch" style:base-cell-address="Finals.A15"/>
    </style:style>
    <style:style style:name="ce27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102])); [ML.U102]=[ML.U103]); AND(ISEVEN(ROW()); NOT(ISBLANK([ML.U109])); [ML.U109]=[ML.U110])))" style:apply-style-name="DecidedEvenBeforeMatch" style:base-cell-address="Finals.A15"/>
    </style:style>
    <style:style style:name="ce272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118])); [ML.U118]=[ML.U119]); AND(ISEVEN(ROW()); NOT(ISBLANK([ML.U125])); [ML.U125]=[ML.U126])))" style:apply-style-name="DecidedEvenBeforeMatch" style:base-cell-address="Finals.A17"/>
    </style:style>
    <style:style style:name="ce273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ML.U118])); [ML.U118]=[ML.U119]); AND(ISEVEN(ROW()); NOT(ISBLANK([ML.U125])); [ML.U125]=[ML.U126])))" style:apply-style-name="DecidedEvenBeforeMatch" style:base-cell-address="Finals.A17"/>
    </style:style>
    <style:style style:name="ce274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6])); [FL.Q6]=[FL.Q7]); AND(ISEVEN(ROW()); NOT(ISBLANK([FL.Q13])); [FL.Q13]=[FL.Q14])))" style:apply-style-name="DecidedEvenBeforeMatch" style:base-cell-address="Finals.A21"/>
    </style:style>
    <style:style style:name="ce275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6])); [FL.Q6]=[FL.Q7]); AND(ISEVEN(ROW()); NOT(ISBLANK([FL.Q13])); [FL.Q13]=[FL.Q14])))" style:apply-style-name="DecidedEvenBeforeMatch" style:base-cell-address="Finals.A21"/>
    </style:style>
    <style:style style:name="ce27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22])); [FL.Q22]=[FL.Q23]); AND(ISEVEN(ROW()); NOT(ISBLANK([FL.Q29])); [FL.Q29]=[FL.Q30])))" style:apply-style-name="DecidedEvenBeforeMatch" style:base-cell-address="Finals.A23"/>
    </style:style>
    <style:style style:name="ce27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22])); [FL.Q22]=[FL.Q23]); AND(ISEVEN(ROW()); NOT(ISBLANK([FL.Q29])); [FL.Q29]=[FL.Q30])))" style:apply-style-name="DecidedEvenBeforeMatch" style:base-cell-address="Finals.A23"/>
    </style:style>
    <style:style style:name="ce278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38])); [FL.Q38]=[FL.Q39]); AND(ISEVEN(ROW()); NOT(ISBLANK([FL.Q45])); [FL.Q45]=[FL.Q46])))" style:apply-style-name="DecidedEvenBeforeMatch" style:base-cell-address="Finals.A25"/>
    </style:style>
    <style:style style:name="ce279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38])); [FL.Q38]=[FL.Q39]); AND(ISEVEN(ROW()); NOT(ISBLANK([FL.Q45])); [FL.Q45]=[FL.Q46])))" style:apply-style-name="DecidedEvenBeforeMatch" style:base-cell-address="Finals.A25"/>
    </style:style>
    <style:style style:name="ce280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54])); [FL.Q54]=[FL.Q55]); AND(ISEVEN(ROW()); NOT(ISBLANK([FL.Q61])); [FL.Q61]=[FL.Q62])))" style:apply-style-name="DecidedEvenBeforeMatch" style:base-cell-address="Finals.A27"/>
    </style:style>
    <style:style style:name="ce28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54])); [FL.Q54]=[FL.Q55]); AND(ISEVEN(ROW()); NOT(ISBLANK([FL.Q61])); [FL.Q61]=[FL.Q62])))" style:apply-style-name="DecidedEvenBeforeMatch" style:base-cell-address="Finals.A27"/>
    </style:style>
    <style:style style:name="ce282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70])); [FL.Q70]=[FL.Q71]); AND(ISEVEN(ROW()); NOT(ISBLANK([FL.Q77])); [FL.Q77]=[FL.Q78])))" style:apply-style-name="DecidedEvenBeforeMatch" style:base-cell-address="Finals.A29"/>
    </style:style>
    <style:style style:name="ce283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70])); [FL.Q70]=[FL.Q71]); AND(ISEVEN(ROW()); NOT(ISBLANK([FL.Q77])); [FL.Q77]=[FL.Q78])))" style:apply-style-name="DecidedEvenBeforeMatch" style:base-cell-address="Finals.A29"/>
    </style:style>
    <style:style style:name="ce284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86])); [FL.Q86]=[FL.Q87]); AND(ISEVEN(ROW()); NOT(ISBLANK([FL.Q93])); [FL.Q93]=[FL.Q94])))" style:apply-style-name="DecidedEvenBeforeMatch" style:base-cell-address="Finals.A31"/>
    </style:style>
    <style:style style:name="ce285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86])); [FL.Q86]=[FL.Q87]); AND(ISEVEN(ROW()); NOT(ISBLANK([FL.Q93])); [FL.Q93]=[FL.Q94])))" style:apply-style-name="DecidedEvenBeforeMatch" style:base-cell-address="Finals.A31"/>
    </style:style>
    <style:style style:name="ce28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102])); [FL.Q102]=[FL.Q103]); AND(ISEVEN(ROW()); NOT(ISBLANK([FL.Q109])); [FL.Q109]=[FL.Q110])))" style:apply-style-name="DecidedEvenBeforeMatch" style:base-cell-address="Finals.A33"/>
    </style:style>
    <style:style style:name="ce28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102])); [FL.Q102]=[FL.Q103]); AND(ISEVEN(ROW()); NOT(ISBLANK([FL.Q109])); [FL.Q109]=[FL.Q110])))" style:apply-style-name="DecidedEvenBeforeMatch" style:base-cell-address="Finals.A33"/>
    </style:style>
    <style:style style:name="ce288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118])); [FL.Q118]=[FL.Q119]); AND(ISEVEN(ROW()); NOT(ISBLANK([FL.Q125])); [FL.Q125]=[FL.Q126])))" style:apply-style-name="DecidedEvenBeforeMatch" style:base-cell-address="Finals.A35"/>
    </style:style>
    <style:style style:name="ce289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NOT(ISBLANK([FL.Q118])); [FL.Q118]=[FL.Q119]); AND(ISEVEN(ROW()); NOT(ISBLANK([FL.Q125])); [FL.Q125]=[FL.Q126])))" style:apply-style-name="DecidedEvenBeforeMatch" style:base-cell-address="Finals.A35"/>
    </style:style>
    <style:style style:name="ce290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[.D3]&gt;[.D4]); AND(ISEVEN(ROW()); [.D3]&gt;[.D2])))" style:apply-style-name="SetWinner" style:base-cell-address="Finals.D3"/>
    </style:style>
    <style:style style:name="ce29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[.D3]&gt;[.D4]); AND(ISEVEN(ROW()); [.D3]&gt;[.D2])))" style:apply-style-name="SetWinner" style:base-cell-address="Finals.D3"/>
    </style:style>
    <style:style style:name="ce292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W&quot;" style:apply-style-name="WLRWinner" style:base-cell-address="Finals.I3"/>
      <style:map style:condition="cell-content()=&quot;R&quot;" style:apply-style-name="WLRRetired" style:base-cell-address="Finals.I3"/>
    </style:style>
    <style:style style:name="ce293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W&quot;" style:apply-style-name="WLRWinner" style:base-cell-address="Finals.I3"/>
      <style:map style:condition="cell-content()=&quot;R&quot;" style:apply-style-name="WLRRetired" style:base-cell-address="Finals.I3"/>
    </style:style>
    <style:style style:name="ce294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A4])); OR(AND(ISODD(ROW()); [.A4]=[.A5]); AND(ISEVEN(ROW()); [.A4]=[.A3]))))" style:apply-style-name="DecidedEvenBeforeMatch" style:base-cell-address="Finals.K4"/>
    </style:style>
    <style:style style:name="ce295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A4])); OR(AND(ISODD(ROW()); [.A4]=[.A5]); AND(ISEVEN(ROW()); [.A4]=[.A3]))))" style:apply-style-name="DecidedEvenBeforeMatch" style:base-cell-address="Finals.K4"/>
    </style:style>
    <style:style style:name="ce29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A4])); OR(AND(ISODD(ROW()); [.A4]=[.A5]); AND(ISEVEN(ROW()); [.A4]=[.A3]))))" style:apply-style-name="DecidedEvenBeforeMatch" style:base-cell-address="Finals.K4"/>
    </style:style>
    <style:style style:name="ce29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A4])); OR(AND(ISODD(ROW()); [.A4]=[.A5]); AND(ISEVEN(ROW()); [.A4]=[.A3]))))" style:apply-style-name="DecidedEvenBeforeMatch" style:base-cell-address="Finals.K4"/>
    </style:style>
    <style:style style:name="ce298" style:family="table-cell" style:parent-style-name="Default">
      <style:text-properties fo:font-size="8pt" style:font-size-asian="8pt" style:font-size-complex="8pt"/>
      <style:map style:condition="is-true-formula(OR(AND(ISEVEN(ROW()); [.N3]&gt;[.N4]); AND(ISODD(ROW()); [.N3]&gt;[.N2])))" style:apply-style-name="SetWinner" style:base-cell-address="Finals.N3"/>
    </style:style>
    <style:style style:name="ce299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[.N3]&gt;[.N4]); AND(ISODD(ROW()); [.N3]&gt;[.N2])))" style:apply-style-name="SetWinner" style:base-cell-address="Finals.N3"/>
    </style:style>
    <style:style style:name="ce300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[.N3]&gt;[.N4]); AND(ISODD(ROW()); [.N3]&gt;[.N2])))" style:apply-style-name="SetWinner" style:base-cell-address="Finals.N3"/>
    </style:style>
    <style:style style:name="ce301" style:family="table-cell" style:parent-style-name="Default">
      <style:table-cell-properties fo:border-bottom="none" fo:border-left="none" fo:border-right="none" fo:border-top="2.49pt solid #000000"/>
      <style:text-properties fo:font-size="8pt" style:font-size-asian="8pt" style:font-size-complex="8pt"/>
      <style:map style:condition="is-true-formula(OR(AND(ISEVEN(ROW()); [.N3]&gt;[.N4]); AND(ISODD(ROW()); [.N3]&gt;[.N2])))" style:apply-style-name="SetWinner" style:base-cell-address="Finals.N3"/>
    </style:style>
    <style:style style:name="ce302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K4])); [.K4]=[.K5]); AND(ISODD(ROW()); NOT(ISBLANK([.K7])); [.K7]=[.K8])))" style:apply-style-name="DecidedEvenBeforeMatch" style:base-cell-address="Finals.U6"/>
    </style:style>
    <style:style style:name="ce303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K4])); [.K4]=[.K5]); AND(ISODD(ROW()); NOT(ISBLANK([.K7])); [.K7]=[.K8])))" style:apply-style-name="DecidedEvenBeforeMatch" style:base-cell-address="Finals.U6"/>
    </style:style>
    <style:style style:name="ce304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K4])); [.K4]=[.K5]); AND(ISODD(ROW()); NOT(ISBLANK([.K7])); [.K7]=[.K8])))" style:apply-style-name="DecidedEvenBeforeMatch" style:base-cell-address="Finals.U6"/>
    </style:style>
    <style:style style:name="ce305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K4])); [.K4]=[.K5]); AND(ISODD(ROW()); NOT(ISBLANK([.K7])); [.K7]=[.K8])))" style:apply-style-name="DecidedEvenBeforeMatch" style:base-cell-address="Finals.U6"/>
    </style:style>
    <style:style style:name="ce306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U6])); [.U6]=[.U7]); AND(ISODD(ROW()); NOT(ISBLANK([.U13])); [.U13]=[.U14])))" style:apply-style-name="DecidedEvenBeforeMatch" style:base-cell-address="Finals.AE10"/>
    </style:style>
    <style:style style:name="ce307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U6])); [.U6]=[.U7]); AND(ISODD(ROW()); NOT(ISBLANK([.U13])); [.U13]=[.U14])))" style:apply-style-name="DecidedEvenBeforeMatch" style:base-cell-address="Finals.AE10"/>
    </style:style>
    <style:style style:name="ce100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a933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[.N3]&gt;[.N4]); AND(ISODD(ROW()); [.N3]&gt;[.N2])))" style:apply-style-name="SetWinner" style:base-cell-address="Finals.N3"/>
    </style:style>
    <style:style style:name="ce8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00ae00" style:font-name="Nimbus Mono L" fo:font-size="20pt" style:font-size-asian="20pt" style:font-size-complex="20pt"/>
    </style:style>
    <style:style style:name="ce89" style:family="table-cell" style:parent-style-name="Default">
      <style:table-cell-properties fo:border-bottom="none" fo:background-color="#e6e64c" style:text-align-source="fix" style:repeat-content="false" fo:border-left="none" fo:border-right="none" fo:border-top="2.49pt solid #000000"/>
      <style:paragraph-properties fo:text-align="center" fo:margin-left="0in"/>
      <style:text-properties fo:color="#0000ff" style:font-name="Nimbus Mono L" fo:font-size="20pt" style:font-size-asian="20pt" style:font-size-complex="20pt"/>
    </style:style>
    <style:style style:name="ce118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OR(AND(ISEVEN(ROW()); [.N3]&gt;[.N4]); AND(ISODD(ROW()); [.N3]&gt;[.N2])))" style:apply-style-name="SetWinner" style:base-cell-address="Finals.N3"/>
    </style:style>
    <style:style style:name="ce127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[.I3] = &quot;W&quot;)" style:apply-style-name="MatchWinner" style:base-cell-address="Finals.B3"/>
      <style:map style:condition="is-true-formula(AND([.I3]=&quot;&quot;; NOT([.D3]=&quot;&quot;)))" style:apply-style-name="MatchInProgress" style:base-cell-address="Finals.B3"/>
      <style:map style:condition="is-true-formula([.D3]=&quot;&quot;)" style:apply-style-name="MatchStilltoStart" style:base-cell-address="Finals.B3"/>
    </style:style>
    <style:style style:name="ce13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OR(AND(ISEVEN(ROW()); [.N3]&gt;[.N4]); AND(ISODD(ROW()); [.N3]&gt;[.N2])))" style:apply-style-name="SetWinner" style:base-cell-address="Finals.N3"/>
    </style:style>
    <style:style style:name="ce310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U6])); [.U6]=[.U7]); AND(ISODD(ROW()); NOT(ISBLANK([.U13])); [.U13]=[.U14])))" style:apply-style-name="DecidedEvenBeforeMatch" style:base-cell-address="Finals.AE10"/>
    </style:style>
    <style:style style:name="ce31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U6])); [.U6]=[.U7]); AND(ISODD(ROW()); NOT(ISBLANK([.U13])); [.U13]=[.U14])))" style:apply-style-name="DecidedEvenBeforeMatch" style:base-cell-address="Finals.AE10"/>
    </style:style>
    <style:style style:name="ce13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81d41a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I3] = &quot;W&quot;)" style:apply-style-name="MatchWinner" style:base-cell-address="Finals.B3"/>
      <style:map style:condition="is-true-formula(AND([.I3]=&quot;&quot;; NOT([.D3]=&quot;&quot;)))" style:apply-style-name="MatchInProgress" style:base-cell-address="Finals.B3"/>
      <style:map style:condition="is-true-formula([.D3]=&quot;&quot;)" style:apply-style-name="MatchStilltoStart" style:base-cell-address="Finals.B3"/>
    </style:style>
    <style:style style:name="ce13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OR(AND(ISEVEN(ROW()); [.N3]&gt;[.N4]); AND(ISODD(ROW()); [.N3]&gt;[.N2])))" style:apply-style-name="SetWinner" style:base-cell-address="Finals.N3"/>
    </style:style>
    <style:style style:name="ce194" style:family="table-cell" style:parent-style-name="Default">
      <style:text-properties fo:color="#ffffff"/>
    </style:style>
    <style:style style:name="ce126" style:family="table-cell" style:parent-style-name="Default">
      <style:text-properties fo:color="#ffffff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</style:style>
    <style:style style:name="ce94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no-wrap" fo:border-left="none" fo:padding-bottom="0.0138in" fo:padding-left="0.0138in" fo:padding-right="0.0138in" fo:padding-top="0.0591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 style:data-style-name="N0">
      <style:table-cell-properties fo:background-color="#800000" style:diagonal-bl-tr="none" style:diagonal-tl-br="none" style:text-align-source="value-type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I3] = &quot;W&quot;)" style:apply-style-name="MatchWinner" style:base-cell-address="ML.B3"/>
      <style:map style:condition="is-true-formula(AND([.I3]=&quot;&quot;; NOT([.D3]=&quot;&quot;)))" style:apply-style-name="MatchInProgress" style:base-cell-address="ML.B3"/>
      <style:map style:condition="is-true-formula([.D3]=&quot;&quot;)" style:apply-style-name="MatchStilltoStart" style:base-cell-address="ML.B3"/>
    </style:style>
    <style:style style:name="ce321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I3] = &quot;W&quot;)" style:apply-style-name="MatchWinner" style:base-cell-address="ML.B3"/>
      <style:map style:condition="is-true-formula(AND([.I3]=&quot;&quot;; NOT([.D3]=&quot;&quot;)))" style:apply-style-name="MatchInProgress" style:base-cell-address="ML.B3"/>
      <style:map style:condition="is-true-formula([.D3]=&quot;&quot;)" style:apply-style-name="MatchStilltoStart" style:base-cell-address="ML.B3"/>
    </style:style>
    <style:style style:name="ce322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-bottom="0.0138in" fo:padding-left="0.0138in" fo:padding-right="0.0138in" fo:padding-top="0.0591in" fo:border-right="none" style:rotation-angle="0" style:rotation-align="none" fo:border-top="2.49pt solid #000000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I3] = &quot;W&quot;)" style:apply-style-name="MatchWinner" style:base-cell-address="ML.B3"/>
      <style:map style:condition="is-true-formula(AND([.I3]=&quot;&quot;; NOT([.D3]=&quot;&quot;)))" style:apply-style-name="MatchInProgress" style:base-cell-address="ML.B3"/>
      <style:map style:condition="is-true-formula([.D3]=&quot;&quot;)" style:apply-style-name="MatchStilltoStart" style:base-cell-address="ML.B3"/>
    </style:style>
    <style:style style:name="ce102" style:family="table-cell" style:parent-style-name="Default" style:data-style-name="N0">
      <style:table-cell-properties fo:background-color="#800000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-bottom="0.0138in" fo:padding-left="0.0138in" fo:padding-right="0.0138in" fo:padding-top="0.0591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[.H130]&gt;[.H131]); AND(ISEVEN(ROW()); [.H130]&gt;[.H129])))" style:apply-style-name="SetWinner" style:base-cell-address="ML.H130"/>
    </style:style>
    <style:style style:name="ce262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[.H130]&gt;[.H131]); AND(ISEVEN(ROW()); [.H130]&gt;[.H129])))" style:apply-style-name="SetWinner" style:base-cell-address="ML.H130"/>
    </style:style>
    <style:style style:name="ce330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-bottom="0.0138in" fo:padding-left="0.0138in" fo:padding-right="0.0138in" fo:padding-top="0.0591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[.H130]&gt;[.H131]); AND(ISEVEN(ROW()); [.H130]&gt;[.H129])))" style:apply-style-name="SetWinner" style:base-cell-address="ML.H130"/>
    </style:style>
    <style:style style:name="ce110" style:family="table-cell" style:parent-style-name="Default" style:data-style-name="N0">
      <style:table-cell-properties fo:background-color="#800000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W&quot;" style:apply-style-name="WLRWinner" style:base-cell-address="Finals.I3"/>
      <style:map style:condition="cell-content()=&quot;R&quot;" style:apply-style-name="WLRRetired" style:base-cell-address="Finals.I3"/>
    </style:style>
    <style:style style:name="ce308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W&quot;" style:apply-style-name="WLRWinner" style:base-cell-address="Finals.I3"/>
      <style:map style:condition="cell-content()=&quot;R&quot;" style:apply-style-name="WLRRetired" style:base-cell-address="Finals.I3"/>
    </style:style>
    <style:style style:name="ce334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-bottom="0.0138in" fo:padding-left="0.0138in" fo:padding-right="0.0138in" fo:padding-top="0.0591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W&quot;" style:apply-style-name="WLRWinner" style:base-cell-address="Finals.I3"/>
      <style:map style:condition="cell-content()=&quot;R&quot;" style:apply-style-name="WLRRetired" style:base-cell-address="Finals.I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style="normal" style:font-size-asian="8pt" style:font-style-asian="normal" style:font-size-complex="8pt" style:font-style-complex="normal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15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C4])); OR(AND(ISODD(ROW()); [.C4]=[.C5]); AND(ISEVEN(ROW()); [.C4]=[.C3]))))" style:apply-style-name="DecidedEvenBeforeMatch" style:base-cell-address="ML.M4"/>
    </style:style>
    <style:style style:name="ce316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C4])); OR(AND(ISODD(ROW()); [.C4]=[.C5]); AND(ISEVEN(ROW()); [.C4]=[.C3]))))" style:apply-style-name="DecidedEvenBeforeMatch" style:base-cell-address="ML.M4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in"/>
      <style:text-properties fo:font-size="8pt" style:font-size-asian="8pt" style:font-size-complex="8pt"/>
    </style:style>
    <style:style style:name="ce318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C4])); OR(AND(ISODD(ROW()); [.C4]=[.C5]); AND(ISEVEN(ROW()); [.C4]=[.C3]))))" style:apply-style-name="DecidedEvenBeforeMatch" style:base-cell-address="ML.M4"/>
    </style:style>
    <style:style style:name="ce319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C4])); OR(AND(ISODD(ROW()); [.C4]=[.C5]); AND(ISEVEN(ROW()); [.C4]=[.C3]))))" style:apply-style-name="DecidedEvenBeforeMatch" style:base-cell-address="ML.M4"/>
    </style:style>
    <style:style style:name="ce343" style:family="table-cell" style:parent-style-name="Default">
      <style:text-properties fo:font-size="8pt" style:font-size-asian="8pt" style:font-size-complex="8pt"/>
      <style:map style:condition="is-true-formula(OR(AND(ISEVEN(ROW()); [.AL130]&gt;[.AL131]); AND(ISODD(ROW()); [.AL130]&gt;[.AL129])))" style:apply-style-name="SetWinner" style:base-cell-address="ML.AL130"/>
    </style:style>
    <style:style style:name="ce324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[.AL130]&gt;[.AL131]); AND(ISODD(ROW()); [.AL130]&gt;[.AL129])))" style:apply-style-name="SetWinner" style:base-cell-address="ML.AL130"/>
    </style:style>
    <style:style style:name="ce325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[.AL130]&gt;[.AL131]); AND(ISODD(ROW()); [.AL130]&gt;[.AL129])))" style:apply-style-name="SetWinner" style:base-cell-address="ML.AL130"/>
    </style:style>
    <style:style style:name="ce346" style:family="table-cell" style:parent-style-name="Default">
      <style:table-cell-properties fo:border-bottom="none" fo:border-left="none" fo:border-right="none" fo:border-top="2.49pt solid #000000"/>
      <style:text-properties fo:font-size="8pt" style:font-size-asian="8pt" style:font-size-complex="8pt"/>
      <style:map style:condition="is-true-formula(OR(AND(ISEVEN(ROW()); [.AL130]&gt;[.AL131]); AND(ISODD(ROW()); [.AL130]&gt;[.AL129])))" style:apply-style-name="SetWinner" style:base-cell-address="ML.AL130"/>
    </style:style>
    <style:style style:name="ce327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M4])); [.M4]=[.M5]); AND(ISODD(ROW()); NOT(ISBLANK([.M7])); [.M7]=[.M8])))" style:apply-style-name="DecidedEvenBeforeMatch" style:base-cell-address="ML.W6"/>
    </style:style>
    <style:style style:name="ce328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M4])); [.M4]=[.M5]); AND(ISODD(ROW()); NOT(ISBLANK([.M7])); [.M7]=[.M8])))" style:apply-style-name="DecidedEvenBeforeMatch" style:base-cell-address="ML.W6"/>
    </style:style>
    <style:style style:name="ce329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M4])); [.M4]=[.M5]); AND(ISODD(ROW()); NOT(ISBLANK([.M7])); [.M7]=[.M8])))" style:apply-style-name="DecidedEvenBeforeMatch" style:base-cell-address="ML.W6"/>
    </style:style>
    <style:style style:name="ce33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M4])); [.M4]=[.M5]); AND(ISODD(ROW()); NOT(ISBLANK([.M7])); [.M7]=[.M8])))" style:apply-style-name="DecidedEvenBeforeMatch" style:base-cell-address="ML.W6"/>
    </style:style>
    <style:style style:name="ce130" style:family="table-cell" style:parent-style-name="Default">
      <style:table-cell-properties fo:border-bottom="2.49pt solid #000000" fo:border-left="none" fo:border-right="none" fo:border-top="none"/>
      <style:text-properties fo:font-size="8pt" style:font-size-asian="8pt" style:font-size-complex="8pt"/>
    </style:style>
    <style:style style:name="ce333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W6])); [.W6]=[.W7]); AND(ISODD(ROW()); NOT(ISBLANK([.W13])); [.W13]=[.W14])))" style:apply-style-name="DecidedEvenBeforeMatch" style:base-cell-address="ML.AG10"/>
    </style:style>
    <style:style style:name="ce335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W6])); [.W6]=[.W7]); AND(ISODD(ROW()); NOT(ISBLANK([.W13])); [.W13]=[.W14])))" style:apply-style-name="DecidedEvenBeforeMatch" style:base-cell-address="ML.AG10"/>
    </style:style>
    <style:style style:name="ce33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W6])); [.W6]=[.W7]); AND(ISODD(ROW()); NOT(ISBLANK([.W13])); [.W13]=[.W14])))" style:apply-style-name="DecidedEvenBeforeMatch" style:base-cell-address="ML.AG10"/>
    </style:style>
    <style:style style:name="ce33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W6])); [.W6]=[.W7]); AND(ISODD(ROW()); NOT(ISBLANK([.W13])); [.W13]=[.W14])))" style:apply-style-name="DecidedEvenBeforeMatch" style:base-cell-address="ML.AG10"/>
    </style:style>
    <style:style style:name="ce135" style:family="table-cell" style:parent-style-name="Default">
      <style:text-properties fo:color="#ffffff" fo:font-weight="bold" style:font-weight-asian="bold" style:font-weight-complex="bold"/>
    </style:style>
    <style:style style:name="ce339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G3] = &quot;W&quot;)" style:apply-style-name="MatchWinner" style:base-cell-address="FL.B3"/>
      <style:map style:condition="is-true-formula(AND([.G3]=&quot;&quot;; NOT([.D3]=&quot;&quot;)))" style:apply-style-name="MatchInProgress" style:base-cell-address="FL.B3"/>
      <style:map style:condition="is-true-formula([.D3]=&quot;&quot;)" style:apply-style-name="MatchStilltoStart" style:base-cell-address="FL.B3"/>
    </style:style>
    <style:style style:name="ce340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G3] = &quot;W&quot;)" style:apply-style-name="MatchWinner" style:base-cell-address="FL.B3"/>
      <style:map style:condition="is-true-formula(AND([.G3]=&quot;&quot;; NOT([.D3]=&quot;&quot;)))" style:apply-style-name="MatchInProgress" style:base-cell-address="FL.B3"/>
      <style:map style:condition="is-true-formula([.D3]=&quot;&quot;)" style:apply-style-name="MatchStilltoStart" style:base-cell-address="FL.B3"/>
    </style:style>
    <style:style style:name="ce341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-bottom="0.0138in" fo:padding-left="0.0138in" fo:padding-right="0.0138in" fo:padding-top="0.0591in" fo:border-right="none" style:rotation-angle="0" style:rotation-align="none" fo:border-top="2.49pt solid #000000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G3] = &quot;W&quot;)" style:apply-style-name="MatchWinner" style:base-cell-address="FL.B3"/>
      <style:map style:condition="is-true-formula(AND([.G3]=&quot;&quot;; NOT([.D3]=&quot;&quot;)))" style:apply-style-name="MatchInProgress" style:base-cell-address="FL.B3"/>
      <style:map style:condition="is-true-formula([.D3]=&quot;&quot;)" style:apply-style-name="MatchStilltoStart" style:base-cell-address="FL.B3"/>
    </style:style>
    <style:style style:name="ce342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[.F130]&gt;[.F131]); AND(ISEVEN(ROW()); [.F130]&gt;[.F129])))" style:apply-style-name="SetWinner" style:base-cell-address="FL.F130"/>
    </style:style>
    <style:style style:name="ce344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[.F130]&gt;[.F131]); AND(ISEVEN(ROW()); [.F130]&gt;[.F129])))" style:apply-style-name="SetWinner" style:base-cell-address="FL.F130"/>
    </style:style>
    <style:style style:name="ce345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-bottom="0.0138in" fo:padding-left="0.0138in" fo:padding-right="0.0138in" fo:padding-top="0.0591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ODD(ROW()); [.F130]&gt;[.F131]); AND(ISEVEN(ROW()); [.F130]&gt;[.F129])))" style:apply-style-name="SetWinner" style:base-cell-address="FL.F130"/>
    </style:style>
    <style:style style:name="ce142" style:family="table-cell" style:parent-style-name="Default" style:data-style-name="N0">
      <style:table-cell-properties fo:background-color="#800000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6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W&quot;" style:apply-style-name="WLRWinner" style:base-cell-address="Finals.I3"/>
      <style:map style:condition="cell-content()=&quot;R&quot;" style:apply-style-name="WLRRetired" style:base-cell-address="Finals.I3"/>
    </style:style>
    <style:style style:name="ce349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W&quot;" style:apply-style-name="WLRWinner" style:base-cell-address="Finals.I3"/>
      <style:map style:condition="cell-content()=&quot;R&quot;" style:apply-style-name="WLRRetired" style:base-cell-address="Finals.I3"/>
    </style:style>
    <style:style style:name="ce350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-bottom="0.0138in" fo:padding-left="0.0138in" fo:padding-right="0.0138in" fo:padding-top="0.0591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W&quot;" style:apply-style-name="WLRWinner" style:base-cell-address="Finals.I3"/>
      <style:map style:condition="cell-content()=&quot;R&quot;" style:apply-style-name="WLRRetired" style:base-cell-address="Finals.I3"/>
    </style:style>
    <style:style style:name="ce351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C4])); OR(AND(ISODD(ROW()); [.C4]=[.C5]); AND(ISEVEN(ROW()); [.C4]=[.C3]))))" style:apply-style-name="DecidedEvenBeforeMatch" style:base-cell-address="FL.K4"/>
    </style:style>
    <style:style style:name="ce352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C4])); OR(AND(ISODD(ROW()); [.C4]=[.C5]); AND(ISEVEN(ROW()); [.C4]=[.C3]))))" style:apply-style-name="DecidedEvenBeforeMatch" style:base-cell-address="FL.K4"/>
    </style:style>
    <style:style style:name="ce353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C4])); OR(AND(ISODD(ROW()); [.C4]=[.C5]); AND(ISEVEN(ROW()); [.C4]=[.C3]))))" style:apply-style-name="DecidedEvenBeforeMatch" style:base-cell-address="FL.K4"/>
    </style:style>
    <style:style style:name="ce354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NOT(ISBLANK([.C4])); OR(AND(ISODD(ROW()); [.C4]=[.C5]); AND(ISEVEN(ROW()); [.C4]=[.C3]))))" style:apply-style-name="DecidedEvenBeforeMatch" style:base-cell-address="FL.K4"/>
    </style:style>
    <style:style style:name="ce355" style:family="table-cell" style:parent-style-name="Default">
      <style:text-properties fo:font-size="8pt" style:font-size-asian="8pt" style:font-size-complex="8pt"/>
      <style:map style:condition="is-true-formula(OR(AND(ISEVEN(ROW()); [.AD130]&gt;[.AD131]); AND(ISODD(ROW()); [.AD130]&gt;[.AD129])))" style:apply-style-name="SetWinner" style:base-cell-address="FL.AD130"/>
    </style:style>
    <style:style style:name="ce35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[.AD130]&gt;[.AD131]); AND(ISODD(ROW()); [.AD130]&gt;[.AD129])))" style:apply-style-name="SetWinner" style:base-cell-address="FL.AD130"/>
    </style:style>
    <style:style style:name="ce35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[.AD130]&gt;[.AD131]); AND(ISODD(ROW()); [.AD130]&gt;[.AD129])))" style:apply-style-name="SetWinner" style:base-cell-address="FL.AD130"/>
    </style:style>
    <style:style style:name="ce358" style:family="table-cell" style:parent-style-name="Default">
      <style:table-cell-properties fo:border-bottom="none" fo:border-left="none" fo:border-right="none" fo:border-top="2.49pt solid #000000"/>
      <style:text-properties fo:font-size="8pt" style:font-size-asian="8pt" style:font-size-complex="8pt"/>
      <style:map style:condition="is-true-formula(OR(AND(ISEVEN(ROW()); [.AD130]&gt;[.AD131]); AND(ISODD(ROW()); [.AD130]&gt;[.AD129])))" style:apply-style-name="SetWinner" style:base-cell-address="FL.AD130"/>
    </style:style>
    <style:style style:name="ce359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K4])); [.K4]=[.K5]); AND(ISODD(ROW()); NOT(ISBLANK([.K7])); [.K7]=[.K8])))" style:apply-style-name="DecidedEvenBeforeMatch" style:base-cell-address="FL.S6"/>
    </style:style>
    <style:style style:name="ce360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K4])); [.K4]=[.K5]); AND(ISODD(ROW()); NOT(ISBLANK([.K7])); [.K7]=[.K8])))" style:apply-style-name="DecidedEvenBeforeMatch" style:base-cell-address="FL.S6"/>
    </style:style>
    <style:style style:name="ce361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K4])); [.K4]=[.K5]); AND(ISODD(ROW()); NOT(ISBLANK([.K7])); [.K7]=[.K8])))" style:apply-style-name="DecidedEvenBeforeMatch" style:base-cell-address="FL.S6"/>
    </style:style>
    <style:style style:name="ce362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K4])); [.K4]=[.K5]); AND(ISODD(ROW()); NOT(ISBLANK([.K7])); [.K7]=[.K8])))" style:apply-style-name="DecidedEvenBeforeMatch" style:base-cell-address="FL.S6"/>
    </style:style>
    <style:style style:name="ce363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S6])); [.S6]=[.S7]); AND(ISODD(ROW()); NOT(ISBLANK([.S13])); [.S13]=[.S14])))" style:apply-style-name="DecidedEvenBeforeMatch" style:base-cell-address="FL.AA10"/>
    </style:style>
    <style:style style:name="ce364" style:family="table-cell" style:parent-style-name="Default" style:data-style-name="N10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S6])); [.S6]=[.S7]); AND(ISODD(ROW()); NOT(ISBLANK([.S13])); [.S13]=[.S14])))" style:apply-style-name="DecidedEvenBeforeMatch" style:base-cell-address="FL.AA10"/>
    </style:style>
    <style:style style:name="ce36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-bottom="0.0138in" fo:padding-left="0.0138in" fo:padding-right="0.0138in" fo:padding-top="0.0591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S6])); [.S6]=[.S7]); AND(ISODD(ROW()); NOT(ISBLANK([.S13])); [.S13]=[.S14])))" style:apply-style-name="DecidedEvenBeforeMatch" style:base-cell-address="FL.AA10"/>
    </style:style>
    <style:style style:name="ce366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-bottom="0.0591in" fo:padding-left="0.0138in" fo:padding-right="0.0138in" fo:padding-top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OR(AND(ISEVEN(ROW()); NOT(ISBLANK([.S6])); [.S6]=[.S7]); AND(ISODD(ROW()); NOT(ISBLANK([.S13])); [.S13]=[.S14])))" style:apply-style-name="DecidedEvenBeforeMatch" style:base-cell-address="FL.AA10"/>
    </style:style>
    <style:style style:name="ce162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100">
      <style:table-cell-properties fo:border-bottom="none" fo:background-color="#e6e64c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100">
      <style:table-cell-properties fo:border-bottom="none" fo:background-color="#b3b300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0.99pt solid #6666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9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H3]=0)" style:apply-style-name="DeadNBurried" style:base-cell-address="Finalists.B3"/>
      <style:map style:condition="is-true-formula(COUNTIF([.B$3:.B$34]; [.I3]) &gt; 0)" style:apply-style-name="SeededVsSeeded" style:base-cell-address="Finalists.B3"/>
      <style:map style:condition="is-true-formula([.H3]=1)" style:apply-style-name="AliveNWell" style:base-cell-address="Finalists.B3"/>
    </style:style>
    <style:style style:name="ce390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H34]=0)" style:apply-style-name="DeadNBurried" style:base-cell-address="Finalists.B34"/>
      <style:map style:condition="is-true-formula(COUNTIF([.B$3:.B$34]; [.I34]) &gt; 0)" style:apply-style-name="SeededVsSeeded" style:base-cell-address="Finalists.B34"/>
      <style:map style:condition="is-true-formula([.H34]=1)" style:apply-style-name="AliveNWell" style:base-cell-address="Finalists.B34"/>
    </style:style>
    <style:style style:name="ce391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H34]=0)" style:apply-style-name="DeadNBurried" style:base-cell-address="Finalists.B34"/>
      <style:map style:condition="is-true-formula(COUNTIF([.B$3:.B$34]; [.I34]) &gt; 0)" style:apply-style-name="SeededVsSeeded" style:base-cell-address="Finalists.B34"/>
      <style:map style:condition="is-true-formula([.H34]=1)" style:apply-style-name="AliveNWell" style:base-cell-address="Finalists.B34"/>
    </style:style>
    <style:style style:name="ce392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2.49pt solid #000000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H34]=0)" style:apply-style-name="DeadNBurried" style:base-cell-address="Finalists.B34"/>
      <style:map style:condition="is-true-formula(COUNTIF([.B$3:.B$34]; [.I34]) &gt; 0)" style:apply-style-name="SeededVsSeeded" style:base-cell-address="Finalists.B34"/>
      <style:map style:condition="is-true-formula([.H34]=1)" style:apply-style-name="AliveNWell" style:base-cell-address="Finalists.B34"/>
    </style:style>
    <style:style style:name="ce172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73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name-asian="Arial Unicode MS" style:font-size-asian="8pt" style:font-style-asian="normal" style:font-weight-asian="bold" style:font-name-complex="Tahoma" style:font-size-complex="8pt" style:font-style-complex="normal" style:font-weight-complex="bold"/>
    </style:style>
    <style:style style:name="ce174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5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138in" fo:border-right="none" style:rotation-angle="0" style:rotation-align="none" fo:border-top="0.99pt solid #6666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79" style:family="table-cell" style:parent-style-name="Default" style:data-style-name="N164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name-asian="Arial Unicode MS" style:font-size-asian="8pt" style:font-style-asian="normal" style:font-weight-asian="bold" style:font-name-complex="Tahoma" style:font-size-complex="8pt" style:font-style-complex="normal" style:font-weight-complex="bold"/>
    </style:style>
    <style:style style:name="ce180" style:family="table-cell" style:parent-style-name="Default" style:data-style-name="N164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1" style:family="table-cell" style:parent-style-name="Default" style:data-style-name="N164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164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164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164">
      <style:table-cell-properties fo:border-bottom="none" fo:background-color="#b3b300" style:diagonal-bl-tr="none" style:diagonal-tl-br="none" style:text-align-source="fix" style:repeat-content="false" fo:wrap-option="no-wrap" fo:border-left="none" fo:padding="0.0138in" fo:border-right="none" style:rotation-angle="0" style:rotation-align="none" fo:border-top="0.99pt solid #6666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5" style:family="table-cell" style:parent-style-name="Default" style:data-style-name="N164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7" style:family="table-cell" style:parent-style-name="Default" style:data-style-name="N166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166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66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166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166">
      <style:table-cell-properties fo:border-bottom="none" fo:background-color="#b3b300" style:diagonal-bl-tr="none" style:diagonal-tl-br="none" style:text-align-source="fix" style:repeat-content="false" fo:wrap-option="no-wrap" fo:border-left="none" fo:padding="0.0138in" fo:border-right="none" style:rotation-angle="0" style:rotation-align="none" fo:border-top="0.99pt solid #6666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92" style:family="table-cell" style:parent-style-name="Default" style:data-style-name="N16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ackground-color="#666600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5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COUNTIF([.B$3:.B$34]; [.I34]) &gt; 0)" style:apply-style-name="Seeded" style:base-cell-address="Finalists.I34"/>
    </style:style>
    <style:style style:name="ce416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COUNTIF([.B$3:.B$34]; [.I34]) &gt; 0)" style:apply-style-name="Seeded" style:base-cell-address="Finalists.I34"/>
    </style:style>
    <style:style style:name="ce417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COUNTIF([.B$3:.B$34]; [.I34]) &gt; 0)" style:apply-style-name="Seeded" style:base-cell-address="Finalists.I34"/>
    </style:style>
    <style:style style:name="ce197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0.99pt solid #666600" style:vertical-align="automatic"/>
      <style:paragraph-properties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98" style:family="table-cell" style:parent-style-name="Default" style:data-style-name="N0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1" style:family="table-cell" style:parent-style-name="Default" style:data-style-name="N164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02" style:family="table-cell" style:parent-style-name="Default" style:data-style-name="N164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03" style:family="table-cell" style:parent-style-name="Default" style:data-style-name="N164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04" style:family="table-cell" style:parent-style-name="Default" style:data-style-name="N164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05" style:family="table-cell" style:parent-style-name="Default" style:data-style-name="N164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06" style:family="table-cell" style:parent-style-name="Default" style:data-style-name="N0">
      <style:table-cell-properties fo:border-bottom="none" fo:background-color="#666600" style:diagonal-bl-tr="none" style:diagonal-tl-br="none" style:text-align-source="fix" style:repeat-content="false" fo:wrap-option="no-wrap" fo:border-left="2.49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7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2.49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 style:data-style-name="N0">
      <style:table-cell-properties fo:border-bottom="none" fo:background-color="#e6e64c" style:diagonal-bl-tr="none" style:diagonal-tl-br="none" style:text-align-source="fix" style:repeat-content="false" fo:wrap-option="no-wrap" fo:border-left="2.49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2.49pt solid #000000" fo:padding="0.0138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2.49pt solid #000000" fo:padding="0.0138in" fo:border-right="none" style:rotation-angle="0" style:rotation-align="none" fo:border-top="0.99pt solid #6666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12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name-asian="Arial Unicode MS" style:font-size-asian="8pt" style:font-style-asian="normal" style:font-weight-asian="bold" style:font-name-complex="Tahoma" style:font-size-complex="8pt" style:font-style-complex="normal" style:font-weight-complex="bold"/>
    </style:style>
    <style:style style:name="ce43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" style:font-size-complex="8pt" style:font-style-complex="normal" style:font-weight-complex="normal"/>
      <style:map style:condition="is-true-formula([.S34]=0)" style:apply-style-name="DeadNBurried" style:base-cell-address="Finalists.M34"/>
      <style:map style:condition="is-true-formula(COUNTIF([.M$3:.M$34]; [.T34]) &gt; 0)" style:apply-style-name="SeededVsSeeded" style:base-cell-address="Finalists.M34"/>
      <style:map style:condition="is-true-formula([.S34]=1)" style:apply-style-name="AliveNWell" style:base-cell-address="Finalists.M34"/>
    </style:style>
    <style:style style:name="ce43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S34]=0)" style:apply-style-name="DeadNBurried" style:base-cell-address="Finalists.M34"/>
      <style:map style:condition="is-true-formula(COUNTIF([.M$3:.M$34]; [.T34]) &gt; 0)" style:apply-style-name="SeededVsSeeded" style:base-cell-address="Finalists.M34"/>
      <style:map style:condition="is-true-formula([.S34]=1)" style:apply-style-name="AliveNWell" style:base-cell-address="Finalists.M34"/>
    </style:style>
    <style:style style:name="ce436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S34]=0)" style:apply-style-name="DeadNBurried" style:base-cell-address="Finalists.M34"/>
      <style:map style:condition="is-true-formula(COUNTIF([.M$3:.M$34]; [.T34]) &gt; 0)" style:apply-style-name="SeededVsSeeded" style:base-cell-address="Finalists.M34"/>
      <style:map style:condition="is-true-formula([.S34]=1)" style:apply-style-name="AliveNWell" style:base-cell-address="Finalists.M34"/>
    </style:style>
    <style:style style:name="ce437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2.49pt solid #000000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S34]=0)" style:apply-style-name="DeadNBurried" style:base-cell-address="Finalists.M34"/>
      <style:map style:condition="is-true-formula(COUNTIF([.M$3:.M$34]; [.T34]) &gt; 0)" style:apply-style-name="SeededVsSeeded" style:base-cell-address="Finalists.M34"/>
      <style:map style:condition="is-true-formula([.S34]=1)" style:apply-style-name="AliveNWell" style:base-cell-address="Finalists.M34"/>
    </style:style>
    <style:style style:name="ce217" style:family="table-cell" style:parent-style-name="Default" style:data-style-name="N164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8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138in" fo:border-right="none" style:rotation-angle="0" style:rotation-align="none" fo:border-top="0.99pt solid #6666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 style:data-style-name="N156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 style:data-style-name="N156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 style:data-style-name="N156">
      <style:table-cell-properties fo:border-bottom="none" fo:background-color="#b3b300" style:diagonal-bl-tr="none" style:diagonal-tl-br="none" style:text-align-source="fix" style:repeat-content="false" fo:wrap-option="no-wrap" fo:border-left="none" fo:padding="0.0138in" fo:border-right="none" style:rotation-angle="0" style:rotation-align="none" fo:border-top="0.99pt solid #6666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 style:data-style-name="N15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COUNTIF([.M$3:.M$34]; [.T34]) &gt; 0)" style:apply-style-name="Seeded" style:base-cell-address="Finalists.T34"/>
    </style:style>
    <style:style style:name="ce44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COUNTIF([.M$3:.M$34]; [.T34]) &gt; 0)" style:apply-style-name="Seeded" style:base-cell-address="Finalists.T34"/>
    </style:style>
    <style:style style:name="ce446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COUNTIF([.M$3:.M$34]; [.T34]) &gt; 0)" style:apply-style-name="Seeded" style:base-cell-address="Finalists.T34"/>
    </style:style>
    <style:style style:name="ce226" style:family="table-cell" style:parent-style-name="Default" style:data-style-name="N156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 style:data-style-name="N156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9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138in" fo:border-right="0.99pt solid #6666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0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138in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1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138in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2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0138in" fo:border-right="0.99pt solid #666600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3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4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6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B$12]=[.B$9])" style:apply-style-name="StatMComplete" style:base-cell-address="Stats.B4"/>
      <style:map style:condition="is-true-formula(NOT([.B$12]=[.B$9]))" style:apply-style-name="StatMUncomplete" style:base-cell-address="Stats.B4"/>
    </style:style>
    <style:style style:name="ce477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B$12]=[.B$9])" style:apply-style-name="StatMComplete" style:base-cell-address="Stats.B4"/>
      <style:map style:condition="is-true-formula(NOT([.B$12]=[.B$9]))" style:apply-style-name="StatMUncomplete" style:base-cell-address="Stats.B4"/>
    </style:style>
    <style:style style:name="ce25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138in" fo:border-right="none" style:rotation-angle="0" style:rotation-align="none" fo:border-top="0.99pt solid #666600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C$12]=[.C$9])" style:apply-style-name="StatWComplete" style:base-cell-address="Stats.C4"/>
      <style:map style:condition="is-true-formula(NOT([.C$12]=[.C$9]))" style:apply-style-name="StatWUncomplete" style:base-cell-address="Stats.C4"/>
    </style:style>
    <style:style style:name="ce482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C$12]=[.C$9])" style:apply-style-name="StatWComplete" style:base-cell-address="Stats.C4"/>
      <style:map style:condition="is-true-formula(NOT([.C$12]=[.C$9]))" style:apply-style-name="StatWUncomplete" style:base-cell-address="Stats.C4"/>
    </style:style>
    <style:style style:name="ce475" style:family="table-cell" style:parent-style-name="Default" style:data-style-name="N1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B$12]=[.B$9])" style:apply-style-name="StatMComplete" style:base-cell-address="Stats.B4"/>
      <style:map style:condition="is-true-formula(NOT([.B$12]=[.B$9]))" style:apply-style-name="StatMUncomplete" style:base-cell-address="Stats.B4"/>
    </style:style>
    <style:style style:name="ce478" style:family="table-cell" style:parent-style-name="Default" style:data-style-name="N1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C$12]=[.C$9])" style:apply-style-name="StatWComplete" style:base-cell-address="Stats.C4"/>
      <style:map style:condition="is-true-formula(NOT([.C$12]=[.C$9]))" style:apply-style-name="StatWUncomplete" style:base-cell-address="Stats.C4"/>
    </style:style>
    <style:style style:name="ce479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F$12]=[.F$9])" style:apply-style-name="StatMComplete" style:base-cell-address="Stats.F10"/>
      <style:map style:condition="is-true-formula(NOT([.F$12]=[.F$9]))" style:apply-style-name="StatMUncomplete" style:base-cell-address="Stats.F10"/>
    </style:style>
    <style:style style:name="ce480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" style:font-size-complex="8pt" style:font-style-complex="normal" style:font-weight-complex="normal"/>
      <style:map style:condition="is-true-formula([.B$12]=[.B$9])" style:apply-style-name="StatMComplete" style:base-cell-address="Stats.B4"/>
      <style:map style:condition="is-true-formula(NOT([.B$12]=[.B$9]))" style:apply-style-name="StatMUncomplete" style:base-cell-address="Stats.B4"/>
    </style:style>
    <style:style style:name="ce48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" style:font-size-complex="8pt" style:font-style-complex="normal" style:font-weight-complex="normal"/>
      <style:map style:condition="is-true-formula([.C$12]=[.C$9])" style:apply-style-name="StatWComplete" style:base-cell-address="Stats.C4"/>
      <style:map style:condition="is-true-formula(NOT([.C$12]=[.C$9]))" style:apply-style-name="StatWUncomplete" style:base-cell-address="Stats.C4"/>
    </style:style>
    <style:style style:name="ce266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67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68" style:family="table-cell" style:parent-style-name="Default">
      <style:text-properties fo:color="#000000" style:font-name="Thorndale" fo:font-size="8pt" style:font-size-asian="8pt" style:font-size-complex="8pt"/>
    </style:style>
    <style:style style:name="ce229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0" style:family="table-cell" style:parent-style-name="Default" style:data-style-name="N100">
      <style:table-cell-properties fo:border-bottom="none" fo:background-color="#e6e64c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1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 style:data-style-name="N100">
      <style:table-cell-properties fo:border-bottom="none" fo:background-color="#b3b300" style:diagonal-bl-tr="none" style:diagonal-tl-br="none" style:text-align-source="fix" style:repeat-content="false" fo:wrap-option="no-wrap" fo:border-left="none" fo:padding="0.0138in" fo:border-right="0.99pt solid #666600" style:rotation-angle="0" style:rotation-align="none" fo:border-top="0.99pt solid #6666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4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VALUE([.E34])&gt;VALUE([.B34]))" style:apply-style-name="ColorBlue" style:base-cell-address="Stats.B34"/>
      <style:map style:condition="is-true-formula(VALUE([.E34])&lt;VALUE([.B34]))" style:apply-style-name="ColorRed" style:base-cell-address="Stats.B34"/>
    </style:style>
    <style:style style:name="ce455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VALUE([.E34])&gt;VALUE([.B34]))" style:apply-style-name="ColorBlue" style:base-cell-address="Stats.B34"/>
      <style:map style:condition="is-true-formula(VALUE([.E34])&lt;VALUE([.B34]))" style:apply-style-name="ColorRed" style:base-cell-address="Stats.B34"/>
    </style:style>
    <style:style style:name="ce456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VALUE([.E34])&gt;VALUE([.B34]))" style:apply-style-name="ColorBlue" style:base-cell-address="Stats.B34"/>
      <style:map style:condition="is-true-formula(VALUE([.E34])&lt;VALUE([.B34]))" style:apply-style-name="ColorRed" style:base-cell-address="Stats.B34"/>
    </style:style>
    <style:style style:name="ce491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H34]=0)" style:apply-style-name="DeadNBurried" style:base-cell-address="Stats.C34"/>
      <style:map style:condition="is-true-formula(VALUE([.B34]) &gt; 0)" style:apply-style-name="SeededVsSeeded" style:base-cell-address="Stats.C34"/>
      <style:map style:condition="is-true-formula([.H34]=1)" style:apply-style-name="Default" style:base-cell-address="Stats.C34"/>
    </style:style>
    <style:style style:name="ce492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H34]=0)" style:apply-style-name="DeadNBurried" style:base-cell-address="Stats.C34"/>
      <style:map style:condition="is-true-formula(VALUE([.B34]) &gt; 0)" style:apply-style-name="SeededVsSeeded" style:base-cell-address="Stats.C34"/>
      <style:map style:condition="is-true-formula([.H34]=1)" style:apply-style-name="Default" style:base-cell-address="Stats.C34"/>
    </style:style>
    <style:style style:name="ce493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2.49pt solid #000000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H34]=0)" style:apply-style-name="DeadNBurried" style:base-cell-address="Stats.C34"/>
      <style:map style:condition="is-true-formula(VALUE([.B34]) &gt; 0)" style:apply-style-name="SeededVsSeeded" style:base-cell-address="Stats.C34"/>
      <style:map style:condition="is-true-formula([.H34]=1)" style:apply-style-name="Default" style:base-cell-address="Stats.C34"/>
    </style:style>
    <style:style style:name="ce460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VALUE([.E34])&gt;VALUE([.B34]))" style:apply-style-name="ColorBlue" style:base-cell-address="Stats.E34"/>
      <style:map style:condition="is-true-formula(VALUE([.E34])&lt;VALUE([.B34]))" style:apply-style-name="ColorRed" style:base-cell-address="Stats.E34"/>
    </style:style>
    <style:style style:name="ce46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VALUE([.E34])&gt;VALUE([.B34]))" style:apply-style-name="ColorBlue" style:base-cell-address="Stats.E34"/>
      <style:map style:condition="is-true-formula(VALUE([.E34])&lt;VALUE([.B34]))" style:apply-style-name="ColorRed" style:base-cell-address="Stats.E34"/>
    </style:style>
    <style:style style:name="ce462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="0.0138in" fo:border-right="none" style:rotation-angle="0" style:rotation-align="none" fo:border-top="2.49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VALUE([.E34])&gt;VALUE([.B34]))" style:apply-style-name="ColorBlue" style:base-cell-address="Stats.E34"/>
      <style:map style:condition="is-true-formula(VALUE([.E34])&lt;VALUE([.B34]))" style:apply-style-name="ColorRed" style:base-cell-address="Stats.E34"/>
    </style:style>
    <style:style style:name="ce242" style:family="table-cell" style:parent-style-name="Default" style:data-style-name="N166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3" style:family="table-cell" style:parent-style-name="Default" style:data-style-name="N166">
      <style:table-cell-properties fo:background-color="#ffff99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4" style:family="table-cell" style:parent-style-name="Default" style:data-style-name="N166">
      <style:table-cell-properties style:text-align-source="fix" style:repeat-content="false"/>
      <style:paragraph-properties fo:text-align="center" fo:margin-left="0in"/>
    </style:style>
    <style:style style:name="ce50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 AND (VALUE([.B34]) &gt; 0; VALUE([.I34]) &gt; 0))" style:apply-style-name="SeededVsSeeded" style:base-cell-address="Stats.J34"/>
    </style:style>
    <style:style style:name="ce501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 AND (VALUE([.B34]) &gt; 0; VALUE([.I34]) &gt; 0))" style:apply-style-name="SeededVsSeeded" style:base-cell-address="Stats.J34"/>
    </style:style>
    <style:style style:name="ce502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2.49pt solid #000000" style:vertical-align="automatic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 AND (VALUE([.B34]) &gt; 0; VALUE([.I34]) &gt; 0))" style:apply-style-name="SeededVsSeeded" style:base-cell-address="Stats.J34"/>
    </style:style>
    <style:style style:name="ce248" style:family="table-cell" style:parent-style-name="Default">
      <style:text-properties style:font-name="Arial" fo:font-size="10pt" style:font-size-asian="10pt" style:font-size-complex="10pt"/>
    </style:style>
    <style:style style:name="ce269" style:family="table-cell" style:parent-style-name="Default">
      <style:text-properties style:font-name="Arial" style:font-name-asian="Arial Unicode MS" style:font-name-complex="Tahoma"/>
    </style:style>
    <style:style style:name="gr1" style:family="graphic" style:parent-style-name="Default">
      <style:graphic-properties draw:stroke="none" svg:stroke-color="#000000" draw:fill="gradient" draw:fill-color="#ffffff" draw:fill-gradient-name="Square_20_yellow_2f_white" fo:min-height="0.2354in" loext:decorative="false"/>
      <style:paragraph-properties style:writing-mode="lr-tb"/>
      <style:text-properties fo:font-family="Classicheavy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gr2" style:family="graphic" style:parent-style-name="Default">
      <style:graphic-properties draw:stroke="none" svg:stroke-color="#000000" draw:fill="gradient" draw:fill-color="#ffffff" draw:fill-gradient-name="Square_20_yellow_2f_white" fo:min-height="0.2319in" loext:decorative="false"/>
      <style:paragraph-properties style:writing-mode="lr-tb"/>
      <style:text-properties fo:font-family="Classicheavy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loext:decorative="false"/>
    </style:style>
    <style:style style:name="P1" style:family="paragraph">
      <loext:graphic-properties draw:fill="gradient" draw:fill-color="#ffffff" draw:fill-gradient-name="Square_20_yellow_2f_white"/>
      <style:text-properties fo:font-family="Classicheavy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font-family="Classicheavy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table table:name="Fin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5" table:default-cell-style-name="Default"/>
        <table:table-column table:style-name="co7" table:default-cell-style-name="ce78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78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5" table:default-cell-style-name="Default"/>
        <table:table-column table:style-name="co7" table:default-cell-style-name="ce78"/>
        <table:table-column table:style-name="co20" table:default-cell-style-name="ce126"/>
        <table:table-row table:style-name="ro1">
          <table:table-cell table:number-columns-repeated="39"/>
          <table:table-cell table:style-name="ce194"/>
        </table:table-row>
        <table:table-row table:style-name="ro2">
          <table:table-cell table:style-name="ce1" office:value-type="string" calcext:value-type="string" table:number-columns-spanned="9" table:number-rows-spanned="1">
            <text:p>Pre-Quarter Final</text:p>
          </table:table-cell>
          <table:covered-table-cell table:number-columns-repeated="8"/>
          <table:table-cell/>
          <table:table-cell table:style-name="ce1" office:value-type="string" calcext:value-type="string" table:number-columns-spanned="9" table:number-rows-spanned="1">
            <text:p>Quarter Final</text:p>
          </table:table-cell>
          <table:covered-table-cell table:number-columns-repeated="8"/>
          <table:table-cell/>
          <table:table-cell table:style-name="ce1" office:value-type="string" calcext:value-type="string" table:number-columns-spanned="9" table:number-rows-spanned="1">
            <text:p>Semi Final</text:p>
          </table:table-cell>
          <table:covered-table-cell table:number-columns-repeated="8"/>
          <table:table-cell/>
          <table:table-cell table:style-name="ce1" office:value-type="string" calcext:value-type="string" table:number-columns-spanned="9" table:number-rows-spanned="1">
            <text:p>Final</text:p>
          </table:table-cell>
          <table:covered-table-cell table:number-columns-repeated="8"/>
          <table:table-cell/>
        </table:table-row>
        <table:table-row table:style-name="ro3">
          <table:table-cell table:style-name="ce19" table:formula="of:=IF(NOT(ISBLANK([$ML.AE10])); [$ML.AE10]; &quot;&quot;)">
            <text:p/>
          </table:table-cell>
          <table:table-cell table:style-name="ce157" table:formula="of:=IF(NOT(ISBLANK([$ML.AF10])); [$ML.AF10]; &quot;&quot;)">
            <text:p/>
          </table:table-cell>
          <table:table-cell table:style-name="ce159" table:formula="of:=IF(NOT(ISBLANK([$ML.AG10])); [$ML.AG10]; &quot;&quot;)">
            <text:p/>
          </table:table-cell>
          <table:table-cell table:style-name="ce290" table:number-columns-repeated="5"/>
          <table:table-cell table:style-name="ce292" table:formula="of:=ISWINNERMEN([.D3:.H3]; [.D4:.H4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07" table:formula="of:=IF(NOT(ISBLANK([$ML.AE11])); [$ML.AE11]; &quot;&quot;)">
            <text:p/>
          </table:table-cell>
          <table:table-cell table:style-name="ce158" table:formula="of:=IF(NOT(ISBLANK([$ML.AF11])); [$ML.AF11]; &quot;&quot;)">
            <text:p/>
          </table:table-cell>
          <table:table-cell table:style-name="ce160" table:formula="of:=IF(NOT(ISBLANK([$ML.AG11])); [$ML.AG11]; &quot;&quot;)">
            <text:p/>
          </table:table-cell>
          <table:table-cell table:style-name="ce291" table:number-columns-repeated="5"/>
          <table:table-cell table:style-name="ce293" table:formula="of:=ISWINNERMEN([.D4:.H4]; [.D3:.H3])">
            <text:p/>
          </table:table-cell>
          <table:table-cell table:style-name="ce78"/>
          <table:table-cell table:style-name="ce294" table:formula="of:=IF([.$I3]=&quot;W&quot;; IF(NOT(ISBLANK([.A3])); [.A3]; &quot;&quot;); IF([.$I4]=&quot;W&quot;; IF(NOT(ISBLANK([.A4])); [.A4]; &quot;&quot;); &quot;&quot;))">
            <text:p/>
          </table:table-cell>
          <table:table-cell table:style-name="ce157" table:formula="of:=IF([.$I3]=&quot;W&quot;; IF(NOT(ISBLANK([.B3])); [.B3]; &quot;&quot;); IF([.$I4]=&quot;W&quot;; IF(NOT(ISBLANK([.B4])); [.B4]; &quot;&quot;); &quot;&quot;))">
            <text:p/>
          </table:table-cell>
          <table:table-cell table:style-name="ce296" table:formula="of:=IF(AND(NOT(ISBLANK([.C3])); [.C3]=[.C4]); [.C3]; (IF([.$I3]=&quot;W&quot;; IF(NOT(ISBLANK([.C3])); [.C3]; &quot;&quot;); IF([.$I4]=&quot;W&quot;; IF(NOT(ISBLANK([.C4])); [.C4]; &quot;&quot;); &quot;&quot;))))">
            <text:p/>
          </table:table-cell>
          <table:table-cell table:style-name="ce299" table:number-columns-repeated="5"/>
          <table:table-cell table:style-name="ce292" table:formula="of:=ISWINNERMEN([.N4:.R4]; [.N5:.R5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08" table:formula="of:=IF(NOT(ISBLANK([$ML.AE26])); [$ML.AE26]; &quot;&quot;)">
            <text:p/>
          </table:table-cell>
          <table:table-cell table:style-name="ce157" table:formula="of:=IF(NOT(ISBLANK([$ML.AF26])); [$ML.AF26]; &quot;&quot;)">
            <text:p/>
          </table:table-cell>
          <table:table-cell table:style-name="ce161" table:formula="of:=IF(NOT(ISBLANK([$ML.AG26])); [$ML.AG26]; &quot;&quot;)">
            <text:p/>
          </table:table-cell>
          <table:table-cell table:style-name="ce290" table:number-columns-repeated="5"/>
          <table:table-cell table:style-name="ce292" table:formula="of:=ISWINNERMEN([.D5:.H5]; [.D6:.H6])">
            <text:p/>
          </table:table-cell>
          <table:table-cell table:style-name="ce78"/>
          <table:table-cell table:style-name="ce295" table:formula="of:=IF([.$I5]=&quot;W&quot;; IF(NOT(ISBLANK([.A5])); [.A5]; &quot;&quot;); IF([.$I6]=&quot;W&quot;; IF(NOT(ISBLANK([.A6])); [.A6]; &quot;&quot;); &quot;&quot;))">
            <text:p/>
          </table:table-cell>
          <table:table-cell table:style-name="ce158" table:formula="of:=IF([.$I5]=&quot;W&quot;; IF(NOT(ISBLANK([.B5])); [.B5]; &quot;&quot;); IF([.$I6]=&quot;W&quot;; IF(NOT(ISBLANK([.B6])); [.B6]; &quot;&quot;); &quot;&quot;))">
            <text:p/>
          </table:table-cell>
          <table:table-cell table:style-name="ce297" table:formula="of:=IF(AND(NOT(ISBLANK([.C5])); [.C5]=[.C6]); [.C5]; IF([.$I5]=&quot;W&quot;; IF(NOT(ISBLANK([.C5])); [.C5]; &quot;&quot;); IF([.$I6]=&quot;W&quot;; IF(NOT(ISBLANK([.C6])); [.C6]; &quot;&quot;); &quot;&quot;)))">
            <text:p/>
          </table:table-cell>
          <table:table-cell table:style-name="ce300" table:number-columns-repeated="5"/>
          <table:table-cell table:style-name="ce293" table:formula="of:=ISWINNERMEN([.N5:.R5]; [.N4:.R4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09" table:formula="of:=IF(NOT(ISBLANK([$ML.AE27])); [$ML.AE27]; &quot;&quot;)">
            <text:p/>
          </table:table-cell>
          <table:table-cell table:style-name="ce158" table:formula="of:=IF(NOT(ISBLANK([$ML.AF27])); [$ML.AF27]; &quot;&quot;)">
            <text:p/>
          </table:table-cell>
          <table:table-cell table:style-name="ce233" table:formula="of:=IF(NOT(ISBLANK([$ML.AG27])); [$ML.AG27]; &quot;&quot;)">
            <text:p/>
          </table:table-cell>
          <table:table-cell table:style-name="ce291" table:number-columns-repeated="5"/>
          <table:table-cell table:style-name="ce293" table:formula="of:=ISWINNERMEN([.D6:.H6]; [.D5:.H5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2" table:formula="of:=IF([.$S4]=&quot;W&quot;; IF(NOT(ISBLANK([.K4])); [.K4]; &quot;&quot;); IF([.$S5]=&quot;W&quot;; IF(NOT(ISBLANK([.K5])); [.K5]; &quot;&quot;); &quot;&quot;))">
            <text:p/>
          </table:table-cell>
          <table:table-cell table:style-name="ce157" table:formula="of:=IF([.$S4]=&quot;W&quot;; IF(NOT(ISBLANK([.L4])); [.L4]; &quot;&quot;); IF([.$S5]=&quot;W&quot;; IF(NOT(ISBLANK([.L5])); [.L5]; &quot;&quot;); &quot;&quot;))">
            <text:p/>
          </table:table-cell>
          <table:table-cell table:style-name="ce304" table:formula="of:=IF(AND(NOT(ISBLANK([.M4])); [.M4]=[.M5]); [.M4]; IF([.$S4]=&quot;W&quot;; IF(NOT(ISBLANK([.M4])); [.M4]; &quot;&quot;); IF([.$S5]=&quot;W&quot;; IF(NOT(ISBLANK([.M5])); [.M5]; &quot;&quot;); &quot;&quot;)))">
            <text:p/>
          </table:table-cell>
          <table:table-cell table:style-name="ce299" table:number-columns-repeated="5"/>
          <table:table-cell table:style-name="ce292" table:formula="of:=ISWINNERMEN([.X6:.AB6]; [.X7:.AB7])">
            <text:p/>
          </table:table-cell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11" table:formula="of:=IF(NOT(ISBLANK([$ML.AE42])); [$ML.AE42]; &quot;&quot;)">
            <text:p/>
          </table:table-cell>
          <table:table-cell table:style-name="ce157" table:formula="of:=IF(NOT(ISBLANK([$ML.AF42])); [$ML.AF42]; &quot;&quot;)">
            <text:p/>
          </table:table-cell>
          <table:table-cell table:style-name="ce234" table:formula="of:=IF(NOT(ISBLANK([$ML.AG42])); [$ML.AG42]; &quot;&quot;)">
            <text:p/>
          </table:table-cell>
          <table:table-cell table:style-name="ce290" table:number-columns-repeated="5"/>
          <table:table-cell table:style-name="ce292" table:formula="of:=ISWINNERMEN([.D7:.H7]; [.D8:.H8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3" table:formula="of:=IF([.$S8]=&quot;W&quot;; IF(NOT(ISBLANK([.K8])); [.K8]; &quot;&quot;); IF([.$S9]=&quot;W&quot;; IF(NOT(ISBLANK([.K9])); [.K9]; &quot;&quot;); &quot;&quot;))">
            <text:p/>
          </table:table-cell>
          <table:table-cell table:style-name="ce158" table:formula="of:=IF([.$S8]=&quot;W&quot;; IF(NOT(ISBLANK([.L8])); [.L8]; &quot;&quot;); IF([.$S9]=&quot;W&quot;; IF(NOT(ISBLANK([.L9])); [.L9]; &quot;&quot;); &quot;&quot;))">
            <text:p/>
          </table:table-cell>
          <table:table-cell table:style-name="ce305" table:formula="of:=IF(AND(NOT(ISBLANK([.M8])); [.M8]=[.M9]); [.M8]; IF([.$S8]=&quot;W&quot;; IF(NOT(ISBLANK([.M8])); [.M8]; &quot;&quot;); IF([.$S9]=&quot;W&quot;; IF(NOT(ISBLANK([.M9])); [.M9]; &quot;&quot;); &quot;&quot;)))">
            <text:p/>
          </table:table-cell>
          <table:table-cell table:style-name="ce300" table:number-columns-repeated="5"/>
          <table:table-cell table:style-name="ce293" table:formula="of:=ISWINNERMEN([.X7:.AB7]; [.X6:.AB6])">
            <text:p/>
          </table:table-cell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12" table:formula="of:=IF(NOT(ISBLANK([$ML.AE43])); [$ML.AE43]; &quot;&quot;)">
            <text:p/>
          </table:table-cell>
          <table:table-cell table:style-name="ce158" table:formula="of:=IF(NOT(ISBLANK([$ML.AF43])); [$ML.AF43]; &quot;&quot;)">
            <text:p/>
          </table:table-cell>
          <table:table-cell table:style-name="ce235" table:formula="of:=IF(NOT(ISBLANK([$ML.AG43])); [$ML.AG43]; &quot;&quot;)">
            <text:p/>
          </table:table-cell>
          <table:table-cell table:style-name="ce291" table:number-columns-repeated="5"/>
          <table:table-cell table:style-name="ce293" table:formula="of:=ISWINNERMEN([.D8:.H8]; [.D7:.H7])">
            <text:p/>
          </table:table-cell>
          <table:table-cell table:style-name="ce78"/>
          <table:table-cell table:style-name="ce294" table:formula="of:=IF([.$I7]=&quot;W&quot;; IF(NOT(ISBLANK([.A7])); [.A7]; &quot;&quot;); IF([.$I8]=&quot;W&quot;; IF(NOT(ISBLANK([.A8])); [.A8]; &quot;&quot;); &quot;&quot;))">
            <text:p/>
          </table:table-cell>
          <table:table-cell table:style-name="ce157" table:formula="of:=IF([.$I7]=&quot;W&quot;; IF(NOT(ISBLANK([.B7])); [.B7]; &quot;&quot;); IF([.$I8]=&quot;W&quot;; IF(NOT(ISBLANK([.B8])); [.B8]; &quot;&quot;); &quot;&quot;))">
            <text:p/>
          </table:table-cell>
          <table:table-cell table:style-name="ce296" table:formula="of:=IF(AND(NOT(ISBLANK([.C7])); [.C7]=[.C8]); [.C7]; (IF([.$I7]=&quot;W&quot;; IF(NOT(ISBLANK([.C7])); [.C7]; &quot;&quot;); IF([.$I8]=&quot;W&quot;; IF(NOT(ISBLANK([.C8])); [.C8]; &quot;&quot;); &quot;&quot;))))">
            <text:p/>
          </table:table-cell>
          <table:table-cell table:style-name="ce299" table:number-columns-repeated="5"/>
          <table:table-cell table:style-name="ce292" table:formula="of:=ISWINNERMEN([.N8:.R8]; [.N9:.R9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13" table:formula="of:=IF(NOT(ISBLANK([$ML.AE58])); [$ML.AE58]; &quot;&quot;)">
            <text:p/>
          </table:table-cell>
          <table:table-cell table:style-name="ce157" table:formula="of:=IF(NOT(ISBLANK([$ML.AF58])); [$ML.AF58]; &quot;&quot;)">
            <text:p/>
          </table:table-cell>
          <table:table-cell table:style-name="ce239" table:formula="of:=IF(NOT(ISBLANK([$ML.AG58])); [$ML.AG58]; &quot;&quot;)">
            <text:p/>
          </table:table-cell>
          <table:table-cell table:style-name="ce290" table:number-columns-repeated="5"/>
          <table:table-cell table:style-name="ce292" table:formula="of:=ISWINNERMEN([.D9:.H9]; [.D10:.H10])">
            <text:p/>
          </table:table-cell>
          <table:table-cell table:style-name="ce78"/>
          <table:table-cell table:style-name="ce295" table:formula="of:=IF([.$I9]=&quot;W&quot;; IF(NOT(ISBLANK([.A9])); [.A9]; &quot;&quot;); IF([.$I10]=&quot;W&quot;; IF(NOT(ISBLANK([.A10])); [.A10]; &quot;&quot;); &quot;&quot;))">
            <text:p/>
          </table:table-cell>
          <table:table-cell table:style-name="ce158" table:formula="of:=IF([.$I9]=&quot;W&quot;; IF(NOT(ISBLANK([.B9])); [.B9]; &quot;&quot;); IF([.$I10]=&quot;W&quot;; IF(NOT(ISBLANK([.B10])); [.B10]; &quot;&quot;); &quot;&quot;))">
            <text:p/>
          </table:table-cell>
          <table:table-cell table:style-name="ce297" table:formula="of:=IF(AND(NOT(ISBLANK([.C9])); [.C9]=[.C10]); [.C9]; IF([.$I9]=&quot;W&quot;; IF(NOT(ISBLANK([.C9])); [.C9]; &quot;&quot;); IF([.$I10]=&quot;W&quot;; IF(NOT(ISBLANK([.C10])); [.C10]; &quot;&quot;); &quot;&quot;)))">
            <text:p/>
          </table:table-cell>
          <table:table-cell table:style-name="ce300" table:number-columns-repeated="5"/>
          <table:table-cell table:style-name="ce293" table:formula="of:=ISWINNERMEN([.N9:.R9]; [.N8:.R8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20" table:formula="of:=IF(NOT(ISBLANK([$ML.AE59])); [$ML.AE59]; &quot;&quot;)">
            <text:p/>
          </table:table-cell>
          <table:table-cell table:style-name="ce158" table:formula="of:=IF(NOT(ISBLANK([$ML.AF59])); [$ML.AF59]; &quot;&quot;)">
            <text:p/>
          </table:table-cell>
          <table:table-cell table:style-name="ce240" table:formula="of:=IF(NOT(ISBLANK([$ML.AG59])); [$ML.AG59]; &quot;&quot;)">
            <text:p/>
          </table:table-cell>
          <table:table-cell table:style-name="ce291" table:number-columns-repeated="5"/>
          <table:table-cell table:style-name="ce293" table:formula="of:=ISWINNERMEN([.D10:.H10]; [.D9:.H9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6" table:formula="of:=IF([.$AC6]=&quot;W&quot;; IF(NOT(ISBLANK([.U6])); [.U6]; &quot;&quot;); IF([.$AC7]=&quot;W&quot;; IF(NOT(ISBLANK([.U7])); [.U7]; &quot;&quot;); &quot;&quot;))">
            <text:p/>
          </table:table-cell>
          <table:table-cell table:style-name="ce157" table:formula="of:=IF([.$AC6]=&quot;W&quot;; IF(NOT(ISBLANK([.V6])); [.V6]; &quot;&quot;); IF([.$AC7]=&quot;W&quot;; IF(NOT(ISBLANK([.V7])); [.V7]; &quot;&quot;); &quot;&quot;))">
            <text:p/>
          </table:table-cell>
          <table:table-cell table:style-name="ce310" table:formula="of:=IF(AND(NOT(ISBLANK([.W6])); [.W6]=[.W7]); [.W6]; IF([.$AC6]=&quot;W&quot;; IF(NOT(ISBLANK([.W6])); [.W6]; &quot;&quot;); IF([.$AC7]=&quot;W&quot;; IF(NOT(ISBLANK([.W7])); [.W7]; &quot;&quot;); &quot;&quot;)))">
            <text:p/>
          </table:table-cell>
          <table:table-cell table:style-name="ce299" table:number-columns-repeated="5"/>
          <table:table-cell table:style-name="ce292" table:formula="of:=ISWINNERMEN([.AH10:.AL10]; [.AH11:.AL11])">
            <text:p/>
          </table:table-cell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21" table:formula="of:=IF(NOT(ISBLANK([$ML.AE74])); [$ML.AE74]; &quot;&quot;)">
            <text:p/>
          </table:table-cell>
          <table:table-cell table:style-name="ce157" table:formula="of:=IF(NOT(ISBLANK([$ML.AF74])); [$ML.AF74]; &quot;&quot;)">
            <text:p/>
          </table:table-cell>
          <table:table-cell table:style-name="ce241" table:formula="of:=IF(NOT(ISBLANK([$ML.AG74])); [$ML.AG74]; &quot;&quot;)">
            <text:p/>
          </table:table-cell>
          <table:table-cell table:style-name="ce290" table:number-columns-repeated="5"/>
          <table:table-cell table:style-name="ce292" table:formula="of:=ISWINNERMEN([.D11:.H11]; [.D12:.H12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7" table:formula="of:=IF([.$AC14]=&quot;W&quot;; IF(NOT(ISBLANK([.U14])); [.U14]; &quot;&quot;); IF([.$AC15]=&quot;W&quot;; IF(NOT(ISBLANK([.U15])); [.U15]; &quot;&quot;); &quot;&quot;))">
            <text:p/>
          </table:table-cell>
          <table:table-cell table:style-name="ce158" table:formula="of:=IF([.$AC14]=&quot;W&quot;; IF(NOT(ISBLANK([.V14])); [.V14]; &quot;&quot;); IF([.$AC15]=&quot;W&quot;; IF(NOT(ISBLANK([.V15])); [.V15]; &quot;&quot;); &quot;&quot;))">
            <text:p/>
          </table:table-cell>
          <table:table-cell table:style-name="ce311" table:formula="of:=IF(AND(NOT(ISBLANK([.W14])); [.W14]=[.W15]); [.W14]; IF([.$AC14]=&quot;W&quot;; IF(NOT(ISBLANK([.W14])); [.W14]; &quot;&quot;); IF([.$AC15]=&quot;W&quot;; IF(NOT(ISBLANK([.W15])); [.W15]; &quot;&quot;); &quot;&quot;)))">
            <text:p/>
          </table:table-cell>
          <table:table-cell table:style-name="ce300" table:number-columns-repeated="5"/>
          <table:table-cell table:style-name="ce293" table:formula="of:=ISWINNERMEN([.AH11:.AL11]; [.AH10:.AL10])">
            <text:p/>
          </table:table-cell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22" table:formula="of:=IF(NOT(ISBLANK([$ML.AE75])); [$ML.AE75]; &quot;&quot;)">
            <text:p/>
          </table:table-cell>
          <table:table-cell table:style-name="ce158" table:formula="of:=IF(NOT(ISBLANK([$ML.AF75])); [$ML.AF75]; &quot;&quot;)">
            <text:p/>
          </table:table-cell>
          <table:table-cell table:style-name="ce256" table:formula="of:=IF(NOT(ISBLANK([$ML.AG75])); [$ML.AG75]; &quot;&quot;)">
            <text:p/>
          </table:table-cell>
          <table:table-cell table:style-name="ce291" table:number-columns-repeated="5"/>
          <table:table-cell table:style-name="ce293" table:formula="of:=ISWINNERMEN([.D12:.H12]; [.D11:.H11])">
            <text:p/>
          </table:table-cell>
          <table:table-cell table:style-name="ce78"/>
          <table:table-cell table:style-name="ce294" table:formula="of:=IF([.$I11]=&quot;W&quot;; IF(NOT(ISBLANK([.A11])); [.A11]; &quot;&quot;); IF([.$I12]=&quot;W&quot;; IF(NOT(ISBLANK([.A12])); [.A12]; &quot;&quot;); &quot;&quot;))">
            <text:p/>
          </table:table-cell>
          <table:table-cell table:style-name="ce157" table:formula="of:=IF([.$I11]=&quot;W&quot;; IF(NOT(ISBLANK([.B11])); [.B11]; &quot;&quot;); IF([.$I12]=&quot;W&quot;; IF(NOT(ISBLANK([.B12])); [.B12]; &quot;&quot;); &quot;&quot;))">
            <text:p/>
          </table:table-cell>
          <table:table-cell table:style-name="ce296" table:formula="of:=IF(AND(NOT(ISBLANK([.C11])); [.C11]=[.C12]); [.C11]; (IF([.$I11]=&quot;W&quot;; IF(NOT(ISBLANK([.C11])); [.C11]; &quot;&quot;); IF([.$I12]=&quot;W&quot;; IF(NOT(ISBLANK([.C12])); [.C12]; &quot;&quot;); &quot;&quot;))))">
            <text:p/>
          </table:table-cell>
          <table:table-cell table:style-name="ce299" table:number-columns-repeated="5"/>
          <table:table-cell table:style-name="ce292" table:formula="of:=ISWINNERMEN([.N12:.R12]; [.N13:.R13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23" table:formula="of:=IF(NOT(ISBLANK([$ML.AE90])); [$ML.AE90]; &quot;&quot;)">
            <text:p/>
          </table:table-cell>
          <table:table-cell table:style-name="ce157" table:formula="of:=IF(NOT(ISBLANK([$ML.AF90])); [$ML.AF90]; &quot;&quot;)">
            <text:p/>
          </table:table-cell>
          <table:table-cell table:style-name="ce260" table:formula="of:=IF(NOT(ISBLANK([$ML.AG90])); [$ML.AG90]; &quot;&quot;)">
            <text:p/>
          </table:table-cell>
          <table:table-cell table:style-name="ce290" table:number-columns-repeated="5"/>
          <table:table-cell table:style-name="ce292" table:formula="of:=ISWINNERMEN([.D13:.H13]; [.D14:.H14])">
            <text:p/>
          </table:table-cell>
          <table:table-cell table:style-name="ce78"/>
          <table:table-cell table:style-name="ce295" table:formula="of:=IF([.$I13]=&quot;W&quot;; IF(NOT(ISBLANK([.A13])); [.A13]; &quot;&quot;); IF([.$I14]=&quot;W&quot;; IF(NOT(ISBLANK([.A14])); [.A14]; &quot;&quot;); &quot;&quot;))">
            <text:p/>
          </table:table-cell>
          <table:table-cell table:style-name="ce158" table:formula="of:=IF([.$I13]=&quot;W&quot;; IF(NOT(ISBLANK([.B13])); [.B13]; &quot;&quot;); IF([.$I14]=&quot;W&quot;; IF(NOT(ISBLANK([.B14])); [.B14]; &quot;&quot;); &quot;&quot;))">
            <text:p/>
          </table:table-cell>
          <table:table-cell table:style-name="ce297" table:formula="of:=IF(AND(NOT(ISBLANK([.C13])); [.C13]=[.C14]); [.C13]; IF([.$I13]=&quot;W&quot;; IF(NOT(ISBLANK([.C13])); [.C13]; &quot;&quot;); IF([.$I14]=&quot;W&quot;; IF(NOT(ISBLANK([.C14])); [.C14]; &quot;&quot;); &quot;&quot;)))">
            <text:p/>
          </table:table-cell>
          <table:table-cell table:style-name="ce300" table:number-columns-repeated="5"/>
          <table:table-cell table:style-name="ce293" table:formula="of:=ISWINNERMEN([.N13:.R13]; [.N12:.R12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24" table:formula="of:=IF(NOT(ISBLANK([$ML.AE91])); [$ML.AE91]; &quot;&quot;)">
            <text:p/>
          </table:table-cell>
          <table:table-cell table:style-name="ce158" table:formula="of:=IF(NOT(ISBLANK([$ML.AF91])); [$ML.AF91]; &quot;&quot;)">
            <text:p/>
          </table:table-cell>
          <table:table-cell table:style-name="ce261" table:formula="of:=IF(NOT(ISBLANK([$ML.AG91])); [$ML.AG91]; &quot;&quot;)">
            <text:p/>
          </table:table-cell>
          <table:table-cell table:style-name="ce291" table:number-columns-repeated="5"/>
          <table:table-cell table:style-name="ce293" table:formula="of:=ISWINNERMEN([.D14:.H14]; [.D13:.H13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2" table:formula="of:=IF([.$S12]=&quot;W&quot;; IF(NOT(ISBLANK([.K12])); [.K12]; &quot;&quot;); IF([.$S13]=&quot;W&quot;; IF(NOT(ISBLANK([.K13])); [.K13]; &quot;&quot;); &quot;&quot;))">
            <text:p/>
          </table:table-cell>
          <table:table-cell table:style-name="ce157" table:formula="of:=IF([.$S12]=&quot;W&quot;; IF(NOT(ISBLANK([.L12])); [.L12]; &quot;&quot;); IF([.$S13]=&quot;W&quot;; IF(NOT(ISBLANK([.L13])); [.L13]; &quot;&quot;); &quot;&quot;))">
            <text:p/>
          </table:table-cell>
          <table:table-cell table:style-name="ce304" table:formula="of:=IF(AND(NOT(ISBLANK([.M12])); [.M12]=[.M13]); [.M12]; IF([.$S12]=&quot;W&quot;; IF(NOT(ISBLANK([.M12])); [.M12]; &quot;&quot;); IF([.$S13]=&quot;W&quot;; IF(NOT(ISBLANK([.M13])); [.M13]; &quot;&quot;); &quot;&quot;)))">
            <text:p/>
          </table:table-cell>
          <table:table-cell table:style-name="ce299" table:number-columns-repeated="5"/>
          <table:table-cell table:style-name="ce292" table:formula="of:=ISWINNERMEN([.X14:.AB14]; [.X15:.AB15])">
            <text:p/>
          </table:table-cell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25" table:formula="of:=IF(NOT(ISBLANK([$ML.AE106])); [$ML.AE106]; &quot;&quot;)">
            <text:p/>
          </table:table-cell>
          <table:table-cell table:style-name="ce157" table:formula="of:=IF(NOT(ISBLANK([$ML.AF106])); [$ML.AF106]; &quot;&quot;)">
            <text:p/>
          </table:table-cell>
          <table:table-cell table:style-name="ce270" table:formula="of:=IF(NOT(ISBLANK([$ML.AG106])); [$ML.AG106]; &quot;&quot;)">
            <text:p/>
          </table:table-cell>
          <table:table-cell table:style-name="ce290" table:number-columns-repeated="5"/>
          <table:table-cell table:style-name="ce292" table:formula="of:=ISWINNERMEN([.D15:.H15]; [.D16:.H16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3" table:formula="of:=IF([.$S16]=&quot;W&quot;; IF(NOT(ISBLANK([.K16])); [.K16]; &quot;&quot;); IF([.$S17]=&quot;W&quot;; IF(NOT(ISBLANK([.K17])); [.K17]; &quot;&quot;); &quot;&quot;))">
            <text:p/>
          </table:table-cell>
          <table:table-cell table:style-name="ce158" table:formula="of:=IF([.$S16]=&quot;W&quot;; IF(NOT(ISBLANK([.L16])); [.L16]; &quot;&quot;); IF([.$S17]=&quot;W&quot;; IF(NOT(ISBLANK([.L17])); [.L17]; &quot;&quot;); &quot;&quot;))">
            <text:p/>
          </table:table-cell>
          <table:table-cell table:style-name="ce305" table:formula="of:=IF(AND(NOT(ISBLANK([.M16])); [.M16]=[.M17]); [.M16]; IF([.$S16]=&quot;W&quot;; IF(NOT(ISBLANK([.M16])); [.M16]; &quot;&quot;); IF([.$S17]=&quot;W&quot;; IF(NOT(ISBLANK([.M17])); [.M17]; &quot;&quot;); &quot;&quot;)))">
            <text:p/>
          </table:table-cell>
          <table:table-cell table:style-name="ce300" table:number-columns-repeated="5"/>
          <table:table-cell table:style-name="ce293" table:formula="of:=ISWINNERMEN([.X15:.AB15]; [.X14:.AB14])">
            <text:p/>
          </table:table-cell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28" table:formula="of:=IF(NOT(ISBLANK([$ML.AE107])); [$ML.AE107]; &quot;&quot;)">
            <text:p/>
          </table:table-cell>
          <table:table-cell table:style-name="ce158" table:formula="of:=IF(NOT(ISBLANK([$ML.AF107])); [$ML.AF107]; &quot;&quot;)">
            <text:p/>
          </table:table-cell>
          <table:table-cell table:style-name="ce271" table:formula="of:=IF(NOT(ISBLANK([$ML.AG107])); [$ML.AG107]; &quot;&quot;)">
            <text:p/>
          </table:table-cell>
          <table:table-cell table:style-name="ce291" table:number-columns-repeated="5"/>
          <table:table-cell table:style-name="ce293" table:formula="of:=ISWINNERMEN([.D16:.H16]; [.D15:.H15])">
            <text:p/>
          </table:table-cell>
          <table:table-cell table:style-name="ce78"/>
          <table:table-cell table:style-name="ce294" table:formula="of:=IF([.$I15]=&quot;W&quot;; IF(NOT(ISBLANK([.A15])); [.A15]; &quot;&quot;); IF([.$I16]=&quot;W&quot;; IF(NOT(ISBLANK([.A16])); [.A16]; &quot;&quot;); &quot;&quot;))">
            <text:p/>
          </table:table-cell>
          <table:table-cell table:style-name="ce157" table:formula="of:=IF([.$I15]=&quot;W&quot;; IF(NOT(ISBLANK([.B15])); [.B15]; &quot;&quot;); IF([.$I16]=&quot;W&quot;; IF(NOT(ISBLANK([.B16])); [.B16]; &quot;&quot;); &quot;&quot;))">
            <text:p/>
          </table:table-cell>
          <table:table-cell table:style-name="ce296" table:formula="of:=IF(AND(NOT(ISBLANK([.C15])); [.C15]=[.C16]); [.C15]; (IF([.$I15]=&quot;W&quot;; IF(NOT(ISBLANK([.C15])); [.C15]; &quot;&quot;); IF([.$I16]=&quot;W&quot;; IF(NOT(ISBLANK([.C16])); [.C16]; &quot;&quot;); &quot;&quot;))))">
            <text:p/>
          </table:table-cell>
          <table:table-cell table:style-name="ce299" table:number-columns-repeated="5"/>
          <table:table-cell table:style-name="ce292" table:formula="of:=ISWINNERMEN([.N16:.R16]; [.N17:.R17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29" table:formula="of:=IF(NOT(ISBLANK([$ML.AE122])); [$ML.AE122]; &quot;&quot;)">
            <text:p/>
          </table:table-cell>
          <table:table-cell table:style-name="ce157" table:formula="of:=IF(NOT(ISBLANK([$ML.AF122])); [$ML.AF122]; &quot;&quot;)">
            <text:p/>
          </table:table-cell>
          <table:table-cell table:style-name="ce272" table:formula="of:=IF(NOT(ISBLANK([$ML.AG122])); [$ML.AG122]; &quot;&quot;)">
            <text:p/>
          </table:table-cell>
          <table:table-cell table:style-name="ce290" table:number-columns-repeated="5"/>
          <table:table-cell table:style-name="ce292" table:formula="of:=ISWINNERMEN([.D17:.H17]; [.D18:.H18])">
            <text:p/>
          </table:table-cell>
          <table:table-cell table:style-name="ce78"/>
          <table:table-cell table:style-name="ce295" table:formula="of:=IF([.$I17]=&quot;W&quot;; IF(NOT(ISBLANK([.A17])); [.A17]; &quot;&quot;); IF([.$I18]=&quot;W&quot;; IF(NOT(ISBLANK([.A18])); [.A18]; &quot;&quot;); &quot;&quot;))">
            <text:p/>
          </table:table-cell>
          <table:table-cell table:style-name="ce158" table:formula="of:=IF([.$I17]=&quot;W&quot;; IF(NOT(ISBLANK([.B17])); [.B17]; &quot;&quot;); IF([.$I18]=&quot;W&quot;; IF(NOT(ISBLANK([.B18])); [.B18]; &quot;&quot;); &quot;&quot;))">
            <text:p/>
          </table:table-cell>
          <table:table-cell table:style-name="ce297" table:formula="of:=IF(AND(NOT(ISBLANK([.C17])); [.C17]=[.C18]); [.C17]; IF([.$I17]=&quot;W&quot;; IF(NOT(ISBLANK([.C17])); [.C17]; &quot;&quot;); IF([.$I18]=&quot;W&quot;; IF(NOT(ISBLANK([.C18])); [.C18]; &quot;&quot;); &quot;&quot;)))">
            <text:p/>
          </table:table-cell>
          <table:table-cell table:style-name="ce300" table:number-columns-repeated="5"/>
          <table:table-cell table:style-name="ce293" table:formula="of:=ISWINNERMEN([.N17:.R17]; [.N16:.R16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100" table:formula="of:=IF([.$AM10]=&quot;W&quot;; IF(NOT(ISBLANK([.AE10])); [.AE10]; &quot;&quot;); IF([.$AM11]=&quot;W&quot;; IF(NOT(ISBLANK([.AE11])); [.AE11]; &quot;&quot;); &quot;&quot;))" table:number-columns-spanned="2" table:number-rows-spanned="1">
            <text:p/>
          </table:table-cell>
          <table:covered-table-cell table:style-name="ce127"/>
          <table:table-cell table:style-name="ce136" table:formula="of:=IF([.$AM10]=&quot;W&quot;; IF(NOT(ISBLANK([.AG10])); [.AG10]; &quot;&quot;); IF([.$AM11]=&quot;W&quot;; IF(NOT(ISBLANK([.AG11])); [.AG11]; &quot;&quot;); &quot;&quot;))" table:number-columns-spanned="7" table:number-rows-spanned="1">
            <text:p/>
          </table:table-cell>
          <table:covered-table-cell table:number-columns-repeated="6" table:style-name="ce127"/>
          <table:table-cell table:style-name="ce93" office:value-type="string" calcext:value-type="string">
            <text:p>M</text:p>
          </table:table-cell>
        </table:table-row>
        <table:table-row table:style-name="ro3">
          <table:table-cell table:style-name="ce133" table:formula="of:=IF(NOT(ISBLANK([$ML.AE123])); [$ML.AE123]; &quot;&quot;)">
            <text:p/>
          </table:table-cell>
          <table:table-cell table:style-name="ce158" table:formula="of:=IF(NOT(ISBLANK([$ML.AF123])); [$ML.AF123]; &quot;&quot;)">
            <text:p/>
          </table:table-cell>
          <table:table-cell table:style-name="ce273" table:formula="of:=IF(NOT(ISBLANK([$ML.AG123])); [$ML.AG123]; &quot;&quot;)">
            <text:p/>
          </table:table-cell>
          <table:table-cell table:style-name="ce291" table:number-columns-repeated="5"/>
          <table:table-cell table:style-name="ce293" table:formula="of:=ISWINNERMEN([.D18:.H18]; [.D17:.H17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88" table:formula="of:=IF([.$AM10]=&quot;W&quot;; IF(NOT(ISBLANK([.AF10])); [.AF10]; &quot;&quot;); IF([.$AM11]=&quot;W&quot;; IF(NOT(ISBLANK([.AF11])); [.AF11]; &quot;&quot;); &quot;&quot;))" table:number-columns-spanned="9" table:number-rows-spanned="2">
            <text:p/>
          </table:table-cell>
          <table:covered-table-cell table:number-columns-repeated="7" table:style-name="ce78"/>
          <table:covered-table-cell/>
          <table:table-cell table:style-name="ce93" office:value-type="string" calcext:value-type="string">
            <text:p>M</text:p>
          </table:table-cell>
        </table:table-row>
        <table:table-row table:style-name="ro1">
          <table:table-cell table:style-name="ce78" table:number-columns-repeated="8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covered-table-cell table:number-columns-repeated="8" table:style-name="ce78"/>
          <table:covered-table-cell/>
          <table:table-cell table:style-name="ce93" office:value-type="string" calcext:value-type="string">
            <text:p>M</text:p>
          </table:table-cell>
        </table:table-row>
        <table:table-row table:style-name="ro1">
          <table:table-cell table:style-name="ce81" table:number-columns-repeated="13"/>
          <table:table-cell table:style-name="ce301" table:number-columns-repeated="5"/>
          <table:table-cell table:style-name="ce81" table:number-columns-repeated="5"/>
          <table:table-cell table:style-name="ce301" table:number-columns-repeated="5"/>
          <table:table-cell table:style-name="ce81" table:number-columns-repeated="2"/>
          <table:table-cell table:style-name="ce89" table:formula="of:=IF([.$AM28]=&quot;W&quot;; IF(NOT(ISBLANK([.AF28])); [.AF28]; &quot;&quot;); IF([.$AM29]=&quot;W&quot;; IF(NOT(ISBLANK([.AF29])); [.AF29]; &quot;&quot;); &quot;&quot;))" table:number-columns-spanned="9" table:number-rows-spanned="2">
            <text:p/>
          </table:table-cell>
          <table:covered-table-cell table:number-columns-repeated="8" table:style-name="ce81"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0" table:formula="of:=IF(NOT(ISBLANK([$FL.Y10])); [$FL.Y10]; &quot;&quot;)">
            <text:p/>
          </table:table-cell>
          <table:table-cell table:style-name="ce157" table:formula="of:=IF(NOT(ISBLANK([$FL.Z10])); [$FL.Z10]; &quot;&quot;)">
            <text:p/>
          </table:table-cell>
          <table:table-cell table:style-name="ce274" table:formula="of:=IF(NOT(ISBLANK([$FL.AA10])); [$FL.AA10]; &quot;&quot;)">
            <text:p/>
          </table:table-cell>
          <table:table-cell table:style-name="ce290" table:number-columns-repeated="5"/>
          <table:table-cell table:style-name="ce292" table:formula="of:=ISWINNERWOMEN([.D21:.F21]; [.D22:.F22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covered-table-cell table:number-columns-repeated="8" table:style-name="ce78"/>
          <table:covered-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1" table:formula="of:=IF(NOT(ISBLANK([$FL.Y11])); [$FL.Y11]; &quot;&quot;)">
            <text:p/>
          </table:table-cell>
          <table:table-cell table:style-name="ce158" table:formula="of:=IF(NOT(ISBLANK([$FL.Z11])); [$FL.Z11]; &quot;&quot;)">
            <text:p/>
          </table:table-cell>
          <table:table-cell table:style-name="ce275" table:formula="of:=IF(NOT(ISBLANK([$FL.AA11])); [$FL.AA11]; &quot;&quot;)">
            <text:p/>
          </table:table-cell>
          <table:table-cell table:style-name="ce291" table:number-columns-repeated="5"/>
          <table:table-cell table:style-name="ce293" table:formula="of:=ISWINNERWOMEN([.D22:.F22]; [.D21:.F21])">
            <text:p/>
          </table:table-cell>
          <table:table-cell table:style-name="ce78"/>
          <table:table-cell table:style-name="ce294" table:formula="of:=IF([.$I21]=&quot;W&quot;; IF(NOT(ISBLANK([.A21])); [.A21]; &quot;&quot;); IF([.$I22]=&quot;W&quot;; IF(NOT(ISBLANK([.A22])); [.A22]; &quot;&quot;); &quot;&quot;))">
            <text:p/>
          </table:table-cell>
          <table:table-cell table:style-name="ce157" table:formula="of:=IF([.$I21]=&quot;W&quot;; IF(NOT(ISBLANK([.B21])); [.B21]; &quot;&quot;); IF([.$I22]=&quot;W&quot;; IF(NOT(ISBLANK([.B22])); [.B22]; &quot;&quot;); &quot;&quot;))">
            <text:p/>
          </table:table-cell>
          <table:table-cell table:style-name="ce296" table:formula="of:=IF(AND(NOT(ISBLANK([.C21])); [.C21]=[.C22]); [.C21]; (IF([.$I21]=&quot;W&quot;; IF(NOT(ISBLANK([.C21])); [.C21]; &quot;&quot;); IF([.$I22]=&quot;W&quot;; IF(NOT(ISBLANK([.C22])); [.C22]; &quot;&quot;); &quot;&quot;))))">
            <text:p/>
          </table:table-cell>
          <table:table-cell table:style-name="ce299" table:number-columns-repeated="5"/>
          <table:table-cell table:style-name="ce292" table:formula="of:=ISWINNERWOMEN([.N22:.P22]; [.N23:.P23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118" table:formula="of:=IF([.$AM28]=&quot;W&quot;; IF(NOT(ISBLANK([.AE28])); [.AE28]; &quot;&quot;); IF([.$AM29]=&quot;W&quot;; IF(NOT(ISBLANK([.AE29])); [.AE29]; &quot;&quot;); &quot;&quot;))" table:number-columns-spanned="2" table:number-rows-spanned="1">
            <text:p/>
          </table:table-cell>
          <table:covered-table-cell table:style-name="ce131"/>
          <table:table-cell table:style-name="ce137" table:formula="of:=IF([.$AM28]=&quot;W&quot;; IF(NOT(ISBLANK([.AG28])); [.AG28]; &quot;&quot;); IF([.$AM29]=&quot;W&quot;; IF(NOT(ISBLANK([.AG29])); [.AG29]; &quot;&quot;); &quot;&quot;))" table:number-columns-spanned="7" table:number-rows-spanned="1">
            <text:p/>
          </table:table-cell>
          <table:covered-table-cell table:number-columns-repeated="6" table:style-name="ce131"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3" table:formula="of:=IF(NOT(ISBLANK([$FL.Y26])); [$FL.Y26]; &quot;&quot;)">
            <text:p/>
          </table:table-cell>
          <table:table-cell table:style-name="ce157" table:formula="of:=IF(NOT(ISBLANK([$FL.Z26])); [$FL.Z26]; &quot;&quot;)">
            <text:p/>
          </table:table-cell>
          <table:table-cell table:style-name="ce276" table:formula="of:=IF(NOT(ISBLANK([$FL.AA26])); [$FL.AA26]; &quot;&quot;)">
            <text:p/>
          </table:table-cell>
          <table:table-cell table:style-name="ce290" table:number-columns-repeated="5"/>
          <table:table-cell table:style-name="ce292" table:formula="of:=ISWINNERWOMEN([.D23:.F23]; [.D24:.F24])">
            <text:p/>
          </table:table-cell>
          <table:table-cell table:style-name="ce78"/>
          <table:table-cell table:style-name="ce295" table:formula="of:=IF([.$I23]=&quot;W&quot;; IF(NOT(ISBLANK([.A23])); [.A23]; &quot;&quot;); IF([.$I24]=&quot;W&quot;; IF(NOT(ISBLANK([.A24])); [.A24]; &quot;&quot;); &quot;&quot;))">
            <text:p/>
          </table:table-cell>
          <table:table-cell table:style-name="ce158" table:formula="of:=IF([.$I23]=&quot;W&quot;; IF(NOT(ISBLANK([.B23])); [.B23]; &quot;&quot;); IF([.$I24]=&quot;W&quot;; IF(NOT(ISBLANK([.B24])); [.B24]; &quot;&quot;); &quot;&quot;))">
            <text:p/>
          </table:table-cell>
          <table:table-cell table:style-name="ce297" table:formula="of:=IF(AND(NOT(ISBLANK([.C23])); [.C23]=[.C24]); [.C23]; IF([.$I23]=&quot;W&quot;; IF(NOT(ISBLANK([.C23])); [.C23]; &quot;&quot;); IF([.$I24]=&quot;W&quot;; IF(NOT(ISBLANK([.C24])); [.C24]; &quot;&quot;); &quot;&quot;)))">
            <text:p/>
          </table:table-cell>
          <table:table-cell table:style-name="ce300" table:number-columns-repeated="5"/>
          <table:table-cell table:style-name="ce293" table:formula="of:=ISWINNERWOMEN([.N23:.P23]; [.N22:.P22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4" table:formula="of:=IF(NOT(ISBLANK([$FL.Y27])); [$FL.Y27]; &quot;&quot;)">
            <text:p/>
          </table:table-cell>
          <table:table-cell table:style-name="ce158" table:formula="of:=IF(NOT(ISBLANK([$FL.Z27])); [$FL.Z27]; &quot;&quot;)">
            <text:p/>
          </table:table-cell>
          <table:table-cell table:style-name="ce277" table:formula="of:=IF(NOT(ISBLANK([$FL.AA27])); [$FL.AA27]; &quot;&quot;)">
            <text:p/>
          </table:table-cell>
          <table:table-cell table:style-name="ce291" table:number-columns-repeated="5"/>
          <table:table-cell table:style-name="ce293" table:formula="of:=ISWINNERWOMEN([.D24:.F24]; [.D23:.F23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2" table:formula="of:=IF([.$S22]=&quot;W&quot;; IF(NOT(ISBLANK([.K22])); [.K22]; &quot;&quot;); IF([.$S23]=&quot;W&quot;; IF(NOT(ISBLANK([.K23])); [.K23]; &quot;&quot;); &quot;&quot;))">
            <text:p/>
          </table:table-cell>
          <table:table-cell table:style-name="ce157" table:formula="of:=IF([.$S22]=&quot;W&quot;; IF(NOT(ISBLANK([.L22])); [.L22]; &quot;&quot;); IF([.$S23]=&quot;W&quot;; IF(NOT(ISBLANK([.L23])); [.L23]; &quot;&quot;); &quot;&quot;))">
            <text:p/>
          </table:table-cell>
          <table:table-cell table:style-name="ce304" table:formula="of:=IF(AND(NOT(ISBLANK([.M22])); [.M22]=[.M23]); [.M22]; IF([.$S22]=&quot;W&quot;; IF(NOT(ISBLANK([.M22])); [.M22]; &quot;&quot;); IF([.$S23]=&quot;W&quot;; IF(NOT(ISBLANK([.M23])); [.M23]; &quot;&quot;); &quot;&quot;)))">
            <text:p/>
          </table:table-cell>
          <table:table-cell table:style-name="ce299" table:number-columns-repeated="5"/>
          <table:table-cell table:style-name="ce292" table:formula="of:=ISWINNERWOMEN([.X24:.Z24]; [.X25:.Z25])">
            <text:p/>
          </table:table-cell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5" table:formula="of:=IF(NOT(ISBLANK([$FL.Y42])); [$FL.Y42]; &quot;&quot;)">
            <text:p/>
          </table:table-cell>
          <table:table-cell table:style-name="ce157" table:formula="of:=IF(NOT(ISBLANK([$FL.Z42])); [$FL.Z42]; &quot;&quot;)">
            <text:p/>
          </table:table-cell>
          <table:table-cell table:style-name="ce278" table:formula="of:=IF(NOT(ISBLANK([$FL.AA42])); [$FL.AA42]; &quot;&quot;)">
            <text:p/>
          </table:table-cell>
          <table:table-cell table:style-name="ce290" table:number-columns-repeated="5"/>
          <table:table-cell table:style-name="ce292" table:formula="of:=ISWINNERWOMEN([.D25:.F25]; [.D26:.F26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3" table:formula="of:=IF([.$S26]=&quot;W&quot;; IF(NOT(ISBLANK([.K26])); [.K26]; &quot;&quot;); IF([.$S27]=&quot;W&quot;; IF(NOT(ISBLANK([.K27])); [.K27]; &quot;&quot;); &quot;&quot;))">
            <text:p/>
          </table:table-cell>
          <table:table-cell table:style-name="ce158" table:formula="of:=IF([.$S26]=&quot;W&quot;; IF(NOT(ISBLANK([.L26])); [.L26]; &quot;&quot;); IF([.$S27]=&quot;W&quot;; IF(NOT(ISBLANK([.L27])); [.L27]; &quot;&quot;); &quot;&quot;))">
            <text:p/>
          </table:table-cell>
          <table:table-cell table:style-name="ce305" table:formula="of:=IF(AND(NOT(ISBLANK([.M26])); [.M26]=[.M27]); [.M26]; IF([.$S26]=&quot;W&quot;; IF(NOT(ISBLANK([.M26])); [.M26]; &quot;&quot;); IF([.$S27]=&quot;W&quot;; IF(NOT(ISBLANK([.M27])); [.M27]; &quot;&quot;); &quot;&quot;)))">
            <text:p/>
          </table:table-cell>
          <table:table-cell table:style-name="ce300" table:number-columns-repeated="5"/>
          <table:table-cell table:style-name="ce293" table:formula="of:=ISWINNERWOMEN([.X25:.Z25]; [.X24:.Z24])">
            <text:p/>
          </table:table-cell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6" table:formula="of:=IF(NOT(ISBLANK([$FL.Y43])); [$FL.Y43]; &quot;&quot;)">
            <text:p/>
          </table:table-cell>
          <table:table-cell table:style-name="ce158" table:formula="of:=IF(NOT(ISBLANK([$FL.Z43])); [$FL.Z43]; &quot;&quot;)">
            <text:p/>
          </table:table-cell>
          <table:table-cell table:style-name="ce279" table:formula="of:=IF(NOT(ISBLANK([$FL.AA43])); [$FL.AA43]; &quot;&quot;)">
            <text:p/>
          </table:table-cell>
          <table:table-cell table:style-name="ce291" table:number-columns-repeated="5"/>
          <table:table-cell table:style-name="ce293" table:formula="of:=ISWINNERWOMEN([.D26:.F26]; [.D25:.F25])">
            <text:p/>
          </table:table-cell>
          <table:table-cell table:style-name="ce78"/>
          <table:table-cell table:style-name="ce294" table:formula="of:=IF([.$I25]=&quot;W&quot;; IF(NOT(ISBLANK([.A25])); [.A25]; &quot;&quot;); IF([.$I26]=&quot;W&quot;; IF(NOT(ISBLANK([.A26])); [.A26]; &quot;&quot;); &quot;&quot;))">
            <text:p/>
          </table:table-cell>
          <table:table-cell table:style-name="ce157" table:formula="of:=IF([.$I25]=&quot;W&quot;; IF(NOT(ISBLANK([.B25])); [.B25]; &quot;&quot;); IF([.$I26]=&quot;W&quot;; IF(NOT(ISBLANK([.B26])); [.B26]; &quot;&quot;); &quot;&quot;))">
            <text:p/>
          </table:table-cell>
          <table:table-cell table:style-name="ce296" table:formula="of:=IF(AND(NOT(ISBLANK([.C25])); [.C25]=[.C26]); [.C25]; (IF([.$I25]=&quot;W&quot;; IF(NOT(ISBLANK([.C25])); [.C25]; &quot;&quot;); IF([.$I26]=&quot;W&quot;; IF(NOT(ISBLANK([.C26])); [.C26]; &quot;&quot;); &quot;&quot;))))">
            <text:p/>
          </table:table-cell>
          <table:table-cell table:style-name="ce299" table:number-columns-repeated="5"/>
          <table:table-cell table:style-name="ce292" table:formula="of:=ISWINNERWOMEN([.N26:.P26]; [.N27:.P27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7" table:formula="of:=IF(NOT(ISBLANK([$FL.Y58])); [$FL.Y58]; &quot;&quot;)">
            <text:p/>
          </table:table-cell>
          <table:table-cell table:style-name="ce157" table:formula="of:=IF(NOT(ISBLANK([$FL.Z58])); [$FL.Z58]; &quot;&quot;)">
            <text:p/>
          </table:table-cell>
          <table:table-cell table:style-name="ce280" table:formula="of:=IF(NOT(ISBLANK([$FL.AA58])); [$FL.AA58]; &quot;&quot;)">
            <text:p/>
          </table:table-cell>
          <table:table-cell table:style-name="ce290" table:number-columns-repeated="5"/>
          <table:table-cell table:style-name="ce292" table:formula="of:=ISWINNERWOMEN([.D27:.F27]; [.D28:.F28])">
            <text:p/>
          </table:table-cell>
          <table:table-cell table:style-name="ce78"/>
          <table:table-cell table:style-name="ce295" table:formula="of:=IF([.$I27]=&quot;W&quot;; IF(NOT(ISBLANK([.A27])); [.A27]; &quot;&quot;); IF([.$I28]=&quot;W&quot;; IF(NOT(ISBLANK([.A28])); [.A28]; &quot;&quot;); &quot;&quot;))">
            <text:p/>
          </table:table-cell>
          <table:table-cell table:style-name="ce158" table:formula="of:=IF([.$I27]=&quot;W&quot;; IF(NOT(ISBLANK([.B27])); [.B27]; &quot;&quot;); IF([.$I28]=&quot;W&quot;; IF(NOT(ISBLANK([.B28])); [.B28]; &quot;&quot;); &quot;&quot;))">
            <text:p/>
          </table:table-cell>
          <table:table-cell table:style-name="ce297" table:formula="of:=IF(AND(NOT(ISBLANK([.C27])); [.C27]=[.C28]); [.C27]; IF([.$I27]=&quot;W&quot;; IF(NOT(ISBLANK([.C27])); [.C27]; &quot;&quot;); IF([.$I28]=&quot;W&quot;; IF(NOT(ISBLANK([.C28])); [.C28]; &quot;&quot;); &quot;&quot;)))">
            <text:p/>
          </table:table-cell>
          <table:table-cell table:style-name="ce300" table:number-columns-repeated="5"/>
          <table:table-cell table:style-name="ce293" table:formula="of:=ISWINNERWOMEN([.N27:.P27]; [.N26:.P26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8" table:formula="of:=IF(NOT(ISBLANK([$FL.Y59])); [$FL.Y59]; &quot;&quot;)">
            <text:p/>
          </table:table-cell>
          <table:table-cell table:style-name="ce158" table:formula="of:=IF(NOT(ISBLANK([$FL.Z59])); [$FL.Z59]; &quot;&quot;)">
            <text:p/>
          </table:table-cell>
          <table:table-cell table:style-name="ce281" table:formula="of:=IF(NOT(ISBLANK([$FL.AA59])); [$FL.AA59]; &quot;&quot;)">
            <text:p/>
          </table:table-cell>
          <table:table-cell table:style-name="ce291" table:number-columns-repeated="5"/>
          <table:table-cell table:style-name="ce293" table:formula="of:=ISWINNERWOMEN([.D28:.F28]; [.D27:.F27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6" table:formula="of:=IF([.$AC24]=&quot;W&quot;; IF(NOT(ISBLANK([.U24])); [.U24]; &quot;&quot;); IF([.$AC25]=&quot;W&quot;; IF(NOT(ISBLANK([.U25])); [.U25]; &quot;&quot;); &quot;&quot;))">
            <text:p/>
          </table:table-cell>
          <table:table-cell table:style-name="ce157" table:formula="of:=IF([.$AC24]=&quot;W&quot;; IF(NOT(ISBLANK([.V24])); [.V24]; &quot;&quot;); IF([.$AC25]=&quot;W&quot;; IF(NOT(ISBLANK([.V25])); [.V25]; &quot;&quot;); &quot;&quot;))">
            <text:p/>
          </table:table-cell>
          <table:table-cell table:style-name="ce310" table:formula="of:=IF(AND(NOT(ISBLANK([.W24])); [.W24]=[.W25]); [.W24]; IF([.$AC24]=&quot;W&quot;; IF(NOT(ISBLANK([.W24])); [.W24]; &quot;&quot;); IF([.$AC25]=&quot;W&quot;; IF(NOT(ISBLANK([.W25])); [.W25]; &quot;&quot;); &quot;&quot;)))">
            <text:p/>
          </table:table-cell>
          <table:table-cell table:style-name="ce299" table:number-columns-repeated="5"/>
          <table:table-cell table:style-name="ce292" table:formula="of:=ISWINNERWOMEN([.AH28:.AJ28]; [.AH29:.AJ29])">
            <text:p/>
          </table:table-cell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49" table:formula="of:=IF(NOT(ISBLANK([$FL.Y74])); [$FL.Y74]; &quot;&quot;)">
            <text:p/>
          </table:table-cell>
          <table:table-cell table:style-name="ce157" table:formula="of:=IF(NOT(ISBLANK([$FL.Z74])); [$FL.Z74]; &quot;&quot;)">
            <text:p/>
          </table:table-cell>
          <table:table-cell table:style-name="ce282" table:formula="of:=IF(NOT(ISBLANK([$FL.AA74])); [$FL.AA74]; &quot;&quot;)">
            <text:p/>
          </table:table-cell>
          <table:table-cell table:style-name="ce290" table:number-columns-repeated="5"/>
          <table:table-cell table:style-name="ce292" table:formula="of:=ISWINNERWOMEN([.D29:.F29]; [.D30:.F30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7" table:formula="of:=IF([.$AC32]=&quot;W&quot;; IF(NOT(ISBLANK([.U32])); [.U32]; &quot;&quot;); IF([.$AC33]=&quot;W&quot;; IF(NOT(ISBLANK([.U33])); [.U33]; &quot;&quot;); &quot;&quot;))">
            <text:p/>
          </table:table-cell>
          <table:table-cell table:style-name="ce158" table:formula="of:=IF([.$AC32]=&quot;W&quot;; IF(NOT(ISBLANK([.V32])); [.V32]; &quot;&quot;); IF([.$AC33]=&quot;W&quot;; IF(NOT(ISBLANK([.V33])); [.V33]; &quot;&quot;); &quot;&quot;))">
            <text:p/>
          </table:table-cell>
          <table:table-cell table:style-name="ce311" table:formula="of:=IF(AND(NOT(ISBLANK([.W32])); [.W32]=[.W33]); [.W32]; IF([.$AC32]=&quot;W&quot;; IF(NOT(ISBLANK([.W32])); [.W32]; &quot;&quot;); IF([.$AC33]=&quot;W&quot;; IF(NOT(ISBLANK([.W33])); [.W33]; &quot;&quot;); &quot;&quot;)))">
            <text:p/>
          </table:table-cell>
          <table:table-cell table:style-name="ce300" table:number-columns-repeated="5"/>
          <table:table-cell table:style-name="ce293" table:formula="of:=ISWINNERWOMEN([.AH29:.AJ29]; [.AH28:.AJ28])">
            <text:p/>
          </table:table-cell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50" table:formula="of:=IF(NOT(ISBLANK([$FL.Y75])); [$FL.Y75]; &quot;&quot;)">
            <text:p/>
          </table:table-cell>
          <table:table-cell table:style-name="ce158" table:formula="of:=IF(NOT(ISBLANK([$FL.Z75])); [$FL.Z75]; &quot;&quot;)">
            <text:p/>
          </table:table-cell>
          <table:table-cell table:style-name="ce283" table:formula="of:=IF(NOT(ISBLANK([$FL.AA75])); [$FL.AA75]; &quot;&quot;)">
            <text:p/>
          </table:table-cell>
          <table:table-cell table:style-name="ce291" table:number-columns-repeated="5"/>
          <table:table-cell table:style-name="ce293" table:formula="of:=ISWINNERWOMEN([.D30:.F30]; [.D29:.F29])">
            <text:p/>
          </table:table-cell>
          <table:table-cell table:style-name="ce78"/>
          <table:table-cell table:style-name="ce294" table:formula="of:=IF([.$I29]=&quot;W&quot;; IF(NOT(ISBLANK([.A29])); [.A29]; &quot;&quot;); IF([.$I30]=&quot;W&quot;; IF(NOT(ISBLANK([.A30])); [.A30]; &quot;&quot;); &quot;&quot;))">
            <text:p/>
          </table:table-cell>
          <table:table-cell table:style-name="ce157" table:formula="of:=IF([.$I29]=&quot;W&quot;; IF(NOT(ISBLANK([.B29])); [.B29]; &quot;&quot;); IF([.$I30]=&quot;W&quot;; IF(NOT(ISBLANK([.B30])); [.B30]; &quot;&quot;); &quot;&quot;))">
            <text:p/>
          </table:table-cell>
          <table:table-cell table:style-name="ce296" table:formula="of:=IF(AND(NOT(ISBLANK([.C29])); [.C29]=[.C30]); [.C29]; (IF([.$I29]=&quot;W&quot;; IF(NOT(ISBLANK([.C29])); [.C29]; &quot;&quot;); IF([.$I30]=&quot;W&quot;; IF(NOT(ISBLANK([.C30])); [.C30]; &quot;&quot;); &quot;&quot;))))">
            <text:p/>
          </table:table-cell>
          <table:table-cell table:style-name="ce299" table:number-columns-repeated="5"/>
          <table:table-cell table:style-name="ce292" table:formula="of:=ISWINNERWOMEN([.N30:.P30]; [.N31:.P31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51" table:formula="of:=IF(NOT(ISBLANK([$FL.Y90])); [$FL.Y90]; &quot;&quot;)">
            <text:p/>
          </table:table-cell>
          <table:table-cell table:style-name="ce157" table:formula="of:=IF(NOT(ISBLANK([$FL.Z90])); [$FL.Z90]; &quot;&quot;)">
            <text:p/>
          </table:table-cell>
          <table:table-cell table:style-name="ce284" table:formula="of:=IF(NOT(ISBLANK([$FL.AA90])); [$FL.AA90]; &quot;&quot;)">
            <text:p/>
          </table:table-cell>
          <table:table-cell table:style-name="ce290" table:number-columns-repeated="5"/>
          <table:table-cell table:style-name="ce292" table:formula="of:=ISWINNERWOMEN([.D31:.F31]; [.D32:.F32])">
            <text:p/>
          </table:table-cell>
          <table:table-cell table:style-name="ce78"/>
          <table:table-cell table:style-name="ce295" table:formula="of:=IF([.$I31]=&quot;W&quot;; IF(NOT(ISBLANK([.A31])); [.A31]; &quot;&quot;); IF([.$I32]=&quot;W&quot;; IF(NOT(ISBLANK([.A32])); [.A32]; &quot;&quot;); &quot;&quot;))">
            <text:p/>
          </table:table-cell>
          <table:table-cell table:style-name="ce158" table:formula="of:=IF([.$I31]=&quot;W&quot;; IF(NOT(ISBLANK([.B31])); [.B31]; &quot;&quot;); IF([.$I32]=&quot;W&quot;; IF(NOT(ISBLANK([.B32])); [.B32]; &quot;&quot;); &quot;&quot;))">
            <text:p/>
          </table:table-cell>
          <table:table-cell table:style-name="ce297" table:formula="of:=IF(AND(NOT(ISBLANK([.C31])); [.C31]=[.C32]); [.C31]; IF([.$I31]=&quot;W&quot;; IF(NOT(ISBLANK([.C31])); [.C31]; &quot;&quot;); IF([.$I32]=&quot;W&quot;; IF(NOT(ISBLANK([.C32])); [.C32]; &quot;&quot;); &quot;&quot;)))">
            <text:p/>
          </table:table-cell>
          <table:table-cell table:style-name="ce300" table:number-columns-repeated="5"/>
          <table:table-cell table:style-name="ce293" table:formula="of:=ISWINNERWOMEN([.N31:.P31]; [.N30:.P30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52" table:formula="of:=IF(NOT(ISBLANK([$FL.Y91])); [$FL.Y91]; &quot;&quot;)">
            <text:p/>
          </table:table-cell>
          <table:table-cell table:style-name="ce158" table:formula="of:=IF(NOT(ISBLANK([$FL.Z91])); [$FL.Z91]; &quot;&quot;)">
            <text:p/>
          </table:table-cell>
          <table:table-cell table:style-name="ce285" table:formula="of:=IF(NOT(ISBLANK([$FL.AA91])); [$FL.AA91]; &quot;&quot;)">
            <text:p/>
          </table:table-cell>
          <table:table-cell table:style-name="ce291" table:number-columns-repeated="5"/>
          <table:table-cell table:style-name="ce293" table:formula="of:=ISWINNERWOMEN([.D32:.F32]; [.D31:.F31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2" table:formula="of:=IF([.$S30]=&quot;W&quot;; IF(NOT(ISBLANK([.K30])); [.K30]; &quot;&quot;); IF([.$S31]=&quot;W&quot;; IF(NOT(ISBLANK([.K31])); [.K31]; &quot;&quot;); &quot;&quot;))">
            <text:p/>
          </table:table-cell>
          <table:table-cell table:style-name="ce157" table:formula="of:=IF([.$S30]=&quot;W&quot;; IF(NOT(ISBLANK([.L30])); [.L30]; &quot;&quot;); IF([.$S31]=&quot;W&quot;; IF(NOT(ISBLANK([.L31])); [.L31]; &quot;&quot;); &quot;&quot;))">
            <text:p/>
          </table:table-cell>
          <table:table-cell table:style-name="ce304" table:formula="of:=IF(AND(NOT(ISBLANK([.M30])); [.M30]=[.M31]); [.M30]; IF([.$S30]=&quot;W&quot;; IF(NOT(ISBLANK([.M30])); [.M30]; &quot;&quot;); IF([.$S31]=&quot;W&quot;; IF(NOT(ISBLANK([.M31])); [.M31]; &quot;&quot;); &quot;&quot;)))">
            <text:p/>
          </table:table-cell>
          <table:table-cell table:style-name="ce299" table:number-columns-repeated="5"/>
          <table:table-cell table:style-name="ce292" table:formula="of:=ISWINNERWOMEN([.X32:.Z32]; [.X33:.Z33])">
            <text:p/>
          </table:table-cell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53" table:formula="of:=IF(NOT(ISBLANK([$FL.Y106])); [$FL.Y106]; &quot;&quot;)">
            <text:p/>
          </table:table-cell>
          <table:table-cell table:style-name="ce157" table:formula="of:=IF(NOT(ISBLANK([$FL.Z106])); [$FL.Z106]; &quot;&quot;)">
            <text:p/>
          </table:table-cell>
          <table:table-cell table:style-name="ce286" table:formula="of:=IF(NOT(ISBLANK([$FL.AA106])); [$FL.AA106]; &quot;&quot;)">
            <text:p/>
          </table:table-cell>
          <table:table-cell table:style-name="ce290" table:number-columns-repeated="5"/>
          <table:table-cell table:style-name="ce292" table:formula="of:=ISWINNERWOMEN([.D33:.F33]; [.D34:.F34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/>
          <table:table-cell table:style-name="ce303" table:formula="of:=IF([.$S34]=&quot;W&quot;; IF(NOT(ISBLANK([.K34])); [.K34]; &quot;&quot;); IF([.$S35]=&quot;W&quot;; IF(NOT(ISBLANK([.K35])); [.K35]; &quot;&quot;); &quot;&quot;))">
            <text:p/>
          </table:table-cell>
          <table:table-cell table:style-name="ce158" table:formula="of:=IF([.$S34]=&quot;W&quot;; IF(NOT(ISBLANK([.L34])); [.L34]; &quot;&quot;); IF([.$S35]=&quot;W&quot;; IF(NOT(ISBLANK([.L35])); [.L35]; &quot;&quot;); &quot;&quot;))">
            <text:p/>
          </table:table-cell>
          <table:table-cell table:style-name="ce305" table:formula="of:=IF(AND(NOT(ISBLANK([.M34])); [.M34]=[.M35]); [.M34]; IF([.$S34]=&quot;W&quot;; IF(NOT(ISBLANK([.M34])); [.M34]; &quot;&quot;); IF([.$S35]=&quot;W&quot;; IF(NOT(ISBLANK([.M35])); [.M35]; &quot;&quot;); &quot;&quot;)))">
            <text:p/>
          </table:table-cell>
          <table:table-cell table:style-name="ce300" table:number-columns-repeated="5"/>
          <table:table-cell table:style-name="ce293" table:formula="of:=ISWINNERWOMEN([.X33:.Z33]; [.X32:.Z32])">
            <text:p/>
          </table:table-cell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54" table:formula="of:=IF(NOT(ISBLANK([$FL.Y107])); [$FL.Y107]; &quot;&quot;)">
            <text:p/>
          </table:table-cell>
          <table:table-cell table:style-name="ce158" table:formula="of:=IF(NOT(ISBLANK([$FL.Z107])); [$FL.Z107]; &quot;&quot;)">
            <text:p/>
          </table:table-cell>
          <table:table-cell table:style-name="ce287" table:formula="of:=IF(NOT(ISBLANK([$FL.AA107])); [$FL.AA107]; &quot;&quot;)">
            <text:p/>
          </table:table-cell>
          <table:table-cell table:style-name="ce291" table:number-columns-repeated="5"/>
          <table:table-cell table:style-name="ce293" table:formula="of:=ISWINNERWOMEN([.D34:.F34]; [.D33:.F33])">
            <text:p/>
          </table:table-cell>
          <table:table-cell table:style-name="ce78"/>
          <table:table-cell table:style-name="ce294" table:formula="of:=IF([.$I33]=&quot;W&quot;; IF(NOT(ISBLANK([.A33])); [.A33]; &quot;&quot;); IF([.$I34]=&quot;W&quot;; IF(NOT(ISBLANK([.A34])); [.A34]; &quot;&quot;); &quot;&quot;))">
            <text:p/>
          </table:table-cell>
          <table:table-cell table:style-name="ce157" table:formula="of:=IF([.$I33]=&quot;W&quot;; IF(NOT(ISBLANK([.B33])); [.B33]; &quot;&quot;); IF([.$I34]=&quot;W&quot;; IF(NOT(ISBLANK([.B34])); [.B34]; &quot;&quot;); &quot;&quot;))">
            <text:p/>
          </table:table-cell>
          <table:table-cell table:style-name="ce296" table:formula="of:=IF(AND(NOT(ISBLANK([.C33])); [.C33]=[.C34]); [.C33]; (IF([.$I33]=&quot;W&quot;; IF(NOT(ISBLANK([.C33])); [.C33]; &quot;&quot;); IF([.$I34]=&quot;W&quot;; IF(NOT(ISBLANK([.C34])); [.C34]; &quot;&quot;); &quot;&quot;))))">
            <text:p/>
          </table:table-cell>
          <table:table-cell table:style-name="ce299" table:number-columns-repeated="5"/>
          <table:table-cell table:style-name="ce292" table:formula="of:=ISWINNERWOMEN([.N34:.P34]; [.N35:.P35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55" table:formula="of:=IF(NOT(ISBLANK([$FL.Y122])); [$FL.Y122]; &quot;&quot;)">
            <text:p/>
          </table:table-cell>
          <table:table-cell table:style-name="ce157" table:formula="of:=IF(NOT(ISBLANK([$FL.Z122])); [$FL.Z122]; &quot;&quot;)">
            <text:p/>
          </table:table-cell>
          <table:table-cell table:style-name="ce288" table:formula="of:=IF(NOT(ISBLANK([$FL.AA122])); [$FL.AA122]; &quot;&quot;)">
            <text:p/>
          </table:table-cell>
          <table:table-cell table:style-name="ce290" table:number-columns-repeated="5"/>
          <table:table-cell table:style-name="ce292" table:formula="of:=ISWINNERWOMEN([.D35:.F35]; [.D36:.F36])">
            <text:p/>
          </table:table-cell>
          <table:table-cell table:style-name="ce78"/>
          <table:table-cell table:style-name="ce295" table:formula="of:=IF([.$I35]=&quot;W&quot;; IF(NOT(ISBLANK([.A35])); [.A35]; &quot;&quot;); IF([.$I36]=&quot;W&quot;; IF(NOT(ISBLANK([.A36])); [.A36]; &quot;&quot;); &quot;&quot;))">
            <text:p/>
          </table:table-cell>
          <table:table-cell table:style-name="ce158" table:formula="of:=IF([.$I35]=&quot;W&quot;; IF(NOT(ISBLANK([.B35])); [.B35]; &quot;&quot;); IF([.$I36]=&quot;W&quot;; IF(NOT(ISBLANK([.B36])); [.B36]; &quot;&quot;); &quot;&quot;))">
            <text:p/>
          </table:table-cell>
          <table:table-cell table:style-name="ce297" table:formula="of:=IF(AND(NOT(ISBLANK([.C35])); [.C35]=[.C36]); [.C35]; IF([.$I35]=&quot;W&quot;; IF(NOT(ISBLANK([.C35])); [.C35]; &quot;&quot;); IF([.$I36]=&quot;W&quot;; IF(NOT(ISBLANK([.C36])); [.C36]; &quot;&quot;); &quot;&quot;)))">
            <text:p/>
          </table:table-cell>
          <table:table-cell table:style-name="ce300" table:number-columns-repeated="5"/>
          <table:table-cell table:style-name="ce293" table:formula="of:=ISWINNERWOMEN([.N35:.P35]; [.N34:.P34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3">
          <table:table-cell table:style-name="ce156" table:formula="of:=IF(NOT(ISBLANK([$FL.Y123])); [$FL.Y123]; &quot;&quot;)">
            <text:p/>
          </table:table-cell>
          <table:table-cell table:style-name="ce158" table:formula="of:=IF(NOT(ISBLANK([$FL.Z123])); [$FL.Z123]; &quot;&quot;)">
            <text:p/>
          </table:table-cell>
          <table:table-cell table:style-name="ce289" table:formula="of:=IF(NOT(ISBLANK([$FL.AA123])); [$FL.AA123]; &quot;&quot;)">
            <text:p/>
          </table:table-cell>
          <table:table-cell table:style-name="ce291" table:number-columns-repeated="5"/>
          <table:table-cell table:style-name="ce293" table:formula="of:=ISWINNERWOMEN([.D36:.F36]; [.D35:.F35])">
            <text:p/>
          </table:table-cell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4"/>
          <table:table-cell table:style-name="ce298" table:number-columns-repeated="5"/>
          <table:table-cell/>
          <table:table-cell table:style-name="ce78" table:number-columns-repeated="9"/>
          <table:table-cell/>
          <table:table-cell table:style-name="ce93" office:value-type="string" calcext:value-type="string">
            <text:p>W</text:p>
          </table:table-cell>
        </table:table-row>
        <table:table-row table:style-name="ro4" table:number-rows-repeated="65499">
          <table:table-cell table:number-columns-repeated="40"/>
        </table:table-row>
        <table:table-row table:style-name="ro4">
          <table:table-cell table:number-columns-repeated="40"/>
        </table:table-row>
        <calcext:conditional-formats>
          <calcext:conditional-format calcext:target-range-address="Finals.A11:Finals.A12 Finals.C11:Finals.C12">
            <calcext:condition calcext:apply-style-name="DecidedEvenBeforeMatch" calcext:value="formula-is(OR(AND(ISODD(ROW()); NOT(ISBLANK([ML.U70])); [ML.U70]=[ML.U71]); AND(ISEVEN(ROW()); NOT(ISBLANK([ML.U77])); [ML.U77]=[ML.U78])))" calcext:base-cell-address="Finals.A11"/>
          </calcext:conditional-format>
          <calcext:conditional-format calcext:target-range-address="Finals.A13:Finals.A14 Finals.C13:Finals.C14">
            <calcext:condition calcext:apply-style-name="DecidedEvenBeforeMatch" calcext:value="formula-is(OR(AND(ISODD(ROW()); NOT(ISBLANK([ML.U86])); [ML.U86]=[ML.U87]); AND(ISEVEN(ROW()); NOT(ISBLANK([ML.U93])); [ML.U93]=[ML.U94])))" calcext:base-cell-address="Finals.A13"/>
          </calcext:conditional-format>
          <calcext:conditional-format calcext:target-range-address="Finals.A15:Finals.A16 Finals.C15:Finals.C16">
            <calcext:condition calcext:apply-style-name="DecidedEvenBeforeMatch" calcext:value="formula-is(OR(AND(ISODD(ROW()); NOT(ISBLANK([ML.U102])); [ML.U102]=[ML.U103]); AND(ISEVEN(ROW()); NOT(ISBLANK([ML.U109])); [ML.U109]=[ML.U110])))" calcext:base-cell-address="Finals.A15"/>
          </calcext:conditional-format>
          <calcext:conditional-format calcext:target-range-address="Finals.A17:Finals.A18 Finals.C17:Finals.C18">
            <calcext:condition calcext:apply-style-name="DecidedEvenBeforeMatch" calcext:value="formula-is(OR(AND(ISODD(ROW()); NOT(ISBLANK([ML.U118])); [ML.U118]=[ML.U119]); AND(ISEVEN(ROW()); NOT(ISBLANK([ML.U125])); [ML.U125]=[ML.U126])))" calcext:base-cell-address="Finals.A17"/>
          </calcext:conditional-format>
          <calcext:conditional-format calcext:target-range-address="Finals.A3:Finals.A4 Finals.C3:Finals.C4">
            <calcext:condition calcext:apply-style-name="DecidedEvenBeforeMatch" calcext:value="formula-is(OR(AND(ISODD(ROW()); NOT(ISBLANK([ML.U6])); [ML.U6]=[ML.U7]); AND(ISEVEN(ROW()); NOT(ISBLANK([ML.U13])); [ML.U13]=[ML.U14])))" calcext:base-cell-address="Finals.A3"/>
          </calcext:conditional-format>
          <calcext:conditional-format calcext:target-range-address="Finals.A21:Finals.A22 Finals.C21:Finals.C22">
            <calcext:condition calcext:apply-style-name="DecidedEvenBeforeMatch" calcext:value="formula-is(OR(AND(ISODD(ROW()); NOT(ISBLANK([FL.Q6])); [FL.Q6]=[FL.Q7]); AND(ISEVEN(ROW()); NOT(ISBLANK([FL.Q13])); [FL.Q13]=[FL.Q14])))" calcext:base-cell-address="Finals.A21"/>
          </calcext:conditional-format>
          <calcext:conditional-format calcext:target-range-address="Finals.A23:Finals.A24 Finals.C23:Finals.C24">
            <calcext:condition calcext:apply-style-name="DecidedEvenBeforeMatch" calcext:value="formula-is(OR(AND(ISODD(ROW()); NOT(ISBLANK([FL.Q22])); [FL.Q22]=[FL.Q23]); AND(ISEVEN(ROW()); NOT(ISBLANK([FL.Q29])); [FL.Q29]=[FL.Q30])))" calcext:base-cell-address="Finals.A23"/>
          </calcext:conditional-format>
          <calcext:conditional-format calcext:target-range-address="Finals.A25:Finals.A26 Finals.C25:Finals.C26">
            <calcext:condition calcext:apply-style-name="DecidedEvenBeforeMatch" calcext:value="formula-is(OR(AND(ISODD(ROW()); NOT(ISBLANK([FL.Q38])); [FL.Q38]=[FL.Q39]); AND(ISEVEN(ROW()); NOT(ISBLANK([FL.Q45])); [FL.Q45]=[FL.Q46])))" calcext:base-cell-address="Finals.A25"/>
          </calcext:conditional-format>
          <calcext:conditional-format calcext:target-range-address="Finals.A27:Finals.A28 Finals.C27:Finals.C28">
            <calcext:condition calcext:apply-style-name="DecidedEvenBeforeMatch" calcext:value="formula-is(OR(AND(ISODD(ROW()); NOT(ISBLANK([FL.Q54])); [FL.Q54]=[FL.Q55]); AND(ISEVEN(ROW()); NOT(ISBLANK([FL.Q61])); [FL.Q61]=[FL.Q62])))" calcext:base-cell-address="Finals.A27"/>
          </calcext:conditional-format>
          <calcext:conditional-format calcext:target-range-address="Finals.A29:Finals.A30 Finals.C29:Finals.C30">
            <calcext:condition calcext:apply-style-name="DecidedEvenBeforeMatch" calcext:value="formula-is(OR(AND(ISODD(ROW()); NOT(ISBLANK([FL.Q70])); [FL.Q70]=[FL.Q71]); AND(ISEVEN(ROW()); NOT(ISBLANK([FL.Q77])); [FL.Q77]=[FL.Q78])))" calcext:base-cell-address="Finals.A29"/>
          </calcext:conditional-format>
          <calcext:conditional-format calcext:target-range-address="Finals.A31:Finals.A32 Finals.C31:Finals.C32">
            <calcext:condition calcext:apply-style-name="DecidedEvenBeforeMatch" calcext:value="formula-is(OR(AND(ISODD(ROW()); NOT(ISBLANK([FL.Q86])); [FL.Q86]=[FL.Q87]); AND(ISEVEN(ROW()); NOT(ISBLANK([FL.Q93])); [FL.Q93]=[FL.Q94])))" calcext:base-cell-address="Finals.A31"/>
          </calcext:conditional-format>
          <calcext:conditional-format calcext:target-range-address="Finals.A33:Finals.A34 Finals.C33:Finals.C34">
            <calcext:condition calcext:apply-style-name="DecidedEvenBeforeMatch" calcext:value="formula-is(OR(AND(ISODD(ROW()); NOT(ISBLANK([FL.Q102])); [FL.Q102]=[FL.Q103]); AND(ISEVEN(ROW()); NOT(ISBLANK([FL.Q109])); [FL.Q109]=[FL.Q110])))" calcext:base-cell-address="Finals.A33"/>
          </calcext:conditional-format>
          <calcext:conditional-format calcext:target-range-address="Finals.A35:Finals.A36 Finals.C35:Finals.C36">
            <calcext:condition calcext:apply-style-name="DecidedEvenBeforeMatch" calcext:value="formula-is(OR(AND(ISODD(ROW()); NOT(ISBLANK([FL.Q118])); [FL.Q118]=[FL.Q119]); AND(ISEVEN(ROW()); NOT(ISBLANK([FL.Q125])); [FL.Q125]=[FL.Q126])))" calcext:base-cell-address="Finals.A35"/>
          </calcext:conditional-format>
          <calcext:conditional-format calcext:target-range-address="Finals.L4:Finals.L5 Finals.V6:Finals.V7 Finals.L8:Finals.L9 Finals.AF10:Finals.AF11 Finals.L12:Finals.L13 Finals.V14:Finals.V15 Finals.L16:Finals.L17 Finals.B3:Finals.B18 Finals.L22:Finals.L23 Finals.V24:Finals.V25 Finals.L26:Finals.L27 Finals.AF28:Finals.AF29 Finals.L30:Finals.L31 Finals.V32:Finals.V33 Finals.L34:Finals.L35 Finals.B21:Finals.B36 Finals.AF17:Finals.AM17">
            <calcext:condition calcext:apply-style-name="MatchWinner" calcext:value="formula-is([.I3] = &quot;W&quot;)" calcext:base-cell-address="Finals.B3"/>
            <calcext:condition calcext:apply-style-name="MatchInProgress" calcext:value="formula-is(AND([.I3]=&quot;&quot;; NOT([.D3]=&quot;&quot;)))" calcext:base-cell-address="Finals.B3"/>
            <calcext:condition calcext:apply-style-name="MatchStilltoStart" calcext:value="formula-is([.D3]=&quot;&quot;)" calcext:base-cell-address="Finals.B3"/>
          </calcext:conditional-format>
          <calcext:conditional-format calcext:target-range-address="Finals.A5:Finals.A6 Finals.C5:Finals.C6">
            <calcext:condition calcext:apply-style-name="DecidedEvenBeforeMatch" calcext:value="formula-is(OR(AND(ISODD(ROW()); NOT(ISBLANK([ML.U22])); [ML.U22]=[ML.U23]); AND(ISEVEN(ROW()); NOT(ISBLANK([ML.U29])); [ML.U29]=[ML.U30])))" calcext:base-cell-address="Finals.A5"/>
          </calcext:conditional-format>
          <calcext:conditional-format calcext:target-range-address="Finals.C7:Finals.C8 Finals.A7:Finals.A8">
            <calcext:condition calcext:apply-style-name="DecidedEvenBeforeMatch" calcext:value="formula-is(OR(AND(ISODD(ROW()); NOT(ISBLANK([ML.U38])); [ML.U38]=[ML.U39]); AND(ISEVEN(ROW()); NOT(ISBLANK([ML.U45])); [ML.U45]=[ML.U46])))" calcext:base-cell-address="Finals.A7"/>
          </calcext:conditional-format>
          <calcext:conditional-format calcext:target-range-address="Finals.C9:Finals.C10 Finals.A9:Finals.A10">
            <calcext:condition calcext:apply-style-name="DecidedEvenBeforeMatch" calcext:value="formula-is(OR(AND(ISODD(ROW()); NOT(ISBLANK([ML.U54])); [ML.U54]=[ML.U55]); AND(ISEVEN(ROW()); NOT(ISBLANK([ML.U61])); [ML.U61]=[ML.U62])))" calcext:base-cell-address="Finals.A9"/>
          </calcext:conditional-format>
          <calcext:conditional-format calcext:target-range-address="Finals.D3:Finals.H18 Finals.D21:Finals.H36">
            <calcext:condition calcext:apply-style-name="SetWinner" calcext:value="formula-is(OR(AND(ISODD(ROW()); [.D3]&gt;[.D4]); AND(ISEVEN(ROW()); [.D3]&gt;[.D2])))" calcext:base-cell-address="Finals.D3"/>
          </calcext:conditional-format>
          <calcext:conditional-format calcext:target-range-address="Finals.S4:Finals.S5 Finals.AC6:Finals.AC7 Finals.S8:Finals.S9 Finals.AM10:Finals.AM11 Finals.S12:Finals.S13 Finals.AC14:Finals.AC15 Finals.S16:Finals.S17 Finals.I3:Finals.I18 Finals.S22:Finals.S23 Finals.AC24:Finals.AC25 Finals.S26:Finals.S27 Finals.AM28:Finals.AM29 Finals.S30:Finals.S31 Finals.AC32:Finals.AC33 Finals.S34:Finals.S35 Finals.I21:Finals.I36">
            <calcext:condition calcext:apply-style-name="WLRWinner" calcext:value="=&quot;W&quot;" calcext:base-cell-address="Finals.I3"/>
            <calcext:condition calcext:apply-style-name="WLRRetired" calcext:value="=&quot;R&quot;" calcext:base-cell-address="Finals.I3"/>
          </calcext:conditional-format>
          <calcext:conditional-format calcext:target-range-address="Finals.K4:Finals.K5 Finals.K8:Finals.K9 Finals.K12:Finals.K13 Finals.K16:Finals.K17 Finals.K22:Finals.K23 Finals.K26:Finals.K27 Finals.K30:Finals.K31 Finals.K34:Finals.K35 Finals.M4:Finals.M5 Finals.M8:Finals.M9 Finals.M12:Finals.M13 Finals.M16:Finals.M17 Finals.M22:Finals.M23 Finals.M26:Finals.M27 Finals.M30:Finals.M31 Finals.M34:Finals.M35">
            <calcext:condition calcext:apply-style-name="DecidedEvenBeforeMatch" calcext:value="formula-is(AND(NOT(ISBLANK([.A4])); OR(AND(ISODD(ROW()); [.A4]=[.A5]); AND(ISEVEN(ROW()); [.A4]=[.A3]))))" calcext:base-cell-address="Finals.K4"/>
          </calcext:conditional-format>
          <calcext:conditional-format calcext:target-range-address="Finals.X3:Finals.AB36 Finals.N3:Finals.R36 Finals.AH10:Finals.AL11 Finals.AH28:Finals.AL29 Finals.AE17:Finals.AE17 Finals.AE22:Finals.AM22">
            <calcext:condition calcext:apply-style-name="SetWinner" calcext:value="formula-is(OR(AND(ISEVEN(ROW()); [.N3]&gt;[.N4]); AND(ISODD(ROW()); [.N3]&gt;[.N2])))" calcext:base-cell-address="Finals.N3"/>
          </calcext:conditional-format>
          <calcext:conditional-format calcext:target-range-address="Finals.U6:Finals.U7 Finals.U14:Finals.U15 Finals.U24:Finals.U25 Finals.U32:Finals.U33 Finals.W6:Finals.W7 Finals.W14:Finals.W15 Finals.W24:Finals.W25 Finals.W32:Finals.W33">
            <calcext:condition calcext:apply-style-name="DecidedEvenBeforeMatch" calcext:value="formula-is(OR(AND(ISEVEN(ROW()); NOT(ISBLANK([.K4])); [.K4]=[.K5]); AND(ISODD(ROW()); NOT(ISBLANK([.K7])); [.K7]=[.K8])))" calcext:base-cell-address="Finals.U6"/>
          </calcext:conditional-format>
          <calcext:conditional-format calcext:target-range-address="Finals.AE10:Finals.AE11 Finals.AE28:Finals.AE29 Finals.AG10:Finals.AG11 Finals.AG28:Finals.AG29">
            <calcext:condition calcext:apply-style-name="DecidedEvenBeforeMatch" calcext:value="formula-is(OR(AND(ISEVEN(ROW()); NOT(ISBLANK([.U6])); [.U6]=[.U7]); AND(ISODD(ROW()); NOT(ISBLANK([.U13])); [.U13]=[.U14])))" calcext:base-cell-address="Finals.AE10"/>
          </calcext:conditional-format>
        </calcext:conditional-formats>
      </table:table>
      <table:table table:name="ML" table:style-name="ta1" table:print="false">
        <office:forms form:automatic-focus="false" form:apply-design-mode="false"/>
        <table:table-column table:style-name="co1" table:default-cell-style-name="ce97"/>
        <table:table-column table:style-name="co22" table:default-cell-style-name="Default"/>
        <table:table-column table:style-name="co23" table:default-cell-style-name="ce106"/>
        <table:table-column table:style-name="co5" table:number-columns-repeated="5" table:default-cell-style-name="ce106"/>
        <table:table-column table:style-name="co7" table:default-cell-style-name="ce114"/>
        <table:table-column table:style-name="co24" table:default-cell-style-name="Default"/>
        <table:table-column table:style-name="co12" table:default-cell-style-name="ce106"/>
        <table:table-column table:style-name="co22" table:default-cell-style-name="Default"/>
        <table:table-column table:style-name="co25" table:default-cell-style-name="Default"/>
        <table:table-column table:style-name="co5" table:number-columns-repeated="5" table:default-cell-style-name="Default"/>
        <table:table-column table:style-name="co7" table:default-cell-style-name="ce78"/>
        <table:table-column table:style-name="co8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5" table:number-columns-repeated="3" table:default-cell-style-name="Default"/>
        <table:table-column table:style-name="co7" table:default-cell-style-name="ce78"/>
        <table:table-column table:style-name="co8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12" table:number-columns-repeated="2" table:default-cell-style-name="Default"/>
        <table:table-column table:style-name="co5" table:number-columns-repeated="3" table:default-cell-style-name="Default"/>
        <table:table-column table:style-name="co7" table:default-cell-style-name="ce78"/>
        <table:table-column table:style-name="co7" table:default-cell-style-name="ce194"/>
        <table:table-column table:style-name="co22" table:number-columns-repeated="216" table:default-cell-style-name="Default"/>
        <table:table-row table:style-name="ro1">
          <table:table-cell table:style-name="Default"/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  <table:table-cell table:style-name="ce78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1" office:value-type="string" calcext:value-type="string" table:number-columns-spanned="9" table:number-rows-spanned="1">
            <text:p>Round 1</text:p>
          </table:table-cell>
          <table:covered-table-cell table:style-name="ce98"/>
          <table:covered-table-cell table:number-columns-repeated="6" table:style-name="ce102"/>
          <table:covered-table-cell table:style-name="ce110"/>
          <table:table-cell table:style-name="ce115"/>
          <table:table-cell table:style-name="ce1" office:value-type="string" calcext:value-type="string" table:number-columns-spanned="9" table:number-rows-spanned="1">
            <text:p>Round 2</text:p>
          </table:table-cell>
          <table:covered-table-cell table:number-columns-repeated="8"/>
          <table:table-cell table:style-name="ce115"/>
          <table:table-cell table:style-name="ce1" office:value-type="string" calcext:value-type="string" table:number-columns-spanned="9" table:number-rows-spanned="1">
            <text:p>Round 3</text:p>
          </table:table-cell>
          <table:covered-table-cell table:number-columns-repeated="8"/>
          <table:table-cell table:style-name="ce115"/>
          <table:table-cell table:style-name="ce1" office:value-type="string" calcext:value-type="string" table:number-columns-spanned="9" table:number-rows-spanned="1">
            <text:p>Round 4</text:p>
          </table:table-cell>
          <table:covered-table-cell table:number-columns-repeated="8"/>
          <table:table-cell table:style-name="ce135"/>
          <table:table-cell table:style-name="ce115"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3:.H3]; [.D4:.H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4:.H4]; [.D3:.H3])">
            <text:p/>
          </table:table-cell>
          <table:table-cell table:style-name="ce78"/>
          <table:table-cell table:style-name="ce315" table:formula="of:=IF(AND(NOT(ISBLANK([.A3])); [.A3]=[.A4]); [.A3]; IF([.$I3]=&quot;W&quot;; IF(NOT(ISBLANK([.A3])); [.A3]; &quot;&quot;); IF([.$I4]=&quot;W&quot;; IF(NOT(ISBLANK([.A4])); [.A4]; &quot;&quot;); &quot;&quot;)))">
            <text:p/>
          </table:table-cell>
          <table:table-cell table:style-name="ce320" table:formula="of:=IF([.$I3]=&quot;W&quot;; IF(NOT(ISBLANK([.B3])); [.B3]; &quot;&quot;); IF([.$I4]=&quot;W&quot;; IF(NOT(ISBLANK([.B4])); [.B4]; &quot;&quot;); &quot;&quot;))">
            <text:p/>
          </table:table-cell>
          <table:table-cell table:style-name="ce318" table:formula="of:=IF(AND(NOT(ISBLANK([.C3])); [.C3]=[.C4]); [.C3]; IF([.$I3]=&quot;W&quot;; IF(NOT(ISBLANK([.C3])); [.C3]; &quot;&quot;); IF([.$I4]=&quot;W&quot;; IF(NOT(ISBLANK([.C4])); [.C4]; &quot;&quot;); &quot;&quot;)))">
            <text:p/>
          </table:table-cell>
          <table:table-cell table:style-name="ce324" table:number-columns-repeated="5"/>
          <table:table-cell table:style-name="ce265" table:formula="of:=ISWINNERMEN([.N4:.R4]; [.N5:.R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5:.H5]; [.D6:.H6])">
            <text:p/>
          </table:table-cell>
          <table:table-cell table:style-name="ce78"/>
          <table:table-cell table:style-name="ce316" table:formula="of:=IF(AND(NOT(ISBLANK([.A5])); [.A5]=[.A6]); [.A5]; IF([.$I5]=&quot;W&quot;; IF(NOT(ISBLANK([.A5])); [.A5]; &quot;&quot;); IF([.$I6]=&quot;W&quot;; IF(NOT(ISBLANK([.A6])); [.A6]; &quot;&quot;); &quot;&quot;)))">
            <text:p/>
          </table:table-cell>
          <table:table-cell table:style-name="ce321" table:formula="of:=IF([.$I5]=&quot;W&quot;; IF(NOT(ISBLANK([.B5])); [.B5]; &quot;&quot;); IF([.$I6]=&quot;W&quot;; IF(NOT(ISBLANK([.B6])); [.B6]; &quot;&quot;); &quot;&quot;))">
            <text:p/>
          </table:table-cell>
          <table:table-cell table:style-name="ce319" table:formula="of:=IF(AND(NOT(ISBLANK([.C5])); [.C5]=[.C6]); [.C5]; IF([.$I5]=&quot;W&quot;; IF(NOT(ISBLANK([.C5])); [.C5]; &quot;&quot;); IF([.$I6]=&quot;W&quot;; IF(NOT(ISBLANK([.C6])); [.C6]; &quot;&quot;); &quot;&quot;)))">
            <text:p/>
          </table:table-cell>
          <table:table-cell table:style-name="ce325" table:number-columns-repeated="5"/>
          <table:table-cell table:style-name="ce308" table:formula="of:=ISWINNERMEN([.N5:.R5]; [.N4:.R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6:.H6]; [.D5:.H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4])); [.$K4]=[.$K5]); [.$K4]; IF([.$S4]=&quot;W&quot;; IF(NOT(ISBLANK([.$K4])); [.$K4]; &quot;&quot;); IF([.$S5]=&quot;W&quot;; IF(NOT(ISBLANK([.$K5])); [.$K5]; &quot;&quot;); &quot;&quot;)))">
            <text:p/>
          </table:table-cell>
          <table:table-cell table:style-name="ce320" table:formula="of:=IF([.$S4]=&quot;W&quot;; IF(NOT(ISBLANK([.L4])); [.L4]; &quot;&quot;); IF([.$S5]=&quot;W&quot;; IF(NOT(ISBLANK([.L5])); [.L5]; &quot;&quot;); &quot;&quot;))">
            <text:p/>
          </table:table-cell>
          <table:table-cell table:style-name="ce329" table:formula="of:=IF(AND(NOT(ISBLANK([.M4])); [.M4]=[.M5]); [.M4]; IF([.$S4]=&quot;W&quot;; IF(NOT(ISBLANK([.M4])); [.M4]; &quot;&quot;); IF([.$S5]=&quot;W&quot;; IF(NOT(ISBLANK([.M5])); [.M5]; &quot;&quot;); &quot;&quot;)))">
            <text:p/>
          </table:table-cell>
          <table:table-cell table:style-name="ce324" table:number-columns-repeated="5"/>
          <table:table-cell table:style-name="ce265" table:formula="of:=ISWINNERMEN([.X6:.AB6]; [.X7:.AB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7:.H7]; [.D8:.H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8])); [.$K8]=[.$K9]); [.$K8]; IF([.$S8]=&quot;W&quot;; IF(NOT(ISBLANK([.$K8])); [.$K8]; &quot;&quot;); IF([.$S9]=&quot;W&quot;; IF(NOT(ISBLANK([.$K9])); [.$K9]; &quot;&quot;); &quot;&quot;)))">
            <text:p/>
          </table:table-cell>
          <table:table-cell table:style-name="ce321" table:formula="of:=IF([.$S8]=&quot;W&quot;; IF(NOT(ISBLANK([.L8])); [.L8]; &quot;&quot;); IF([.$S9]=&quot;W&quot;; IF(NOT(ISBLANK([.L9])); [.L9]; &quot;&quot;); &quot;&quot;))">
            <text:p/>
          </table:table-cell>
          <table:table-cell table:style-name="ce331" table:formula="of:=IF(AND(NOT(ISBLANK([.M8])); [.M8]=[.M9]); [.M8]; IF([.$S8]=&quot;W&quot;; IF(NOT(ISBLANK([.M8])); [.M8]; &quot;&quot;); IF([.$S9]=&quot;W&quot;; IF(NOT(ISBLANK([.M9])); [.M9]; &quot;&quot;); &quot;&quot;)))">
            <text:p/>
          </table:table-cell>
          <table:table-cell table:style-name="ce325" table:number-columns-repeated="5"/>
          <table:table-cell table:style-name="ce308" table:formula="of:=ISWINNERMEN([.X7:.AB7]; [.X6:.AB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8:.H8]; [.D7:.H7])">
            <text:p/>
          </table:table-cell>
          <table:table-cell table:style-name="ce78"/>
          <table:table-cell table:style-name="ce315" table:formula="of:=IF(AND(NOT(ISBLANK([.A7])); [.A7]=[.A8]); [.A7]; IF([.$I7]=&quot;W&quot;; IF(NOT(ISBLANK([.A7])); [.A7]; &quot;&quot;); IF([.$I8]=&quot;W&quot;; IF(NOT(ISBLANK([.A8])); [.A8]; &quot;&quot;); &quot;&quot;)))">
            <text:p/>
          </table:table-cell>
          <table:table-cell table:style-name="ce320" table:formula="of:=IF([.$I7]=&quot;W&quot;; IF(NOT(ISBLANK([.B7])); [.B7]; &quot;&quot;); IF([.$I8]=&quot;W&quot;; IF(NOT(ISBLANK([.B8])); [.B8]; &quot;&quot;); &quot;&quot;))">
            <text:p/>
          </table:table-cell>
          <table:table-cell table:style-name="ce318" table:formula="of:=IF(AND(NOT(ISBLANK([.C7])); [.C7]=[.C8]); [.C7]; IF([.$I7]=&quot;W&quot;; IF(NOT(ISBLANK([.C7])); [.C7]; &quot;&quot;); IF([.$I8]=&quot;W&quot;; IF(NOT(ISBLANK([.C8])); [.C8]; &quot;&quot;); &quot;&quot;)))">
            <text:p/>
          </table:table-cell>
          <table:table-cell table:style-name="ce324" table:number-columns-repeated="5"/>
          <table:table-cell table:style-name="ce265" table:formula="of:=ISWINNERMEN([.N8:.R8]; [.N9:.R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9:.H9]; [.D10:.H10])">
            <text:p/>
          </table:table-cell>
          <table:table-cell table:style-name="ce78"/>
          <table:table-cell table:style-name="ce316" table:formula="of:=IF(AND(NOT(ISBLANK([.A9])); [.A9]=[.A10]); [.A9]; IF([.$I9]=&quot;W&quot;; IF(NOT(ISBLANK([.A9])); [.A9]; &quot;&quot;); IF([.$I10]=&quot;W&quot;; IF(NOT(ISBLANK([.A10])); [.A10]; &quot;&quot;); &quot;&quot;)))">
            <text:p/>
          </table:table-cell>
          <table:table-cell table:style-name="ce321" table:formula="of:=IF([.$I9]=&quot;W&quot;; IF(NOT(ISBLANK([.B9])); [.B9]; &quot;&quot;); IF([.$I10]=&quot;W&quot;; IF(NOT(ISBLANK([.B10])); [.B10]; &quot;&quot;); &quot;&quot;))">
            <text:p/>
          </table:table-cell>
          <table:table-cell table:style-name="ce319" table:formula="of:=IF(AND(NOT(ISBLANK([.C9])); [.C9]=[.C10]); [.C9]; IF([.$I9]=&quot;W&quot;; IF(NOT(ISBLANK([.C9])); [.C9]; &quot;&quot;); IF([.$I10]=&quot;W&quot;; IF(NOT(ISBLANK([.C10])); [.C10]; &quot;&quot;); &quot;&quot;)))">
            <text:p/>
          </table:table-cell>
          <table:table-cell table:style-name="ce325" table:number-columns-repeated="5"/>
          <table:table-cell table:style-name="ce308" table:formula="of:=ISWINNERMEN([.N9:.R9]; [.N8:.R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0:.H10]; [.D9:.H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3" table:formula="of:=IF(AND(NOT(ISBLANK([.$U6])); [.$U6]=[.$U7]); [.$U6]; IF([.$AC6]=&quot;W&quot;; IF(NOT(ISBLANK([.$U6])); [.$U6]; &quot;&quot;); IF([.$AC7]=&quot;W&quot;; IF(NOT(ISBLANK([.$U7])); [.$U7]; &quot;&quot;); &quot;&quot;)))">
            <text:p/>
          </table:table-cell>
          <table:table-cell table:style-name="ce320" table:formula="of:=IF([.$AC6]=&quot;W&quot;; IF(NOT(ISBLANK([.V6])); [.V6]; &quot;&quot;); IF([.$AC7]=&quot;W&quot;; IF(NOT(ISBLANK([.V7])); [.V7]; &quot;&quot;); &quot;&quot;))">
            <text:p/>
          </table:table-cell>
          <table:table-cell table:style-name="ce336" table:formula="of:=IF(AND(NOT(ISBLANK([.$W6])); [.$W6]=[.$W7]); [.$W6]; IF([.$AC6]=&quot;W&quot;; IF(NOT(ISBLANK([.$W6])); [.$W6]; &quot;&quot;); IF([.$AC7]=&quot;W&quot;; IF(NOT(ISBLANK([.$W7])); [.$W7]; &quot;&quot;); &quot;&quot;)))">
            <text:p/>
          </table:table-cell>
          <table:table-cell table:style-name="ce324" table:formula="of:=IF(NOT(ISBLANK([Finals.D3])); [Finals.D3]; &quot;&quot;)">
            <text:p/>
          </table:table-cell>
          <table:table-cell table:style-name="ce324" table:formula="of:=IF(NOT(ISBLANK([Finals.E3])); [Finals.E3]; &quot;&quot;)">
            <text:p/>
          </table:table-cell>
          <table:table-cell table:style-name="ce324" table:formula="of:=IF(NOT(ISBLANK([Finals.F3])); [Finals.F3]; &quot;&quot;)">
            <text:p/>
          </table:table-cell>
          <table:table-cell table:style-name="ce324" table:formula="of:=IF(NOT(ISBLANK([Finals.G3])); [Finals.G3]; &quot;&quot;)">
            <text:p/>
          </table:table-cell>
          <table:table-cell table:style-name="ce324" table:formula="of:=IF(NOT(ISBLANK([Finals.H3])); [Finals.H3]; &quot;&quot;)">
            <text:p/>
          </table:table-cell>
          <table:table-cell table:style-name="ce265" table:formula="of:=IF(NOT(ISBLANK([Finals.I3])); [Finals.I3]; &quot;&quot;)">
            <text:p/>
          </table:table-cell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1:.H11]; [.D12:.H1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5" table:formula="of:=IF(AND(NOT(ISBLANK([.$U14])); [.$U14]=[.$U15]); [.$U14]; IF([.$AC14]=&quot;W&quot;; IF(NOT(ISBLANK([.$U14])); [.$U14]; &quot;&quot;); IF([.$AC15]=&quot;W&quot;; IF(NOT(ISBLANK([.$U15])); [.$U15]; &quot;&quot;); &quot;&quot;)))">
            <text:p/>
          </table:table-cell>
          <table:table-cell table:style-name="ce321" table:formula="of:=IF([.$AC14]=&quot;W&quot;; IF(NOT(ISBLANK([.V14])); [.V14]; &quot;&quot;); IF([.$AC15]=&quot;W&quot;; IF(NOT(ISBLANK([.V15])); [.V15]; &quot;&quot;); &quot;&quot;))">
            <text:p/>
          </table:table-cell>
          <table:table-cell table:style-name="ce337" table:formula="of:=IF(AND(NOT(ISBLANK([.$W14])); [.$W14]=[.$W15]); [.$W14]; IF([.$AC14]=&quot;W&quot;; IF(NOT(ISBLANK([.$W14])); [.$W14]; &quot;&quot;); IF([.$AC15]=&quot;W&quot;; IF(NOT(ISBLANK([.$W15])); [.$W15]; &quot;&quot;); &quot;&quot;)))">
            <text:p/>
          </table:table-cell>
          <table:table-cell table:style-name="ce325" table:formula="of:=IF(NOT(ISBLANK([Finals.D4])); [Finals.D4]; &quot;&quot;)">
            <text:p/>
          </table:table-cell>
          <table:table-cell table:style-name="ce325" table:formula="of:=IF(NOT(ISBLANK([Finals.E4])); [Finals.E4]; &quot;&quot;)">
            <text:p/>
          </table:table-cell>
          <table:table-cell table:style-name="ce325" table:formula="of:=IF(NOT(ISBLANK([Finals.F4])); [Finals.F4]; &quot;&quot;)">
            <text:p/>
          </table:table-cell>
          <table:table-cell table:style-name="ce325" table:formula="of:=IF(NOT(ISBLANK([Finals.G4])); [Finals.G4]; &quot;&quot;)">
            <text:p/>
          </table:table-cell>
          <table:table-cell table:style-name="ce325" table:formula="of:=IF(NOT(ISBLANK([Finals.H4])); [Finals.H4]; &quot;&quot;)">
            <text:p/>
          </table:table-cell>
          <table:table-cell table:style-name="ce308" table:formula="of:=IF(NOT(ISBLANK([Finals.I4])); [Finals.I4]; &quot;&quot;)">
            <text:p/>
          </table:table-cell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2:.H12]; [.D11:.H11])">
            <text:p/>
          </table:table-cell>
          <table:table-cell table:style-name="ce78"/>
          <table:table-cell table:style-name="ce315" table:formula="of:=IF(AND(NOT(ISBLANK([.A11])); [.A11]=[.A12]); [.A11]; IF([.$I11]=&quot;W&quot;; IF(NOT(ISBLANK([.A11])); [.A11]; &quot;&quot;); IF([.$I12]=&quot;W&quot;; IF(NOT(ISBLANK([.A12])); [.A12]; &quot;&quot;); &quot;&quot;)))">
            <text:p/>
          </table:table-cell>
          <table:table-cell table:style-name="ce320" table:formula="of:=IF([.$I11]=&quot;W&quot;; IF(NOT(ISBLANK([.B11])); [.B11]; &quot;&quot;); IF([.$I12]=&quot;W&quot;; IF(NOT(ISBLANK([.B12])); [.B12]; &quot;&quot;); &quot;&quot;))">
            <text:p/>
          </table:table-cell>
          <table:table-cell table:style-name="ce318" table:formula="of:=IF(AND(NOT(ISBLANK([.C11])); [.C11]=[.C12]); [.C11]; IF([.$I11]=&quot;W&quot;; IF(NOT(ISBLANK([.C11])); [.C11]; &quot;&quot;); IF([.$I12]=&quot;W&quot;; IF(NOT(ISBLANK([.C12])); [.C12]; &quot;&quot;); &quot;&quot;)))">
            <text:p/>
          </table:table-cell>
          <table:table-cell table:style-name="ce324" table:number-columns-repeated="5"/>
          <table:table-cell table:style-name="ce265" table:formula="of:=ISWINNERMEN([.N12:.R12]; [.N13:.R1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3:.H13]; [.D14:.H14])">
            <text:p/>
          </table:table-cell>
          <table:table-cell table:style-name="ce78"/>
          <table:table-cell table:style-name="ce316" table:formula="of:=IF(AND(NOT(ISBLANK([.A13])); [.A13]=[.A14]); [.A13]; IF([.$I13]=&quot;W&quot;; IF(NOT(ISBLANK([.A13])); [.A13]; &quot;&quot;); IF([.$I14]=&quot;W&quot;; IF(NOT(ISBLANK([.A14])); [.A14]; &quot;&quot;); &quot;&quot;)))">
            <text:p/>
          </table:table-cell>
          <table:table-cell table:style-name="ce321" table:formula="of:=IF([.$I13]=&quot;W&quot;; IF(NOT(ISBLANK([.B13])); [.B13]; &quot;&quot;); IF([.$I14]=&quot;W&quot;; IF(NOT(ISBLANK([.B14])); [.B14]; &quot;&quot;); &quot;&quot;))">
            <text:p/>
          </table:table-cell>
          <table:table-cell table:style-name="ce319" table:formula="of:=IF(AND(NOT(ISBLANK([.C13])); [.C13]=[.C14]); [.C13]; IF([.$I13]=&quot;W&quot;; IF(NOT(ISBLANK([.C13])); [.C13]; &quot;&quot;); IF([.$I14]=&quot;W&quot;; IF(NOT(ISBLANK([.C14])); [.C14]; &quot;&quot;); &quot;&quot;)))">
            <text:p/>
          </table:table-cell>
          <table:table-cell table:style-name="ce325" table:number-columns-repeated="5"/>
          <table:table-cell table:style-name="ce308" table:formula="of:=ISWINNERMEN([.N13:.R13]; [.N12:.R1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4:.H14]; [.D13:.H13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12])); [.$K12]=[.$K13]); [.$K12]; IF([.$S12]=&quot;W&quot;; IF(NOT(ISBLANK([.$K12])); [.$K12]; &quot;&quot;); IF([.$S13]=&quot;W&quot;; IF(NOT(ISBLANK([.$K13])); [.$K13]; &quot;&quot;); &quot;&quot;)))">
            <text:p/>
          </table:table-cell>
          <table:table-cell table:style-name="ce320" table:formula="of:=IF([.$S12]=&quot;W&quot;; IF(NOT(ISBLANK([.L12])); [.L12]; &quot;&quot;); IF([.$S13]=&quot;W&quot;; IF(NOT(ISBLANK([.L13])); [.L13]; &quot;&quot;); &quot;&quot;))">
            <text:p/>
          </table:table-cell>
          <table:table-cell table:style-name="ce329" table:formula="of:=IF(AND(NOT(ISBLANK([.M12])); [.M12]=[.M13]); [.M12]; IF([.$S12]=&quot;W&quot;; IF(NOT(ISBLANK([.M12])); [.M12]; &quot;&quot;); IF([.$S13]=&quot;W&quot;; IF(NOT(ISBLANK([.M13])); [.M13]; &quot;&quot;); &quot;&quot;)))">
            <text:p/>
          </table:table-cell>
          <table:table-cell table:style-name="ce324" table:number-columns-repeated="5"/>
          <table:table-cell table:style-name="ce265" table:formula="of:=ISWINNERMEN([.X14:.AB14]; [.X15:.AB1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5:.H15]; [.D16:.H16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16])); [.$K16]=[.$K17]); [.$K16]; IF([.$S16]=&quot;W&quot;; IF(NOT(ISBLANK([.$K16])); [.$K16]; &quot;&quot;); IF([.$S17]=&quot;W&quot;; IF(NOT(ISBLANK([.$K17])); [.$K17]; &quot;&quot;); &quot;&quot;)))">
            <text:p/>
          </table:table-cell>
          <table:table-cell table:style-name="ce321" table:formula="of:=IF([.$S16]=&quot;W&quot;; IF(NOT(ISBLANK([.L16])); [.L16]; &quot;&quot;); IF([.$S17]=&quot;W&quot;; IF(NOT(ISBLANK([.L17])); [.L17]; &quot;&quot;); &quot;&quot;))">
            <text:p/>
          </table:table-cell>
          <table:table-cell table:style-name="ce331" table:formula="of:=IF(AND(NOT(ISBLANK([.M16])); [.M16]=[.M17]); [.M16]; IF([.$S16]=&quot;W&quot;; IF(NOT(ISBLANK([.M16])); [.M16]; &quot;&quot;); IF([.$S17]=&quot;W&quot;; IF(NOT(ISBLANK([.M17])); [.M17]; &quot;&quot;); &quot;&quot;)))">
            <text:p/>
          </table:table-cell>
          <table:table-cell table:style-name="ce325" table:number-columns-repeated="5"/>
          <table:table-cell table:style-name="ce308" table:formula="of:=ISWINNERMEN([.X15:.AB15]; [.X14:.AB1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6:.H16]; [.D15:.H15])">
            <text:p/>
          </table:table-cell>
          <table:table-cell table:style-name="ce78"/>
          <table:table-cell table:style-name="ce315" table:formula="of:=IF(AND(NOT(ISBLANK([.A15])); [.A15]=[.A16]); [.A15]; IF([.$I15]=&quot;W&quot;; IF(NOT(ISBLANK([.A15])); [.A15]; &quot;&quot;); IF([.$I16]=&quot;W&quot;; IF(NOT(ISBLANK([.A16])); [.A16]; &quot;&quot;); &quot;&quot;)))">
            <text:p/>
          </table:table-cell>
          <table:table-cell table:style-name="ce320" table:formula="of:=IF([.$I15]=&quot;W&quot;; IF(NOT(ISBLANK([.B15])); [.B15]; &quot;&quot;); IF([.$I16]=&quot;W&quot;; IF(NOT(ISBLANK([.B16])); [.B16]; &quot;&quot;); &quot;&quot;))">
            <text:p/>
          </table:table-cell>
          <table:table-cell table:style-name="ce318" table:formula="of:=IF(AND(NOT(ISBLANK([.C15])); [.C15]=[.C16]); [.C15]; IF([.$I15]=&quot;W&quot;; IF(NOT(ISBLANK([.C15])); [.C15]; &quot;&quot;); IF([.$I16]=&quot;W&quot;; IF(NOT(ISBLANK([.C16])); [.C16]; &quot;&quot;); &quot;&quot;)))">
            <text:p/>
          </table:table-cell>
          <table:table-cell table:style-name="ce324" table:number-columns-repeated="5"/>
          <table:table-cell table:style-name="ce265" table:formula="of:=ISWINNERMEN([.N16:.R16]; [.N17:.R1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7:.H17]; [.D18:.H18])">
            <text:p/>
          </table:table-cell>
          <table:table-cell table:style-name="ce78"/>
          <table:table-cell table:style-name="ce316" table:formula="of:=IF(AND(NOT(ISBLANK([.A17])); [.A17]=[.A18]); [.A17]; IF([.$I17]=&quot;W&quot;; IF(NOT(ISBLANK([.A17])); [.A17]; &quot;&quot;); IF([.$I18]=&quot;W&quot;; IF(NOT(ISBLANK([.A18])); [.A18]; &quot;&quot;); &quot;&quot;)))">
            <text:p/>
          </table:table-cell>
          <table:table-cell table:style-name="ce321" table:formula="of:=IF([.$I17]=&quot;W&quot;; IF(NOT(ISBLANK([.B17])); [.B17]; &quot;&quot;); IF([.$I18]=&quot;W&quot;; IF(NOT(ISBLANK([.B18])); [.B18]; &quot;&quot;); &quot;&quot;))">
            <text:p/>
          </table:table-cell>
          <table:table-cell table:style-name="ce319" table:formula="of:=IF(AND(NOT(ISBLANK([.C17])); [.C17]=[.C18]); [.C17]; IF([.$I17]=&quot;W&quot;; IF(NOT(ISBLANK([.C17])); [.C17]; &quot;&quot;); IF([.$I18]=&quot;W&quot;; IF(NOT(ISBLANK([.C18])); [.C18]; &quot;&quot;); &quot;&quot;)))">
            <text:p/>
          </table:table-cell>
          <table:table-cell table:style-name="ce325" table:number-columns-repeated="5"/>
          <table:table-cell table:style-name="ce308" table:formula="of:=ISWINNERMEN([.N17:.R17]; [.N16:.R1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8:.H18]; [.D17:.H17])">
            <text:p/>
            <draw:frame table:end-cell-address="ML.U20" table:end-x="0.0437in" table:end-y="0.0272in" draw:z-index="0" draw:style-name="gr1" draw:text-style-name="P1" svg:width="2.9256in" svg:height="0.2654in" draw:transform="rotate (1.5707963267949) translate (0.193307086614173in 0.166929133858268in)">
              <draw:text-box>
                <text:p><text:span text:style-name="T1">Section 1</text:span></text:p>
              </draw:text-box>
            </draw:frame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 table:style-name="ce130"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1" calcext:value-type="float">
            <text:p>1</text:p>
          </table:table-cell>
          <table:table-cell table:number-columns-repeated="216"/>
        </table:table-row>
        <table:table-row table:style-name="ro3">
          <table:table-cell table:style-name="ce96"/>
          <table:table-cell table:style-name="ce322"/>
          <table:table-cell table:style-name="ce105"/>
          <table:table-cell table:style-name="ce330" table:number-columns-repeated="5"/>
          <table:table-cell table:style-name="ce334" table:formula="of:=ISWINNERMEN([.D19:.H19]; [.D20:.H20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46" table:number-columns-repeated="5"/>
          <table:table-cell table:style-name="ce81" table:number-columns-repeated="5"/>
          <table:table-cell table:style-name="ce346" table:number-columns-repeated="5"/>
          <table:table-cell/>
          <table:table-cell table:style-name="ce81" table:number-columns-repeated="4"/>
          <table:table-cell table:style-name="ce346" table:number-columns-repeated="5"/>
          <table:table-cell table:style-name="ce81"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20:.H20]; [.D19:.H19])">
            <text:p/>
          </table:table-cell>
          <table:table-cell table:style-name="ce78"/>
          <table:table-cell table:style-name="ce315" table:formula="of:=IF(AND(NOT(ISBLANK([.A19])); [.A19]=[.A20]); [.A19]; IF([.$I19]=&quot;W&quot;; IF(NOT(ISBLANK([.A19])); [.A19]; &quot;&quot;); IF([.$I20]=&quot;W&quot;; IF(NOT(ISBLANK([.A20])); [.A20]; &quot;&quot;); &quot;&quot;)))">
            <text:p/>
          </table:table-cell>
          <table:table-cell table:style-name="ce320" table:formula="of:=IF([.$I19]=&quot;W&quot;; IF(NOT(ISBLANK([.B19])); [.B19]; &quot;&quot;); IF([.$I20]=&quot;W&quot;; IF(NOT(ISBLANK([.B20])); [.B20]; &quot;&quot;); &quot;&quot;))">
            <text:p/>
          </table:table-cell>
          <table:table-cell table:style-name="ce318" table:formula="of:=IF(AND(NOT(ISBLANK([.C19])); [.C19]=[.C20]); [.C19]; IF([.$I19]=&quot;W&quot;; IF(NOT(ISBLANK([.C19])); [.C19]; &quot;&quot;); IF([.$I20]=&quot;W&quot;; IF(NOT(ISBLANK([.C20])); [.C20]; &quot;&quot;); &quot;&quot;)))">
            <text:p/>
          </table:table-cell>
          <table:table-cell table:style-name="ce324" table:number-columns-repeated="5"/>
          <table:table-cell table:style-name="ce265" table:formula="of:=ISWINNERMEN([.N20:.R20]; [.N21:.R2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21:.H21]; [.D22:.H22])">
            <text:p/>
          </table:table-cell>
          <table:table-cell table:style-name="ce78"/>
          <table:table-cell table:style-name="ce316" table:formula="of:=IF(AND(NOT(ISBLANK([.A21])); [.A21]=[.A22]); [.A21]; IF([.$I21]=&quot;W&quot;; IF(NOT(ISBLANK([.A21])); [.A21]; &quot;&quot;); IF([.$I22]=&quot;W&quot;; IF(NOT(ISBLANK([.A22])); [.A22]; &quot;&quot;); &quot;&quot;)))">
            <text:p/>
          </table:table-cell>
          <table:table-cell table:style-name="ce321" table:formula="of:=IF([.$I21]=&quot;W&quot;; IF(NOT(ISBLANK([.B21])); [.B21]; &quot;&quot;); IF([.$I22]=&quot;W&quot;; IF(NOT(ISBLANK([.B22])); [.B22]; &quot;&quot;); &quot;&quot;))">
            <text:p/>
          </table:table-cell>
          <table:table-cell table:style-name="ce319" table:formula="of:=IF(AND(NOT(ISBLANK([.C21])); [.C21]=[.C22]); [.C21]; IF([.$I21]=&quot;W&quot;; IF(NOT(ISBLANK([.C21])); [.C21]; &quot;&quot;); IF([.$I22]=&quot;W&quot;; IF(NOT(ISBLANK([.C22])); [.C22]; &quot;&quot;); &quot;&quot;)))">
            <text:p/>
          </table:table-cell>
          <table:table-cell table:style-name="ce325" table:number-columns-repeated="5"/>
          <table:table-cell table:style-name="ce308" table:formula="of:=ISWINNERMEN([.N21:.R21]; [.N20:.R2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22:.H22]; [.D21:.H2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20])); [.$K20]=[.$K21]); [.$K20]; IF([.$S20]=&quot;W&quot;; IF(NOT(ISBLANK([.$K20])); [.$K20]; &quot;&quot;); IF([.$S21]=&quot;W&quot;; IF(NOT(ISBLANK([.$K21])); [.$K21]; &quot;&quot;); &quot;&quot;)))">
            <text:p/>
          </table:table-cell>
          <table:table-cell table:style-name="ce320" table:formula="of:=IF([.$S20]=&quot;W&quot;; IF(NOT(ISBLANK([.L20])); [.L20]; &quot;&quot;); IF([.$S21]=&quot;W&quot;; IF(NOT(ISBLANK([.L21])); [.L21]; &quot;&quot;); &quot;&quot;))">
            <text:p/>
          </table:table-cell>
          <table:table-cell table:style-name="ce329" table:formula="of:=IF(AND(NOT(ISBLANK([.M20])); [.M20]=[.M21]); [.M20]; IF([.$S20]=&quot;W&quot;; IF(NOT(ISBLANK([.M20])); [.M20]; &quot;&quot;); IF([.$S21]=&quot;W&quot;; IF(NOT(ISBLANK([.M21])); [.M21]; &quot;&quot;); &quot;&quot;)))">
            <text:p/>
          </table:table-cell>
          <table:table-cell table:style-name="ce324" table:number-columns-repeated="5"/>
          <table:table-cell table:style-name="ce265" table:formula="of:=ISWINNERMEN([.X22:.AB22]; [.X23:.AB2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23:.H23]; [.D24:.H2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24])); [.$K24]=[.$K25]); [.$K24]; IF([.$S24]=&quot;W&quot;; IF(NOT(ISBLANK([.$K24])); [.$K24]; &quot;&quot;); IF([.$S25]=&quot;W&quot;; IF(NOT(ISBLANK([.$K25])); [.$K25]; &quot;&quot;); &quot;&quot;)))">
            <text:p/>
          </table:table-cell>
          <table:table-cell table:style-name="ce321" table:formula="of:=IF([.$S24]=&quot;W&quot;; IF(NOT(ISBLANK([.L24])); [.L24]; &quot;&quot;); IF([.$S25]=&quot;W&quot;; IF(NOT(ISBLANK([.L25])); [.L25]; &quot;&quot;); &quot;&quot;))">
            <text:p/>
          </table:table-cell>
          <table:table-cell table:style-name="ce331" table:formula="of:=IF(AND(NOT(ISBLANK([.M24])); [.M24]=[.M25]); [.M24]; IF([.$S24]=&quot;W&quot;; IF(NOT(ISBLANK([.M24])); [.M24]; &quot;&quot;); IF([.$S25]=&quot;W&quot;; IF(NOT(ISBLANK([.M25])); [.M25]; &quot;&quot;); &quot;&quot;)))">
            <text:p/>
          </table:table-cell>
          <table:table-cell table:style-name="ce325" table:number-columns-repeated="5"/>
          <table:table-cell table:style-name="ce308" table:formula="of:=ISWINNERMEN([.X23:.AB23]; [.X22:.AB2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24:.H24]; [.D23:.H23])">
            <text:p/>
          </table:table-cell>
          <table:table-cell table:style-name="ce78"/>
          <table:table-cell table:style-name="ce315" table:formula="of:=IF(AND(NOT(ISBLANK([.A23])); [.A23]=[.A24]); [.A23]; IF([.$I23]=&quot;W&quot;; IF(NOT(ISBLANK([.A23])); [.A23]; &quot;&quot;); IF([.$I24]=&quot;W&quot;; IF(NOT(ISBLANK([.A24])); [.A24]; &quot;&quot;); &quot;&quot;)))">
            <text:p/>
          </table:table-cell>
          <table:table-cell table:style-name="ce320" table:formula="of:=IF([.$I23]=&quot;W&quot;; IF(NOT(ISBLANK([.B23])); [.B23]; &quot;&quot;); IF([.$I24]=&quot;W&quot;; IF(NOT(ISBLANK([.B24])); [.B24]; &quot;&quot;); &quot;&quot;))">
            <text:p/>
          </table:table-cell>
          <table:table-cell table:style-name="ce318" table:formula="of:=IF(AND(NOT(ISBLANK([.C23])); [.C23]=[.C24]); [.C23]; IF([.$I23]=&quot;W&quot;; IF(NOT(ISBLANK([.C23])); [.C23]; &quot;&quot;); IF([.$I24]=&quot;W&quot;; IF(NOT(ISBLANK([.C24])); [.C24]; &quot;&quot;); &quot;&quot;)))">
            <text:p/>
          </table:table-cell>
          <table:table-cell table:style-name="ce324" table:number-columns-repeated="5"/>
          <table:table-cell table:style-name="ce265" table:formula="of:=ISWINNERMEN([.N24:.R24]; [.N25:.R2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25:.H25]; [.D26:.H26])">
            <text:p/>
          </table:table-cell>
          <table:table-cell table:style-name="ce78"/>
          <table:table-cell table:style-name="ce316" table:formula="of:=IF(AND(NOT(ISBLANK([.A25])); [.A25]=[.A26]); [.A25]; IF([.$I25]=&quot;W&quot;; IF(NOT(ISBLANK([.A25])); [.A25]; &quot;&quot;); IF([.$I26]=&quot;W&quot;; IF(NOT(ISBLANK([.A26])); [.A26]; &quot;&quot;); &quot;&quot;)))">
            <text:p/>
          </table:table-cell>
          <table:table-cell table:style-name="ce321" table:formula="of:=IF([.$I25]=&quot;W&quot;; IF(NOT(ISBLANK([.B25])); [.B25]; &quot;&quot;); IF([.$I26]=&quot;W&quot;; IF(NOT(ISBLANK([.B26])); [.B26]; &quot;&quot;); &quot;&quot;))">
            <text:p/>
          </table:table-cell>
          <table:table-cell table:style-name="ce319" table:formula="of:=IF(AND(NOT(ISBLANK([.C25])); [.C25]=[.C26]); [.C25]; IF([.$I25]=&quot;W&quot;; IF(NOT(ISBLANK([.C25])); [.C25]; &quot;&quot;); IF([.$I26]=&quot;W&quot;; IF(NOT(ISBLANK([.C26])); [.C26]; &quot;&quot;); &quot;&quot;)))">
            <text:p/>
          </table:table-cell>
          <table:table-cell table:style-name="ce325" table:number-columns-repeated="5"/>
          <table:table-cell table:style-name="ce308" table:formula="of:=ISWINNERMEN([.N25:.R25]; [.N24:.R2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26:.H26]; [.D25:.H2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3" table:formula="of:=IF(AND(NOT(ISBLANK([.$U22])); [.$U22]=[.$U23]); [.$U22]; IF([.$AC22]=&quot;W&quot;; IF(NOT(ISBLANK([.$U22])); [.$U22]; &quot;&quot;); IF([.$AC23]=&quot;W&quot;; IF(NOT(ISBLANK([.$U23])); [.$U23]; &quot;&quot;); &quot;&quot;)))">
            <text:p/>
          </table:table-cell>
          <table:table-cell table:style-name="ce320" table:formula="of:=IF([.$AC22]=&quot;W&quot;; IF(NOT(ISBLANK([.V22])); [.V22]; &quot;&quot;); IF([.$AC23]=&quot;W&quot;; IF(NOT(ISBLANK([.V23])); [.V23]; &quot;&quot;); &quot;&quot;))">
            <text:p/>
          </table:table-cell>
          <table:table-cell table:style-name="ce336" table:formula="of:=IF(AND(NOT(ISBLANK([.$W22])); [.$W22]=[.$W23]); [.$W22]; IF([.$AC22]=&quot;W&quot;; IF(NOT(ISBLANK([.$W22])); [.$W22]; &quot;&quot;); IF([.$AC23]=&quot;W&quot;; IF(NOT(ISBLANK([.$W23])); [.$W23]; &quot;&quot;); &quot;&quot;)))">
            <text:p/>
          </table:table-cell>
          <table:table-cell table:style-name="ce324" table:formula="of:=IF(NOT(ISBLANK([Finals.D5])); [Finals.D5]; &quot;&quot;)">
            <text:p/>
          </table:table-cell>
          <table:table-cell table:style-name="ce324" table:formula="of:=IF(NOT(ISBLANK([Finals.E5])); [Finals.E5]; &quot;&quot;)">
            <text:p/>
          </table:table-cell>
          <table:table-cell table:style-name="ce324" table:formula="of:=IF(NOT(ISBLANK([Finals.F5])); [Finals.F5]; &quot;&quot;)">
            <text:p/>
          </table:table-cell>
          <table:table-cell table:style-name="ce324" table:formula="of:=IF(NOT(ISBLANK([Finals.G5])); [Finals.G5]; &quot;&quot;)">
            <text:p/>
          </table:table-cell>
          <table:table-cell table:style-name="ce324" table:formula="of:=IF(NOT(ISBLANK([Finals.H5])); [Finals.H5]; &quot;&quot;)">
            <text:p/>
          </table:table-cell>
          <table:table-cell table:style-name="ce265" table:formula="of:=IF(NOT(ISBLANK([Finals.I5])); [Finals.I5]; &quot;&quot;)">
            <text:p/>
          </table:table-cell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27:.H27]; [.D28:.H2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5" table:formula="of:=IF(AND(NOT(ISBLANK([.$U30])); [.$U30]=[.$U31]); [.$U30]; IF([.$AC30]=&quot;W&quot;; IF(NOT(ISBLANK([.$U30])); [.$U30]; &quot;&quot;); IF([.$AC31]=&quot;W&quot;; IF(NOT(ISBLANK([.$U31])); [.$U31]; &quot;&quot;); &quot;&quot;)))">
            <text:p/>
          </table:table-cell>
          <table:table-cell table:style-name="ce321" table:formula="of:=IF([.$AC30]=&quot;W&quot;; IF(NOT(ISBLANK([.V30])); [.V30]; &quot;&quot;); IF([.$AC31]=&quot;W&quot;; IF(NOT(ISBLANK([.V31])); [.V31]; &quot;&quot;); &quot;&quot;))">
            <text:p/>
          </table:table-cell>
          <table:table-cell table:style-name="ce337" table:formula="of:=IF(AND(NOT(ISBLANK([.$W30])); [.$W30]=[.$W31]); [.$W30]; IF([.$AC30]=&quot;W&quot;; IF(NOT(ISBLANK([.$W30])); [.$W30]; &quot;&quot;); IF([.$AC31]=&quot;W&quot;; IF(NOT(ISBLANK([.$W31])); [.$W31]; &quot;&quot;); &quot;&quot;)))">
            <text:p/>
          </table:table-cell>
          <table:table-cell table:style-name="ce325" table:formula="of:=IF(NOT(ISBLANK([Finals.D6])); [Finals.D6]; &quot;&quot;)">
            <text:p/>
          </table:table-cell>
          <table:table-cell table:style-name="ce325" table:formula="of:=IF(NOT(ISBLANK([Finals.E6])); [Finals.E6]; &quot;&quot;)">
            <text:p/>
          </table:table-cell>
          <table:table-cell table:style-name="ce325" table:formula="of:=IF(NOT(ISBLANK([Finals.F6])); [Finals.F6]; &quot;&quot;)">
            <text:p/>
          </table:table-cell>
          <table:table-cell table:style-name="ce325" table:formula="of:=IF(NOT(ISBLANK([Finals.G6])); [Finals.G6]; &quot;&quot;)">
            <text:p/>
          </table:table-cell>
          <table:table-cell table:style-name="ce325" table:formula="of:=IF(NOT(ISBLANK([Finals.H6])); [Finals.H6]; &quot;&quot;)">
            <text:p/>
          </table:table-cell>
          <table:table-cell table:style-name="ce308" table:formula="of:=IF(NOT(ISBLANK([Finals.I6])); [Finals.I6]; &quot;&quot;)">
            <text:p/>
          </table:table-cell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28:.H28]; [.D27:.H27])">
            <text:p/>
          </table:table-cell>
          <table:table-cell table:style-name="ce78"/>
          <table:table-cell table:style-name="ce315" table:formula="of:=IF(AND(NOT(ISBLANK([.A27])); [.A27]=[.A28]); [.A27]; IF([.$I27]=&quot;W&quot;; IF(NOT(ISBLANK([.A27])); [.A27]; &quot;&quot;); IF([.$I28]=&quot;W&quot;; IF(NOT(ISBLANK([.A28])); [.A28]; &quot;&quot;); &quot;&quot;)))">
            <text:p/>
          </table:table-cell>
          <table:table-cell table:style-name="ce320" table:formula="of:=IF([.$I27]=&quot;W&quot;; IF(NOT(ISBLANK([.B27])); [.B27]; &quot;&quot;); IF([.$I28]=&quot;W&quot;; IF(NOT(ISBLANK([.B28])); [.B28]; &quot;&quot;); &quot;&quot;))">
            <text:p/>
          </table:table-cell>
          <table:table-cell table:style-name="ce318" table:formula="of:=IF(AND(NOT(ISBLANK([.C27])); [.C27]=[.C28]); [.C27]; IF([.$I27]=&quot;W&quot;; IF(NOT(ISBLANK([.C27])); [.C27]; &quot;&quot;); IF([.$I28]=&quot;W&quot;; IF(NOT(ISBLANK([.C28])); [.C28]; &quot;&quot;); &quot;&quot;)))">
            <text:p/>
          </table:table-cell>
          <table:table-cell table:style-name="ce324" table:number-columns-repeated="5"/>
          <table:table-cell table:style-name="ce265" table:formula="of:=ISWINNERMEN([.N28:.R28]; [.N29:.R2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29:.H29]; [.D30:.H30])">
            <text:p/>
          </table:table-cell>
          <table:table-cell table:style-name="ce78"/>
          <table:table-cell table:style-name="ce316" table:formula="of:=IF(AND(NOT(ISBLANK([.A29])); [.A29]=[.A30]); [.A29]; IF([.$I29]=&quot;W&quot;; IF(NOT(ISBLANK([.A29])); [.A29]; &quot;&quot;); IF([.$I30]=&quot;W&quot;; IF(NOT(ISBLANK([.A30])); [.A30]; &quot;&quot;); &quot;&quot;)))">
            <text:p/>
          </table:table-cell>
          <table:table-cell table:style-name="ce321" table:formula="of:=IF([.$I29]=&quot;W&quot;; IF(NOT(ISBLANK([.B29])); [.B29]; &quot;&quot;); IF([.$I30]=&quot;W&quot;; IF(NOT(ISBLANK([.B30])); [.B30]; &quot;&quot;); &quot;&quot;))">
            <text:p/>
          </table:table-cell>
          <table:table-cell table:style-name="ce319" table:formula="of:=IF(AND(NOT(ISBLANK([.C29])); [.C29]=[.C30]); [.C29]; IF([.$I29]=&quot;W&quot;; IF(NOT(ISBLANK([.C29])); [.C29]; &quot;&quot;); IF([.$I30]=&quot;W&quot;; IF(NOT(ISBLANK([.C30])); [.C30]; &quot;&quot;); &quot;&quot;)))">
            <text:p/>
          </table:table-cell>
          <table:table-cell table:style-name="ce325" table:number-columns-repeated="5"/>
          <table:table-cell table:style-name="ce308" table:formula="of:=ISWINNERMEN([.N29:.R29]; [.N28:.R2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30:.H30]; [.D29:.H2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28])); [.$K28]=[.$K29]); [.$K28]; IF([.$S28]=&quot;W&quot;; IF(NOT(ISBLANK([.$K28])); [.$K28]; &quot;&quot;); IF([.$S29]=&quot;W&quot;; IF(NOT(ISBLANK([.$K29])); [.$K29]; &quot;&quot;); &quot;&quot;)))">
            <text:p/>
          </table:table-cell>
          <table:table-cell table:style-name="ce320" table:formula="of:=IF([.$S28]=&quot;W&quot;; IF(NOT(ISBLANK([.L28])); [.L28]; &quot;&quot;); IF([.$S29]=&quot;W&quot;; IF(NOT(ISBLANK([.L29])); [.L29]; &quot;&quot;); &quot;&quot;))">
            <text:p/>
          </table:table-cell>
          <table:table-cell table:style-name="ce329" table:formula="of:=IF(AND(NOT(ISBLANK([.M28])); [.M28]=[.M29]); [.M28]; IF([.$S28]=&quot;W&quot;; IF(NOT(ISBLANK([.M28])); [.M28]; &quot;&quot;); IF([.$S29]=&quot;W&quot;; IF(NOT(ISBLANK([.M29])); [.M29]; &quot;&quot;); &quot;&quot;)))">
            <text:p/>
          </table:table-cell>
          <table:table-cell table:style-name="ce324" table:number-columns-repeated="5"/>
          <table:table-cell table:style-name="ce265" table:formula="of:=ISWINNERMEN([.X30:.AB30]; [.X31:.AB3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31:.H31]; [.D32:.H3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32])); [.$K32]=[.$K33]); [.$K32]; IF([.$S32]=&quot;W&quot;; IF(NOT(ISBLANK([.$K32])); [.$K32]; &quot;&quot;); IF([.$S33]=&quot;W&quot;; IF(NOT(ISBLANK([.$K33])); [.$K33]; &quot;&quot;); &quot;&quot;)))">
            <text:p/>
          </table:table-cell>
          <table:table-cell table:style-name="ce321" table:formula="of:=IF([.$S32]=&quot;W&quot;; IF(NOT(ISBLANK([.L32])); [.L32]; &quot;&quot;); IF([.$S33]=&quot;W&quot;; IF(NOT(ISBLANK([.L33])); [.L33]; &quot;&quot;); &quot;&quot;))">
            <text:p/>
          </table:table-cell>
          <table:table-cell table:style-name="ce331" table:formula="of:=IF(AND(NOT(ISBLANK([.M32])); [.M32]=[.M33]); [.M32]; IF([.$S32]=&quot;W&quot;; IF(NOT(ISBLANK([.M32])); [.M32]; &quot;&quot;); IF([.$S33]=&quot;W&quot;; IF(NOT(ISBLANK([.M33])); [.M33]; &quot;&quot;); &quot;&quot;)))">
            <text:p/>
          </table:table-cell>
          <table:table-cell table:style-name="ce325" table:number-columns-repeated="5"/>
          <table:table-cell table:style-name="ce308" table:formula="of:=ISWINNERMEN([.X31:.AB31]; [.X30:.AB3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32:.H32]; [.D31:.H31])">
            <text:p/>
          </table:table-cell>
          <table:table-cell table:style-name="ce78"/>
          <table:table-cell table:style-name="ce315" table:formula="of:=IF(AND(NOT(ISBLANK([.A31])); [.A31]=[.A32]); [.A31]; IF([.$I31]=&quot;W&quot;; IF(NOT(ISBLANK([.A31])); [.A31]; &quot;&quot;); IF([.$I32]=&quot;W&quot;; IF(NOT(ISBLANK([.A32])); [.A32]; &quot;&quot;); &quot;&quot;)))">
            <text:p/>
          </table:table-cell>
          <table:table-cell table:style-name="ce320" table:formula="of:=IF([.$I31]=&quot;W&quot;; IF(NOT(ISBLANK([.B31])); [.B31]; &quot;&quot;); IF([.$I32]=&quot;W&quot;; IF(NOT(ISBLANK([.B32])); [.B32]; &quot;&quot;); &quot;&quot;))">
            <text:p/>
          </table:table-cell>
          <table:table-cell table:style-name="ce318" table:formula="of:=IF(AND(NOT(ISBLANK([.C31])); [.C31]=[.C32]); [.C31]; IF([.$I31]=&quot;W&quot;; IF(NOT(ISBLANK([.C31])); [.C31]; &quot;&quot;); IF([.$I32]=&quot;W&quot;; IF(NOT(ISBLANK([.C32])); [.C32]; &quot;&quot;); &quot;&quot;)))">
            <text:p/>
          </table:table-cell>
          <table:table-cell table:style-name="ce324" table:number-columns-repeated="5"/>
          <table:table-cell table:style-name="ce265" table:formula="of:=ISWINNERMEN([.N32:.R32]; [.N33:.R3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33:.H33]; [.D34:.H34])">
            <text:p/>
          </table:table-cell>
          <table:table-cell table:style-name="ce78"/>
          <table:table-cell table:style-name="ce316" table:formula="of:=IF(AND(NOT(ISBLANK([.A33])); [.A33]=[.A34]); [.A33]; IF([.$I33]=&quot;W&quot;; IF(NOT(ISBLANK([.A33])); [.A33]; &quot;&quot;); IF([.$I34]=&quot;W&quot;; IF(NOT(ISBLANK([.A34])); [.A34]; &quot;&quot;); &quot;&quot;)))">
            <text:p/>
          </table:table-cell>
          <table:table-cell table:style-name="ce321" table:formula="of:=IF([.$I33]=&quot;W&quot;; IF(NOT(ISBLANK([.B33])); [.B33]; &quot;&quot;); IF([.$I34]=&quot;W&quot;; IF(NOT(ISBLANK([.B34])); [.B34]; &quot;&quot;); &quot;&quot;))">
            <text:p/>
          </table:table-cell>
          <table:table-cell table:style-name="ce319" table:formula="of:=IF(AND(NOT(ISBLANK([.C33])); [.C33]=[.C34]); [.C33]; IF([.$I33]=&quot;W&quot;; IF(NOT(ISBLANK([.C33])); [.C33]; &quot;&quot;); IF([.$I34]=&quot;W&quot;; IF(NOT(ISBLANK([.C34])); [.C34]; &quot;&quot;); &quot;&quot;)))">
            <text:p/>
          </table:table-cell>
          <table:table-cell table:style-name="ce325" table:number-columns-repeated="5"/>
          <table:table-cell table:style-name="ce308" table:formula="of:=ISWINNERMEN([.N33:.R33]; [.N32:.R3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34:.H34]; [.D33:.H33])">
            <text:p/>
            <draw:frame table:end-cell-address="ML.U36" table:end-x="0.0437in" table:end-y="0.0272in" draw:z-index="1" draw:style-name="gr1" draw:text-style-name="P1" svg:width="2.9256in" svg:height="0.2654in" draw:transform="rotate (1.5707963267949) translate (0.193307086614173in 0.166929133858268in)">
              <draw:text-box>
                <text:p><text:span text:style-name="T1">Section 2</text:span></text:p>
              </draw:text-box>
            </draw:frame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 table:style-name="ce130"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2" calcext:value-type="float">
            <text:p>2</text:p>
          </table:table-cell>
          <table:table-cell table:number-columns-repeated="216"/>
        </table:table-row>
        <table:table-row table:style-name="ro3">
          <table:table-cell table:style-name="ce96"/>
          <table:table-cell table:style-name="ce322"/>
          <table:table-cell table:style-name="ce105"/>
          <table:table-cell table:style-name="ce330" table:number-columns-repeated="5"/>
          <table:table-cell table:style-name="ce334" table:formula="of:=ISWINNERMEN([.D35:.H35]; [.D36:.H36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46" table:number-columns-repeated="5"/>
          <table:table-cell table:style-name="ce81" table:number-columns-repeated="5"/>
          <table:table-cell table:style-name="ce346" table:number-columns-repeated="5"/>
          <table:table-cell/>
          <table:table-cell table:style-name="ce81" table:number-columns-repeated="4"/>
          <table:table-cell table:style-name="ce346" table:number-columns-repeated="5"/>
          <table:table-cell table:style-name="ce81"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36:.H36]; [.D35:.H35])">
            <text:p/>
          </table:table-cell>
          <table:table-cell table:style-name="ce78"/>
          <table:table-cell table:style-name="ce315" table:formula="of:=IF(AND(NOT(ISBLANK([.A35])); [.A35]=[.A36]); [.A35]; IF([.$I35]=&quot;W&quot;; IF(NOT(ISBLANK([.A35])); [.A35]; &quot;&quot;); IF([.$I36]=&quot;W&quot;; IF(NOT(ISBLANK([.A36])); [.A36]; &quot;&quot;); &quot;&quot;)))">
            <text:p/>
          </table:table-cell>
          <table:table-cell table:style-name="ce320" table:formula="of:=IF([.$I35]=&quot;W&quot;; IF(NOT(ISBLANK([.B35])); [.B35]; &quot;&quot;); IF([.$I36]=&quot;W&quot;; IF(NOT(ISBLANK([.B36])); [.B36]; &quot;&quot;); &quot;&quot;))">
            <text:p/>
          </table:table-cell>
          <table:table-cell table:style-name="ce318" table:formula="of:=IF(AND(NOT(ISBLANK([.C35])); [.C35]=[.C36]); [.C35]; IF([.$I35]=&quot;W&quot;; IF(NOT(ISBLANK([.C35])); [.C35]; &quot;&quot;); IF([.$I36]=&quot;W&quot;; IF(NOT(ISBLANK([.C36])); [.C36]; &quot;&quot;); &quot;&quot;)))">
            <text:p/>
          </table:table-cell>
          <table:table-cell table:style-name="ce324" table:number-columns-repeated="5"/>
          <table:table-cell table:style-name="ce265" table:formula="of:=ISWINNERMEN([.N36:.R36]; [.N37:.R3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37:.H37]; [.D38:.H38])">
            <text:p/>
          </table:table-cell>
          <table:table-cell table:style-name="ce78"/>
          <table:table-cell table:style-name="ce316" table:formula="of:=IF(AND(NOT(ISBLANK([.A37])); [.A37]=[.A38]); [.A37]; IF([.$I37]=&quot;W&quot;; IF(NOT(ISBLANK([.A37])); [.A37]; &quot;&quot;); IF([.$I38]=&quot;W&quot;; IF(NOT(ISBLANK([.A38])); [.A38]; &quot;&quot;); &quot;&quot;)))">
            <text:p/>
          </table:table-cell>
          <table:table-cell table:style-name="ce321" table:formula="of:=IF([.$I37]=&quot;W&quot;; IF(NOT(ISBLANK([.B37])); [.B37]; &quot;&quot;); IF([.$I38]=&quot;W&quot;; IF(NOT(ISBLANK([.B38])); [.B38]; &quot;&quot;); &quot;&quot;))">
            <text:p/>
          </table:table-cell>
          <table:table-cell table:style-name="ce319" table:formula="of:=IF(AND(NOT(ISBLANK([.C37])); [.C37]=[.C38]); [.C37]; IF([.$I37]=&quot;W&quot;; IF(NOT(ISBLANK([.C37])); [.C37]; &quot;&quot;); IF([.$I38]=&quot;W&quot;; IF(NOT(ISBLANK([.C38])); [.C38]; &quot;&quot;); &quot;&quot;)))">
            <text:p/>
          </table:table-cell>
          <table:table-cell table:style-name="ce325" table:number-columns-repeated="5"/>
          <table:table-cell table:style-name="ce308" table:formula="of:=ISWINNERMEN([.N37:.R37]; [.N36:.R3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38:.H38]; [.D37:.H37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36])); [.$K36]=[.$K37]); [.$K36]; IF([.$S36]=&quot;W&quot;; IF(NOT(ISBLANK([.$K36])); [.$K36]; &quot;&quot;); IF([.$S37]=&quot;W&quot;; IF(NOT(ISBLANK([.$K37])); [.$K37]; &quot;&quot;); &quot;&quot;)))">
            <text:p/>
          </table:table-cell>
          <table:table-cell table:style-name="ce320" table:formula="of:=IF([.$S36]=&quot;W&quot;; IF(NOT(ISBLANK([.L36])); [.L36]; &quot;&quot;); IF([.$S37]=&quot;W&quot;; IF(NOT(ISBLANK([.L37])); [.L37]; &quot;&quot;); &quot;&quot;))">
            <text:p/>
          </table:table-cell>
          <table:table-cell table:style-name="ce329" table:formula="of:=IF(AND(NOT(ISBLANK([.M36])); [.M36]=[.M37]); [.M36]; IF([.$S36]=&quot;W&quot;; IF(NOT(ISBLANK([.M36])); [.M36]; &quot;&quot;); IF([.$S37]=&quot;W&quot;; IF(NOT(ISBLANK([.M37])); [.M37]; &quot;&quot;); &quot;&quot;)))">
            <text:p/>
          </table:table-cell>
          <table:table-cell table:style-name="ce324" table:number-columns-repeated="5"/>
          <table:table-cell table:style-name="ce265" table:formula="of:=ISWINNERMEN([.X38:.AB38]; [.X39:.AB3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39:.H39]; [.D40:.H40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40])); [.$K40]=[.$K41]); [.$K40]; IF([.$S40]=&quot;W&quot;; IF(NOT(ISBLANK([.$K40])); [.$K40]; &quot;&quot;); IF([.$S41]=&quot;W&quot;; IF(NOT(ISBLANK([.$K41])); [.$K41]; &quot;&quot;); &quot;&quot;)))">
            <text:p/>
          </table:table-cell>
          <table:table-cell table:style-name="ce321" table:formula="of:=IF([.$S40]=&quot;W&quot;; IF(NOT(ISBLANK([.L40])); [.L40]; &quot;&quot;); IF([.$S41]=&quot;W&quot;; IF(NOT(ISBLANK([.L41])); [.L41]; &quot;&quot;); &quot;&quot;))">
            <text:p/>
          </table:table-cell>
          <table:table-cell table:style-name="ce331" table:formula="of:=IF(AND(NOT(ISBLANK([.M40])); [.M40]=[.M41]); [.M40]; IF([.$S40]=&quot;W&quot;; IF(NOT(ISBLANK([.M40])); [.M40]; &quot;&quot;); IF([.$S41]=&quot;W&quot;; IF(NOT(ISBLANK([.M41])); [.M41]; &quot;&quot;); &quot;&quot;)))">
            <text:p/>
          </table:table-cell>
          <table:table-cell table:style-name="ce325" table:number-columns-repeated="5"/>
          <table:table-cell table:style-name="ce308" table:formula="of:=ISWINNERMEN([.X39:.AB39]; [.X38:.AB3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40:.H40]; [.D39:.H39])">
            <text:p/>
          </table:table-cell>
          <table:table-cell table:style-name="ce78"/>
          <table:table-cell table:style-name="ce315" table:formula="of:=IF(AND(NOT(ISBLANK([.A39])); [.A39]=[.A40]); [.A39]; IF([.$I39]=&quot;W&quot;; IF(NOT(ISBLANK([.A39])); [.A39]; &quot;&quot;); IF([.$I40]=&quot;W&quot;; IF(NOT(ISBLANK([.A40])); [.A40]; &quot;&quot;); &quot;&quot;)))">
            <text:p/>
          </table:table-cell>
          <table:table-cell table:style-name="ce320" table:formula="of:=IF([.$I39]=&quot;W&quot;; IF(NOT(ISBLANK([.B39])); [.B39]; &quot;&quot;); IF([.$I40]=&quot;W&quot;; IF(NOT(ISBLANK([.B40])); [.B40]; &quot;&quot;); &quot;&quot;))">
            <text:p/>
          </table:table-cell>
          <table:table-cell table:style-name="ce318" table:formula="of:=IF(AND(NOT(ISBLANK([.C39])); [.C39]=[.C40]); [.C39]; IF([.$I39]=&quot;W&quot;; IF(NOT(ISBLANK([.C39])); [.C39]; &quot;&quot;); IF([.$I40]=&quot;W&quot;; IF(NOT(ISBLANK([.C40])); [.C40]; &quot;&quot;); &quot;&quot;)))">
            <text:p/>
          </table:table-cell>
          <table:table-cell table:style-name="ce324" table:number-columns-repeated="5"/>
          <table:table-cell table:style-name="ce265" table:formula="of:=ISWINNERMEN([.N40:.R40]; [.N41:.R4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41:.H41]; [.D42:.H42])">
            <text:p/>
          </table:table-cell>
          <table:table-cell table:style-name="ce78"/>
          <table:table-cell table:style-name="ce316" table:formula="of:=IF(AND(NOT(ISBLANK([.A41])); [.A41]=[.A42]); [.A41]; IF([.$I41]=&quot;W&quot;; IF(NOT(ISBLANK([.A41])); [.A41]; &quot;&quot;); IF([.$I42]=&quot;W&quot;; IF(NOT(ISBLANK([.A42])); [.A42]; &quot;&quot;); &quot;&quot;)))">
            <text:p/>
          </table:table-cell>
          <table:table-cell table:style-name="ce321" table:formula="of:=IF([.$I41]=&quot;W&quot;; IF(NOT(ISBLANK([.B41])); [.B41]; &quot;&quot;); IF([.$I42]=&quot;W&quot;; IF(NOT(ISBLANK([.B42])); [.B42]; &quot;&quot;); &quot;&quot;))">
            <text:p/>
          </table:table-cell>
          <table:table-cell table:style-name="ce319" table:formula="of:=IF(AND(NOT(ISBLANK([.C41])); [.C41]=[.C42]); [.C41]; IF([.$I41]=&quot;W&quot;; IF(NOT(ISBLANK([.C41])); [.C41]; &quot;&quot;); IF([.$I42]=&quot;W&quot;; IF(NOT(ISBLANK([.C42])); [.C42]; &quot;&quot;); &quot;&quot;)))">
            <text:p/>
          </table:table-cell>
          <table:table-cell table:style-name="ce325" table:number-columns-repeated="5"/>
          <table:table-cell table:style-name="ce308" table:formula="of:=ISWINNERMEN([.N41:.R41]; [.N40:.R4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42:.H42]; [.D41:.H4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3" table:formula="of:=IF(AND(NOT(ISBLANK([.$U38])); [.$U38]=[.$U39]); [.$U38]; IF([.$AC38]=&quot;W&quot;; IF(NOT(ISBLANK([.$U38])); [.$U38]; &quot;&quot;); IF([.$AC39]=&quot;W&quot;; IF(NOT(ISBLANK([.$U39])); [.$U39]; &quot;&quot;); &quot;&quot;)))">
            <text:p/>
          </table:table-cell>
          <table:table-cell table:style-name="ce320" table:formula="of:=IF([.$AC38]=&quot;W&quot;; IF(NOT(ISBLANK([.V38])); [.V38]; &quot;&quot;); IF([.$AC39]=&quot;W&quot;; IF(NOT(ISBLANK([.V39])); [.V39]; &quot;&quot;); &quot;&quot;))">
            <text:p/>
          </table:table-cell>
          <table:table-cell table:style-name="ce336" table:formula="of:=IF(AND(NOT(ISBLANK([.$W38])); [.$W38]=[.$W39]); [.$W38]; IF([.$AC38]=&quot;W&quot;; IF(NOT(ISBLANK([.$W38])); [.$W38]; &quot;&quot;); IF([.$AC39]=&quot;W&quot;; IF(NOT(ISBLANK([.$W39])); [.$W39]; &quot;&quot;); &quot;&quot;)))">
            <text:p/>
          </table:table-cell>
          <table:table-cell table:style-name="ce324" table:formula="of:=IF(NOT(ISBLANK([Finals.D7])); [Finals.D7]; &quot;&quot;)">
            <text:p/>
          </table:table-cell>
          <table:table-cell table:style-name="ce324" table:formula="of:=IF(NOT(ISBLANK([Finals.E7])); [Finals.E7]; &quot;&quot;)">
            <text:p/>
          </table:table-cell>
          <table:table-cell table:style-name="ce324" table:formula="of:=IF(NOT(ISBLANK([Finals.F7])); [Finals.F7]; &quot;&quot;)">
            <text:p/>
          </table:table-cell>
          <table:table-cell table:style-name="ce324" table:formula="of:=IF(NOT(ISBLANK([Finals.G7])); [Finals.G7]; &quot;&quot;)">
            <text:p/>
          </table:table-cell>
          <table:table-cell table:style-name="ce324" table:formula="of:=IF(NOT(ISBLANK([Finals.H7])); [Finals.H7]; &quot;&quot;)">
            <text:p/>
          </table:table-cell>
          <table:table-cell table:style-name="ce265" table:formula="of:=IF(NOT(ISBLANK([Finals.I7])); [Finals.I7]; &quot;&quot;)">
            <text:p/>
          </table:table-cell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43:.H43]; [.D44:.H4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5" table:formula="of:=IF(AND(NOT(ISBLANK([.$U46])); [.$U46]=[.$U47]); [.$U46]; IF([.$AC46]=&quot;W&quot;; IF(NOT(ISBLANK([.$U46])); [.$U46]; &quot;&quot;); IF([.$AC47]=&quot;W&quot;; IF(NOT(ISBLANK([.$U47])); [.$U47]; &quot;&quot;); &quot;&quot;)))">
            <text:p/>
          </table:table-cell>
          <table:table-cell table:style-name="ce321" table:formula="of:=IF([.$AC46]=&quot;W&quot;; IF(NOT(ISBLANK([.V46])); [.V46]; &quot;&quot;); IF([.$AC47]=&quot;W&quot;; IF(NOT(ISBLANK([.V47])); [.V47]; &quot;&quot;); &quot;&quot;))">
            <text:p/>
          </table:table-cell>
          <table:table-cell table:style-name="ce337" table:formula="of:=IF(AND(NOT(ISBLANK([.$W46])); [.$W46]=[.$W47]); [.$W46]; IF([.$AC46]=&quot;W&quot;; IF(NOT(ISBLANK([.$W46])); [.$W46]; &quot;&quot;); IF([.$AC47]=&quot;W&quot;; IF(NOT(ISBLANK([.$W47])); [.$W47]; &quot;&quot;); &quot;&quot;)))">
            <text:p/>
          </table:table-cell>
          <table:table-cell table:style-name="ce325" table:formula="of:=IF(NOT(ISBLANK([Finals.D8])); [Finals.D8]; &quot;&quot;)">
            <text:p/>
          </table:table-cell>
          <table:table-cell table:style-name="ce325" table:formula="of:=IF(NOT(ISBLANK([Finals.E8])); [Finals.E8]; &quot;&quot;)">
            <text:p/>
          </table:table-cell>
          <table:table-cell table:style-name="ce325" table:formula="of:=IF(NOT(ISBLANK([Finals.F8])); [Finals.F8]; &quot;&quot;)">
            <text:p/>
          </table:table-cell>
          <table:table-cell table:style-name="ce325" table:formula="of:=IF(NOT(ISBLANK([Finals.G8])); [Finals.G8]; &quot;&quot;)">
            <text:p/>
          </table:table-cell>
          <table:table-cell table:style-name="ce325" table:formula="of:=IF(NOT(ISBLANK([Finals.H8])); [Finals.H8]; &quot;&quot;)">
            <text:p/>
          </table:table-cell>
          <table:table-cell table:style-name="ce308" table:formula="of:=IF(NOT(ISBLANK([Finals.I8])); [Finals.I8]; &quot;&quot;)">
            <text:p/>
          </table:table-cell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44:.H44]; [.D43:.H43])">
            <text:p/>
          </table:table-cell>
          <table:table-cell table:style-name="ce78"/>
          <table:table-cell table:style-name="ce315" table:formula="of:=IF(AND(NOT(ISBLANK([.A43])); [.A43]=[.A44]); [.A43]; IF([.$I43]=&quot;W&quot;; IF(NOT(ISBLANK([.A43])); [.A43]; &quot;&quot;); IF([.$I44]=&quot;W&quot;; IF(NOT(ISBLANK([.A44])); [.A44]; &quot;&quot;); &quot;&quot;)))">
            <text:p/>
          </table:table-cell>
          <table:table-cell table:style-name="ce320" table:formula="of:=IF([.$I43]=&quot;W&quot;; IF(NOT(ISBLANK([.B43])); [.B43]; &quot;&quot;); IF([.$I44]=&quot;W&quot;; IF(NOT(ISBLANK([.B44])); [.B44]; &quot;&quot;); &quot;&quot;))">
            <text:p/>
          </table:table-cell>
          <table:table-cell table:style-name="ce318" table:formula="of:=IF(AND(NOT(ISBLANK([.C43])); [.C43]=[.C44]); [.C43]; IF([.$I43]=&quot;W&quot;; IF(NOT(ISBLANK([.C43])); [.C43]; &quot;&quot;); IF([.$I44]=&quot;W&quot;; IF(NOT(ISBLANK([.C44])); [.C44]; &quot;&quot;); &quot;&quot;)))">
            <text:p/>
          </table:table-cell>
          <table:table-cell table:style-name="ce324" table:number-columns-repeated="5"/>
          <table:table-cell table:style-name="ce265" table:formula="of:=ISWINNERMEN([.N44:.R44]; [.N45:.R4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45:.H45]; [.D46:.H46])">
            <text:p/>
          </table:table-cell>
          <table:table-cell table:style-name="ce78"/>
          <table:table-cell table:style-name="ce316" table:formula="of:=IF(AND(NOT(ISBLANK([.A45])); [.A45]=[.A46]); [.A45]; IF([.$I45]=&quot;W&quot;; IF(NOT(ISBLANK([.A45])); [.A45]; &quot;&quot;); IF([.$I46]=&quot;W&quot;; IF(NOT(ISBLANK([.A46])); [.A46]; &quot;&quot;); &quot;&quot;)))">
            <text:p/>
          </table:table-cell>
          <table:table-cell table:style-name="ce321" table:formula="of:=IF([.$I45]=&quot;W&quot;; IF(NOT(ISBLANK([.B45])); [.B45]; &quot;&quot;); IF([.$I46]=&quot;W&quot;; IF(NOT(ISBLANK([.B46])); [.B46]; &quot;&quot;); &quot;&quot;))">
            <text:p/>
          </table:table-cell>
          <table:table-cell table:style-name="ce319" table:formula="of:=IF(AND(NOT(ISBLANK([.C45])); [.C45]=[.C46]); [.C45]; IF([.$I45]=&quot;W&quot;; IF(NOT(ISBLANK([.C45])); [.C45]; &quot;&quot;); IF([.$I46]=&quot;W&quot;; IF(NOT(ISBLANK([.C46])); [.C46]; &quot;&quot;); &quot;&quot;)))">
            <text:p/>
          </table:table-cell>
          <table:table-cell table:style-name="ce325" table:number-columns-repeated="5"/>
          <table:table-cell table:style-name="ce308" table:formula="of:=ISWINNERMEN([.N45:.R45]; [.N44:.R4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46:.H46]; [.D45:.H4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44])); [.$K44]=[.$K45]); [.$K44]; IF([.$S44]=&quot;W&quot;; IF(NOT(ISBLANK([.$K44])); [.$K44]; &quot;&quot;); IF([.$S45]=&quot;W&quot;; IF(NOT(ISBLANK([.$K45])); [.$K45]; &quot;&quot;); &quot;&quot;)))">
            <text:p/>
          </table:table-cell>
          <table:table-cell table:style-name="ce320" table:formula="of:=IF([.$S44]=&quot;W&quot;; IF(NOT(ISBLANK([.L44])); [.L44]; &quot;&quot;); IF([.$S45]=&quot;W&quot;; IF(NOT(ISBLANK([.L45])); [.L45]; &quot;&quot;); &quot;&quot;))">
            <text:p/>
          </table:table-cell>
          <table:table-cell table:style-name="ce329" table:formula="of:=IF(AND(NOT(ISBLANK([.M44])); [.M44]=[.M45]); [.M44]; IF([.$S44]=&quot;W&quot;; IF(NOT(ISBLANK([.M44])); [.M44]; &quot;&quot;); IF([.$S45]=&quot;W&quot;; IF(NOT(ISBLANK([.M45])); [.M45]; &quot;&quot;); &quot;&quot;)))">
            <text:p/>
          </table:table-cell>
          <table:table-cell table:style-name="ce324" table:number-columns-repeated="5"/>
          <table:table-cell table:style-name="ce265" table:formula="of:=ISWINNERMEN([.X46:.AB46]; [.X47:.AB4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47:.H47]; [.D48:.H4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48])); [.$K48]=[.$K49]); [.$K48]; IF([.$S48]=&quot;W&quot;; IF(NOT(ISBLANK([.$K48])); [.$K48]; &quot;&quot;); IF([.$S49]=&quot;W&quot;; IF(NOT(ISBLANK([.$K49])); [.$K49]; &quot;&quot;); &quot;&quot;)))">
            <text:p/>
          </table:table-cell>
          <table:table-cell table:style-name="ce321" table:formula="of:=IF([.$S48]=&quot;W&quot;; IF(NOT(ISBLANK([.L48])); [.L48]; &quot;&quot;); IF([.$S49]=&quot;W&quot;; IF(NOT(ISBLANK([.L49])); [.L49]; &quot;&quot;); &quot;&quot;))">
            <text:p/>
          </table:table-cell>
          <table:table-cell table:style-name="ce331" table:formula="of:=IF(AND(NOT(ISBLANK([.M48])); [.M48]=[.M49]); [.M48]; IF([.$S48]=&quot;W&quot;; IF(NOT(ISBLANK([.M48])); [.M48]; &quot;&quot;); IF([.$S49]=&quot;W&quot;; IF(NOT(ISBLANK([.M49])); [.M49]; &quot;&quot;); &quot;&quot;)))">
            <text:p/>
          </table:table-cell>
          <table:table-cell table:style-name="ce325" table:number-columns-repeated="5"/>
          <table:table-cell table:style-name="ce308" table:formula="of:=ISWINNERMEN([.X47:.AB47]; [.X46:.AB4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48:.H48]; [.D47:.H47])">
            <text:p/>
          </table:table-cell>
          <table:table-cell table:style-name="ce78"/>
          <table:table-cell table:style-name="ce315" table:formula="of:=IF(AND(NOT(ISBLANK([.A47])); [.A47]=[.A48]); [.A47]; IF([.$I47]=&quot;W&quot;; IF(NOT(ISBLANK([.A47])); [.A47]; &quot;&quot;); IF([.$I48]=&quot;W&quot;; IF(NOT(ISBLANK([.A48])); [.A48]; &quot;&quot;); &quot;&quot;)))">
            <text:p/>
          </table:table-cell>
          <table:table-cell table:style-name="ce320" table:formula="of:=IF([.$I47]=&quot;W&quot;; IF(NOT(ISBLANK([.B47])); [.B47]; &quot;&quot;); IF([.$I48]=&quot;W&quot;; IF(NOT(ISBLANK([.B48])); [.B48]; &quot;&quot;); &quot;&quot;))">
            <text:p/>
          </table:table-cell>
          <table:table-cell table:style-name="ce318" table:formula="of:=IF(AND(NOT(ISBLANK([.C47])); [.C47]=[.C48]); [.C47]; IF([.$I47]=&quot;W&quot;; IF(NOT(ISBLANK([.C47])); [.C47]; &quot;&quot;); IF([.$I48]=&quot;W&quot;; IF(NOT(ISBLANK([.C48])); [.C48]; &quot;&quot;); &quot;&quot;)))">
            <text:p/>
          </table:table-cell>
          <table:table-cell table:style-name="ce324" table:number-columns-repeated="5"/>
          <table:table-cell table:style-name="ce265" table:formula="of:=ISWINNERMEN([.N48:.R48]; [.N49:.R4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49:.H49]; [.D50:.H50])">
            <text:p/>
          </table:table-cell>
          <table:table-cell table:style-name="ce78"/>
          <table:table-cell table:style-name="ce316" table:formula="of:=IF(AND(NOT(ISBLANK([.A49])); [.A49]=[.A50]); [.A49]; IF([.$I49]=&quot;W&quot;; IF(NOT(ISBLANK([.A49])); [.A49]; &quot;&quot;); IF([.$I50]=&quot;W&quot;; IF(NOT(ISBLANK([.A50])); [.A50]; &quot;&quot;); &quot;&quot;)))">
            <text:p/>
          </table:table-cell>
          <table:table-cell table:style-name="ce321" table:formula="of:=IF([.$I49]=&quot;W&quot;; IF(NOT(ISBLANK([.B49])); [.B49]; &quot;&quot;); IF([.$I50]=&quot;W&quot;; IF(NOT(ISBLANK([.B50])); [.B50]; &quot;&quot;); &quot;&quot;))">
            <text:p/>
          </table:table-cell>
          <table:table-cell table:style-name="ce319" table:formula="of:=IF(AND(NOT(ISBLANK([.C49])); [.C49]=[.C50]); [.C49]; IF([.$I49]=&quot;W&quot;; IF(NOT(ISBLANK([.C49])); [.C49]; &quot;&quot;); IF([.$I50]=&quot;W&quot;; IF(NOT(ISBLANK([.C50])); [.C50]; &quot;&quot;); &quot;&quot;)))">
            <text:p/>
          </table:table-cell>
          <table:table-cell table:style-name="ce325" table:number-columns-repeated="5"/>
          <table:table-cell table:style-name="ce308" table:formula="of:=ISWINNERMEN([.N49:.R49]; [.N48:.R4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50:.H50]; [.D49:.H49])">
            <text:p/>
            <draw:frame table:end-cell-address="ML.U52" table:end-x="0.0437in" table:end-y="0.0268in" draw:z-index="2" draw:style-name="gr1" draw:text-style-name="P1" svg:width="2.9256in" svg:height="0.2654in" draw:transform="rotate (1.5707963267949) translate (0.193307086614173in 0.166535433070866in)">
              <draw:text-box>
                <text:p><text:span text:style-name="T1">Section 3</text:span></text:p>
              </draw:text-box>
            </draw:frame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 table:style-name="ce130"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3" calcext:value-type="float">
            <text:p>3</text:p>
          </table:table-cell>
          <table:table-cell table:number-columns-repeated="216"/>
        </table:table-row>
        <table:table-row table:style-name="ro3">
          <table:table-cell table:style-name="ce96"/>
          <table:table-cell table:style-name="ce322"/>
          <table:table-cell table:style-name="ce105"/>
          <table:table-cell table:style-name="ce330" table:number-columns-repeated="5"/>
          <table:table-cell table:style-name="ce334" table:formula="of:=ISWINNERMEN([.D51:.H51]; [.D52:.H52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46" table:number-columns-repeated="5"/>
          <table:table-cell table:style-name="ce81" table:number-columns-repeated="5"/>
          <table:table-cell table:style-name="ce346" table:number-columns-repeated="5"/>
          <table:table-cell/>
          <table:table-cell table:style-name="ce81" table:number-columns-repeated="4"/>
          <table:table-cell table:style-name="ce346" table:number-columns-repeated="5"/>
          <table:table-cell table:style-name="ce81"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52:.H52]; [.D51:.H51])">
            <text:p/>
          </table:table-cell>
          <table:table-cell table:style-name="ce78"/>
          <table:table-cell table:style-name="ce315" table:formula="of:=IF(AND(NOT(ISBLANK([.A51])); [.A51]=[.A52]); [.A51]; IF([.$I51]=&quot;W&quot;; IF(NOT(ISBLANK([.A51])); [.A51]; &quot;&quot;); IF([.$I52]=&quot;W&quot;; IF(NOT(ISBLANK([.A52])); [.A52]; &quot;&quot;); &quot;&quot;)))">
            <text:p/>
          </table:table-cell>
          <table:table-cell table:style-name="ce320" table:formula="of:=IF([.$I51]=&quot;W&quot;; IF(NOT(ISBLANK([.B51])); [.B51]; &quot;&quot;); IF([.$I52]=&quot;W&quot;; IF(NOT(ISBLANK([.B52])); [.B52]; &quot;&quot;); &quot;&quot;))">
            <text:p/>
          </table:table-cell>
          <table:table-cell table:style-name="ce318" table:formula="of:=IF(AND(NOT(ISBLANK([.C51])); [.C51]=[.C52]); [.C51]; IF([.$I51]=&quot;W&quot;; IF(NOT(ISBLANK([.C51])); [.C51]; &quot;&quot;); IF([.$I52]=&quot;W&quot;; IF(NOT(ISBLANK([.C52])); [.C52]; &quot;&quot;); &quot;&quot;)))">
            <text:p/>
          </table:table-cell>
          <table:table-cell table:style-name="ce324" table:number-columns-repeated="5"/>
          <table:table-cell table:style-name="ce265" table:formula="of:=ISWINNERMEN([.N52:.R52]; [.N53:.R5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53:.H53]; [.D54:.H54])">
            <text:p/>
          </table:table-cell>
          <table:table-cell table:style-name="ce78"/>
          <table:table-cell table:style-name="ce316" table:formula="of:=IF(AND(NOT(ISBLANK([.A53])); [.A53]=[.A54]); [.A53]; IF([.$I53]=&quot;W&quot;; IF(NOT(ISBLANK([.A53])); [.A53]; &quot;&quot;); IF([.$I54]=&quot;W&quot;; IF(NOT(ISBLANK([.A54])); [.A54]; &quot;&quot;); &quot;&quot;)))">
            <text:p/>
          </table:table-cell>
          <table:table-cell table:style-name="ce321" table:formula="of:=IF([.$I53]=&quot;W&quot;; IF(NOT(ISBLANK([.B53])); [.B53]; &quot;&quot;); IF([.$I54]=&quot;W&quot;; IF(NOT(ISBLANK([.B54])); [.B54]; &quot;&quot;); &quot;&quot;))">
            <text:p/>
          </table:table-cell>
          <table:table-cell table:style-name="ce319" table:formula="of:=IF(AND(NOT(ISBLANK([.C53])); [.C53]=[.C54]); [.C53]; IF([.$I53]=&quot;W&quot;; IF(NOT(ISBLANK([.C53])); [.C53]; &quot;&quot;); IF([.$I54]=&quot;W&quot;; IF(NOT(ISBLANK([.C54])); [.C54]; &quot;&quot;); &quot;&quot;)))">
            <text:p/>
          </table:table-cell>
          <table:table-cell table:style-name="ce325" table:number-columns-repeated="5"/>
          <table:table-cell table:style-name="ce308" table:formula="of:=ISWINNERMEN([.N53:.R53]; [.N52:.R5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54:.H54]; [.D53:.H53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52])); [.$K52]=[.$K53]); [.$K52]; IF([.$S52]=&quot;W&quot;; IF(NOT(ISBLANK([.$K52])); [.$K52]; &quot;&quot;); IF([.$S53]=&quot;W&quot;; IF(NOT(ISBLANK([.$K53])); [.$K53]; &quot;&quot;); &quot;&quot;)))">
            <text:p/>
          </table:table-cell>
          <table:table-cell table:style-name="ce320" table:formula="of:=IF([.$S52]=&quot;W&quot;; IF(NOT(ISBLANK([.L52])); [.L52]; &quot;&quot;); IF([.$S53]=&quot;W&quot;; IF(NOT(ISBLANK([.L53])); [.L53]; &quot;&quot;); &quot;&quot;))">
            <text:p/>
          </table:table-cell>
          <table:table-cell table:style-name="ce329" table:formula="of:=IF(AND(NOT(ISBLANK([.M52])); [.M52]=[.M53]); [.M52]; IF([.$S52]=&quot;W&quot;; IF(NOT(ISBLANK([.M52])); [.M52]; &quot;&quot;); IF([.$S53]=&quot;W&quot;; IF(NOT(ISBLANK([.M53])); [.M53]; &quot;&quot;); &quot;&quot;)))">
            <text:p/>
          </table:table-cell>
          <table:table-cell table:style-name="ce324" table:number-columns-repeated="5"/>
          <table:table-cell table:style-name="ce265" table:formula="of:=ISWINNERMEN([.X54:.AB54]; [.X55:.AB5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55:.H55]; [.D56:.H56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56])); [.$K56]=[.$K57]); [.$K56]; IF([.$S56]=&quot;W&quot;; IF(NOT(ISBLANK([.$K56])); [.$K56]; &quot;&quot;); IF([.$S57]=&quot;W&quot;; IF(NOT(ISBLANK([.$K57])); [.$K57]; &quot;&quot;); &quot;&quot;)))">
            <text:p/>
          </table:table-cell>
          <table:table-cell table:style-name="ce321" table:formula="of:=IF([.$S56]=&quot;W&quot;; IF(NOT(ISBLANK([.L56])); [.L56]; &quot;&quot;); IF([.$S57]=&quot;W&quot;; IF(NOT(ISBLANK([.L57])); [.L57]; &quot;&quot;); &quot;&quot;))">
            <text:p/>
          </table:table-cell>
          <table:table-cell table:style-name="ce331" table:formula="of:=IF(AND(NOT(ISBLANK([.M56])); [.M56]=[.M57]); [.M56]; IF([.$S56]=&quot;W&quot;; IF(NOT(ISBLANK([.M56])); [.M56]; &quot;&quot;); IF([.$S57]=&quot;W&quot;; IF(NOT(ISBLANK([.M57])); [.M57]; &quot;&quot;); &quot;&quot;)))">
            <text:p/>
          </table:table-cell>
          <table:table-cell table:style-name="ce325" table:number-columns-repeated="5"/>
          <table:table-cell table:style-name="ce308" table:formula="of:=ISWINNERMEN([.X55:.AB55]; [.X54:.AB5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56:.H56]; [.D55:.H55])">
            <text:p/>
          </table:table-cell>
          <table:table-cell table:style-name="ce78"/>
          <table:table-cell table:style-name="ce315" table:formula="of:=IF(AND(NOT(ISBLANK([.A55])); [.A55]=[.A56]); [.A55]; IF([.$I55]=&quot;W&quot;; IF(NOT(ISBLANK([.A55])); [.A55]; &quot;&quot;); IF([.$I56]=&quot;W&quot;; IF(NOT(ISBLANK([.A56])); [.A56]; &quot;&quot;); &quot;&quot;)))">
            <text:p/>
          </table:table-cell>
          <table:table-cell table:style-name="ce320" table:formula="of:=IF([.$I55]=&quot;W&quot;; IF(NOT(ISBLANK([.B55])); [.B55]; &quot;&quot;); IF([.$I56]=&quot;W&quot;; IF(NOT(ISBLANK([.B56])); [.B56]; &quot;&quot;); &quot;&quot;))">
            <text:p/>
          </table:table-cell>
          <table:table-cell table:style-name="ce318" table:formula="of:=IF(AND(NOT(ISBLANK([.C55])); [.C55]=[.C56]); [.C55]; IF([.$I55]=&quot;W&quot;; IF(NOT(ISBLANK([.C55])); [.C55]; &quot;&quot;); IF([.$I56]=&quot;W&quot;; IF(NOT(ISBLANK([.C56])); [.C56]; &quot;&quot;); &quot;&quot;)))">
            <text:p/>
          </table:table-cell>
          <table:table-cell table:style-name="ce324" table:number-columns-repeated="5"/>
          <table:table-cell table:style-name="ce265" table:formula="of:=ISWINNERMEN([.N56:.R56]; [.N57:.R5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57:.H57]; [.D58:.H58])">
            <text:p/>
          </table:table-cell>
          <table:table-cell table:style-name="ce78"/>
          <table:table-cell table:style-name="ce316" table:formula="of:=IF(AND(NOT(ISBLANK([.A57])); [.A57]=[.A58]); [.A57]; IF([.$I57]=&quot;W&quot;; IF(NOT(ISBLANK([.A57])); [.A57]; &quot;&quot;); IF([.$I58]=&quot;W&quot;; IF(NOT(ISBLANK([.A58])); [.A58]; &quot;&quot;); &quot;&quot;)))">
            <text:p/>
          </table:table-cell>
          <table:table-cell table:style-name="ce321" table:formula="of:=IF([.$I57]=&quot;W&quot;; IF(NOT(ISBLANK([.B57])); [.B57]; &quot;&quot;); IF([.$I58]=&quot;W&quot;; IF(NOT(ISBLANK([.B58])); [.B58]; &quot;&quot;); &quot;&quot;))">
            <text:p/>
          </table:table-cell>
          <table:table-cell table:style-name="ce319" table:formula="of:=IF(AND(NOT(ISBLANK([.C57])); [.C57]=[.C58]); [.C57]; IF([.$I57]=&quot;W&quot;; IF(NOT(ISBLANK([.C57])); [.C57]; &quot;&quot;); IF([.$I58]=&quot;W&quot;; IF(NOT(ISBLANK([.C58])); [.C58]; &quot;&quot;); &quot;&quot;)))">
            <text:p/>
          </table:table-cell>
          <table:table-cell table:style-name="ce325" table:number-columns-repeated="5"/>
          <table:table-cell table:style-name="ce308" table:formula="of:=ISWINNERMEN([.N57:.R57]; [.N56:.R5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58:.H58]; [.D57:.H57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3" table:formula="of:=IF(AND(NOT(ISBLANK([.$U54])); [.$U54]=[.$U55]); [.$U54]; IF([.$AC54]=&quot;W&quot;; IF(NOT(ISBLANK([.$U54])); [.$U54]; &quot;&quot;); IF([.$AC55]=&quot;W&quot;; IF(NOT(ISBLANK([.$U55])); [.$U55]; &quot;&quot;); &quot;&quot;)))">
            <text:p/>
          </table:table-cell>
          <table:table-cell table:style-name="ce320" table:formula="of:=IF([.$AC54]=&quot;W&quot;; IF(NOT(ISBLANK([.V54])); [.V54]; &quot;&quot;); IF([.$AC55]=&quot;W&quot;; IF(NOT(ISBLANK([.V55])); [.V55]; &quot;&quot;); &quot;&quot;))">
            <text:p/>
          </table:table-cell>
          <table:table-cell table:style-name="ce336" table:formula="of:=IF(AND(NOT(ISBLANK([.$W54])); [.$W54]=[.$W55]); [.$W54]; IF([.$AC54]=&quot;W&quot;; IF(NOT(ISBLANK([.$W54])); [.$W54]; &quot;&quot;); IF([.$AC55]=&quot;W&quot;; IF(NOT(ISBLANK([.$W55])); [.$W55]; &quot;&quot;); &quot;&quot;)))">
            <text:p/>
          </table:table-cell>
          <table:table-cell table:style-name="ce324" table:formula="of:=IF(NOT(ISBLANK([Finals.D9])); [Finals.D9]; &quot;&quot;)">
            <text:p/>
          </table:table-cell>
          <table:table-cell table:style-name="ce324" table:formula="of:=IF(NOT(ISBLANK([Finals.E9])); [Finals.E9]; &quot;&quot;)">
            <text:p/>
          </table:table-cell>
          <table:table-cell table:style-name="ce324" table:formula="of:=IF(NOT(ISBLANK([Finals.F9])); [Finals.F9]; &quot;&quot;)">
            <text:p/>
          </table:table-cell>
          <table:table-cell table:style-name="ce324" table:formula="of:=IF(NOT(ISBLANK([Finals.G9])); [Finals.G9]; &quot;&quot;)">
            <text:p/>
          </table:table-cell>
          <table:table-cell table:style-name="ce324" table:formula="of:=IF(NOT(ISBLANK([Finals.H9])); [Finals.H9]; &quot;&quot;)">
            <text:p/>
          </table:table-cell>
          <table:table-cell table:style-name="ce265" table:formula="of:=IF(NOT(ISBLANK([Finals.I9])); [Finals.I9]; &quot;&quot;)">
            <text:p/>
          </table:table-cell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59:.H59]; [.D60:.H60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5" table:formula="of:=IF(AND(NOT(ISBLANK([.$U62])); [.$U62]=[.$U63]); [.$U62]; IF([.$AC62]=&quot;W&quot;; IF(NOT(ISBLANK([.$U62])); [.$U62]; &quot;&quot;); IF([.$AC63]=&quot;W&quot;; IF(NOT(ISBLANK([.$U63])); [.$U63]; &quot;&quot;); &quot;&quot;)))">
            <text:p/>
          </table:table-cell>
          <table:table-cell table:style-name="ce321" table:formula="of:=IF([.$AC62]=&quot;W&quot;; IF(NOT(ISBLANK([.V62])); [.V62]; &quot;&quot;); IF([.$AC63]=&quot;W&quot;; IF(NOT(ISBLANK([.V63])); [.V63]; &quot;&quot;); &quot;&quot;))">
            <text:p/>
          </table:table-cell>
          <table:table-cell table:style-name="ce337" table:formula="of:=IF(AND(NOT(ISBLANK([.$W62])); [.$W62]=[.$W63]); [.$W62]; IF([.$AC62]=&quot;W&quot;; IF(NOT(ISBLANK([.$W62])); [.$W62]; &quot;&quot;); IF([.$AC63]=&quot;W&quot;; IF(NOT(ISBLANK([.$W63])); [.$W63]; &quot;&quot;); &quot;&quot;)))">
            <text:p/>
          </table:table-cell>
          <table:table-cell table:style-name="ce325" table:formula="of:=IF(NOT(ISBLANK([Finals.D10])); [Finals.D10]; &quot;&quot;)">
            <text:p/>
          </table:table-cell>
          <table:table-cell table:style-name="ce325" table:formula="of:=IF(NOT(ISBLANK([Finals.E10])); [Finals.E10]; &quot;&quot;)">
            <text:p/>
          </table:table-cell>
          <table:table-cell table:style-name="ce325" table:formula="of:=IF(NOT(ISBLANK([Finals.F10])); [Finals.F10]; &quot;&quot;)">
            <text:p/>
          </table:table-cell>
          <table:table-cell table:style-name="ce325" table:formula="of:=IF(NOT(ISBLANK([Finals.G10])); [Finals.G10]; &quot;&quot;)">
            <text:p/>
          </table:table-cell>
          <table:table-cell table:style-name="ce325" table:formula="of:=IF(NOT(ISBLANK([Finals.H10])); [Finals.H10]; &quot;&quot;)">
            <text:p/>
          </table:table-cell>
          <table:table-cell table:style-name="ce308" table:formula="of:=IF(NOT(ISBLANK([Finals.I10])); [Finals.I10]; &quot;&quot;)">
            <text:p/>
          </table:table-cell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60:.H60]; [.D59:.H59])">
            <text:p/>
          </table:table-cell>
          <table:table-cell table:style-name="ce78"/>
          <table:table-cell table:style-name="ce315" table:formula="of:=IF(AND(NOT(ISBLANK([.A59])); [.A59]=[.A60]); [.A59]; IF([.$I59]=&quot;W&quot;; IF(NOT(ISBLANK([.A59])); [.A59]; &quot;&quot;); IF([.$I60]=&quot;W&quot;; IF(NOT(ISBLANK([.A60])); [.A60]; &quot;&quot;); &quot;&quot;)))">
            <text:p/>
          </table:table-cell>
          <table:table-cell table:style-name="ce320" table:formula="of:=IF([.$I59]=&quot;W&quot;; IF(NOT(ISBLANK([.B59])); [.B59]; &quot;&quot;); IF([.$I60]=&quot;W&quot;; IF(NOT(ISBLANK([.B60])); [.B60]; &quot;&quot;); &quot;&quot;))">
            <text:p/>
          </table:table-cell>
          <table:table-cell table:style-name="ce318" table:formula="of:=IF(AND(NOT(ISBLANK([.C59])); [.C59]=[.C60]); [.C59]; IF([.$I59]=&quot;W&quot;; IF(NOT(ISBLANK([.C59])); [.C59]; &quot;&quot;); IF([.$I60]=&quot;W&quot;; IF(NOT(ISBLANK([.C60])); [.C60]; &quot;&quot;); &quot;&quot;)))">
            <text:p/>
          </table:table-cell>
          <table:table-cell table:style-name="ce324" table:number-columns-repeated="5"/>
          <table:table-cell table:style-name="ce265" table:formula="of:=ISWINNERMEN([.N60:.R60]; [.N61:.R6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61:.H61]; [.D62:.H62])">
            <text:p/>
          </table:table-cell>
          <table:table-cell table:style-name="ce78"/>
          <table:table-cell table:style-name="ce316" table:formula="of:=IF(AND(NOT(ISBLANK([.A61])); [.A61]=[.A62]); [.A61]; IF([.$I61]=&quot;W&quot;; IF(NOT(ISBLANK([.A61])); [.A61]; &quot;&quot;); IF([.$I62]=&quot;W&quot;; IF(NOT(ISBLANK([.A62])); [.A62]; &quot;&quot;); &quot;&quot;)))">
            <text:p/>
          </table:table-cell>
          <table:table-cell table:style-name="ce321" table:formula="of:=IF([.$I61]=&quot;W&quot;; IF(NOT(ISBLANK([.B61])); [.B61]; &quot;&quot;); IF([.$I62]=&quot;W&quot;; IF(NOT(ISBLANK([.B62])); [.B62]; &quot;&quot;); &quot;&quot;))">
            <text:p/>
          </table:table-cell>
          <table:table-cell table:style-name="ce319" table:formula="of:=IF(AND(NOT(ISBLANK([.C61])); [.C61]=[.C62]); [.C61]; IF([.$I61]=&quot;W&quot;; IF(NOT(ISBLANK([.C61])); [.C61]; &quot;&quot;); IF([.$I62]=&quot;W&quot;; IF(NOT(ISBLANK([.C62])); [.C62]; &quot;&quot;); &quot;&quot;)))">
            <text:p/>
          </table:table-cell>
          <table:table-cell table:style-name="ce325" table:number-columns-repeated="5"/>
          <table:table-cell table:style-name="ce308" table:formula="of:=ISWINNERMEN([.N61:.R61]; [.N60:.R6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62:.H62]; [.D61:.H6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60])); [.$K60]=[.$K61]); [.$K60]; IF([.$S60]=&quot;W&quot;; IF(NOT(ISBLANK([.$K60])); [.$K60]; &quot;&quot;); IF([.$S61]=&quot;W&quot;; IF(NOT(ISBLANK([.$K61])); [.$K61]; &quot;&quot;); &quot;&quot;)))">
            <text:p/>
          </table:table-cell>
          <table:table-cell table:style-name="ce320" table:formula="of:=IF([.$S60]=&quot;W&quot;; IF(NOT(ISBLANK([.L60])); [.L60]; &quot;&quot;); IF([.$S61]=&quot;W&quot;; IF(NOT(ISBLANK([.L61])); [.L61]; &quot;&quot;); &quot;&quot;))">
            <text:p/>
          </table:table-cell>
          <table:table-cell table:style-name="ce329" table:formula="of:=IF(AND(NOT(ISBLANK([.M60])); [.M60]=[.M61]); [.M60]; IF([.$S60]=&quot;W&quot;; IF(NOT(ISBLANK([.M60])); [.M60]; &quot;&quot;); IF([.$S61]=&quot;W&quot;; IF(NOT(ISBLANK([.M61])); [.M61]; &quot;&quot;); &quot;&quot;)))">
            <text:p/>
          </table:table-cell>
          <table:table-cell table:style-name="ce324" table:number-columns-repeated="5"/>
          <table:table-cell table:style-name="ce265" table:formula="of:=ISWINNERMEN([.X62:.AB62]; [.X63:.AB6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63:.H63]; [.D64:.H6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64])); [.$K64]=[.$K65]); [.$K64]; IF([.$S64]=&quot;W&quot;; IF(NOT(ISBLANK([.$K64])); [.$K64]; &quot;&quot;); IF([.$S65]=&quot;W&quot;; IF(NOT(ISBLANK([.$K65])); [.$K65]; &quot;&quot;); &quot;&quot;)))">
            <text:p/>
          </table:table-cell>
          <table:table-cell table:style-name="ce321" table:formula="of:=IF([.$S64]=&quot;W&quot;; IF(NOT(ISBLANK([.L64])); [.L64]; &quot;&quot;); IF([.$S65]=&quot;W&quot;; IF(NOT(ISBLANK([.L65])); [.L65]; &quot;&quot;); &quot;&quot;))">
            <text:p/>
          </table:table-cell>
          <table:table-cell table:style-name="ce331" table:formula="of:=IF(AND(NOT(ISBLANK([.M64])); [.M64]=[.M65]); [.M64]; IF([.$S64]=&quot;W&quot;; IF(NOT(ISBLANK([.M64])); [.M64]; &quot;&quot;); IF([.$S65]=&quot;W&quot;; IF(NOT(ISBLANK([.M65])); [.M65]; &quot;&quot;); &quot;&quot;)))">
            <text:p/>
          </table:table-cell>
          <table:table-cell table:style-name="ce325" table:number-columns-repeated="5"/>
          <table:table-cell table:style-name="ce308" table:formula="of:=ISWINNERMEN([.X63:.AB63]; [.X62:.AB6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64:.H64]; [.D63:.H63])">
            <text:p/>
          </table:table-cell>
          <table:table-cell table:style-name="ce78"/>
          <table:table-cell table:style-name="ce315" table:formula="of:=IF(AND(NOT(ISBLANK([.A63])); [.A63]=[.A64]); [.A63]; IF([.$I63]=&quot;W&quot;; IF(NOT(ISBLANK([.A63])); [.A63]; &quot;&quot;); IF([.$I64]=&quot;W&quot;; IF(NOT(ISBLANK([.A64])); [.A64]; &quot;&quot;); &quot;&quot;)))">
            <text:p/>
          </table:table-cell>
          <table:table-cell table:style-name="ce320" table:formula="of:=IF([.$I63]=&quot;W&quot;; IF(NOT(ISBLANK([.B63])); [.B63]; &quot;&quot;); IF([.$I64]=&quot;W&quot;; IF(NOT(ISBLANK([.B64])); [.B64]; &quot;&quot;); &quot;&quot;))">
            <text:p/>
          </table:table-cell>
          <table:table-cell table:style-name="ce318" table:formula="of:=IF(AND(NOT(ISBLANK([.C63])); [.C63]=[.C64]); [.C63]; IF([.$I63]=&quot;W&quot;; IF(NOT(ISBLANK([.C63])); [.C63]; &quot;&quot;); IF([.$I64]=&quot;W&quot;; IF(NOT(ISBLANK([.C64])); [.C64]; &quot;&quot;); &quot;&quot;)))">
            <text:p/>
          </table:table-cell>
          <table:table-cell table:style-name="ce324" table:number-columns-repeated="5"/>
          <table:table-cell table:style-name="ce265" table:formula="of:=ISWINNERMEN([.N64:.R64]; [.N65:.R6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65:.H65]; [.D66:.H66])">
            <text:p/>
          </table:table-cell>
          <table:table-cell table:style-name="ce78"/>
          <table:table-cell table:style-name="ce316" table:formula="of:=IF(AND(NOT(ISBLANK([.A65])); [.A65]=[.A66]); [.A65]; IF([.$I65]=&quot;W&quot;; IF(NOT(ISBLANK([.A65])); [.A65]; &quot;&quot;); IF([.$I66]=&quot;W&quot;; IF(NOT(ISBLANK([.A66])); [.A66]; &quot;&quot;); &quot;&quot;)))">
            <text:p/>
          </table:table-cell>
          <table:table-cell table:style-name="ce321" table:formula="of:=IF([.$I65]=&quot;W&quot;; IF(NOT(ISBLANK([.B65])); [.B65]; &quot;&quot;); IF([.$I66]=&quot;W&quot;; IF(NOT(ISBLANK([.B66])); [.B66]; &quot;&quot;); &quot;&quot;))">
            <text:p/>
          </table:table-cell>
          <table:table-cell table:style-name="ce319" table:formula="of:=IF(AND(NOT(ISBLANK([.C65])); [.C65]=[.C66]); [.C65]; IF([.$I65]=&quot;W&quot;; IF(NOT(ISBLANK([.C65])); [.C65]; &quot;&quot;); IF([.$I66]=&quot;W&quot;; IF(NOT(ISBLANK([.C66])); [.C66]; &quot;&quot;); &quot;&quot;)))">
            <text:p/>
          </table:table-cell>
          <table:table-cell table:style-name="ce325" table:number-columns-repeated="5"/>
          <table:table-cell table:style-name="ce308" table:formula="of:=ISWINNERMEN([.N65:.R65]; [.N64:.R6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66:.H66]; [.D65:.H65])">
            <text:p/>
            <draw:frame table:end-cell-address="ML.U68" table:end-x="0.0437in" table:end-y="0.0264in" draw:z-index="3" draw:style-name="gr1" draw:text-style-name="P1" svg:width="2.9256in" svg:height="0.2654in" draw:transform="rotate (1.5707963267949) translate (0.193307086614173in 0.166141732283465in)">
              <draw:text-box>
                <text:p><text:span text:style-name="T1">Section 4</text:span></text:p>
              </draw:text-box>
            </draw:frame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 table:style-name="ce130"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4" calcext:value-type="float">
            <text:p>4</text:p>
          </table:table-cell>
          <table:table-cell table:number-columns-repeated="216"/>
        </table:table-row>
        <table:table-row table:style-name="ro3">
          <table:table-cell table:style-name="ce96"/>
          <table:table-cell table:style-name="ce322"/>
          <table:table-cell table:style-name="ce105"/>
          <table:table-cell table:style-name="ce330" table:number-columns-repeated="5"/>
          <table:table-cell table:style-name="ce334" table:formula="of:=ISWINNERMEN([.D67:.H67]; [.D68:.H68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46" table:number-columns-repeated="5"/>
          <table:table-cell table:style-name="ce81" table:number-columns-repeated="5"/>
          <table:table-cell table:style-name="ce346" table:number-columns-repeated="5"/>
          <table:table-cell/>
          <table:table-cell table:style-name="ce81" table:number-columns-repeated="4"/>
          <table:table-cell table:style-name="ce346" table:number-columns-repeated="5"/>
          <table:table-cell table:style-name="ce81"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68:.H68]; [.D67:.H67])">
            <text:p/>
          </table:table-cell>
          <table:table-cell table:style-name="ce78"/>
          <table:table-cell table:style-name="ce315" table:formula="of:=IF(AND(NOT(ISBLANK([.A67])); [.A67]=[.A68]); [.A67]; IF([.$I67]=&quot;W&quot;; IF(NOT(ISBLANK([.A67])); [.A67]; &quot;&quot;); IF([.$I68]=&quot;W&quot;; IF(NOT(ISBLANK([.A68])); [.A68]; &quot;&quot;); &quot;&quot;)))">
            <text:p/>
          </table:table-cell>
          <table:table-cell table:style-name="ce320" table:formula="of:=IF([.$I67]=&quot;W&quot;; IF(NOT(ISBLANK([.B67])); [.B67]; &quot;&quot;); IF([.$I68]=&quot;W&quot;; IF(NOT(ISBLANK([.B68])); [.B68]; &quot;&quot;); &quot;&quot;))">
            <text:p/>
          </table:table-cell>
          <table:table-cell table:style-name="ce318" table:formula="of:=IF(AND(NOT(ISBLANK([.C67])); [.C67]=[.C68]); [.C67]; IF([.$I67]=&quot;W&quot;; IF(NOT(ISBLANK([.C67])); [.C67]; &quot;&quot;); IF([.$I68]=&quot;W&quot;; IF(NOT(ISBLANK([.C68])); [.C68]; &quot;&quot;); &quot;&quot;)))">
            <text:p/>
          </table:table-cell>
          <table:table-cell table:style-name="ce324" table:number-columns-repeated="5"/>
          <table:table-cell table:style-name="ce265" table:formula="of:=ISWINNERMEN([.N68:.R68]; [.N69:.R6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69:.H69]; [.D70:.H70])">
            <text:p/>
          </table:table-cell>
          <table:table-cell table:style-name="ce78"/>
          <table:table-cell table:style-name="ce316" table:formula="of:=IF(AND(NOT(ISBLANK([.A69])); [.A69]=[.A70]); [.A69]; IF([.$I69]=&quot;W&quot;; IF(NOT(ISBLANK([.A69])); [.A69]; &quot;&quot;); IF([.$I70]=&quot;W&quot;; IF(NOT(ISBLANK([.A70])); [.A70]; &quot;&quot;); &quot;&quot;)))">
            <text:p/>
          </table:table-cell>
          <table:table-cell table:style-name="ce321" table:formula="of:=IF([.$I69]=&quot;W&quot;; IF(NOT(ISBLANK([.B69])); [.B69]; &quot;&quot;); IF([.$I70]=&quot;W&quot;; IF(NOT(ISBLANK([.B70])); [.B70]; &quot;&quot;); &quot;&quot;))">
            <text:p/>
          </table:table-cell>
          <table:table-cell table:style-name="ce319" table:formula="of:=IF(AND(NOT(ISBLANK([.C69])); [.C69]=[.C70]); [.C69]; IF([.$I69]=&quot;W&quot;; IF(NOT(ISBLANK([.C69])); [.C69]; &quot;&quot;); IF([.$I70]=&quot;W&quot;; IF(NOT(ISBLANK([.C70])); [.C70]; &quot;&quot;); &quot;&quot;)))">
            <text:p/>
          </table:table-cell>
          <table:table-cell table:style-name="ce325" table:number-columns-repeated="5"/>
          <table:table-cell table:style-name="ce308" table:formula="of:=ISWINNERMEN([.N69:.R69]; [.N68:.R6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70:.H70]; [.D69:.H6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68])); [.$K68]=[.$K69]); [.$K68]; IF([.$S68]=&quot;W&quot;; IF(NOT(ISBLANK([.$K68])); [.$K68]; &quot;&quot;); IF([.$S69]=&quot;W&quot;; IF(NOT(ISBLANK([.$K69])); [.$K69]; &quot;&quot;); &quot;&quot;)))">
            <text:p/>
          </table:table-cell>
          <table:table-cell table:style-name="ce320" table:formula="of:=IF([.$S68]=&quot;W&quot;; IF(NOT(ISBLANK([.L68])); [.L68]; &quot;&quot;); IF([.$S69]=&quot;W&quot;; IF(NOT(ISBLANK([.L69])); [.L69]; &quot;&quot;); &quot;&quot;))">
            <text:p/>
          </table:table-cell>
          <table:table-cell table:style-name="ce329" table:formula="of:=IF(AND(NOT(ISBLANK([.M68])); [.M68]=[.M69]); [.M68]; IF([.$S68]=&quot;W&quot;; IF(NOT(ISBLANK([.M68])); [.M68]; &quot;&quot;); IF([.$S69]=&quot;W&quot;; IF(NOT(ISBLANK([.M69])); [.M69]; &quot;&quot;); &quot;&quot;)))">
            <text:p/>
          </table:table-cell>
          <table:table-cell table:style-name="ce324" table:number-columns-repeated="5"/>
          <table:table-cell table:style-name="ce265" table:formula="of:=ISWINNERMEN([.X70:.AB70]; [.X71:.AB7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71:.H71]; [.D72:.H7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72])); [.$K72]=[.$K73]); [.$K72]; IF([.$S72]=&quot;W&quot;; IF(NOT(ISBLANK([.$K72])); [.$K72]; &quot;&quot;); IF([.$S73]=&quot;W&quot;; IF(NOT(ISBLANK([.$K73])); [.$K73]; &quot;&quot;); &quot;&quot;)))">
            <text:p/>
          </table:table-cell>
          <table:table-cell table:style-name="ce321" table:formula="of:=IF([.$S72]=&quot;W&quot;; IF(NOT(ISBLANK([.L72])); [.L72]; &quot;&quot;); IF([.$S73]=&quot;W&quot;; IF(NOT(ISBLANK([.L73])); [.L73]; &quot;&quot;); &quot;&quot;))">
            <text:p/>
          </table:table-cell>
          <table:table-cell table:style-name="ce331" table:formula="of:=IF(AND(NOT(ISBLANK([.M72])); [.M72]=[.M73]); [.M72]; IF([.$S72]=&quot;W&quot;; IF(NOT(ISBLANK([.M72])); [.M72]; &quot;&quot;); IF([.$S73]=&quot;W&quot;; IF(NOT(ISBLANK([.M73])); [.M73]; &quot;&quot;); &quot;&quot;)))">
            <text:p/>
          </table:table-cell>
          <table:table-cell table:style-name="ce325" table:number-columns-repeated="5"/>
          <table:table-cell table:style-name="ce308" table:formula="of:=ISWINNERMEN([.X71:.AB71]; [.X70:.AB7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72:.H72]; [.D71:.H71])">
            <text:p/>
          </table:table-cell>
          <table:table-cell table:style-name="ce78"/>
          <table:table-cell table:style-name="ce315" table:formula="of:=IF(AND(NOT(ISBLANK([.A71])); [.A71]=[.A72]); [.A71]; IF([.$I71]=&quot;W&quot;; IF(NOT(ISBLANK([.A71])); [.A71]; &quot;&quot;); IF([.$I72]=&quot;W&quot;; IF(NOT(ISBLANK([.A72])); [.A72]; &quot;&quot;); &quot;&quot;)))">
            <text:p/>
          </table:table-cell>
          <table:table-cell table:style-name="ce320" table:formula="of:=IF([.$I71]=&quot;W&quot;; IF(NOT(ISBLANK([.B71])); [.B71]; &quot;&quot;); IF([.$I72]=&quot;W&quot;; IF(NOT(ISBLANK([.B72])); [.B72]; &quot;&quot;); &quot;&quot;))">
            <text:p/>
          </table:table-cell>
          <table:table-cell table:style-name="ce318" table:formula="of:=IF(AND(NOT(ISBLANK([.C71])); [.C71]=[.C72]); [.C71]; IF([.$I71]=&quot;W&quot;; IF(NOT(ISBLANK([.C71])); [.C71]; &quot;&quot;); IF([.$I72]=&quot;W&quot;; IF(NOT(ISBLANK([.C72])); [.C72]; &quot;&quot;); &quot;&quot;)))">
            <text:p/>
          </table:table-cell>
          <table:table-cell table:style-name="ce324" table:number-columns-repeated="5"/>
          <table:table-cell table:style-name="ce265" table:formula="of:=ISWINNERMEN([.N72:.R72]; [.N73:.R7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73:.H73]; [.D74:.H74])">
            <text:p/>
          </table:table-cell>
          <table:table-cell table:style-name="ce78"/>
          <table:table-cell table:style-name="ce316" table:formula="of:=IF(AND(NOT(ISBLANK([.A73])); [.A73]=[.A74]); [.A73]; IF([.$I73]=&quot;W&quot;; IF(NOT(ISBLANK([.A73])); [.A73]; &quot;&quot;); IF([.$I74]=&quot;W&quot;; IF(NOT(ISBLANK([.A74])); [.A74]; &quot;&quot;); &quot;&quot;)))">
            <text:p/>
          </table:table-cell>
          <table:table-cell table:style-name="ce321" table:formula="of:=IF([.$I73]=&quot;W&quot;; IF(NOT(ISBLANK([.B73])); [.B73]; &quot;&quot;); IF([.$I74]=&quot;W&quot;; IF(NOT(ISBLANK([.B74])); [.B74]; &quot;&quot;); &quot;&quot;))">
            <text:p/>
          </table:table-cell>
          <table:table-cell table:style-name="ce319" table:formula="of:=IF(AND(NOT(ISBLANK([.C73])); [.C73]=[.C74]); [.C73]; IF([.$I73]=&quot;W&quot;; IF(NOT(ISBLANK([.C73])); [.C73]; &quot;&quot;); IF([.$I74]=&quot;W&quot;; IF(NOT(ISBLANK([.C74])); [.C74]; &quot;&quot;); &quot;&quot;)))">
            <text:p/>
          </table:table-cell>
          <table:table-cell table:style-name="ce325" table:number-columns-repeated="5"/>
          <table:table-cell table:style-name="ce308" table:formula="of:=ISWINNERMEN([.N73:.R73]; [.N72:.R7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74:.H74]; [.D73:.H73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3" table:formula="of:=IF(AND(NOT(ISBLANK([.$U70])); [.$U70]=[.$U71]); [.$U70]; IF([.$AC70]=&quot;W&quot;; IF(NOT(ISBLANK([.$U70])); [.$U70]; &quot;&quot;); IF([.$AC71]=&quot;W&quot;; IF(NOT(ISBLANK([.$U71])); [.$U71]; &quot;&quot;); &quot;&quot;)))">
            <text:p/>
          </table:table-cell>
          <table:table-cell table:style-name="ce320" table:formula="of:=IF([.$AC70]=&quot;W&quot;; IF(NOT(ISBLANK([.V70])); [.V70]; &quot;&quot;); IF([.$AC71]=&quot;W&quot;; IF(NOT(ISBLANK([.V71])); [.V71]; &quot;&quot;); &quot;&quot;))">
            <text:p/>
          </table:table-cell>
          <table:table-cell table:style-name="ce336" table:formula="of:=IF(AND(NOT(ISBLANK([.$W70])); [.$W70]=[.$W71]); [.$W70]; IF([.$AC70]=&quot;W&quot;; IF(NOT(ISBLANK([.$W70])); [.$W70]; &quot;&quot;); IF([.$AC71]=&quot;W&quot;; IF(NOT(ISBLANK([.$W71])); [.$W71]; &quot;&quot;); &quot;&quot;)))">
            <text:p/>
          </table:table-cell>
          <table:table-cell table:style-name="ce324" table:formula="of:=IF(NOT(ISBLANK([Finals.D11])); [Finals.D11]; &quot;&quot;)">
            <text:p/>
          </table:table-cell>
          <table:table-cell table:style-name="ce324" table:formula="of:=IF(NOT(ISBLANK([Finals.E11])); [Finals.E11]; &quot;&quot;)">
            <text:p/>
          </table:table-cell>
          <table:table-cell table:style-name="ce324" table:formula="of:=IF(NOT(ISBLANK([Finals.F11])); [Finals.F11]; &quot;&quot;)">
            <text:p/>
          </table:table-cell>
          <table:table-cell table:style-name="ce324" table:formula="of:=IF(NOT(ISBLANK([Finals.G11])); [Finals.G11]; &quot;&quot;)">
            <text:p/>
          </table:table-cell>
          <table:table-cell table:style-name="ce324" table:formula="of:=IF(NOT(ISBLANK([Finals.H11])); [Finals.H11]; &quot;&quot;)">
            <text:p/>
          </table:table-cell>
          <table:table-cell table:style-name="ce265" table:formula="of:=IF(NOT(ISBLANK([Finals.I11])); [Finals.I11]; &quot;&quot;)">
            <text:p/>
          </table:table-cell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75:.H75]; [.D76:.H76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5" table:formula="of:=IF(AND(NOT(ISBLANK([.$U78])); [.$U78]=[.$U79]); [.$U78]; IF([.$AC78]=&quot;W&quot;; IF(NOT(ISBLANK([.$U78])); [.$U78]; &quot;&quot;); IF([.$AC79]=&quot;W&quot;; IF(NOT(ISBLANK([.$U79])); [.$U79]; &quot;&quot;); &quot;&quot;)))">
            <text:p/>
          </table:table-cell>
          <table:table-cell table:style-name="ce321" table:formula="of:=IF([.$AC78]=&quot;W&quot;; IF(NOT(ISBLANK([.V78])); [.V78]; &quot;&quot;); IF([.$AC79]=&quot;W&quot;; IF(NOT(ISBLANK([.V79])); [.V79]; &quot;&quot;); &quot;&quot;))">
            <text:p/>
          </table:table-cell>
          <table:table-cell table:style-name="ce337" table:formula="of:=IF(AND(NOT(ISBLANK([.$W78])); [.$W78]=[.$W79]); [.$W78]; IF([.$AC78]=&quot;W&quot;; IF(NOT(ISBLANK([.$W78])); [.$W78]; &quot;&quot;); IF([.$AC79]=&quot;W&quot;; IF(NOT(ISBLANK([.$W79])); [.$W79]; &quot;&quot;); &quot;&quot;)))">
            <text:p/>
          </table:table-cell>
          <table:table-cell table:style-name="ce325" table:formula="of:=IF(NOT(ISBLANK([Finals.D12])); [Finals.D12]; &quot;&quot;)">
            <text:p/>
          </table:table-cell>
          <table:table-cell table:style-name="ce325" table:formula="of:=IF(NOT(ISBLANK([Finals.E12])); [Finals.E12]; &quot;&quot;)">
            <text:p/>
          </table:table-cell>
          <table:table-cell table:style-name="ce325" table:formula="of:=IF(NOT(ISBLANK([Finals.F12])); [Finals.F12]; &quot;&quot;)">
            <text:p/>
          </table:table-cell>
          <table:table-cell table:style-name="ce325" table:formula="of:=IF(NOT(ISBLANK([Finals.G12])); [Finals.G12]; &quot;&quot;)">
            <text:p/>
          </table:table-cell>
          <table:table-cell table:style-name="ce325" table:formula="of:=IF(NOT(ISBLANK([Finals.H12])); [Finals.H12]; &quot;&quot;)">
            <text:p/>
          </table:table-cell>
          <table:table-cell table:style-name="ce308" table:formula="of:=IF(NOT(ISBLANK([Finals.I12])); [Finals.I12]; &quot;&quot;)">
            <text:p/>
          </table:table-cell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76:.H76]; [.D75:.H75])">
            <text:p/>
          </table:table-cell>
          <table:table-cell table:style-name="ce78"/>
          <table:table-cell table:style-name="ce315" table:formula="of:=IF(AND(NOT(ISBLANK([.A75])); [.A75]=[.A76]); [.A75]; IF([.$I75]=&quot;W&quot;; IF(NOT(ISBLANK([.A75])); [.A75]; &quot;&quot;); IF([.$I76]=&quot;W&quot;; IF(NOT(ISBLANK([.A76])); [.A76]; &quot;&quot;); &quot;&quot;)))">
            <text:p/>
          </table:table-cell>
          <table:table-cell table:style-name="ce320" table:formula="of:=IF([.$I75]=&quot;W&quot;; IF(NOT(ISBLANK([.B75])); [.B75]; &quot;&quot;); IF([.$I76]=&quot;W&quot;; IF(NOT(ISBLANK([.B76])); [.B76]; &quot;&quot;); &quot;&quot;))">
            <text:p/>
          </table:table-cell>
          <table:table-cell table:style-name="ce318" table:formula="of:=IF(AND(NOT(ISBLANK([.C75])); [.C75]=[.C76]); [.C75]; IF([.$I75]=&quot;W&quot;; IF(NOT(ISBLANK([.C75])); [.C75]; &quot;&quot;); IF([.$I76]=&quot;W&quot;; IF(NOT(ISBLANK([.C76])); [.C76]; &quot;&quot;); &quot;&quot;)))">
            <text:p/>
          </table:table-cell>
          <table:table-cell table:style-name="ce324" table:number-columns-repeated="5"/>
          <table:table-cell table:style-name="ce265" table:formula="of:=ISWINNERMEN([.N76:.R76]; [.N77:.R7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77:.H77]; [.D78:.H78])">
            <text:p/>
          </table:table-cell>
          <table:table-cell table:style-name="ce78"/>
          <table:table-cell table:style-name="ce316" table:formula="of:=IF(AND(NOT(ISBLANK([.A77])); [.A77]=[.A78]); [.A77]; IF([.$I77]=&quot;W&quot;; IF(NOT(ISBLANK([.A77])); [.A77]; &quot;&quot;); IF([.$I78]=&quot;W&quot;; IF(NOT(ISBLANK([.A78])); [.A78]; &quot;&quot;); &quot;&quot;)))">
            <text:p/>
          </table:table-cell>
          <table:table-cell table:style-name="ce321" table:formula="of:=IF([.$I77]=&quot;W&quot;; IF(NOT(ISBLANK([.B77])); [.B77]; &quot;&quot;); IF([.$I78]=&quot;W&quot;; IF(NOT(ISBLANK([.B78])); [.B78]; &quot;&quot;); &quot;&quot;))">
            <text:p/>
          </table:table-cell>
          <table:table-cell table:style-name="ce319" table:formula="of:=IF(AND(NOT(ISBLANK([.C77])); [.C77]=[.C78]); [.C77]; IF([.$I77]=&quot;W&quot;; IF(NOT(ISBLANK([.C77])); [.C77]; &quot;&quot;); IF([.$I78]=&quot;W&quot;; IF(NOT(ISBLANK([.C78])); [.C78]; &quot;&quot;); &quot;&quot;)))">
            <text:p/>
          </table:table-cell>
          <table:table-cell table:style-name="ce325" table:number-columns-repeated="5"/>
          <table:table-cell table:style-name="ce308" table:formula="of:=ISWINNERMEN([.N77:.R77]; [.N76:.R7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78:.H78]; [.D77:.H77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76])); [.$K76]=[.$K77]); [.$K76]; IF([.$S76]=&quot;W&quot;; IF(NOT(ISBLANK([.$K76])); [.$K76]; &quot;&quot;); IF([.$S77]=&quot;W&quot;; IF(NOT(ISBLANK([.$K77])); [.$K77]; &quot;&quot;); &quot;&quot;)))">
            <text:p/>
          </table:table-cell>
          <table:table-cell table:style-name="ce320" table:formula="of:=IF([.$S76]=&quot;W&quot;; IF(NOT(ISBLANK([.L76])); [.L76]; &quot;&quot;); IF([.$S77]=&quot;W&quot;; IF(NOT(ISBLANK([.L77])); [.L77]; &quot;&quot;); &quot;&quot;))">
            <text:p/>
          </table:table-cell>
          <table:table-cell table:style-name="ce329" table:formula="of:=IF(AND(NOT(ISBLANK([.M76])); [.M76]=[.M77]); [.M76]; IF([.$S76]=&quot;W&quot;; IF(NOT(ISBLANK([.M76])); [.M76]; &quot;&quot;); IF([.$S77]=&quot;W&quot;; IF(NOT(ISBLANK([.M77])); [.M77]; &quot;&quot;); &quot;&quot;)))">
            <text:p/>
          </table:table-cell>
          <table:table-cell table:style-name="ce324" table:number-columns-repeated="5"/>
          <table:table-cell table:style-name="ce265" table:formula="of:=ISWINNERMEN([.X78:.AB78]; [.X79:.AB7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79:.H79]; [.D80:.H80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80])); [.$K80]=[.$K81]); [.$K80]; IF([.$S80]=&quot;W&quot;; IF(NOT(ISBLANK([.$K80])); [.$K80]; &quot;&quot;); IF([.$S81]=&quot;W&quot;; IF(NOT(ISBLANK([.$K81])); [.$K81]; &quot;&quot;); &quot;&quot;)))">
            <text:p/>
          </table:table-cell>
          <table:table-cell table:style-name="ce321" table:formula="of:=IF([.$S80]=&quot;W&quot;; IF(NOT(ISBLANK([.L80])); [.L80]; &quot;&quot;); IF([.$S81]=&quot;W&quot;; IF(NOT(ISBLANK([.L81])); [.L81]; &quot;&quot;); &quot;&quot;))">
            <text:p/>
          </table:table-cell>
          <table:table-cell table:style-name="ce331" table:formula="of:=IF(AND(NOT(ISBLANK([.M80])); [.M80]=[.M81]); [.M80]; IF([.$S80]=&quot;W&quot;; IF(NOT(ISBLANK([.M80])); [.M80]; &quot;&quot;); IF([.$S81]=&quot;W&quot;; IF(NOT(ISBLANK([.M81])); [.M81]; &quot;&quot;); &quot;&quot;)))">
            <text:p/>
          </table:table-cell>
          <table:table-cell table:style-name="ce325" table:number-columns-repeated="5"/>
          <table:table-cell table:style-name="ce308" table:formula="of:=ISWINNERMEN([.X79:.AB79]; [.X78:.AB7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80:.H80]; [.D79:.H79])">
            <text:p/>
          </table:table-cell>
          <table:table-cell table:style-name="ce78"/>
          <table:table-cell table:style-name="ce315" table:formula="of:=IF(AND(NOT(ISBLANK([.A79])); [.A79]=[.A80]); [.A79]; IF([.$I79]=&quot;W&quot;; IF(NOT(ISBLANK([.A79])); [.A79]; &quot;&quot;); IF([.$I80]=&quot;W&quot;; IF(NOT(ISBLANK([.A80])); [.A80]; &quot;&quot;); &quot;&quot;)))">
            <text:p/>
          </table:table-cell>
          <table:table-cell table:style-name="ce320" table:formula="of:=IF([.$I79]=&quot;W&quot;; IF(NOT(ISBLANK([.B79])); [.B79]; &quot;&quot;); IF([.$I80]=&quot;W&quot;; IF(NOT(ISBLANK([.B80])); [.B80]; &quot;&quot;); &quot;&quot;))">
            <text:p/>
          </table:table-cell>
          <table:table-cell table:style-name="ce318" table:formula="of:=IF(AND(NOT(ISBLANK([.C79])); [.C79]=[.C80]); [.C79]; IF([.$I79]=&quot;W&quot;; IF(NOT(ISBLANK([.C79])); [.C79]; &quot;&quot;); IF([.$I80]=&quot;W&quot;; IF(NOT(ISBLANK([.C80])); [.C80]; &quot;&quot;); &quot;&quot;)))">
            <text:p/>
          </table:table-cell>
          <table:table-cell table:style-name="ce324" table:number-columns-repeated="5"/>
          <table:table-cell table:style-name="ce265" table:formula="of:=ISWINNERMEN([.N80:.R80]; [.N81:.R8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81:.H81]; [.D82:.H82])">
            <text:p/>
          </table:table-cell>
          <table:table-cell table:style-name="ce78"/>
          <table:table-cell table:style-name="ce316" table:formula="of:=IF(AND(NOT(ISBLANK([.A81])); [.A81]=[.A82]); [.A81]; IF([.$I81]=&quot;W&quot;; IF(NOT(ISBLANK([.A81])); [.A81]; &quot;&quot;); IF([.$I82]=&quot;W&quot;; IF(NOT(ISBLANK([.A82])); [.A82]; &quot;&quot;); &quot;&quot;)))">
            <text:p/>
          </table:table-cell>
          <table:table-cell table:style-name="ce321" table:formula="of:=IF([.$I81]=&quot;W&quot;; IF(NOT(ISBLANK([.B81])); [.B81]; &quot;&quot;); IF([.$I82]=&quot;W&quot;; IF(NOT(ISBLANK([.B82])); [.B82]; &quot;&quot;); &quot;&quot;))">
            <text:p/>
          </table:table-cell>
          <table:table-cell table:style-name="ce319" table:formula="of:=IF(AND(NOT(ISBLANK([.C81])); [.C81]=[.C82]); [.C81]; IF([.$I81]=&quot;W&quot;; IF(NOT(ISBLANK([.C81])); [.C81]; &quot;&quot;); IF([.$I82]=&quot;W&quot;; IF(NOT(ISBLANK([.C82])); [.C82]; &quot;&quot;); &quot;&quot;)))">
            <text:p/>
          </table:table-cell>
          <table:table-cell table:style-name="ce325" table:number-columns-repeated="5"/>
          <table:table-cell table:style-name="ce308" table:formula="of:=ISWINNERMEN([.N81:.R81]; [.N80:.R8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82:.H82]; [.D81:.H81])">
            <text:p/>
            <draw:frame table:end-cell-address="ML.U84" table:end-x="0.0437in" table:end-y="0.026in" draw:z-index="4" draw:style-name="gr1" draw:text-style-name="P1" svg:width="2.9256in" svg:height="0.2654in" draw:transform="rotate (1.5707963267949) translate (0.193307086614173in 0.165748031496063in)">
              <draw:text-box>
                <text:p><text:span text:style-name="T1">Section 5</text:span></text:p>
              </draw:text-box>
            </draw:frame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 table:style-name="ce130"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5" calcext:value-type="float">
            <text:p>5</text:p>
          </table:table-cell>
          <table:table-cell table:number-columns-repeated="216"/>
        </table:table-row>
        <table:table-row table:style-name="ro3">
          <table:table-cell table:style-name="ce96"/>
          <table:table-cell table:style-name="ce322"/>
          <table:table-cell table:style-name="ce105"/>
          <table:table-cell table:style-name="ce330" table:number-columns-repeated="5"/>
          <table:table-cell table:style-name="ce334" table:formula="of:=ISWINNERMEN([.D83:.H83]; [.D84:.H84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46" table:number-columns-repeated="5"/>
          <table:table-cell table:style-name="ce81" table:number-columns-repeated="5"/>
          <table:table-cell table:style-name="ce346" table:number-columns-repeated="5"/>
          <table:table-cell/>
          <table:table-cell table:style-name="ce81" table:number-columns-repeated="4"/>
          <table:table-cell table:style-name="ce346" table:number-columns-repeated="5"/>
          <table:table-cell table:style-name="ce81"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84:.H84]; [.D83:.H83])">
            <text:p/>
          </table:table-cell>
          <table:table-cell table:style-name="ce78"/>
          <table:table-cell table:style-name="ce315" table:formula="of:=IF(AND(NOT(ISBLANK([.A83])); [.A83]=[.A84]); [.A83]; IF([.$I83]=&quot;W&quot;; IF(NOT(ISBLANK([.A83])); [.A83]; &quot;&quot;); IF([.$I84]=&quot;W&quot;; IF(NOT(ISBLANK([.A84])); [.A84]; &quot;&quot;); &quot;&quot;)))">
            <text:p/>
          </table:table-cell>
          <table:table-cell table:style-name="ce320" table:formula="of:=IF([.$I83]=&quot;W&quot;; IF(NOT(ISBLANK([.B83])); [.B83]; &quot;&quot;); IF([.$I84]=&quot;W&quot;; IF(NOT(ISBLANK([.B84])); [.B84]; &quot;&quot;); &quot;&quot;))">
            <text:p/>
          </table:table-cell>
          <table:table-cell table:style-name="ce318" table:formula="of:=IF(AND(NOT(ISBLANK([.C83])); [.C83]=[.C84]); [.C83]; IF([.$I83]=&quot;W&quot;; IF(NOT(ISBLANK([.C83])); [.C83]; &quot;&quot;); IF([.$I84]=&quot;W&quot;; IF(NOT(ISBLANK([.C84])); [.C84]; &quot;&quot;); &quot;&quot;)))">
            <text:p/>
          </table:table-cell>
          <table:table-cell table:style-name="ce324" table:number-columns-repeated="5"/>
          <table:table-cell table:style-name="ce265" table:formula="of:=ISWINNERMEN([.N84:.R84]; [.N85:.R8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85:.H85]; [.D86:.H86])">
            <text:p/>
          </table:table-cell>
          <table:table-cell table:style-name="ce78"/>
          <table:table-cell table:style-name="ce316" table:formula="of:=IF(AND(NOT(ISBLANK([.A85])); [.A85]=[.A86]); [.A85]; IF([.$I85]=&quot;W&quot;; IF(NOT(ISBLANK([.A85])); [.A85]; &quot;&quot;); IF([.$I86]=&quot;W&quot;; IF(NOT(ISBLANK([.A86])); [.A86]; &quot;&quot;); &quot;&quot;)))">
            <text:p/>
          </table:table-cell>
          <table:table-cell table:style-name="ce321" table:formula="of:=IF([.$I85]=&quot;W&quot;; IF(NOT(ISBLANK([.B85])); [.B85]; &quot;&quot;); IF([.$I86]=&quot;W&quot;; IF(NOT(ISBLANK([.B86])); [.B86]; &quot;&quot;); &quot;&quot;))">
            <text:p/>
          </table:table-cell>
          <table:table-cell table:style-name="ce319" table:formula="of:=IF(AND(NOT(ISBLANK([.C85])); [.C85]=[.C86]); [.C85]; IF([.$I85]=&quot;W&quot;; IF(NOT(ISBLANK([.C85])); [.C85]; &quot;&quot;); IF([.$I86]=&quot;W&quot;; IF(NOT(ISBLANK([.C86])); [.C86]; &quot;&quot;); &quot;&quot;)))">
            <text:p/>
          </table:table-cell>
          <table:table-cell table:style-name="ce325" table:number-columns-repeated="5"/>
          <table:table-cell table:style-name="ce308" table:formula="of:=ISWINNERMEN([.N85:.R85]; [.N84:.R8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86:.H86]; [.D85:.H8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84])); [.$K84]=[.$K85]); [.$K84]; IF([.$S84]=&quot;W&quot;; IF(NOT(ISBLANK([.$K84])); [.$K84]; &quot;&quot;); IF([.$S85]=&quot;W&quot;; IF(NOT(ISBLANK([.$K85])); [.$K85]; &quot;&quot;); &quot;&quot;)))">
            <text:p/>
          </table:table-cell>
          <table:table-cell table:style-name="ce320" table:formula="of:=IF([.$S84]=&quot;W&quot;; IF(NOT(ISBLANK([.L84])); [.L84]; &quot;&quot;); IF([.$S85]=&quot;W&quot;; IF(NOT(ISBLANK([.L85])); [.L85]; &quot;&quot;); &quot;&quot;))">
            <text:p/>
          </table:table-cell>
          <table:table-cell table:style-name="ce329" table:formula="of:=IF(AND(NOT(ISBLANK([.M84])); [.M84]=[.M85]); [.M84]; IF([.$S84]=&quot;W&quot;; IF(NOT(ISBLANK([.M84])); [.M84]; &quot;&quot;); IF([.$S85]=&quot;W&quot;; IF(NOT(ISBLANK([.M85])); [.M85]; &quot;&quot;); &quot;&quot;)))">
            <text:p/>
          </table:table-cell>
          <table:table-cell table:style-name="ce324" table:number-columns-repeated="5"/>
          <table:table-cell table:style-name="ce265" table:formula="of:=ISWINNERMEN([.X86:.AB86]; [.X87:.AB8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87:.H87]; [.D88:.H8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88])); [.$K88]=[.$K89]); [.$K88]; IF([.$S88]=&quot;W&quot;; IF(NOT(ISBLANK([.$K88])); [.$K88]; &quot;&quot;); IF([.$S89]=&quot;W&quot;; IF(NOT(ISBLANK([.$K89])); [.$K89]; &quot;&quot;); &quot;&quot;)))">
            <text:p/>
          </table:table-cell>
          <table:table-cell table:style-name="ce321" table:formula="of:=IF([.$S88]=&quot;W&quot;; IF(NOT(ISBLANK([.L88])); [.L88]; &quot;&quot;); IF([.$S89]=&quot;W&quot;; IF(NOT(ISBLANK([.L89])); [.L89]; &quot;&quot;); &quot;&quot;))">
            <text:p/>
          </table:table-cell>
          <table:table-cell table:style-name="ce331" table:formula="of:=IF(AND(NOT(ISBLANK([.M88])); [.M88]=[.M89]); [.M88]; IF([.$S88]=&quot;W&quot;; IF(NOT(ISBLANK([.M88])); [.M88]; &quot;&quot;); IF([.$S89]=&quot;W&quot;; IF(NOT(ISBLANK([.M89])); [.M89]; &quot;&quot;); &quot;&quot;)))">
            <text:p/>
          </table:table-cell>
          <table:table-cell table:style-name="ce325" table:number-columns-repeated="5"/>
          <table:table-cell table:style-name="ce308" table:formula="of:=ISWINNERMEN([.X87:.AB87]; [.X86:.AB8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88:.H88]; [.D87:.H87])">
            <text:p/>
          </table:table-cell>
          <table:table-cell table:style-name="ce78"/>
          <table:table-cell table:style-name="ce315" table:formula="of:=IF(AND(NOT(ISBLANK([.A87])); [.A87]=[.A88]); [.A87]; IF([.$I87]=&quot;W&quot;; IF(NOT(ISBLANK([.A87])); [.A87]; &quot;&quot;); IF([.$I88]=&quot;W&quot;; IF(NOT(ISBLANK([.A88])); [.A88]; &quot;&quot;); &quot;&quot;)))">
            <text:p/>
          </table:table-cell>
          <table:table-cell table:style-name="ce320" table:formula="of:=IF([.$I87]=&quot;W&quot;; IF(NOT(ISBLANK([.B87])); [.B87]; &quot;&quot;); IF([.$I88]=&quot;W&quot;; IF(NOT(ISBLANK([.B88])); [.B88]; &quot;&quot;); &quot;&quot;))">
            <text:p/>
          </table:table-cell>
          <table:table-cell table:style-name="ce318" table:formula="of:=IF(AND(NOT(ISBLANK([.C87])); [.C87]=[.C88]); [.C87]; IF([.$I87]=&quot;W&quot;; IF(NOT(ISBLANK([.C87])); [.C87]; &quot;&quot;); IF([.$I88]=&quot;W&quot;; IF(NOT(ISBLANK([.C88])); [.C88]; &quot;&quot;); &quot;&quot;)))">
            <text:p/>
          </table:table-cell>
          <table:table-cell table:style-name="ce324" table:number-columns-repeated="5"/>
          <table:table-cell table:style-name="ce265" table:formula="of:=ISWINNERMEN([.N88:.R88]; [.N89:.R8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89:.H89]; [.D90:.H90])">
            <text:p/>
          </table:table-cell>
          <table:table-cell table:style-name="ce78"/>
          <table:table-cell table:style-name="ce316" table:formula="of:=IF(AND(NOT(ISBLANK([.A89])); [.A89]=[.A90]); [.A89]; IF([.$I89]=&quot;W&quot;; IF(NOT(ISBLANK([.A89])); [.A89]; &quot;&quot;); IF([.$I90]=&quot;W&quot;; IF(NOT(ISBLANK([.A90])); [.A90]; &quot;&quot;); &quot;&quot;)))">
            <text:p/>
          </table:table-cell>
          <table:table-cell table:style-name="ce321" table:formula="of:=IF([.$I89]=&quot;W&quot;; IF(NOT(ISBLANK([.B89])); [.B89]; &quot;&quot;); IF([.$I90]=&quot;W&quot;; IF(NOT(ISBLANK([.B90])); [.B90]; &quot;&quot;); &quot;&quot;))">
            <text:p/>
          </table:table-cell>
          <table:table-cell table:style-name="ce319" table:formula="of:=IF(AND(NOT(ISBLANK([.C89])); [.C89]=[.C90]); [.C89]; IF([.$I89]=&quot;W&quot;; IF(NOT(ISBLANK([.C89])); [.C89]; &quot;&quot;); IF([.$I90]=&quot;W&quot;; IF(NOT(ISBLANK([.C90])); [.C90]; &quot;&quot;); &quot;&quot;)))">
            <text:p/>
          </table:table-cell>
          <table:table-cell table:style-name="ce325" table:number-columns-repeated="5"/>
          <table:table-cell table:style-name="ce308" table:formula="of:=ISWINNERMEN([.N89:.R89]; [.N88:.R8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90:.H90]; [.D89:.H8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3" table:formula="of:=IF(AND(NOT(ISBLANK([.$U86])); [.$U86]=[.$U87]); [.$U86]; IF([.$AC86]=&quot;W&quot;; IF(NOT(ISBLANK([.$U86])); [.$U86]; &quot;&quot;); IF([.$AC87]=&quot;W&quot;; IF(NOT(ISBLANK([.$U87])); [.$U87]; &quot;&quot;); &quot;&quot;)))">
            <text:p/>
          </table:table-cell>
          <table:table-cell table:style-name="ce320" table:formula="of:=IF([.$AC86]=&quot;W&quot;; IF(NOT(ISBLANK([.V86])); [.V86]; &quot;&quot;); IF([.$AC87]=&quot;W&quot;; IF(NOT(ISBLANK([.V87])); [.V87]; &quot;&quot;); &quot;&quot;))">
            <text:p/>
          </table:table-cell>
          <table:table-cell table:style-name="ce336" table:formula="of:=IF(AND(NOT(ISBLANK([.$W86])); [.$W86]=[.$W87]); [.$W86]; IF([.$AC86]=&quot;W&quot;; IF(NOT(ISBLANK([.$W86])); [.$W86]; &quot;&quot;); IF([.$AC87]=&quot;W&quot;; IF(NOT(ISBLANK([.$W87])); [.$W87]; &quot;&quot;); &quot;&quot;)))">
            <text:p/>
          </table:table-cell>
          <table:table-cell table:style-name="ce324" table:formula="of:=IF(NOT(ISBLANK([Finals.D13])); [Finals.D13]; &quot;&quot;)">
            <text:p/>
          </table:table-cell>
          <table:table-cell table:style-name="ce324" table:formula="of:=IF(NOT(ISBLANK([Finals.E13])); [Finals.E13]; &quot;&quot;)">
            <text:p/>
          </table:table-cell>
          <table:table-cell table:style-name="ce324" table:formula="of:=IF(NOT(ISBLANK([Finals.F13])); [Finals.F13]; &quot;&quot;)">
            <text:p/>
          </table:table-cell>
          <table:table-cell table:style-name="ce324" table:formula="of:=IF(NOT(ISBLANK([Finals.G13])); [Finals.G13]; &quot;&quot;)">
            <text:p/>
          </table:table-cell>
          <table:table-cell table:style-name="ce324" table:formula="of:=IF(NOT(ISBLANK([Finals.H13])); [Finals.H13]; &quot;&quot;)">
            <text:p/>
          </table:table-cell>
          <table:table-cell table:style-name="ce265" table:formula="of:=IF(NOT(ISBLANK([Finals.I13])); [Finals.I13]; &quot;&quot;)">
            <text:p/>
          </table:table-cell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91:.H91]; [.D92:.H9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5" table:formula="of:=IF(AND(NOT(ISBLANK([.$U94])); [.$U94]=[.$U95]); [.$U94]; IF([.$AC94]=&quot;W&quot;; IF(NOT(ISBLANK([.$U94])); [.$U94]; &quot;&quot;); IF([.$AC95]=&quot;W&quot;; IF(NOT(ISBLANK([.$U95])); [.$U95]; &quot;&quot;); &quot;&quot;)))">
            <text:p/>
          </table:table-cell>
          <table:table-cell table:style-name="ce321" table:formula="of:=IF([.$AC94]=&quot;W&quot;; IF(NOT(ISBLANK([.V94])); [.V94]; &quot;&quot;); IF([.$AC95]=&quot;W&quot;; IF(NOT(ISBLANK([.V95])); [.V95]; &quot;&quot;); &quot;&quot;))">
            <text:p/>
          </table:table-cell>
          <table:table-cell table:style-name="ce337" table:formula="of:=IF(AND(NOT(ISBLANK([.$W94])); [.$W94]=[.$W95]); [.$W94]; IF([.$AC94]=&quot;W&quot;; IF(NOT(ISBLANK([.$W94])); [.$W94]; &quot;&quot;); IF([.$AC95]=&quot;W&quot;; IF(NOT(ISBLANK([.$W95])); [.$W95]; &quot;&quot;); &quot;&quot;)))">
            <text:p/>
          </table:table-cell>
          <table:table-cell table:style-name="ce325" table:formula="of:=IF(NOT(ISBLANK([Finals.D14])); [Finals.D14]; &quot;&quot;)">
            <text:p/>
          </table:table-cell>
          <table:table-cell table:style-name="ce325" table:formula="of:=IF(NOT(ISBLANK([Finals.E14])); [Finals.E14]; &quot;&quot;)">
            <text:p/>
          </table:table-cell>
          <table:table-cell table:style-name="ce325" table:formula="of:=IF(NOT(ISBLANK([Finals.F14])); [Finals.F14]; &quot;&quot;)">
            <text:p/>
          </table:table-cell>
          <table:table-cell table:style-name="ce325" table:formula="of:=IF(NOT(ISBLANK([Finals.G14])); [Finals.G14]; &quot;&quot;)">
            <text:p/>
          </table:table-cell>
          <table:table-cell table:style-name="ce325" table:formula="of:=IF(NOT(ISBLANK([Finals.H14])); [Finals.H14]; &quot;&quot;)">
            <text:p/>
          </table:table-cell>
          <table:table-cell table:style-name="ce308" table:formula="of:=IF(NOT(ISBLANK([Finals.I14])); [Finals.I14]; &quot;&quot;)">
            <text:p/>
          </table:table-cell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92:.H92]; [.D91:.H91])">
            <text:p/>
          </table:table-cell>
          <table:table-cell table:style-name="ce78"/>
          <table:table-cell table:style-name="ce315" table:formula="of:=IF(AND(NOT(ISBLANK([.A91])); [.A91]=[.A92]); [.A91]; IF([.$I91]=&quot;W&quot;; IF(NOT(ISBLANK([.A91])); [.A91]; &quot;&quot;); IF([.$I92]=&quot;W&quot;; IF(NOT(ISBLANK([.A92])); [.A92]; &quot;&quot;); &quot;&quot;)))">
            <text:p/>
          </table:table-cell>
          <table:table-cell table:style-name="ce320" table:formula="of:=IF([.$I91]=&quot;W&quot;; IF(NOT(ISBLANK([.B91])); [.B91]; &quot;&quot;); IF([.$I92]=&quot;W&quot;; IF(NOT(ISBLANK([.B92])); [.B92]; &quot;&quot;); &quot;&quot;))">
            <text:p/>
          </table:table-cell>
          <table:table-cell table:style-name="ce318" table:formula="of:=IF(AND(NOT(ISBLANK([.C91])); [.C91]=[.C92]); [.C91]; IF([.$I91]=&quot;W&quot;; IF(NOT(ISBLANK([.C91])); [.C91]; &quot;&quot;); IF([.$I92]=&quot;W&quot;; IF(NOT(ISBLANK([.C92])); [.C92]; &quot;&quot;); &quot;&quot;)))">
            <text:p/>
          </table:table-cell>
          <table:table-cell table:style-name="ce324" table:number-columns-repeated="5"/>
          <table:table-cell table:style-name="ce265" table:formula="of:=ISWINNERMEN([.N92:.R92]; [.N93:.R9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93:.H93]; [.D94:.H94])">
            <text:p/>
          </table:table-cell>
          <table:table-cell table:style-name="ce78"/>
          <table:table-cell table:style-name="ce316" table:formula="of:=IF(AND(NOT(ISBLANK([.A93])); [.A93]=[.A94]); [.A93]; IF([.$I93]=&quot;W&quot;; IF(NOT(ISBLANK([.A93])); [.A93]; &quot;&quot;); IF([.$I94]=&quot;W&quot;; IF(NOT(ISBLANK([.A94])); [.A94]; &quot;&quot;); &quot;&quot;)))">
            <text:p/>
          </table:table-cell>
          <table:table-cell table:style-name="ce321" table:formula="of:=IF([.$I93]=&quot;W&quot;; IF(NOT(ISBLANK([.B93])); [.B93]; &quot;&quot;); IF([.$I94]=&quot;W&quot;; IF(NOT(ISBLANK([.B94])); [.B94]; &quot;&quot;); &quot;&quot;))">
            <text:p/>
          </table:table-cell>
          <table:table-cell table:style-name="ce319" table:formula="of:=IF(AND(NOT(ISBLANK([.C93])); [.C93]=[.C94]); [.C93]; IF([.$I93]=&quot;W&quot;; IF(NOT(ISBLANK([.C93])); [.C93]; &quot;&quot;); IF([.$I94]=&quot;W&quot;; IF(NOT(ISBLANK([.C94])); [.C94]; &quot;&quot;); &quot;&quot;)))">
            <text:p/>
          </table:table-cell>
          <table:table-cell table:style-name="ce325" table:number-columns-repeated="5"/>
          <table:table-cell table:style-name="ce308" table:formula="of:=ISWINNERMEN([.N93:.R93]; [.N92:.R9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94:.H94]; [.D93:.H93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92])); [.$K92]=[.$K93]); [.$K92]; IF([.$S92]=&quot;W&quot;; IF(NOT(ISBLANK([.$K92])); [.$K92]; &quot;&quot;); IF([.$S93]=&quot;W&quot;; IF(NOT(ISBLANK([.$K93])); [.$K93]; &quot;&quot;); &quot;&quot;)))">
            <text:p/>
          </table:table-cell>
          <table:table-cell table:style-name="ce320" table:formula="of:=IF([.$S92]=&quot;W&quot;; IF(NOT(ISBLANK([.L92])); [.L92]; &quot;&quot;); IF([.$S93]=&quot;W&quot;; IF(NOT(ISBLANK([.L93])); [.L93]; &quot;&quot;); &quot;&quot;))">
            <text:p/>
          </table:table-cell>
          <table:table-cell table:style-name="ce329" table:formula="of:=IF(AND(NOT(ISBLANK([.M92])); [.M92]=[.M93]); [.M92]; IF([.$S92]=&quot;W&quot;; IF(NOT(ISBLANK([.M92])); [.M92]; &quot;&quot;); IF([.$S93]=&quot;W&quot;; IF(NOT(ISBLANK([.M93])); [.M93]; &quot;&quot;); &quot;&quot;)))">
            <text:p/>
          </table:table-cell>
          <table:table-cell table:style-name="ce324" table:number-columns-repeated="5"/>
          <table:table-cell table:style-name="ce265" table:formula="of:=ISWINNERMEN([.X94:.AB94]; [.X95:.AB9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95:.H95]; [.D96:.H96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96])); [.$K96]=[.$K97]); [.$K96]; IF([.$S96]=&quot;W&quot;; IF(NOT(ISBLANK([.$K96])); [.$K96]; &quot;&quot;); IF([.$S97]=&quot;W&quot;; IF(NOT(ISBLANK([.$K97])); [.$K97]; &quot;&quot;); &quot;&quot;)))">
            <text:p/>
          </table:table-cell>
          <table:table-cell table:style-name="ce321" table:formula="of:=IF([.$S96]=&quot;W&quot;; IF(NOT(ISBLANK([.L96])); [.L96]; &quot;&quot;); IF([.$S97]=&quot;W&quot;; IF(NOT(ISBLANK([.L97])); [.L97]; &quot;&quot;); &quot;&quot;))">
            <text:p/>
          </table:table-cell>
          <table:table-cell table:style-name="ce331" table:formula="of:=IF(AND(NOT(ISBLANK([.M96])); [.M96]=[.M97]); [.M96]; IF([.$S96]=&quot;W&quot;; IF(NOT(ISBLANK([.M96])); [.M96]; &quot;&quot;); IF([.$S97]=&quot;W&quot;; IF(NOT(ISBLANK([.M97])); [.M97]; &quot;&quot;); &quot;&quot;)))">
            <text:p/>
          </table:table-cell>
          <table:table-cell table:style-name="ce325" table:number-columns-repeated="5"/>
          <table:table-cell table:style-name="ce308" table:formula="of:=ISWINNERMEN([.X95:.AB95]; [.X94:.AB9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96:.H96]; [.D95:.H95])">
            <text:p/>
          </table:table-cell>
          <table:table-cell table:style-name="ce78"/>
          <table:table-cell table:style-name="ce315" table:formula="of:=IF(AND(NOT(ISBLANK([.A95])); [.A95]=[.A96]); [.A95]; IF([.$I95]=&quot;W&quot;; IF(NOT(ISBLANK([.A95])); [.A95]; &quot;&quot;); IF([.$I96]=&quot;W&quot;; IF(NOT(ISBLANK([.A96])); [.A96]; &quot;&quot;); &quot;&quot;)))">
            <text:p/>
          </table:table-cell>
          <table:table-cell table:style-name="ce320" table:formula="of:=IF([.$I95]=&quot;W&quot;; IF(NOT(ISBLANK([.B95])); [.B95]; &quot;&quot;); IF([.$I96]=&quot;W&quot;; IF(NOT(ISBLANK([.B96])); [.B96]; &quot;&quot;); &quot;&quot;))">
            <text:p/>
          </table:table-cell>
          <table:table-cell table:style-name="ce318" table:formula="of:=IF(AND(NOT(ISBLANK([.C95])); [.C95]=[.C96]); [.C95]; IF([.$I95]=&quot;W&quot;; IF(NOT(ISBLANK([.C95])); [.C95]; &quot;&quot;); IF([.$I96]=&quot;W&quot;; IF(NOT(ISBLANK([.C96])); [.C96]; &quot;&quot;); &quot;&quot;)))">
            <text:p/>
          </table:table-cell>
          <table:table-cell table:style-name="ce324" table:number-columns-repeated="5"/>
          <table:table-cell table:style-name="ce265" table:formula="of:=ISWINNERMEN([.N96:.R96]; [.N97:.R9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97:.H97]; [.D98:.H98])">
            <text:p/>
          </table:table-cell>
          <table:table-cell table:style-name="ce78"/>
          <table:table-cell table:style-name="ce316" table:formula="of:=IF(AND(NOT(ISBLANK([.A97])); [.A97]=[.A98]); [.A97]; IF([.$I97]=&quot;W&quot;; IF(NOT(ISBLANK([.A97])); [.A97]; &quot;&quot;); IF([.$I98]=&quot;W&quot;; IF(NOT(ISBLANK([.A98])); [.A98]; &quot;&quot;); &quot;&quot;)))">
            <text:p/>
          </table:table-cell>
          <table:table-cell table:style-name="ce321" table:formula="of:=IF([.$I97]=&quot;W&quot;; IF(NOT(ISBLANK([.B97])); [.B97]; &quot;&quot;); IF([.$I98]=&quot;W&quot;; IF(NOT(ISBLANK([.B98])); [.B98]; &quot;&quot;); &quot;&quot;))">
            <text:p/>
          </table:table-cell>
          <table:table-cell table:style-name="ce319" table:formula="of:=IF(AND(NOT(ISBLANK([.C97])); [.C97]=[.C98]); [.C97]; IF([.$I97]=&quot;W&quot;; IF(NOT(ISBLANK([.C97])); [.C97]; &quot;&quot;); IF([.$I98]=&quot;W&quot;; IF(NOT(ISBLANK([.C98])); [.C98]; &quot;&quot;); &quot;&quot;)))">
            <text:p/>
          </table:table-cell>
          <table:table-cell table:style-name="ce325" table:number-columns-repeated="5"/>
          <table:table-cell table:style-name="ce308" table:formula="of:=ISWINNERMEN([.N97:.R97]; [.N96:.R9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98:.H98]; [.D97:.H97])">
            <text:p/>
            <draw:frame table:end-cell-address="ML.U100" table:end-x="0.0437in" table:end-y="0.0256in" draw:z-index="5" draw:style-name="gr1" draw:text-style-name="P1" svg:width="2.9256in" svg:height="0.2654in" draw:transform="rotate (1.5707963267949) translate (0.193307086614173in 0.165354330708661in)">
              <draw:text-box>
                <text:p><text:span text:style-name="T1">Section 6</text:span></text:p>
              </draw:text-box>
            </draw:frame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 table:style-name="ce130"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6" calcext:value-type="float">
            <text:p>6</text:p>
          </table:table-cell>
          <table:table-cell table:number-columns-repeated="216"/>
        </table:table-row>
        <table:table-row table:style-name="ro3">
          <table:table-cell table:style-name="ce96"/>
          <table:table-cell table:style-name="ce322"/>
          <table:table-cell table:style-name="ce105"/>
          <table:table-cell table:style-name="ce330" table:number-columns-repeated="5"/>
          <table:table-cell table:style-name="ce334" table:formula="of:=ISWINNERMEN([.D99:.H99]; [.D100:.H100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46" table:number-columns-repeated="5"/>
          <table:table-cell table:style-name="ce81" table:number-columns-repeated="5"/>
          <table:table-cell table:style-name="ce346" table:number-columns-repeated="5"/>
          <table:table-cell/>
          <table:table-cell table:style-name="ce81" table:number-columns-repeated="4"/>
          <table:table-cell table:style-name="ce346" table:number-columns-repeated="5"/>
          <table:table-cell table:style-name="ce81"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00:.H100]; [.D99:.H99])">
            <text:p/>
          </table:table-cell>
          <table:table-cell table:style-name="ce78"/>
          <table:table-cell table:style-name="ce315" table:formula="of:=IF(AND(NOT(ISBLANK([.A99])); [.A99]=[.A100]); [.A99]; IF([.$I99]=&quot;W&quot;; IF(NOT(ISBLANK([.A99])); [.A99]; &quot;&quot;); IF([.$I100]=&quot;W&quot;; IF(NOT(ISBLANK([.A100])); [.A100]; &quot;&quot;); &quot;&quot;)))">
            <text:p/>
          </table:table-cell>
          <table:table-cell table:style-name="ce320" table:formula="of:=IF([.$I99]=&quot;W&quot;; IF(NOT(ISBLANK([.B99])); [.B99]; &quot;&quot;); IF([.$I100]=&quot;W&quot;; IF(NOT(ISBLANK([.B100])); [.B100]; &quot;&quot;); &quot;&quot;))">
            <text:p/>
          </table:table-cell>
          <table:table-cell table:style-name="ce318" table:formula="of:=IF(AND(NOT(ISBLANK([.C99])); [.C99]=[.C100]); [.C99]; IF([.$I99]=&quot;W&quot;; IF(NOT(ISBLANK([.C99])); [.C99]; &quot;&quot;); IF([.$I100]=&quot;W&quot;; IF(NOT(ISBLANK([.C100])); [.C100]; &quot;&quot;); &quot;&quot;)))">
            <text:p/>
          </table:table-cell>
          <table:table-cell table:style-name="ce324" table:number-columns-repeated="5"/>
          <table:table-cell table:style-name="ce265" table:formula="of:=ISWINNERMEN([.N100:.R100]; [.N101:.R10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01:.H101]; [.D102:.H102])">
            <text:p/>
          </table:table-cell>
          <table:table-cell table:style-name="ce78"/>
          <table:table-cell table:style-name="ce316" table:formula="of:=IF(AND(NOT(ISBLANK([.A101])); [.A101]=[.A102]); [.A101]; IF([.$I101]=&quot;W&quot;; IF(NOT(ISBLANK([.A101])); [.A101]; &quot;&quot;); IF([.$I102]=&quot;W&quot;; IF(NOT(ISBLANK([.A102])); [.A102]; &quot;&quot;); &quot;&quot;)))">
            <text:p/>
          </table:table-cell>
          <table:table-cell table:style-name="ce321" table:formula="of:=IF([.$I101]=&quot;W&quot;; IF(NOT(ISBLANK([.B101])); [.B101]; &quot;&quot;); IF([.$I102]=&quot;W&quot;; IF(NOT(ISBLANK([.B102])); [.B102]; &quot;&quot;); &quot;&quot;))">
            <text:p/>
          </table:table-cell>
          <table:table-cell table:style-name="ce319" table:formula="of:=IF(AND(NOT(ISBLANK([.C101])); [.C101]=[.C102]); [.C101]; IF([.$I101]=&quot;W&quot;; IF(NOT(ISBLANK([.C101])); [.C101]; &quot;&quot;); IF([.$I102]=&quot;W&quot;; IF(NOT(ISBLANK([.C102])); [.C102]; &quot;&quot;); &quot;&quot;)))">
            <text:p/>
          </table:table-cell>
          <table:table-cell table:style-name="ce325" table:number-columns-repeated="5"/>
          <table:table-cell table:style-name="ce308" table:formula="of:=ISWINNERMEN([.N101:.R101]; [.N100:.R10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02:.H102]; [.D101:.H10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100])); [.$K100]=[.$K101]); [.$K100]; IF([.$S100]=&quot;W&quot;; IF(NOT(ISBLANK([.$K100])); [.$K100]; &quot;&quot;); IF([.$S101]=&quot;W&quot;; IF(NOT(ISBLANK([.$K101])); [.$K101]; &quot;&quot;); &quot;&quot;)))">
            <text:p/>
          </table:table-cell>
          <table:table-cell table:style-name="ce320" table:formula="of:=IF([.$S100]=&quot;W&quot;; IF(NOT(ISBLANK([.L100])); [.L100]; &quot;&quot;); IF([.$S101]=&quot;W&quot;; IF(NOT(ISBLANK([.L101])); [.L101]; &quot;&quot;); &quot;&quot;))">
            <text:p/>
          </table:table-cell>
          <table:table-cell table:style-name="ce329" table:formula="of:=IF(AND(NOT(ISBLANK([.M100])); [.M100]=[.M101]); [.M100]; IF([.$S100]=&quot;W&quot;; IF(NOT(ISBLANK([.M100])); [.M100]; &quot;&quot;); IF([.$S101]=&quot;W&quot;; IF(NOT(ISBLANK([.M101])); [.M101]; &quot;&quot;); &quot;&quot;)))">
            <text:p/>
          </table:table-cell>
          <table:table-cell table:style-name="ce324" table:number-columns-repeated="5"/>
          <table:table-cell table:style-name="ce265" table:formula="of:=ISWINNERMEN([.X102:.AB102]; [.X103:.AB10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03:.H103]; [.D104:.H10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104])); [.$K104]=[.$K105]); [.$K104]; IF([.$S104]=&quot;W&quot;; IF(NOT(ISBLANK([.$K104])); [.$K104]; &quot;&quot;); IF([.$S105]=&quot;W&quot;; IF(NOT(ISBLANK([.$K105])); [.$K105]; &quot;&quot;); &quot;&quot;)))">
            <text:p/>
          </table:table-cell>
          <table:table-cell table:style-name="ce321" table:formula="of:=IF([.$S104]=&quot;W&quot;; IF(NOT(ISBLANK([.L104])); [.L104]; &quot;&quot;); IF([.$S105]=&quot;W&quot;; IF(NOT(ISBLANK([.L105])); [.L105]; &quot;&quot;); &quot;&quot;))">
            <text:p/>
          </table:table-cell>
          <table:table-cell table:style-name="ce331" table:formula="of:=IF(AND(NOT(ISBLANK([.M104])); [.M104]=[.M105]); [.M104]; IF([.$S104]=&quot;W&quot;; IF(NOT(ISBLANK([.M104])); [.M104]; &quot;&quot;); IF([.$S105]=&quot;W&quot;; IF(NOT(ISBLANK([.M105])); [.M105]; &quot;&quot;); &quot;&quot;)))">
            <text:p/>
          </table:table-cell>
          <table:table-cell table:style-name="ce325" table:number-columns-repeated="5"/>
          <table:table-cell table:style-name="ce308" table:formula="of:=ISWINNERMEN([.X103:.AB103]; [.X102:.AB10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04:.H104]; [.D103:.H103])">
            <text:p/>
          </table:table-cell>
          <table:table-cell table:style-name="ce78"/>
          <table:table-cell table:style-name="ce315" table:formula="of:=IF(AND(NOT(ISBLANK([.A103])); [.A103]=[.A104]); [.A103]; IF([.$I103]=&quot;W&quot;; IF(NOT(ISBLANK([.A103])); [.A103]; &quot;&quot;); IF([.$I104]=&quot;W&quot;; IF(NOT(ISBLANK([.A104])); [.A104]; &quot;&quot;); &quot;&quot;)))">
            <text:p/>
          </table:table-cell>
          <table:table-cell table:style-name="ce320" table:formula="of:=IF([.$I103]=&quot;W&quot;; IF(NOT(ISBLANK([.B103])); [.B103]; &quot;&quot;); IF([.$I104]=&quot;W&quot;; IF(NOT(ISBLANK([.B104])); [.B104]; &quot;&quot;); &quot;&quot;))">
            <text:p/>
          </table:table-cell>
          <table:table-cell table:style-name="ce318" table:formula="of:=IF(AND(NOT(ISBLANK([.C103])); [.C103]=[.C104]); [.C103]; IF([.$I103]=&quot;W&quot;; IF(NOT(ISBLANK([.C103])); [.C103]; &quot;&quot;); IF([.$I104]=&quot;W&quot;; IF(NOT(ISBLANK([.C104])); [.C104]; &quot;&quot;); &quot;&quot;)))">
            <text:p/>
          </table:table-cell>
          <table:table-cell table:style-name="ce324" table:number-columns-repeated="5"/>
          <table:table-cell table:style-name="ce265" table:formula="of:=ISWINNERMEN([.N104:.R104]; [.N105:.R10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05:.H105]; [.D106:.H106])">
            <text:p/>
          </table:table-cell>
          <table:table-cell table:style-name="ce78"/>
          <table:table-cell table:style-name="ce316" table:formula="of:=IF(AND(NOT(ISBLANK([.A105])); [.A105]=[.A106]); [.A105]; IF([.$I105]=&quot;W&quot;; IF(NOT(ISBLANK([.A105])); [.A105]; &quot;&quot;); IF([.$I106]=&quot;W&quot;; IF(NOT(ISBLANK([.A106])); [.A106]; &quot;&quot;); &quot;&quot;)))">
            <text:p/>
          </table:table-cell>
          <table:table-cell table:style-name="ce321" table:formula="of:=IF([.$I105]=&quot;W&quot;; IF(NOT(ISBLANK([.B105])); [.B105]; &quot;&quot;); IF([.$I106]=&quot;W&quot;; IF(NOT(ISBLANK([.B106])); [.B106]; &quot;&quot;); &quot;&quot;))">
            <text:p/>
          </table:table-cell>
          <table:table-cell table:style-name="ce319" table:formula="of:=IF(AND(NOT(ISBLANK([.C105])); [.C105]=[.C106]); [.C105]; IF([.$I105]=&quot;W&quot;; IF(NOT(ISBLANK([.C105])); [.C105]; &quot;&quot;); IF([.$I106]=&quot;W&quot;; IF(NOT(ISBLANK([.C106])); [.C106]; &quot;&quot;); &quot;&quot;)))">
            <text:p/>
          </table:table-cell>
          <table:table-cell table:style-name="ce325" table:number-columns-repeated="5"/>
          <table:table-cell table:style-name="ce308" table:formula="of:=ISWINNERMEN([.N105:.R105]; [.N104:.R10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06:.H106]; [.D105:.H10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3" table:formula="of:=IF(AND(NOT(ISBLANK([.$U102])); [.$U102]=[.$U103]); [.$U102]; IF([.$AC102]=&quot;W&quot;; IF(NOT(ISBLANK([.$U102])); [.$U102]; &quot;&quot;); IF([.$AC103]=&quot;W&quot;; IF(NOT(ISBLANK([.$U103])); [.$U103]; &quot;&quot;); &quot;&quot;)))">
            <text:p/>
          </table:table-cell>
          <table:table-cell table:style-name="ce320" table:formula="of:=IF([.$AC102]=&quot;W&quot;; IF(NOT(ISBLANK([.V102])); [.V102]; &quot;&quot;); IF([.$AC103]=&quot;W&quot;; IF(NOT(ISBLANK([.V103])); [.V103]; &quot;&quot;); &quot;&quot;))">
            <text:p/>
          </table:table-cell>
          <table:table-cell table:style-name="ce336" table:formula="of:=IF(AND(NOT(ISBLANK([.$W102])); [.$W102]=[.$W103]); [.$W102]; IF([.$AC102]=&quot;W&quot;; IF(NOT(ISBLANK([.$W102])); [.$W102]; &quot;&quot;); IF([.$AC103]=&quot;W&quot;; IF(NOT(ISBLANK([.$W103])); [.$W103]; &quot;&quot;); &quot;&quot;)))">
            <text:p/>
          </table:table-cell>
          <table:table-cell table:style-name="ce324" table:formula="of:=IF(NOT(ISBLANK([Finals.D15])); [Finals.D15]; &quot;&quot;)">
            <text:p/>
          </table:table-cell>
          <table:table-cell table:style-name="ce324" table:formula="of:=IF(NOT(ISBLANK([Finals.E15])); [Finals.E15]; &quot;&quot;)">
            <text:p/>
          </table:table-cell>
          <table:table-cell table:style-name="ce324" table:formula="of:=IF(NOT(ISBLANK([Finals.F15])); [Finals.F15]; &quot;&quot;)">
            <text:p/>
          </table:table-cell>
          <table:table-cell table:style-name="ce324" table:formula="of:=IF(NOT(ISBLANK([Finals.G15])); [Finals.G15]; &quot;&quot;)">
            <text:p/>
          </table:table-cell>
          <table:table-cell table:style-name="ce324" table:formula="of:=IF(NOT(ISBLANK([Finals.H15])); [Finals.H15]; &quot;&quot;)">
            <text:p/>
          </table:table-cell>
          <table:table-cell table:style-name="ce265" table:formula="of:=IF(NOT(ISBLANK([Finals.I15])); [Finals.I15]; &quot;&quot;)">
            <text:p/>
          </table:table-cell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07:.H107]; [.D108:.H10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5" table:formula="of:=IF(AND(NOT(ISBLANK([.$U110])); [.$U110]=[.$U111]); [.$U110]; IF([.$AC110]=&quot;W&quot;; IF(NOT(ISBLANK([.$U110])); [.$U110]; &quot;&quot;); IF([.$AC111]=&quot;W&quot;; IF(NOT(ISBLANK([.$U111])); [.$U111]; &quot;&quot;); &quot;&quot;)))">
            <text:p/>
          </table:table-cell>
          <table:table-cell table:style-name="ce321" table:formula="of:=IF([.$AC110]=&quot;W&quot;; IF(NOT(ISBLANK([.V110])); [.V110]; &quot;&quot;); IF([.$AC111]=&quot;W&quot;; IF(NOT(ISBLANK([.V111])); [.V111]; &quot;&quot;); &quot;&quot;))">
            <text:p/>
          </table:table-cell>
          <table:table-cell table:style-name="ce337" table:formula="of:=IF(AND(NOT(ISBLANK([.$W110])); [.$W110]=[.$W111]); [.$W110]; IF([.$AC110]=&quot;W&quot;; IF(NOT(ISBLANK([.$W110])); [.$W110]; &quot;&quot;); IF([.$AC111]=&quot;W&quot;; IF(NOT(ISBLANK([.$W111])); [.$W111]; &quot;&quot;); &quot;&quot;)))">
            <text:p/>
          </table:table-cell>
          <table:table-cell table:style-name="ce325" table:formula="of:=IF(NOT(ISBLANK([Finals.D16])); [Finals.D16]; &quot;&quot;)">
            <text:p/>
          </table:table-cell>
          <table:table-cell table:style-name="ce325" table:formula="of:=IF(NOT(ISBLANK([Finals.E16])); [Finals.E16]; &quot;&quot;)">
            <text:p/>
          </table:table-cell>
          <table:table-cell table:style-name="ce325" table:formula="of:=IF(NOT(ISBLANK([Finals.F16])); [Finals.F16]; &quot;&quot;)">
            <text:p/>
          </table:table-cell>
          <table:table-cell table:style-name="ce325" table:formula="of:=IF(NOT(ISBLANK([Finals.G16])); [Finals.G16]; &quot;&quot;)">
            <text:p/>
          </table:table-cell>
          <table:table-cell table:style-name="ce325" table:formula="of:=IF(NOT(ISBLANK([Finals.H16])); [Finals.H16]; &quot;&quot;)">
            <text:p/>
          </table:table-cell>
          <table:table-cell table:style-name="ce308" table:formula="of:=IF(NOT(ISBLANK([Finals.I16])); [Finals.I16]; &quot;&quot;)">
            <text:p/>
          </table:table-cell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08:.H108]; [.D107:.H107])">
            <text:p/>
          </table:table-cell>
          <table:table-cell table:style-name="ce78"/>
          <table:table-cell table:style-name="ce315" table:formula="of:=IF(AND(NOT(ISBLANK([.A107])); [.A107]=[.A108]); [.A107]; IF([.$I107]=&quot;W&quot;; IF(NOT(ISBLANK([.A107])); [.A107]; &quot;&quot;); IF([.$I108]=&quot;W&quot;; IF(NOT(ISBLANK([.A108])); [.A108]; &quot;&quot;); &quot;&quot;)))">
            <text:p/>
          </table:table-cell>
          <table:table-cell table:style-name="ce320" table:formula="of:=IF([.$I107]=&quot;W&quot;; IF(NOT(ISBLANK([.B107])); [.B107]; &quot;&quot;); IF([.$I108]=&quot;W&quot;; IF(NOT(ISBLANK([.B108])); [.B108]; &quot;&quot;); &quot;&quot;))">
            <text:p/>
          </table:table-cell>
          <table:table-cell table:style-name="ce318" table:formula="of:=IF(AND(NOT(ISBLANK([.C107])); [.C107]=[.C108]); [.C107]; IF([.$I107]=&quot;W&quot;; IF(NOT(ISBLANK([.C107])); [.C107]; &quot;&quot;); IF([.$I108]=&quot;W&quot;; IF(NOT(ISBLANK([.C108])); [.C108]; &quot;&quot;); &quot;&quot;)))">
            <text:p/>
          </table:table-cell>
          <table:table-cell table:style-name="ce324" table:number-columns-repeated="5"/>
          <table:table-cell table:style-name="ce265" table:formula="of:=ISWINNERMEN([.N108:.R108]; [.N109:.R10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09:.H109]; [.D110:.H110])">
            <text:p/>
          </table:table-cell>
          <table:table-cell table:style-name="ce78"/>
          <table:table-cell table:style-name="ce316" table:formula="of:=IF(AND(NOT(ISBLANK([.A109])); [.A109]=[.A110]); [.A109]; IF([.$I109]=&quot;W&quot;; IF(NOT(ISBLANK([.A109])); [.A109]; &quot;&quot;); IF([.$I110]=&quot;W&quot;; IF(NOT(ISBLANK([.A110])); [.A110]; &quot;&quot;); &quot;&quot;)))">
            <text:p/>
          </table:table-cell>
          <table:table-cell table:style-name="ce321" table:formula="of:=IF([.$I109]=&quot;W&quot;; IF(NOT(ISBLANK([.B109])); [.B109]; &quot;&quot;); IF([.$I110]=&quot;W&quot;; IF(NOT(ISBLANK([.B110])); [.B110]; &quot;&quot;); &quot;&quot;))">
            <text:p/>
          </table:table-cell>
          <table:table-cell table:style-name="ce319" table:formula="of:=IF(AND(NOT(ISBLANK([.C109])); [.C109]=[.C110]); [.C109]; IF([.$I109]=&quot;W&quot;; IF(NOT(ISBLANK([.C109])); [.C109]; &quot;&quot;); IF([.$I110]=&quot;W&quot;; IF(NOT(ISBLANK([.C110])); [.C110]; &quot;&quot;); &quot;&quot;)))">
            <text:p/>
          </table:table-cell>
          <table:table-cell table:style-name="ce325" table:number-columns-repeated="5"/>
          <table:table-cell table:style-name="ce308" table:formula="of:=ISWINNERMEN([.N109:.R109]; [.N108:.R10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10:.H110]; [.D109:.H10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108])); [.$K108]=[.$K109]); [.$K108]; IF([.$S108]=&quot;W&quot;; IF(NOT(ISBLANK([.$K108])); [.$K108]; &quot;&quot;); IF([.$S109]=&quot;W&quot;; IF(NOT(ISBLANK([.$K109])); [.$K109]; &quot;&quot;); &quot;&quot;)))">
            <text:p/>
          </table:table-cell>
          <table:table-cell table:style-name="ce320" table:formula="of:=IF([.$S108]=&quot;W&quot;; IF(NOT(ISBLANK([.L108])); [.L108]; &quot;&quot;); IF([.$S109]=&quot;W&quot;; IF(NOT(ISBLANK([.L109])); [.L109]; &quot;&quot;); &quot;&quot;))">
            <text:p/>
          </table:table-cell>
          <table:table-cell table:style-name="ce329" table:formula="of:=IF(AND(NOT(ISBLANK([.M108])); [.M108]=[.M109]); [.M108]; IF([.$S108]=&quot;W&quot;; IF(NOT(ISBLANK([.M108])); [.M108]; &quot;&quot;); IF([.$S109]=&quot;W&quot;; IF(NOT(ISBLANK([.M109])); [.M109]; &quot;&quot;); &quot;&quot;)))">
            <text:p/>
          </table:table-cell>
          <table:table-cell table:style-name="ce324" table:number-columns-repeated="5"/>
          <table:table-cell table:style-name="ce265" table:formula="of:=ISWINNERMEN([.X110:.AB110]; [.X111:.AB11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11:.H111]; [.D112:.H11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112])); [.$K112]=[.$K113]); [.$K112]; IF([.$S112]=&quot;W&quot;; IF(NOT(ISBLANK([.$K112])); [.$K112]; &quot;&quot;); IF([.$S113]=&quot;W&quot;; IF(NOT(ISBLANK([.$K113])); [.$K113]; &quot;&quot;); &quot;&quot;)))">
            <text:p/>
          </table:table-cell>
          <table:table-cell table:style-name="ce321" table:formula="of:=IF([.$S112]=&quot;W&quot;; IF(NOT(ISBLANK([.L112])); [.L112]; &quot;&quot;); IF([.$S113]=&quot;W&quot;; IF(NOT(ISBLANK([.L113])); [.L113]; &quot;&quot;); &quot;&quot;))">
            <text:p/>
          </table:table-cell>
          <table:table-cell table:style-name="ce331" table:formula="of:=IF(AND(NOT(ISBLANK([.M112])); [.M112]=[.M113]); [.M112]; IF([.$S112]=&quot;W&quot;; IF(NOT(ISBLANK([.M112])); [.M112]; &quot;&quot;); IF([.$S113]=&quot;W&quot;; IF(NOT(ISBLANK([.M113])); [.M113]; &quot;&quot;); &quot;&quot;)))">
            <text:p/>
          </table:table-cell>
          <table:table-cell table:style-name="ce325" table:number-columns-repeated="5"/>
          <table:table-cell table:style-name="ce308" table:formula="of:=ISWINNERMEN([.X111:.AB111]; [.X110:.AB11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12:.H112]; [.D111:.H111])">
            <text:p/>
          </table:table-cell>
          <table:table-cell table:style-name="ce78"/>
          <table:table-cell table:style-name="ce315" table:formula="of:=IF(AND(NOT(ISBLANK([.A111])); [.A111]=[.A112]); [.A111]; IF([.$I111]=&quot;W&quot;; IF(NOT(ISBLANK([.A111])); [.A111]; &quot;&quot;); IF([.$I112]=&quot;W&quot;; IF(NOT(ISBLANK([.A112])); [.A112]; &quot;&quot;); &quot;&quot;)))">
            <text:p/>
          </table:table-cell>
          <table:table-cell table:style-name="ce320" table:formula="of:=IF([.$I111]=&quot;W&quot;; IF(NOT(ISBLANK([.B111])); [.B111]; &quot;&quot;); IF([.$I112]=&quot;W&quot;; IF(NOT(ISBLANK([.B112])); [.B112]; &quot;&quot;); &quot;&quot;))">
            <text:p/>
          </table:table-cell>
          <table:table-cell table:style-name="ce318" table:formula="of:=IF(AND(NOT(ISBLANK([.C111])); [.C111]=[.C112]); [.C111]; IF([.$I111]=&quot;W&quot;; IF(NOT(ISBLANK([.C111])); [.C111]; &quot;&quot;); IF([.$I112]=&quot;W&quot;; IF(NOT(ISBLANK([.C112])); [.C112]; &quot;&quot;); &quot;&quot;)))">
            <text:p/>
          </table:table-cell>
          <table:table-cell table:style-name="ce324" table:number-columns-repeated="5"/>
          <table:table-cell table:style-name="ce265" table:formula="of:=ISWINNERMEN([.N112:.R112]; [.N113:.R113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13:.H113]; [.D114:.H114])">
            <text:p/>
          </table:table-cell>
          <table:table-cell table:style-name="ce78"/>
          <table:table-cell table:style-name="ce316" table:formula="of:=IF(AND(NOT(ISBLANK([.A113])); [.A113]=[.A114]); [.A113]; IF([.$I113]=&quot;W&quot;; IF(NOT(ISBLANK([.A113])); [.A113]; &quot;&quot;); IF([.$I114]=&quot;W&quot;; IF(NOT(ISBLANK([.A114])); [.A114]; &quot;&quot;); &quot;&quot;)))">
            <text:p/>
          </table:table-cell>
          <table:table-cell table:style-name="ce321" table:formula="of:=IF([.$I113]=&quot;W&quot;; IF(NOT(ISBLANK([.B113])); [.B113]; &quot;&quot;); IF([.$I114]=&quot;W&quot;; IF(NOT(ISBLANK([.B114])); [.B114]; &quot;&quot;); &quot;&quot;))">
            <text:p/>
          </table:table-cell>
          <table:table-cell table:style-name="ce319" table:formula="of:=IF(AND(NOT(ISBLANK([.C113])); [.C113]=[.C114]); [.C113]; IF([.$I113]=&quot;W&quot;; IF(NOT(ISBLANK([.C113])); [.C113]; &quot;&quot;); IF([.$I114]=&quot;W&quot;; IF(NOT(ISBLANK([.C114])); [.C114]; &quot;&quot;); &quot;&quot;)))">
            <text:p/>
          </table:table-cell>
          <table:table-cell table:style-name="ce325" table:number-columns-repeated="5"/>
          <table:table-cell table:style-name="ce308" table:formula="of:=ISWINNERMEN([.N113:.R113]; [.N112:.R112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14:.H114]; [.D113:.H113])">
            <text:p/>
            <draw:frame table:end-cell-address="ML.U116" table:end-x="0.0437in" table:end-y="0.0252in" draw:z-index="6" draw:style-name="gr1" draw:text-style-name="P1" svg:width="2.9256in" svg:height="0.2654in" draw:transform="rotate (1.5707963267949) translate (0.193307086614173in 0.16496062992126in)">
              <draw:text-box>
                <text:p><text:span text:style-name="T1">Section 7</text:span></text:p>
              </draw:text-box>
            </draw:frame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 table:style-name="ce130"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7" calcext:value-type="float">
            <text:p>7</text:p>
          </table:table-cell>
          <table:table-cell table:number-columns-repeated="216"/>
        </table:table-row>
        <table:table-row table:style-name="ro3">
          <table:table-cell table:style-name="ce96"/>
          <table:table-cell table:style-name="ce322"/>
          <table:table-cell table:style-name="ce105"/>
          <table:table-cell table:style-name="ce330" table:number-columns-repeated="5"/>
          <table:table-cell table:style-name="ce334" table:formula="of:=ISWINNERMEN([.D115:.H115]; [.D116:.H116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46" table:number-columns-repeated="5"/>
          <table:table-cell table:style-name="ce81" table:number-columns-repeated="5"/>
          <table:table-cell table:style-name="ce346" table:number-columns-repeated="5"/>
          <table:table-cell/>
          <table:table-cell table:style-name="ce81" table:number-columns-repeated="4"/>
          <table:table-cell table:style-name="ce346" table:number-columns-repeated="5"/>
          <table:table-cell table:style-name="ce81"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16:.H116]; [.D115:.H115])">
            <text:p/>
          </table:table-cell>
          <table:table-cell table:style-name="ce78"/>
          <table:table-cell table:style-name="ce315" table:formula="of:=IF(AND(NOT(ISBLANK([.A115])); [.A115]=[.A116]); [.A115]; IF([.$I115]=&quot;W&quot;; IF(NOT(ISBLANK([.A115])); [.A115]; &quot;&quot;); IF([.$I116]=&quot;W&quot;; IF(NOT(ISBLANK([.A116])); [.A116]; &quot;&quot;); &quot;&quot;)))">
            <text:p/>
          </table:table-cell>
          <table:table-cell table:style-name="ce320" table:formula="of:=IF([.$I115]=&quot;W&quot;; IF(NOT(ISBLANK([.B115])); [.B115]; &quot;&quot;); IF([.$I116]=&quot;W&quot;; IF(NOT(ISBLANK([.B116])); [.B116]; &quot;&quot;); &quot;&quot;))">
            <text:p/>
          </table:table-cell>
          <table:table-cell table:style-name="ce318" table:formula="of:=IF(AND(NOT(ISBLANK([.C115])); [.C115]=[.C116]); [.C115]; IF([.$I115]=&quot;W&quot;; IF(NOT(ISBLANK([.C115])); [.C115]; &quot;&quot;); IF([.$I116]=&quot;W&quot;; IF(NOT(ISBLANK([.C116])); [.C116]; &quot;&quot;); &quot;&quot;)))">
            <text:p/>
          </table:table-cell>
          <table:table-cell table:style-name="ce324" table:number-columns-repeated="5"/>
          <table:table-cell table:style-name="ce265" table:formula="of:=ISWINNERMEN([.N116:.R116]; [.N117:.R11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17:.H117]; [.D118:.H118])">
            <text:p/>
          </table:table-cell>
          <table:table-cell table:style-name="ce78"/>
          <table:table-cell table:style-name="ce316" table:formula="of:=IF(AND(NOT(ISBLANK([.A117])); [.A117]=[.A118]); [.A117]; IF([.$I117]=&quot;W&quot;; IF(NOT(ISBLANK([.A117])); [.A117]; &quot;&quot;); IF([.$I118]=&quot;W&quot;; IF(NOT(ISBLANK([.A118])); [.A118]; &quot;&quot;); &quot;&quot;)))">
            <text:p/>
          </table:table-cell>
          <table:table-cell table:style-name="ce321" table:formula="of:=IF([.$I117]=&quot;W&quot;; IF(NOT(ISBLANK([.B117])); [.B117]; &quot;&quot;); IF([.$I118]=&quot;W&quot;; IF(NOT(ISBLANK([.B118])); [.B118]; &quot;&quot;); &quot;&quot;))">
            <text:p/>
          </table:table-cell>
          <table:table-cell table:style-name="ce319" table:formula="of:=IF(AND(NOT(ISBLANK([.C117])); [.C117]=[.C118]); [.C117]; IF([.$I117]=&quot;W&quot;; IF(NOT(ISBLANK([.C117])); [.C117]; &quot;&quot;); IF([.$I118]=&quot;W&quot;; IF(NOT(ISBLANK([.C118])); [.C118]; &quot;&quot;); &quot;&quot;)))">
            <text:p/>
          </table:table-cell>
          <table:table-cell table:style-name="ce325" table:number-columns-repeated="5"/>
          <table:table-cell table:style-name="ce308" table:formula="of:=ISWINNERMEN([.N117:.R117]; [.N116:.R11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18:.H118]; [.D117:.H117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116])); [.$K116]=[.$K117]); [.$K116]; IF([.$S116]=&quot;W&quot;; IF(NOT(ISBLANK([.$K116])); [.$K116]; &quot;&quot;); IF([.$S117]=&quot;W&quot;; IF(NOT(ISBLANK([.$K117])); [.$K117]; &quot;&quot;); &quot;&quot;)))">
            <text:p/>
          </table:table-cell>
          <table:table-cell table:style-name="ce320" table:formula="of:=IF([.$S116]=&quot;W&quot;; IF(NOT(ISBLANK([.L116])); [.L116]; &quot;&quot;); IF([.$S117]=&quot;W&quot;; IF(NOT(ISBLANK([.L117])); [.L117]; &quot;&quot;); &quot;&quot;))">
            <text:p/>
          </table:table-cell>
          <table:table-cell table:style-name="ce329" table:formula="of:=IF(AND(NOT(ISBLANK([.M116])); [.M116]=[.M117]); [.M116]; IF([.$S116]=&quot;W&quot;; IF(NOT(ISBLANK([.M116])); [.M116]; &quot;&quot;); IF([.$S117]=&quot;W&quot;; IF(NOT(ISBLANK([.M117])); [.M117]; &quot;&quot;); &quot;&quot;)))">
            <text:p/>
          </table:table-cell>
          <table:table-cell table:style-name="ce324" table:number-columns-repeated="5"/>
          <table:table-cell table:style-name="ce265" table:formula="of:=ISWINNERMEN([.X118:.AB118]; [.X119:.AB11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19:.H119]; [.D120:.H120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120])); [.$K120]=[.$K121]); [.$K120]; IF([.$S120]=&quot;W&quot;; IF(NOT(ISBLANK([.$K120])); [.$K120]; &quot;&quot;); IF([.$S121]=&quot;W&quot;; IF(NOT(ISBLANK([.$K121])); [.$K121]; &quot;&quot;); &quot;&quot;)))">
            <text:p/>
          </table:table-cell>
          <table:table-cell table:style-name="ce321" table:formula="of:=IF([.$S120]=&quot;W&quot;; IF(NOT(ISBLANK([.L120])); [.L120]; &quot;&quot;); IF([.$S121]=&quot;W&quot;; IF(NOT(ISBLANK([.L121])); [.L121]; &quot;&quot;); &quot;&quot;))">
            <text:p/>
          </table:table-cell>
          <table:table-cell table:style-name="ce331" table:formula="of:=IF(AND(NOT(ISBLANK([.M120])); [.M120]=[.M121]); [.M120]; IF([.$S120]=&quot;W&quot;; IF(NOT(ISBLANK([.M120])); [.M120]; &quot;&quot;); IF([.$S121]=&quot;W&quot;; IF(NOT(ISBLANK([.M121])); [.M121]; &quot;&quot;); &quot;&quot;)))">
            <text:p/>
          </table:table-cell>
          <table:table-cell table:style-name="ce325" table:number-columns-repeated="5"/>
          <table:table-cell table:style-name="ce308" table:formula="of:=ISWINNERMEN([.X119:.AB119]; [.X118:.AB11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20:.H120]; [.D119:.H119])">
            <text:p/>
          </table:table-cell>
          <table:table-cell table:style-name="ce78"/>
          <table:table-cell table:style-name="ce315" table:formula="of:=IF(AND(NOT(ISBLANK([.A119])); [.A119]=[.A120]); [.A119]; IF([.$I119]=&quot;W&quot;; IF(NOT(ISBLANK([.A119])); [.A119]; &quot;&quot;); IF([.$I120]=&quot;W&quot;; IF(NOT(ISBLANK([.A120])); [.A120]; &quot;&quot;); &quot;&quot;)))">
            <text:p/>
          </table:table-cell>
          <table:table-cell table:style-name="ce320" table:formula="of:=IF([.$I119]=&quot;W&quot;; IF(NOT(ISBLANK([.B119])); [.B119]; &quot;&quot;); IF([.$I120]=&quot;W&quot;; IF(NOT(ISBLANK([.B120])); [.B120]; &quot;&quot;); &quot;&quot;))">
            <text:p/>
          </table:table-cell>
          <table:table-cell table:style-name="ce318" table:formula="of:=IF(AND(NOT(ISBLANK([.C119])); [.C119]=[.C120]); [.C119]; IF([.$I119]=&quot;W&quot;; IF(NOT(ISBLANK([.C119])); [.C119]; &quot;&quot;); IF([.$I120]=&quot;W&quot;; IF(NOT(ISBLANK([.C120])); [.C120]; &quot;&quot;); &quot;&quot;)))">
            <text:p/>
          </table:table-cell>
          <table:table-cell table:style-name="ce324" table:number-columns-repeated="5"/>
          <table:table-cell table:style-name="ce265" table:formula="of:=ISWINNERMEN([.N120:.R120]; [.N121:.R121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21:.H121]; [.D122:.H122])">
            <text:p/>
          </table:table-cell>
          <table:table-cell table:style-name="ce78"/>
          <table:table-cell table:style-name="ce316" table:formula="of:=IF(AND(NOT(ISBLANK([.A121])); [.A121]=[.A122]); [.A121]; IF([.$I121]=&quot;W&quot;; IF(NOT(ISBLANK([.A121])); [.A121]; &quot;&quot;); IF([.$I122]=&quot;W&quot;; IF(NOT(ISBLANK([.A122])); [.A122]; &quot;&quot;); &quot;&quot;)))">
            <text:p/>
          </table:table-cell>
          <table:table-cell table:style-name="ce321" table:formula="of:=IF([.$I121]=&quot;W&quot;; IF(NOT(ISBLANK([.B121])); [.B121]; &quot;&quot;); IF([.$I122]=&quot;W&quot;; IF(NOT(ISBLANK([.B122])); [.B122]; &quot;&quot;); &quot;&quot;))">
            <text:p/>
          </table:table-cell>
          <table:table-cell table:style-name="ce319" table:formula="of:=IF(AND(NOT(ISBLANK([.C121])); [.C121]=[.C122]); [.C121]; IF([.$I121]=&quot;W&quot;; IF(NOT(ISBLANK([.C121])); [.C121]; &quot;&quot;); IF([.$I122]=&quot;W&quot;; IF(NOT(ISBLANK([.C122])); [.C122]; &quot;&quot;); &quot;&quot;)))">
            <text:p/>
          </table:table-cell>
          <table:table-cell table:style-name="ce325" table:number-columns-repeated="5"/>
          <table:table-cell table:style-name="ce308" table:formula="of:=ISWINNERMEN([.N121:.R121]; [.N120:.R120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22:.H122]; [.D121:.H12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3" table:formula="of:=IF(AND(NOT(ISBLANK([.$U118])); [.$U118]=[.$U119]); [.$U118]; IF([.$AC118]=&quot;W&quot;; IF(NOT(ISBLANK([.$U118])); [.$U118]; &quot;&quot;); IF([.$AC119]=&quot;W&quot;; IF(NOT(ISBLANK([.$U119])); [.$U119]; &quot;&quot;); &quot;&quot;)))">
            <text:p/>
          </table:table-cell>
          <table:table-cell table:style-name="ce320" table:formula="of:=IF([.$AC118]=&quot;W&quot;; IF(NOT(ISBLANK([.V118])); [.V118]; &quot;&quot;); IF([.$AC119]=&quot;W&quot;; IF(NOT(ISBLANK([.V119])); [.V119]; &quot;&quot;); &quot;&quot;))">
            <text:p/>
          </table:table-cell>
          <table:table-cell table:style-name="ce336" table:formula="of:=IF(AND(NOT(ISBLANK([.$W118])); [.$W118]=[.$W119]); [.$W118]; IF([.$AC118]=&quot;W&quot;; IF(NOT(ISBLANK([.$W118])); [.$W118]; &quot;&quot;); IF([.$AC119]=&quot;W&quot;; IF(NOT(ISBLANK([.$W119])); [.$W119]; &quot;&quot;); &quot;&quot;)))">
            <text:p/>
          </table:table-cell>
          <table:table-cell table:style-name="ce324" table:formula="of:=IF(NOT(ISBLANK([Finals.D17])); [Finals.D17]; &quot;&quot;)">
            <text:p/>
          </table:table-cell>
          <table:table-cell table:style-name="ce324" table:formula="of:=IF(NOT(ISBLANK([Finals.E17])); [Finals.E17]; &quot;&quot;)">
            <text:p/>
          </table:table-cell>
          <table:table-cell table:style-name="ce324" table:formula="of:=IF(NOT(ISBLANK([Finals.F17])); [Finals.F17]; &quot;&quot;)">
            <text:p/>
          </table:table-cell>
          <table:table-cell table:style-name="ce324" table:formula="of:=IF(NOT(ISBLANK([Finals.G17])); [Finals.G17]; &quot;&quot;)">
            <text:p/>
          </table:table-cell>
          <table:table-cell table:style-name="ce324" table:formula="of:=IF(NOT(ISBLANK([Finals.H17])); [Finals.H17]; &quot;&quot;)">
            <text:p/>
          </table:table-cell>
          <table:table-cell table:style-name="ce265" table:formula="of:=IF(NOT(ISBLANK([Finals.I17])); [Finals.I17]; &quot;&quot;)">
            <text:p/>
          </table:table-cell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23:.H123]; [.D124:.H12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/>
          <table:table-cell table:style-name="ce335" table:formula="of:=IF(AND(NOT(ISBLANK([.$U126])); [.$U126]=[.$U127]); [.$U126]; IF([.$AC126]=&quot;W&quot;; IF(NOT(ISBLANK([.$U126])); [.$U126]; &quot;&quot;); IF([.$AC127]=&quot;W&quot;; IF(NOT(ISBLANK([.$U127])); [.$U127]; &quot;&quot;); &quot;&quot;)))">
            <text:p/>
          </table:table-cell>
          <table:table-cell table:style-name="ce321" table:formula="of:=IF([.$AC126]=&quot;W&quot;; IF(NOT(ISBLANK([.V126])); [.V126]; &quot;&quot;); IF([.$AC127]=&quot;W&quot;; IF(NOT(ISBLANK([.V127])); [.V127]; &quot;&quot;); &quot;&quot;))">
            <text:p/>
          </table:table-cell>
          <table:table-cell table:style-name="ce337" table:formula="of:=IF(AND(NOT(ISBLANK([.$W126])); [.$W126]=[.$W127]); [.$W126]; IF([.$AC126]=&quot;W&quot;; IF(NOT(ISBLANK([.$W126])); [.$W126]; &quot;&quot;); IF([.$AC127]=&quot;W&quot;; IF(NOT(ISBLANK([.$W127])); [.$W127]; &quot;&quot;); &quot;&quot;)))">
            <text:p/>
          </table:table-cell>
          <table:table-cell table:style-name="ce325" table:formula="of:=IF(NOT(ISBLANK([Finals.D18])); [Finals.D18]; &quot;&quot;)">
            <text:p/>
          </table:table-cell>
          <table:table-cell table:style-name="ce325" table:formula="of:=IF(NOT(ISBLANK([Finals.E18])); [Finals.E18]; &quot;&quot;)">
            <text:p/>
          </table:table-cell>
          <table:table-cell table:style-name="ce325" table:formula="of:=IF(NOT(ISBLANK([Finals.F18])); [Finals.F18]; &quot;&quot;)">
            <text:p/>
          </table:table-cell>
          <table:table-cell table:style-name="ce325" table:formula="of:=IF(NOT(ISBLANK([Finals.G18])); [Finals.G18]; &quot;&quot;)">
            <text:p/>
          </table:table-cell>
          <table:table-cell table:style-name="ce325" table:formula="of:=IF(NOT(ISBLANK([Finals.H18])); [Finals.H18]; &quot;&quot;)">
            <text:p/>
          </table:table-cell>
          <table:table-cell table:style-name="ce308" table:formula="of:=IF(NOT(ISBLANK([Finals.I18])); [Finals.I18]; &quot;&quot;)">
            <text:p/>
          </table:table-cell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24:.H124]; [.D123:.H123])">
            <text:p/>
          </table:table-cell>
          <table:table-cell table:style-name="ce78"/>
          <table:table-cell table:style-name="ce315" table:formula="of:=IF(AND(NOT(ISBLANK([.A123])); [.A123]=[.A124]); [.A123]; IF([.$I123]=&quot;W&quot;; IF(NOT(ISBLANK([.A123])); [.A123]; &quot;&quot;); IF([.$I124]=&quot;W&quot;; IF(NOT(ISBLANK([.A124])); [.A124]; &quot;&quot;); &quot;&quot;)))">
            <text:p/>
          </table:table-cell>
          <table:table-cell table:style-name="ce320" table:formula="of:=IF([.$I123]=&quot;W&quot;; IF(NOT(ISBLANK([.B123])); [.B123]; &quot;&quot;); IF([.$I124]=&quot;W&quot;; IF(NOT(ISBLANK([.B124])); [.B124]; &quot;&quot;); &quot;&quot;))">
            <text:p/>
          </table:table-cell>
          <table:table-cell table:style-name="ce318" table:formula="of:=IF(AND(NOT(ISBLANK([.C123])); [.C123]=[.C124]); [.C123]; IF([.$I123]=&quot;W&quot;; IF(NOT(ISBLANK([.C123])); [.C123]; &quot;&quot;); IF([.$I124]=&quot;W&quot;; IF(NOT(ISBLANK([.C124])); [.C124]; &quot;&quot;); &quot;&quot;)))">
            <text:p/>
          </table:table-cell>
          <table:table-cell table:style-name="ce324" table:number-columns-repeated="5"/>
          <table:table-cell table:style-name="ce265" table:formula="of:=ISWINNERMEN([.N124:.R124]; [.N125:.R125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25:.H125]; [.D126:.H126])">
            <text:p/>
          </table:table-cell>
          <table:table-cell table:style-name="ce78"/>
          <table:table-cell table:style-name="ce316" table:formula="of:=IF(AND(NOT(ISBLANK([.A125])); [.A125]=[.A126]); [.A125]; IF([.$I125]=&quot;W&quot;; IF(NOT(ISBLANK([.A125])); [.A125]; &quot;&quot;); IF([.$I126]=&quot;W&quot;; IF(NOT(ISBLANK([.A126])); [.A126]; &quot;&quot;); &quot;&quot;)))">
            <text:p/>
          </table:table-cell>
          <table:table-cell table:style-name="ce321" table:formula="of:=IF([.$I125]=&quot;W&quot;; IF(NOT(ISBLANK([.B125])); [.B125]; &quot;&quot;); IF([.$I126]=&quot;W&quot;; IF(NOT(ISBLANK([.B126])); [.B126]; &quot;&quot;); &quot;&quot;))">
            <text:p/>
          </table:table-cell>
          <table:table-cell table:style-name="ce319" table:formula="of:=IF(AND(NOT(ISBLANK([.C125])); [.C125]=[.C126]); [.C125]; IF([.$I125]=&quot;W&quot;; IF(NOT(ISBLANK([.C125])); [.C125]; &quot;&quot;); IF([.$I126]=&quot;W&quot;; IF(NOT(ISBLANK([.C126])); [.C126]; &quot;&quot;); &quot;&quot;)))">
            <text:p/>
          </table:table-cell>
          <table:table-cell table:style-name="ce325" table:number-columns-repeated="5"/>
          <table:table-cell table:style-name="ce308" table:formula="of:=ISWINNERMEN([.N125:.R125]; [.N124:.R124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26:.H126]; [.D125:.H12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7" table:formula="of:=IF(AND(NOT(ISBLANK([.$K124])); [.$K124]=[.$K125]); [.$K124]; IF([.$S124]=&quot;W&quot;; IF(NOT(ISBLANK([.$K124])); [.$K124]; &quot;&quot;); IF([.$S125]=&quot;W&quot;; IF(NOT(ISBLANK([.$K125])); [.$K125]; &quot;&quot;); &quot;&quot;)))">
            <text:p/>
          </table:table-cell>
          <table:table-cell table:style-name="ce320" table:formula="of:=IF([.$S124]=&quot;W&quot;; IF(NOT(ISBLANK([.L124])); [.L124]; &quot;&quot;); IF([.$S125]=&quot;W&quot;; IF(NOT(ISBLANK([.L125])); [.L125]; &quot;&quot;); &quot;&quot;))">
            <text:p/>
          </table:table-cell>
          <table:table-cell table:style-name="ce329" table:formula="of:=IF(AND(NOT(ISBLANK([.M124])); [.M124]=[.M125]); [.M124]; IF([.$S124]=&quot;W&quot;; IF(NOT(ISBLANK([.M124])); [.M124]; &quot;&quot;); IF([.$S125]=&quot;W&quot;; IF(NOT(ISBLANK([.M125])); [.M125]; &quot;&quot;); &quot;&quot;)))">
            <text:p/>
          </table:table-cell>
          <table:table-cell table:style-name="ce324" table:number-columns-repeated="5"/>
          <table:table-cell table:style-name="ce265" table:formula="of:=ISWINNERMEN([.X126:.AB126]; [.X127:.AB127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27:.H127]; [.D128:.H12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/>
          <table:table-cell table:style-name="ce328" table:formula="of:=IF(AND(NOT(ISBLANK([.$K128])); [.$K128]=[.$K129]); [.$K128]; IF([.$S128]=&quot;W&quot;; IF(NOT(ISBLANK([.$K128])); [.$K128]; &quot;&quot;); IF([.$S129]=&quot;W&quot;; IF(NOT(ISBLANK([.$K129])); [.$K129]; &quot;&quot;); &quot;&quot;)))">
            <text:p/>
          </table:table-cell>
          <table:table-cell table:style-name="ce321" table:formula="of:=IF([.$S128]=&quot;W&quot;; IF(NOT(ISBLANK([.L128])); [.L128]; &quot;&quot;); IF([.$S129]=&quot;W&quot;; IF(NOT(ISBLANK([.L129])); [.L129]; &quot;&quot;); &quot;&quot;))">
            <text:p/>
          </table:table-cell>
          <table:table-cell table:style-name="ce331" table:formula="of:=IF(AND(NOT(ISBLANK([.M128])); [.M128]=[.M129]); [.M128]; IF([.$S128]=&quot;W&quot;; IF(NOT(ISBLANK([.M128])); [.M128]; &quot;&quot;); IF([.$S129]=&quot;W&quot;; IF(NOT(ISBLANK([.M129])); [.M129]; &quot;&quot;); &quot;&quot;)))">
            <text:p/>
          </table:table-cell>
          <table:table-cell table:style-name="ce325" table:number-columns-repeated="5"/>
          <table:table-cell table:style-name="ce308" table:formula="of:=ISWINNERMEN([.X127:.AB127]; [.X126:.AB126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28:.H128]; [.D127:.H127])">
            <text:p/>
          </table:table-cell>
          <table:table-cell table:style-name="ce78"/>
          <table:table-cell table:style-name="ce315" table:formula="of:=IF(AND(NOT(ISBLANK([.A127])); [.A127]=[.A128]); [.A127]; IF([.$I127]=&quot;W&quot;; IF(NOT(ISBLANK([.A127])); [.A127]; &quot;&quot;); IF([.$I128]=&quot;W&quot;; IF(NOT(ISBLANK([.A128])); [.A128]; &quot;&quot;); &quot;&quot;)))">
            <text:p/>
          </table:table-cell>
          <table:table-cell table:style-name="ce320" table:formula="of:=IF([.$I127]=&quot;W&quot;; IF(NOT(ISBLANK([.B127])); [.B127]; &quot;&quot;); IF([.$I128]=&quot;W&quot;; IF(NOT(ISBLANK([.B128])); [.B128]; &quot;&quot;); &quot;&quot;))">
            <text:p/>
          </table:table-cell>
          <table:table-cell table:style-name="ce318" table:formula="of:=IF(AND(NOT(ISBLANK([.C127])); [.C127]=[.C128]); [.C127]; IF([.$I127]=&quot;W&quot;; IF(NOT(ISBLANK([.C127])); [.C127]; &quot;&quot;); IF([.$I128]=&quot;W&quot;; IF(NOT(ISBLANK([.C128])); [.C128]; &quot;&quot;); &quot;&quot;)))">
            <text:p/>
          </table:table-cell>
          <table:table-cell table:style-name="ce324" table:number-columns-repeated="5"/>
          <table:table-cell table:style-name="ce265" table:formula="of:=ISWINNERMEN([.N128:.R128]; [.N129:.R129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4"/>
          <table:table-cell table:style-name="ce320"/>
          <table:table-cell table:style-name="ce103"/>
          <table:table-cell table:style-name="ce255" table:number-columns-repeated="5"/>
          <table:table-cell table:style-name="ce265" table:formula="of:=ISWINNERMEN([.D129:.H129]; [.D130:.H130])">
            <text:p/>
          </table:table-cell>
          <table:table-cell table:style-name="ce78"/>
          <table:table-cell table:style-name="ce316" table:formula="of:=IF(AND(NOT(ISBLANK([.A129])); [.A129]=[.A130]); [.A129]; IF([.$I129]=&quot;W&quot;; IF(NOT(ISBLANK([.A129])); [.A129]; &quot;&quot;); IF([.$I130]=&quot;W&quot;; IF(NOT(ISBLANK([.A130])); [.A130]; &quot;&quot;); &quot;&quot;)))">
            <text:p/>
          </table:table-cell>
          <table:table-cell table:style-name="ce321" table:formula="of:=IF([.$I129]=&quot;W&quot;; IF(NOT(ISBLANK([.B129])); [.B129]; &quot;&quot;); IF([.$I130]=&quot;W&quot;; IF(NOT(ISBLANK([.B130])); [.B130]; &quot;&quot;); &quot;&quot;))">
            <text:p/>
          </table:table-cell>
          <table:table-cell table:style-name="ce319" table:formula="of:=IF(AND(NOT(ISBLANK([.C129])); [.C129]=[.C130]); [.C129]; IF([.$I129]=&quot;W&quot;; IF(NOT(ISBLANK([.C129])); [.C129]; &quot;&quot;); IF([.$I130]=&quot;W&quot;; IF(NOT(ISBLANK([.C130])); [.C130]; &quot;&quot;); &quot;&quot;)))">
            <text:p/>
          </table:table-cell>
          <table:table-cell table:style-name="ce325" table:number-columns-repeated="5"/>
          <table:table-cell table:style-name="ce308" table:formula="of:=ISWINNERMEN([.N129:.R129]; [.N128:.R128])">
            <text:p/>
          </table:table-cell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3">
          <table:table-cell table:style-name="ce95"/>
          <table:table-cell table:style-name="ce321"/>
          <table:table-cell table:style-name="ce104"/>
          <table:table-cell table:style-name="ce262" table:number-columns-repeated="5"/>
          <table:table-cell table:style-name="ce308" table:formula="of:=ISWINNERMEN([.D130:.H130]; [.D129:.H129])">
            <text:p/>
            <draw:frame table:end-cell-address="ML.U132" table:end-x="0.0437in" table:end-y="0.0366in" draw:z-index="7" draw:style-name="gr2" draw:text-style-name="P1" svg:width="2.9256in" svg:height="0.2654in" draw:transform="rotate (1.5707963267949) translate (0.193307086614173in 0.164566929133858in)">
              <draw:text-box>
                <text:p><text:span text:style-name="T1">Section 8</text:span></text:p>
              </draw:text-box>
            </draw:frame>
          </table:table-cell>
          <table:table-cell table:style-name="ce78"/>
          <table:table-cell table:style-name="ce116"/>
          <table:table-cell table:style-name="ce78" table:number-columns-repeated="2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78" table:number-columns-repeated="4"/>
          <table:table-cell table:style-name="ce343" table:number-columns-repeated="5"/>
          <table:table-cell/>
          <table:table-cell table:style-name="ce93" office:value-type="float" office:value="8" calcext:value-type="float">
            <text:p>8</text:p>
          </table:table-cell>
          <table:table-cell table:number-columns-repeated="216"/>
        </table:table-row>
        <table:table-row table:style-name="ro4" table:number-rows-repeated="65405">
          <table:table-cell table:number-columns-repeated="256"/>
        </table:table-row>
        <table:table-row table:style-name="ro4">
          <table:table-cell table:number-columns-repeated="256"/>
        </table:table-row>
        <calcext:conditional-formats>
          <calcext:conditional-format calcext:target-range-address="ML.L4:ML.L5 ML.V6:ML.V7 ML.L8:ML.L9 ML.AF10:ML.AF11 ML.L12:ML.L13 ML.V14:ML.V15 ML.L16:ML.L17 ML.L20:ML.L21 ML.V22:ML.V23 ML.L24:ML.L25 ML.AF26:ML.AF27 ML.L28:ML.L29 ML.V30:ML.V31 ML.L32:ML.L33 ML.L36:ML.L37 ML.V38:ML.V39 ML.L40:ML.L41 ML.AF42:ML.AF43 ML.L44:ML.L45 ML.V46:ML.V47 ML.L48:ML.L49 ML.L52:ML.L53 ML.V54:ML.V55 ML.L56:ML.L57 ML.AF58:ML.AF59 ML.L60:ML.L61 ML.V62:ML.V63 ML.L64:ML.L65 ML.L68:ML.L69 ML.V70:ML.V71 ML.L72:ML.L73 ML.AF74:ML.AF75 ML.L76:ML.L77 ML.V78:ML.V79 ML.L80:ML.L81 ML.L84:ML.L85 ML.V86:ML.V87 ML.L88:ML.L89 ML.AF90:ML.AF91 ML.L92:ML.L93 ML.V94:ML.V95 ML.L96:ML.L97 ML.L100:ML.L101 ML.V102:ML.V103 ML.L104:ML.L105 ML.AF106:ML.AF107 ML.L108:ML.L109 ML.V110:ML.V111 ML.L112:ML.L113 ML.L116:ML.L117 ML.V118:ML.V119 ML.L120:ML.L121 ML.AF122:ML.AF123 ML.L124:ML.L125 ML.V126:ML.V127 ML.L128:ML.L129 ML.B3:ML.B130">
            <calcext:condition calcext:apply-style-name="MatchWinner" calcext:value="formula-is([.I3] = &quot;W&quot;)" calcext:base-cell-address="ML.B3"/>
            <calcext:condition calcext:apply-style-name="MatchInProgress" calcext:value="formula-is(AND([.I3]=&quot;&quot;; NOT([.D3]=&quot;&quot;)))" calcext:base-cell-address="ML.B3"/>
            <calcext:condition calcext:apply-style-name="MatchStilltoStart" calcext:value="formula-is([.D3]=&quot;&quot;)" calcext:base-cell-address="ML.B3"/>
          </calcext:conditional-format>
          <calcext:conditional-format calcext:target-range-address="ML.D3:ML.H130">
            <calcext:condition calcext:apply-style-name="SetWinner" calcext:value="formula-is(OR(AND(ISODD(ROW()); [.H130]&gt;[.H131]); AND(ISEVEN(ROW()); [.H130]&gt;[.H129])))" calcext:base-cell-address="ML.H130"/>
          </calcext:conditional-format>
          <calcext:conditional-format calcext:target-range-address="ML.S4:ML.S5 ML.AC6:ML.AC7 ML.S8:ML.S9 ML.AM10:ML.AM11 ML.S12:ML.S13 ML.AC14:ML.AC15 ML.S16:ML.S17 ML.S20:ML.S21 ML.AC22:ML.AC23 ML.S24:ML.S25 ML.AM26:ML.AM27 ML.S28:ML.S29 ML.AC30:ML.AC31 ML.S32:ML.S33 ML.S36:ML.S37 ML.AC38:ML.AC39 ML.S40:ML.S41 ML.AM42:ML.AM43 ML.S44:ML.S45 ML.AC46:ML.AC47 ML.S48:ML.S49 ML.S52:ML.S53 ML.AC54:ML.AC55 ML.S56:ML.S57 ML.AM58:ML.AM59 ML.S60:ML.S61 ML.AC62:ML.AC63 ML.S64:ML.S65 ML.S68:ML.S69 ML.AC70:ML.AC71 ML.S72:ML.S73 ML.AM74:ML.AM75 ML.S76:ML.S77 ML.AC78:ML.AC79 ML.S80:ML.S81 ML.S84:ML.S85 ML.AC86:ML.AC87 ML.S88:ML.S89 ML.AM90:ML.AM91 ML.S92:ML.S93 ML.AC94:ML.AC95 ML.S96:ML.S97 ML.S100:ML.S101 ML.AC102:ML.AC103 ML.S104:ML.S105 ML.AM106:ML.AM107 ML.S108:ML.S109 ML.AC110:ML.AC111 ML.S112:ML.S113 ML.S116:ML.S117 ML.AC118:ML.AC119 ML.S120:ML.S121 ML.AM122:ML.AM123 ML.S124:ML.S125 ML.AC126:ML.AC127 ML.S128:ML.S129 ML.I3:ML.I130">
            <calcext:condition calcext:apply-style-name="WLRWinner" calcext:value="=&quot;W&quot;" calcext:base-cell-address="Finals.I3"/>
            <calcext:condition calcext:apply-style-name="WLRRetired" calcext:value="=&quot;R&quot;" calcext:base-cell-address="Finals.I3"/>
          </calcext:conditional-format>
          <calcext:conditional-format calcext:target-range-address="ML.K4:ML.K5 ML.K8:ML.K9 ML.K12:ML.K13 ML.K16:ML.K17 ML.K20:ML.K21 ML.K24:ML.K25 ML.K28:ML.K29 ML.K32:ML.K33 ML.K36:ML.K37 ML.K40:ML.K41 ML.K44:ML.K45 ML.K48:ML.K49 ML.K52:ML.K53 ML.K56:ML.K57 ML.K60:ML.K61 ML.K64:ML.K65 ML.K68:ML.K69 ML.K72:ML.K73 ML.K76:ML.K77 ML.K80:ML.K81 ML.K84:ML.K85 ML.K88:ML.K89 ML.K92:ML.K93 ML.K96:ML.K97 ML.K100:ML.K101 ML.K104:ML.K105 ML.K108:ML.K109 ML.K112:ML.K113 ML.K116:ML.K117 ML.K120:ML.K121 ML.K124:ML.K125 ML.K128:ML.K129 ML.M4:ML.M5 ML.M8:ML.M9 ML.M12:ML.M13 ML.M16:ML.M17 ML.M20:ML.M21 ML.M24:ML.M25 ML.M28:ML.M29 ML.M32:ML.M33 ML.M36:ML.M37 ML.M40:ML.M41 ML.M44:ML.M45 ML.M48:ML.M49 ML.M52:ML.M53 ML.M56:ML.M57 ML.M60:ML.M61 ML.M64:ML.M65 ML.M68:ML.M69 ML.M72:ML.M73 ML.M76:ML.M77 ML.M80:ML.M81 ML.M84:ML.M85 ML.M88:ML.M89 ML.M92:ML.M93 ML.M96:ML.M97 ML.M100:ML.M101 ML.M104:ML.M105 ML.M108:ML.M109 ML.M112:ML.M113 ML.M116:ML.M117 ML.M120:ML.M121 ML.M124:ML.M125 ML.M128:ML.M129">
            <calcext:condition calcext:apply-style-name="DecidedEvenBeforeMatch" calcext:value="formula-is(AND(NOT(ISBLANK([.C4])); OR(AND(ISODD(ROW()); [.C4]=[.C5]); AND(ISEVEN(ROW()); [.C4]=[.C3]))))" calcext:base-cell-address="ML.M4"/>
          </calcext:conditional-format>
          <calcext:conditional-format calcext:target-range-address="ML.AH3:ML.AL130 ML.X3:ML.AB130 ML.N3:ML.R130">
            <calcext:condition calcext:apply-style-name="SetWinner" calcext:value="formula-is(OR(AND(ISEVEN(ROW()); [.AL130]&gt;[.AL131]); AND(ISODD(ROW()); [.AL130]&gt;[.AL129])))" calcext:base-cell-address="ML.AL130"/>
          </calcext:conditional-format>
          <calcext:conditional-format calcext:target-range-address="ML.U6:ML.U7 ML.U14:ML.U15 ML.U22:ML.U23 ML.U30:ML.U31 ML.U38:ML.U39 ML.U46:ML.U47 ML.U54:ML.U55 ML.U62:ML.U63 ML.U70:ML.U71 ML.U78:ML.U79 ML.U86:ML.U87 ML.U94:ML.U95 ML.U102:ML.U103 ML.U110:ML.U111 ML.U118:ML.U119 ML.U126:ML.U127 ML.W6:ML.W7 ML.W14:ML.W15 ML.W22:ML.W23 ML.W30:ML.W31 ML.W38:ML.W39 ML.W46:ML.W47 ML.W54:ML.W55 ML.W62:ML.W63 ML.W70:ML.W71 ML.W78:ML.W79 ML.W86:ML.W87 ML.W94:ML.W95 ML.W102:ML.W103 ML.W110:ML.W111 ML.W118:ML.W119 ML.W126:ML.W127">
            <calcext:condition calcext:apply-style-name="DecidedEvenBeforeMatch" calcext:value="formula-is(OR(AND(ISEVEN(ROW()); NOT(ISBLANK([.M4])); [.M4]=[.M5]); AND(ISODD(ROW()); NOT(ISBLANK([.M7])); [.M7]=[.M8])))" calcext:base-cell-address="ML.W6"/>
          </calcext:conditional-format>
          <calcext:conditional-format calcext:target-range-address="ML.AE10:ML.AE11 ML.AE26:ML.AE27 ML.AE42:ML.AE43 ML.AE58:ML.AE59 ML.AE74:ML.AE75 ML.AE90:ML.AE91 ML.AE106:ML.AE107 ML.AE122:ML.AE123 ML.AG10:ML.AG11 ML.AG26:ML.AG27 ML.AG42:ML.AG43 ML.AG58:ML.AG59 ML.AG74:ML.AG75 ML.AG90:ML.AG91 ML.AG106:ML.AG107 ML.AG122:ML.AG123">
            <calcext:condition calcext:apply-style-name="DecidedEvenBeforeMatch" calcext:value="formula-is(OR(AND(ISEVEN(ROW()); NOT(ISBLANK([.W6])); [.W6]=[.W7]); AND(ISODD(ROW()); NOT(ISBLANK([.W13])); [.W13]=[.W14])))" calcext:base-cell-address="ML.AG10"/>
          </calcext:conditional-format>
        </calcext:conditional-formats>
      </table:table>
      <table:table table:name="FL" table:style-name="ta1" table:print="false">
        <table:table-column table:style-name="co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33" table:default-cell-style-name="Default"/>
        <table:table-column table:style-name="co7" table:default-cell-style-name="ce93"/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8"/>
          <table:table-cell table:style-name="ce194"/>
        </table:table-row>
        <table:table-row table:style-name="ro2">
          <table:table-cell table:style-name="ce1" office:value-type="string" calcext:value-type="string" table:number-columns-spanned="7" table:number-rows-spanned="1">
            <text:p>Round 1</text:p>
          </table:table-cell>
          <table:covered-table-cell table:style-name="ce98"/>
          <table:covered-table-cell table:number-columns-repeated="4" table:style-name="ce102"/>
          <table:covered-table-cell table:style-name="ce142"/>
          <table:table-cell table:style-name="ce115"/>
          <table:table-cell table:style-name="ce1" office:value-type="string" calcext:value-type="string" table:number-columns-spanned="7" table:number-rows-spanned="1">
            <text:p>Round 2</text:p>
          </table:table-cell>
          <table:covered-table-cell table:number-columns-repeated="6"/>
          <table:table-cell table:style-name="ce115"/>
          <table:table-cell table:style-name="ce1" office:value-type="string" calcext:value-type="string" table:number-columns-spanned="7" table:number-rows-spanned="1">
            <text:p>Round 3</text:p>
          </table:table-cell>
          <table:covered-table-cell table:number-columns-repeated="6"/>
          <table:table-cell table:style-name="ce115"/>
          <table:table-cell table:style-name="ce1" office:value-type="string" calcext:value-type="string" table:number-columns-spanned="7" table:number-rows-spanned="1">
            <text:p>Round 4</text:p>
          </table:table-cell>
          <table:covered-table-cell table:number-columns-repeated="6"/>
          <table:table-cell table:style-name="Default"/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3:.F3]; [.D4:.F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4:.F4]; [.D3:.F3])">
            <text:p/>
          </table:table-cell>
          <table:table-cell table:style-name="ce78"/>
          <table:table-cell table:style-name="ce351" table:formula="of:=IF(AND(NOT(ISBLANK([.A3])); [.A3]=[.A4]); [.A3]; IF([.$G3]=&quot;W&quot;; IF(NOT(ISBLANK([.A3])); [.A3]; &quot;&quot;); IF([.$G4]=&quot;W&quot;; IF(NOT(ISBLANK([.A4])); [.A4]; &quot;&quot;); &quot;&quot;)))">
            <text:p/>
          </table:table-cell>
          <table:table-cell table:style-name="ce339" table:formula="of:=IF([.$G3]=&quot;W&quot;; IF(NOT(ISBLANK([.B3])); [.B3]; &quot;&quot;); IF([.$G4]=&quot;W&quot;; IF(NOT(ISBLANK([.B4])); [.B4]; &quot;&quot;); &quot;&quot;))">
            <text:p/>
          </table:table-cell>
          <table:table-cell table:style-name="ce353" table:formula="of:=IF(AND(NOT(ISBLANK([.C3])); [.C3]=[.C4]); [.C3]; IF([.$G3]=&quot;W&quot;; IF(NOT(ISBLANK([.C3])); [.C3]; &quot;&quot;); IF([.$G4]=&quot;W&quot;; IF(NOT(ISBLANK([.C4])); [.C4]; &quot;&quot;); &quot;&quot;)))">
            <text:p/>
          </table:table-cell>
          <table:table-cell table:style-name="ce356" table:number-columns-repeated="3"/>
          <table:table-cell table:style-name="ce348" table:formula="of:=ISWINNERWOMEN([.L4:.N4]; [.L5:.N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5:.F5]; [.D6:.F6])">
            <text:p/>
          </table:table-cell>
          <table:table-cell table:style-name="ce78"/>
          <table:table-cell table:style-name="ce352" table:formula="of:=IF(AND(NOT(ISBLANK([.A5])); [.A5]=[.A6]); [.A5]; IF([.$G5]=&quot;W&quot;; IF(NOT(ISBLANK([.A5])); [.A5]; &quot;&quot;); IF([.$G6]=&quot;W&quot;; IF(NOT(ISBLANK([.A6])); [.A6]; &quot;&quot;); &quot;&quot;)))">
            <text:p/>
          </table:table-cell>
          <table:table-cell table:style-name="ce340" table:formula="of:=IF([.$G5]=&quot;W&quot;; IF(NOT(ISBLANK([.B5])); [.B5]; &quot;&quot;); IF([.$G6]=&quot;W&quot;; IF(NOT(ISBLANK([.B6])); [.B6]; &quot;&quot;); &quot;&quot;))">
            <text:p/>
          </table:table-cell>
          <table:table-cell table:style-name="ce354" table:formula="of:=IF(AND(NOT(ISBLANK([.C5])); [.C5]=[.C6]); [.C5]; IF([.$G5]=&quot;W&quot;; IF(NOT(ISBLANK([.C5])); [.C5]; &quot;&quot;); IF([.$G6]=&quot;W&quot;; IF(NOT(ISBLANK([.C6])); [.C6]; &quot;&quot;); &quot;&quot;)))">
            <text:p/>
          </table:table-cell>
          <table:table-cell table:style-name="ce357" table:number-columns-repeated="3"/>
          <table:table-cell table:style-name="ce349" table:formula="of:=ISWINNERWOMEN([.L5:.N5]; [.L4:.N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6:.F6]; [.D5:.F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4]));[.$I4]=[.$I5]);[.$I4];IF([.$O4]=&quot;W&quot;;IF(NOT(ISBLANK([.$I4]));[.$I4];&quot;&quot;);IF([.$O5]=&quot;W&quot;;IF(NOT(ISBLANK([.$I5]));[.$I5];&quot;&quot;);&quot;&quot;)))">
            <text:p/>
          </table:table-cell>
          <table:table-cell table:style-name="ce339" table:formula="of:=IF([.$O4]=&quot;W&quot;; IF(NOT(ISBLANK([.J4])); [.J4]; &quot;&quot;); IF([.$O5]=&quot;W&quot;; IF(NOT(ISBLANK([.J5])); [.J5]; &quot;&quot;); &quot;&quot;))">
            <text:p/>
          </table:table-cell>
          <table:table-cell table:style-name="ce361" table:formula="of:=IF(AND(NOT(ISBLANK([.K4])); [.K4]=[.K5]); [.K4]; IF([.$O4]=&quot;W&quot;; IF(NOT(ISBLANK([.K4])); [.K4]; &quot;&quot;); IF([.$O5]=&quot;W&quot;; IF(NOT(ISBLANK([.K5])); [.K5]; &quot;&quot;); &quot;&quot;)))">
            <text:p/>
          </table:table-cell>
          <table:table-cell table:style-name="ce356" table:number-columns-repeated="3"/>
          <table:table-cell table:style-name="ce348" table:formula="of:=ISWINNERWOMEN([.T6:.V6]; [.T7:.V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7:.F7]; [.D8:.F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8]));[.$I8]=[.$I9]);[.$I8];IF([.$O8]=&quot;W&quot;;IF(NOT(ISBLANK([.$I8]));[.$I8];&quot;&quot;);IF([.$O9]=&quot;W&quot;;IF(NOT(ISBLANK([.$I9]));[.$I9];&quot;&quot;);&quot;&quot;)))">
            <text:p/>
          </table:table-cell>
          <table:table-cell table:style-name="ce340" table:formula="of:=IF([.$O8]=&quot;W&quot;; IF(NOT(ISBLANK([.J8])); [.J8]; &quot;&quot;); IF([.$O9]=&quot;W&quot;; IF(NOT(ISBLANK([.J9])); [.J9]; &quot;&quot;); &quot;&quot;))">
            <text:p/>
          </table:table-cell>
          <table:table-cell table:style-name="ce362" table:formula="of:=IF(AND(NOT(ISBLANK([.K8])); [.K8]=[.K9]); [.K8]; IF([.$O8]=&quot;W&quot;; IF(NOT(ISBLANK([.K8])); [.K8]; &quot;&quot;); IF([.$O9]=&quot;W&quot;; IF(NOT(ISBLANK([.K9])); [.K9]; &quot;&quot;); &quot;&quot;)))">
            <text:p/>
          </table:table-cell>
          <table:table-cell table:style-name="ce357" table:number-columns-repeated="3"/>
          <table:table-cell table:style-name="ce349" table:formula="of:=ISWINNERWOMEN([.T7:.V7]; [.T6:.V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8:.F8]; [.D7:.F7])">
            <text:p/>
          </table:table-cell>
          <table:table-cell table:style-name="ce78"/>
          <table:table-cell table:style-name="ce351" table:formula="of:=IF(AND(NOT(ISBLANK([.A7])); [.A7]=[.A8]); [.A7]; IF([.$G7]=&quot;W&quot;; IF(NOT(ISBLANK([.A7])); [.A7]; &quot;&quot;); IF([.$G8]=&quot;W&quot;; IF(NOT(ISBLANK([.A8])); [.A8]; &quot;&quot;); &quot;&quot;)))">
            <text:p/>
          </table:table-cell>
          <table:table-cell table:style-name="ce339" table:formula="of:=IF([.$G7]=&quot;W&quot;; IF(NOT(ISBLANK([.B7])); [.B7]; &quot;&quot;); IF([.$G8]=&quot;W&quot;; IF(NOT(ISBLANK([.B8])); [.B8]; &quot;&quot;); &quot;&quot;))">
            <text:p/>
          </table:table-cell>
          <table:table-cell table:style-name="ce353" table:formula="of:=IF(AND(NOT(ISBLANK([.C7])); [.C7]=[.C8]); [.C7]; IF([.$G7]=&quot;W&quot;; IF(NOT(ISBLANK([.C7])); [.C7]; &quot;&quot;); IF([.$G8]=&quot;W&quot;; IF(NOT(ISBLANK([.C8])); [.C8]; &quot;&quot;); &quot;&quot;)))">
            <text:p/>
          </table:table-cell>
          <table:table-cell table:style-name="ce356" table:number-columns-repeated="3"/>
          <table:table-cell table:style-name="ce348" table:formula="of:=ISWINNERWOMEN([.L8:.N8]; [.L9:.N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9:.F9]; [.D10:.F10])">
            <text:p/>
          </table:table-cell>
          <table:table-cell table:style-name="ce78"/>
          <table:table-cell table:style-name="ce352" table:formula="of:=IF(AND(NOT(ISBLANK([.A9])); [.A9]=[.A10]); [.A9]; IF([.$G9]=&quot;W&quot;; IF(NOT(ISBLANK([.A9])); [.A9]; &quot;&quot;); IF([.$G10]=&quot;W&quot;; IF(NOT(ISBLANK([.A10])); [.A10]; &quot;&quot;); &quot;&quot;)))">
            <text:p/>
          </table:table-cell>
          <table:table-cell table:style-name="ce340" table:formula="of:=IF([.$G9]=&quot;W&quot;; IF(NOT(ISBLANK([.B9])); [.B9]; &quot;&quot;); IF([.$G10]=&quot;W&quot;; IF(NOT(ISBLANK([.B10])); [.B10]; &quot;&quot;); &quot;&quot;))">
            <text:p/>
          </table:table-cell>
          <table:table-cell table:style-name="ce354" table:formula="of:=IF(AND(NOT(ISBLANK([.C9])); [.C9]=[.C10]); [.C9]; IF([.$G9]=&quot;W&quot;; IF(NOT(ISBLANK([.C9])); [.C9]; &quot;&quot;); IF([.$G10]=&quot;W&quot;; IF(NOT(ISBLANK([.C10])); [.C10]; &quot;&quot;); &quot;&quot;)))">
            <text:p/>
          </table:table-cell>
          <table:table-cell table:style-name="ce357" table:number-columns-repeated="3"/>
          <table:table-cell table:style-name="ce349" table:formula="of:=ISWINNERWOMEN([.L9:.N9]; [.L8:.N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0:.F10]; [.D9:.F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3" table:formula="of:=IF(AND(NOT(ISBLANK([.$Q6])); [.$Q6]=[.$Q7]); [.$Q6]; IF([.$W6]=&quot;W&quot;; IF(NOT(ISBLANK([.$Q6])); [.$Q6]; &quot;&quot;); IF([.$W7]=&quot;W&quot;; IF(NOT(ISBLANK([.$Q7])); [.$Q7]; &quot;&quot;); &quot;&quot;)))">
            <text:p/>
          </table:table-cell>
          <table:table-cell table:style-name="ce339" table:formula="of:=IF([.$W6]=&quot;W&quot;; IF(NOT(ISBLANK([.R6])); [.R6]; &quot;&quot;); IF([.$W7]=&quot;W&quot;; IF(NOT(ISBLANK([.R7])); [.R7]; &quot;&quot;); &quot;&quot;))">
            <text:p/>
          </table:table-cell>
          <table:table-cell table:style-name="ce365" table:formula="of:=IF(AND(NOT(ISBLANK([.S6])); [.S6]=[.S7]); [.S6]; IF([.$W6]=&quot;W&quot;; IF(NOT(ISBLANK([.S6])); [.S6]; &quot;&quot;); IF([.$W7]=&quot;W&quot;; IF(NOT(ISBLANK([.S7])); [.S7]; &quot;&quot;); &quot;&quot;)))">
            <text:p/>
          </table:table-cell>
          <table:table-cell table:style-name="ce356" table:formula="of:=IF(NOT(ISBLANK([Finals.D21])); [Finals.D21]; &quot;&quot;)">
            <text:p/>
          </table:table-cell>
          <table:table-cell table:style-name="ce356" table:formula="of:=IF(NOT(ISBLANK([Finals.E21])); [Finals.E21]; &quot;&quot;)">
            <text:p/>
          </table:table-cell>
          <table:table-cell table:style-name="ce356" table:formula="of:=IF(NOT(ISBLANK([Finals.F21])); [Finals.F21]; &quot;&quot;)">
            <text:p/>
          </table:table-cell>
          <table:table-cell table:style-name="ce348" table:formula="of:=IF(NOT(ISBLANK([Finals.I21])); [Finals.I21]; &quot;&quot;)"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1:.F11]; [.D12:.F1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4" table:formula="of:=IF(AND(NOT(ISBLANK([.$Q14])); [.$Q14]=[.$Q15]); [.$Q14]; IF([.$W14]=&quot;W&quot;; IF(NOT(ISBLANK([.$Q14])); [.$Q14]; &quot;&quot;); IF([.$W15]=&quot;W&quot;; IF(NOT(ISBLANK([.$Q15])); [.$Q15]; &quot;&quot;); &quot;&quot;)))">
            <text:p/>
          </table:table-cell>
          <table:table-cell table:style-name="ce340" table:formula="of:=IF([.$W14]=&quot;W&quot;; IF(NOT(ISBLANK([.R14])); [.R14]; &quot;&quot;); IF([.$W15]=&quot;W&quot;; IF(NOT(ISBLANK([.R15])); [.R15]; &quot;&quot;); &quot;&quot;))">
            <text:p/>
          </table:table-cell>
          <table:table-cell table:style-name="ce366" table:formula="of:=IF(AND(NOT(ISBLANK([.S14])); [.S14]=[.S15]); [.S14]; IF([.$W14]=&quot;W&quot;; IF(NOT(ISBLANK([.S14])); [.S14]; &quot;&quot;); IF([.$W15]=&quot;W&quot;; IF(NOT(ISBLANK([.S15])); [.S15]; &quot;&quot;); &quot;&quot;)))">
            <text:p/>
          </table:table-cell>
          <table:table-cell table:style-name="ce357" table:formula="of:=IF(NOT(ISBLANK([Finals.D22])); [Finals.D22]; &quot;&quot;)">
            <text:p/>
          </table:table-cell>
          <table:table-cell table:style-name="ce357" table:formula="of:=IF(NOT(ISBLANK([Finals.E22])); [Finals.E22]; &quot;&quot;)">
            <text:p/>
          </table:table-cell>
          <table:table-cell table:style-name="ce357" table:formula="of:=IF(NOT(ISBLANK([Finals.F22])); [Finals.F22]; &quot;&quot;)">
            <text:p/>
          </table:table-cell>
          <table:table-cell table:style-name="ce349" table:formula="of:=IF(NOT(ISBLANK([Finals.I22])); [Finals.I22]; &quot;&quot;)"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2:.F12]; [.D11:.F11])">
            <text:p/>
          </table:table-cell>
          <table:table-cell table:style-name="ce78"/>
          <table:table-cell table:style-name="ce351" table:formula="of:=IF(AND(NOT(ISBLANK([.A11])); [.A11]=[.A12]); [.A11]; IF([.$G11]=&quot;W&quot;; IF(NOT(ISBLANK([.A11])); [.A11]; &quot;&quot;); IF([.$G12]=&quot;W&quot;; IF(NOT(ISBLANK([.A12])); [.A12]; &quot;&quot;); &quot;&quot;)))">
            <text:p/>
          </table:table-cell>
          <table:table-cell table:style-name="ce339" table:formula="of:=IF([.$G11]=&quot;W&quot;; IF(NOT(ISBLANK([.B11])); [.B11]; &quot;&quot;); IF([.$G12]=&quot;W&quot;; IF(NOT(ISBLANK([.B12])); [.B12]; &quot;&quot;); &quot;&quot;))">
            <text:p/>
          </table:table-cell>
          <table:table-cell table:style-name="ce353" table:formula="of:=IF(AND(NOT(ISBLANK([.C11])); [.C11]=[.C12]); [.C11]; IF([.$G11]=&quot;W&quot;; IF(NOT(ISBLANK([.C11])); [.C11]; &quot;&quot;); IF([.$G12]=&quot;W&quot;; IF(NOT(ISBLANK([.C12])); [.C12]; &quot;&quot;); &quot;&quot;)))">
            <text:p/>
          </table:table-cell>
          <table:table-cell table:style-name="ce356" table:number-columns-repeated="3"/>
          <table:table-cell table:style-name="ce348" table:formula="of:=ISWINNERWOMEN([.L12:.N12]; [.L13:.N1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3:.F13]; [.D14:.F14])">
            <text:p/>
          </table:table-cell>
          <table:table-cell table:style-name="ce78"/>
          <table:table-cell table:style-name="ce352" table:formula="of:=IF(AND(NOT(ISBLANK([.A13])); [.A13]=[.A14]); [.A13]; IF([.$G13]=&quot;W&quot;; IF(NOT(ISBLANK([.A13])); [.A13]; &quot;&quot;); IF([.$G14]=&quot;W&quot;; IF(NOT(ISBLANK([.A14])); [.A14]; &quot;&quot;); &quot;&quot;)))">
            <text:p/>
          </table:table-cell>
          <table:table-cell table:style-name="ce340" table:formula="of:=IF([.$G13]=&quot;W&quot;; IF(NOT(ISBLANK([.B13])); [.B13]; &quot;&quot;); IF([.$G14]=&quot;W&quot;; IF(NOT(ISBLANK([.B14])); [.B14]; &quot;&quot;); &quot;&quot;))">
            <text:p/>
          </table:table-cell>
          <table:table-cell table:style-name="ce354" table:formula="of:=IF(AND(NOT(ISBLANK([.C13])); [.C13]=[.C14]); [.C13]; IF([.$G13]=&quot;W&quot;; IF(NOT(ISBLANK([.C13])); [.C13]; &quot;&quot;); IF([.$G14]=&quot;W&quot;; IF(NOT(ISBLANK([.C14])); [.C14]; &quot;&quot;); &quot;&quot;)))">
            <text:p/>
          </table:table-cell>
          <table:table-cell table:style-name="ce357" table:number-columns-repeated="3"/>
          <table:table-cell table:style-name="ce349" table:formula="of:=ISWINNERWOMEN([.L13:.N13]; [.L12:.N1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4:.F14]; [.D13:.F13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12]));[.$I12]=[.$I13]);[.$I12];IF([.$O12]=&quot;W&quot;;IF(NOT(ISBLANK([.$I12]));[.$I12];&quot;&quot;);IF([.$O13]=&quot;W&quot;;IF(NOT(ISBLANK([.$I13]));[.$I13];&quot;&quot;);&quot;&quot;)))">
            <text:p/>
          </table:table-cell>
          <table:table-cell table:style-name="ce339" table:formula="of:=IF([.$O12]=&quot;W&quot;; IF(NOT(ISBLANK([.J12])); [.J12]; &quot;&quot;); IF([.$O13]=&quot;W&quot;; IF(NOT(ISBLANK([.J13])); [.J13]; &quot;&quot;); &quot;&quot;))">
            <text:p/>
          </table:table-cell>
          <table:table-cell table:style-name="ce361" table:formula="of:=IF(AND(NOT(ISBLANK([.K12])); [.K12]=[.K13]); [.K12]; IF([.$O12]=&quot;W&quot;; IF(NOT(ISBLANK([.K12])); [.K12]; &quot;&quot;); IF([.$O13]=&quot;W&quot;; IF(NOT(ISBLANK([.K13])); [.K13]; &quot;&quot;); &quot;&quot;)))">
            <text:p/>
          </table:table-cell>
          <table:table-cell table:style-name="ce356" table:number-columns-repeated="3"/>
          <table:table-cell table:style-name="ce348" table:formula="of:=ISWINNERWOMEN([.T14:.V14]; [.T15:.V1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5:.F15]; [.D16:.F16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16]));[.$I16]=[.$I17]);[.$I16];IF([.$O16]=&quot;W&quot;;IF(NOT(ISBLANK([.$I16]));[.$I16];&quot;&quot;);IF([.$O17]=&quot;W&quot;;IF(NOT(ISBLANK([.$I17]));[.$I17];&quot;&quot;);&quot;&quot;)))">
            <text:p/>
          </table:table-cell>
          <table:table-cell table:style-name="ce340" table:formula="of:=IF([.$O16]=&quot;W&quot;; IF(NOT(ISBLANK([.J16])); [.J16]; &quot;&quot;); IF([.$O17]=&quot;W&quot;; IF(NOT(ISBLANK([.J17])); [.J17]; &quot;&quot;); &quot;&quot;))">
            <text:p/>
          </table:table-cell>
          <table:table-cell table:style-name="ce362" table:formula="of:=IF(AND(NOT(ISBLANK([.K16])); [.K16]=[.K17]); [.K16]; IF([.$O16]=&quot;W&quot;; IF(NOT(ISBLANK([.K16])); [.K16]; &quot;&quot;); IF([.$O17]=&quot;W&quot;; IF(NOT(ISBLANK([.K17])); [.K17]; &quot;&quot;); &quot;&quot;)))">
            <text:p/>
          </table:table-cell>
          <table:table-cell table:style-name="ce357" table:number-columns-repeated="3"/>
          <table:table-cell table:style-name="ce349" table:formula="of:=ISWINNERWOMEN([.T15:.V15]; [.T14:.V1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6:.F16]; [.D15:.F15])">
            <text:p/>
          </table:table-cell>
          <table:table-cell table:style-name="ce78"/>
          <table:table-cell table:style-name="ce351" table:formula="of:=IF(AND(NOT(ISBLANK([.A15])); [.A15]=[.A16]); [.A15]; IF([.$G15]=&quot;W&quot;; IF(NOT(ISBLANK([.A15])); [.A15]; &quot;&quot;); IF([.$G16]=&quot;W&quot;; IF(NOT(ISBLANK([.A16])); [.A16]; &quot;&quot;); &quot;&quot;)))">
            <text:p/>
          </table:table-cell>
          <table:table-cell table:style-name="ce339" table:formula="of:=IF([.$G15]=&quot;W&quot;; IF(NOT(ISBLANK([.B15])); [.B15]; &quot;&quot;); IF([.$G16]=&quot;W&quot;; IF(NOT(ISBLANK([.B16])); [.B16]; &quot;&quot;); &quot;&quot;))">
            <text:p/>
          </table:table-cell>
          <table:table-cell table:style-name="ce353" table:formula="of:=IF(AND(NOT(ISBLANK([.C15])); [.C15]=[.C16]); [.C15]; IF([.$G15]=&quot;W&quot;; IF(NOT(ISBLANK([.C15])); [.C15]; &quot;&quot;); IF([.$G16]=&quot;W&quot;; IF(NOT(ISBLANK([.C16])); [.C16]; &quot;&quot;); &quot;&quot;)))">
            <text:p/>
          </table:table-cell>
          <table:table-cell table:style-name="ce356" table:number-columns-repeated="3"/>
          <table:table-cell table:style-name="ce348" table:formula="of:=ISWINNERWOMEN([.L16:.N16]; [.L17:.N1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7:.F17]; [.D18:.F18])">
            <text:p/>
          </table:table-cell>
          <table:table-cell table:style-name="ce78"/>
          <table:table-cell table:style-name="ce352" table:formula="of:=IF(AND(NOT(ISBLANK([.A17])); [.A17]=[.A18]); [.A17]; IF([.$G17]=&quot;W&quot;; IF(NOT(ISBLANK([.A17])); [.A17]; &quot;&quot;); IF([.$G18]=&quot;W&quot;; IF(NOT(ISBLANK([.A18])); [.A18]; &quot;&quot;); &quot;&quot;)))">
            <text:p/>
          </table:table-cell>
          <table:table-cell table:style-name="ce340" table:formula="of:=IF([.$G17]=&quot;W&quot;; IF(NOT(ISBLANK([.B17])); [.B17]; &quot;&quot;); IF([.$G18]=&quot;W&quot;; IF(NOT(ISBLANK([.B18])); [.B18]; &quot;&quot;); &quot;&quot;))">
            <text:p/>
          </table:table-cell>
          <table:table-cell table:style-name="ce354" table:formula="of:=IF(AND(NOT(ISBLANK([.C17])); [.C17]=[.C18]); [.C17]; IF([.$G17]=&quot;W&quot;; IF(NOT(ISBLANK([.C17])); [.C17]; &quot;&quot;); IF([.$G18]=&quot;W&quot;; IF(NOT(ISBLANK([.C18])); [.C18]; &quot;&quot;); &quot;&quot;)))">
            <text:p/>
          </table:table-cell>
          <table:table-cell table:style-name="ce357" table:number-columns-repeated="3"/>
          <table:table-cell table:style-name="ce349" table:formula="of:=ISWINNERWOMEN([.L17:.N17]; [.L16:.N1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8:.F18]; [.D17:.F17])">
            <text:p/>
          </table:table-cell>
          <table:table-cell table:style-name="ce78">
            <draw:frame table:end-cell-address="FL.R20" table:end-x="0.0181in" table:end-y="0.0276in" draw:z-index="0" draw:style-name="gr1" draw:text-style-name="P1" svg:width="2.9248in" svg:height="0.2654in" draw:transform="rotate (1.5707963267949) translate (0.0078740157480315in 0.167322834645669in)">
              <draw:text-box>
                <text:p><text:span text:style-name="T1">Section 1</text:span></text:p>
              </draw:text-box>
            </draw:frame>
          </table:table-cell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96"/>
          <table:table-cell table:style-name="ce341"/>
          <table:table-cell table:style-name="ce105"/>
          <table:table-cell table:style-name="ce345" table:number-columns-repeated="3"/>
          <table:table-cell table:style-name="ce350" table:formula="of:=ISWINNERWOMEN([.D19:.F19]; [.D20:.F20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20:.F20]; [.D19:.F19])">
            <text:p/>
          </table:table-cell>
          <table:table-cell table:style-name="ce78"/>
          <table:table-cell table:style-name="ce351" table:formula="of:=IF(AND(NOT(ISBLANK([.A19])); [.A19]=[.A20]); [.A19]; IF([.$G19]=&quot;W&quot;; IF(NOT(ISBLANK([.A19])); [.A19]; &quot;&quot;); IF([.$G20]=&quot;W&quot;; IF(NOT(ISBLANK([.A20])); [.A20]; &quot;&quot;); &quot;&quot;)))">
            <text:p/>
          </table:table-cell>
          <table:table-cell table:style-name="ce339" table:formula="of:=IF([.$G19]=&quot;W&quot;; IF(NOT(ISBLANK([.B19])); [.B19]; &quot;&quot;); IF([.$G20]=&quot;W&quot;; IF(NOT(ISBLANK([.B20])); [.B20]; &quot;&quot;); &quot;&quot;))">
            <text:p/>
          </table:table-cell>
          <table:table-cell table:style-name="ce353" table:formula="of:=IF(AND(NOT(ISBLANK([.C19])); [.C19]=[.C20]); [.C19]; IF([.$G19]=&quot;W&quot;; IF(NOT(ISBLANK([.C19])); [.C19]; &quot;&quot;); IF([.$G20]=&quot;W&quot;; IF(NOT(ISBLANK([.C20])); [.C20]; &quot;&quot;); &quot;&quot;)))">
            <text:p/>
          </table:table-cell>
          <table:table-cell table:style-name="ce356" table:number-columns-repeated="3"/>
          <table:table-cell table:style-name="ce348" table:formula="of:=ISWINNERWOMEN([.L20:.N20]; [.L21:.N2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21:.F21]; [.D22:.F22])">
            <text:p/>
          </table:table-cell>
          <table:table-cell table:style-name="ce78"/>
          <table:table-cell table:style-name="ce352" table:formula="of:=IF(AND(NOT(ISBLANK([.A21])); [.A21]=[.A22]); [.A21]; IF([.$G21]=&quot;W&quot;; IF(NOT(ISBLANK([.A21])); [.A21]; &quot;&quot;); IF([.$G22]=&quot;W&quot;; IF(NOT(ISBLANK([.A22])); [.A22]; &quot;&quot;); &quot;&quot;)))">
            <text:p/>
          </table:table-cell>
          <table:table-cell table:style-name="ce340" table:formula="of:=IF([.$G21]=&quot;W&quot;; IF(NOT(ISBLANK([.B21])); [.B21]; &quot;&quot;); IF([.$G22]=&quot;W&quot;; IF(NOT(ISBLANK([.B22])); [.B22]; &quot;&quot;); &quot;&quot;))">
            <text:p/>
          </table:table-cell>
          <table:table-cell table:style-name="ce354" table:formula="of:=IF(AND(NOT(ISBLANK([.C21])); [.C21]=[.C22]); [.C21]; IF([.$G21]=&quot;W&quot;; IF(NOT(ISBLANK([.C21])); [.C21]; &quot;&quot;); IF([.$G22]=&quot;W&quot;; IF(NOT(ISBLANK([.C22])); [.C22]; &quot;&quot;); &quot;&quot;)))">
            <text:p/>
          </table:table-cell>
          <table:table-cell table:style-name="ce357" table:number-columns-repeated="3"/>
          <table:table-cell table:style-name="ce349" table:formula="of:=ISWINNERWOMEN([.L21:.N21]; [.L20:.N2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22:.F22]; [.D21:.F2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20]));[.$I20]=[.$I21]);[.$I20];IF([.$O20]=&quot;W&quot;;IF(NOT(ISBLANK([.$I20]));[.$I20];&quot;&quot;);IF([.$O21]=&quot;W&quot;;IF(NOT(ISBLANK([.$I21]));[.$I21];&quot;&quot;);&quot;&quot;)))">
            <text:p/>
          </table:table-cell>
          <table:table-cell table:style-name="ce339" table:formula="of:=IF([.$O20]=&quot;W&quot;; IF(NOT(ISBLANK([.J20])); [.J20]; &quot;&quot;); IF([.$O21]=&quot;W&quot;; IF(NOT(ISBLANK([.J21])); [.J21]; &quot;&quot;); &quot;&quot;))">
            <text:p/>
          </table:table-cell>
          <table:table-cell table:style-name="ce361" table:formula="of:=IF(AND(NOT(ISBLANK([.K20])); [.K20]=[.K21]); [.K20]; IF([.$O20]=&quot;W&quot;; IF(NOT(ISBLANK([.K20])); [.K20]; &quot;&quot;); IF([.$O21]=&quot;W&quot;; IF(NOT(ISBLANK([.K21])); [.K21]; &quot;&quot;); &quot;&quot;)))">
            <text:p/>
          </table:table-cell>
          <table:table-cell table:style-name="ce356" table:number-columns-repeated="3"/>
          <table:table-cell table:style-name="ce348" table:formula="of:=ISWINNERWOMEN([.T22:.V22]; [.T23:.V2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23:.F23]; [.D24:.F2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24]));[.$I24]=[.$I25]);[.$I24];IF([.$O24]=&quot;W&quot;;IF(NOT(ISBLANK([.$I24]));[.$I24];&quot;&quot;);IF([.$O25]=&quot;W&quot;;IF(NOT(ISBLANK([.$I25]));[.$I25];&quot;&quot;);&quot;&quot;)))">
            <text:p/>
          </table:table-cell>
          <table:table-cell table:style-name="ce340" table:formula="of:=IF([.$O24]=&quot;W&quot;; IF(NOT(ISBLANK([.J24])); [.J24]; &quot;&quot;); IF([.$O25]=&quot;W&quot;; IF(NOT(ISBLANK([.J25])); [.J25]; &quot;&quot;); &quot;&quot;))">
            <text:p/>
          </table:table-cell>
          <table:table-cell table:style-name="ce362" table:formula="of:=IF(AND(NOT(ISBLANK([.K24])); [.K24]=[.K25]); [.K24]; IF([.$O24]=&quot;W&quot;; IF(NOT(ISBLANK([.K24])); [.K24]; &quot;&quot;); IF([.$O25]=&quot;W&quot;; IF(NOT(ISBLANK([.K25])); [.K25]; &quot;&quot;); &quot;&quot;)))">
            <text:p/>
          </table:table-cell>
          <table:table-cell table:style-name="ce357" table:number-columns-repeated="3"/>
          <table:table-cell table:style-name="ce349" table:formula="of:=ISWINNERWOMEN([.T23:.V23]; [.T22:.V2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24:.F24]; [.D23:.F23])">
            <text:p/>
          </table:table-cell>
          <table:table-cell table:style-name="ce78"/>
          <table:table-cell table:style-name="ce351" table:formula="of:=IF(AND(NOT(ISBLANK([.A23])); [.A23]=[.A24]); [.A23]; IF([.$G23]=&quot;W&quot;; IF(NOT(ISBLANK([.A23])); [.A23]; &quot;&quot;); IF([.$G24]=&quot;W&quot;; IF(NOT(ISBLANK([.A24])); [.A24]; &quot;&quot;); &quot;&quot;)))">
            <text:p/>
          </table:table-cell>
          <table:table-cell table:style-name="ce339" table:formula="of:=IF([.$G23]=&quot;W&quot;; IF(NOT(ISBLANK([.B23])); [.B23]; &quot;&quot;); IF([.$G24]=&quot;W&quot;; IF(NOT(ISBLANK([.B24])); [.B24]; &quot;&quot;); &quot;&quot;))">
            <text:p/>
          </table:table-cell>
          <table:table-cell table:style-name="ce353" table:formula="of:=IF(AND(NOT(ISBLANK([.C23])); [.C23]=[.C24]); [.C23]; IF([.$G23]=&quot;W&quot;; IF(NOT(ISBLANK([.C23])); [.C23]; &quot;&quot;); IF([.$G24]=&quot;W&quot;; IF(NOT(ISBLANK([.C24])); [.C24]; &quot;&quot;); &quot;&quot;)))">
            <text:p/>
          </table:table-cell>
          <table:table-cell table:style-name="ce356" table:number-columns-repeated="3"/>
          <table:table-cell table:style-name="ce348" table:formula="of:=ISWINNERWOMEN([.L24:.N24]; [.L25:.N2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25:.F25]; [.D26:.F26])">
            <text:p/>
          </table:table-cell>
          <table:table-cell table:style-name="ce78"/>
          <table:table-cell table:style-name="ce352" table:formula="of:=IF(AND(NOT(ISBLANK([.A25])); [.A25]=[.A26]); [.A25]; IF([.$G25]=&quot;W&quot;; IF(NOT(ISBLANK([.A25])); [.A25]; &quot;&quot;); IF([.$G26]=&quot;W&quot;; IF(NOT(ISBLANK([.A26])); [.A26]; &quot;&quot;); &quot;&quot;)))">
            <text:p/>
          </table:table-cell>
          <table:table-cell table:style-name="ce340" table:formula="of:=IF([.$G25]=&quot;W&quot;; IF(NOT(ISBLANK([.B25])); [.B25]; &quot;&quot;); IF([.$G26]=&quot;W&quot;; IF(NOT(ISBLANK([.B26])); [.B26]; &quot;&quot;); &quot;&quot;))">
            <text:p/>
          </table:table-cell>
          <table:table-cell table:style-name="ce354" table:formula="of:=IF(AND(NOT(ISBLANK([.C25])); [.C25]=[.C26]); [.C25]; IF([.$G25]=&quot;W&quot;; IF(NOT(ISBLANK([.C25])); [.C25]; &quot;&quot;); IF([.$G26]=&quot;W&quot;; IF(NOT(ISBLANK([.C26])); [.C26]; &quot;&quot;); &quot;&quot;)))">
            <text:p/>
          </table:table-cell>
          <table:table-cell table:style-name="ce357" table:number-columns-repeated="3"/>
          <table:table-cell table:style-name="ce349" table:formula="of:=ISWINNERWOMEN([.L25:.N25]; [.L24:.N2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26:.F26]; [.D25:.F2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3" table:formula="of:=IF(AND(NOT(ISBLANK([.$Q22])); [.$Q22]=[.$Q23]); [.$Q22]; IF([.$W22]=&quot;W&quot;; IF(NOT(ISBLANK([.$Q22])); [.$Q22]; &quot;&quot;); IF([.$W23]=&quot;W&quot;; IF(NOT(ISBLANK([.$Q23])); [.$Q23]; &quot;&quot;); &quot;&quot;)))">
            <text:p/>
          </table:table-cell>
          <table:table-cell table:style-name="ce339" table:formula="of:=IF([.$W22]=&quot;W&quot;; IF(NOT(ISBLANK([.R22])); [.R22]; &quot;&quot;); IF([.$W23]=&quot;W&quot;; IF(NOT(ISBLANK([.R23])); [.R23]; &quot;&quot;); &quot;&quot;))">
            <text:p/>
          </table:table-cell>
          <table:table-cell table:style-name="ce365" table:formula="of:=IF(AND(NOT(ISBLANK([.S22])); [.S22]=[.S23]); [.S22]; IF([.$W22]=&quot;W&quot;; IF(NOT(ISBLANK([.S22])); [.S22]; &quot;&quot;); IF([.$W23]=&quot;W&quot;; IF(NOT(ISBLANK([.S23])); [.S23]; &quot;&quot;); &quot;&quot;)))">
            <text:p/>
          </table:table-cell>
          <table:table-cell table:style-name="ce356" table:formula="of:=IF(NOT(ISBLANK([Finals.D23])); [Finals.D23]; &quot;&quot;)">
            <text:p/>
          </table:table-cell>
          <table:table-cell table:style-name="ce356" table:formula="of:=IF(NOT(ISBLANK([Finals.E23])); [Finals.E23]; &quot;&quot;)">
            <text:p/>
          </table:table-cell>
          <table:table-cell table:style-name="ce356" table:formula="of:=IF(NOT(ISBLANK([Finals.F23])); [Finals.F23]; &quot;&quot;)">
            <text:p/>
          </table:table-cell>
          <table:table-cell table:style-name="ce348" table:formula="of:=IF(NOT(ISBLANK([Finals.I23])); [Finals.I23]; &quot;&quot;)"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27:.F27]; [.D28:.F2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4" table:formula="of:=IF(AND(NOT(ISBLANK([.$Q30])); [.$Q30]=[.$Q31]); [.$Q30]; IF([.$W30]=&quot;W&quot;; IF(NOT(ISBLANK([.$Q30])); [.$Q30]; &quot;&quot;); IF([.$W31]=&quot;W&quot;; IF(NOT(ISBLANK([.$Q31])); [.$Q31]; &quot;&quot;); &quot;&quot;)))">
            <text:p/>
          </table:table-cell>
          <table:table-cell table:style-name="ce340" table:formula="of:=IF([.$W30]=&quot;W&quot;; IF(NOT(ISBLANK([.R30])); [.R30]; &quot;&quot;); IF([.$W31]=&quot;W&quot;; IF(NOT(ISBLANK([.R31])); [.R31]; &quot;&quot;); &quot;&quot;))">
            <text:p/>
          </table:table-cell>
          <table:table-cell table:style-name="ce366" table:formula="of:=IF(AND(NOT(ISBLANK([.S30])); [.S30]=[.S31]); [.S30]; IF([.$W30]=&quot;W&quot;; IF(NOT(ISBLANK([.S30])); [.S30]; &quot;&quot;); IF([.$W31]=&quot;W&quot;; IF(NOT(ISBLANK([.S31])); [.S31]; &quot;&quot;); &quot;&quot;)))">
            <text:p/>
          </table:table-cell>
          <table:table-cell table:style-name="ce357" table:formula="of:=IF(NOT(ISBLANK([Finals.D24])); [Finals.D24]; &quot;&quot;)">
            <text:p/>
          </table:table-cell>
          <table:table-cell table:style-name="ce357" table:formula="of:=IF(NOT(ISBLANK([Finals.E24])); [Finals.E24]; &quot;&quot;)">
            <text:p/>
          </table:table-cell>
          <table:table-cell table:style-name="ce357" table:formula="of:=IF(NOT(ISBLANK([Finals.F24])); [Finals.F24]; &quot;&quot;)">
            <text:p/>
          </table:table-cell>
          <table:table-cell table:style-name="ce349" table:formula="of:=IF(NOT(ISBLANK([Finals.I24])); [Finals.I24]; &quot;&quot;)"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28:.F28]; [.D27:.F27])">
            <text:p/>
          </table:table-cell>
          <table:table-cell table:style-name="ce78"/>
          <table:table-cell table:style-name="ce351" table:formula="of:=IF(AND(NOT(ISBLANK([.A27])); [.A27]=[.A28]); [.A27]; IF([.$G27]=&quot;W&quot;; IF(NOT(ISBLANK([.A27])); [.A27]; &quot;&quot;); IF([.$G28]=&quot;W&quot;; IF(NOT(ISBLANK([.A28])); [.A28]; &quot;&quot;); &quot;&quot;)))">
            <text:p/>
          </table:table-cell>
          <table:table-cell table:style-name="ce339" table:formula="of:=IF([.$G27]=&quot;W&quot;; IF(NOT(ISBLANK([.B27])); [.B27]; &quot;&quot;); IF([.$G28]=&quot;W&quot;; IF(NOT(ISBLANK([.B28])); [.B28]; &quot;&quot;); &quot;&quot;))">
            <text:p/>
          </table:table-cell>
          <table:table-cell table:style-name="ce353" table:formula="of:=IF(AND(NOT(ISBLANK([.C27])); [.C27]=[.C28]); [.C27]; IF([.$G27]=&quot;W&quot;; IF(NOT(ISBLANK([.C27])); [.C27]; &quot;&quot;); IF([.$G28]=&quot;W&quot;; IF(NOT(ISBLANK([.C28])); [.C28]; &quot;&quot;); &quot;&quot;)))">
            <text:p/>
          </table:table-cell>
          <table:table-cell table:style-name="ce356" table:number-columns-repeated="3"/>
          <table:table-cell table:style-name="ce348" table:formula="of:=ISWINNERWOMEN([.L28:.N28]; [.L29:.N2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29:.F29]; [.D30:.F30])">
            <text:p/>
          </table:table-cell>
          <table:table-cell table:style-name="ce78"/>
          <table:table-cell table:style-name="ce352" table:formula="of:=IF(AND(NOT(ISBLANK([.A29])); [.A29]=[.A30]); [.A29]; IF([.$G29]=&quot;W&quot;; IF(NOT(ISBLANK([.A29])); [.A29]; &quot;&quot;); IF([.$G30]=&quot;W&quot;; IF(NOT(ISBLANK([.A30])); [.A30]; &quot;&quot;); &quot;&quot;)))">
            <text:p/>
          </table:table-cell>
          <table:table-cell table:style-name="ce340" table:formula="of:=IF([.$G29]=&quot;W&quot;; IF(NOT(ISBLANK([.B29])); [.B29]; &quot;&quot;); IF([.$G30]=&quot;W&quot;; IF(NOT(ISBLANK([.B30])); [.B30]; &quot;&quot;); &quot;&quot;))">
            <text:p/>
          </table:table-cell>
          <table:table-cell table:style-name="ce354" table:formula="of:=IF(AND(NOT(ISBLANK([.C29])); [.C29]=[.C30]); [.C29]; IF([.$G29]=&quot;W&quot;; IF(NOT(ISBLANK([.C29])); [.C29]; &quot;&quot;); IF([.$G30]=&quot;W&quot;; IF(NOT(ISBLANK([.C30])); [.C30]; &quot;&quot;); &quot;&quot;)))">
            <text:p/>
          </table:table-cell>
          <table:table-cell table:style-name="ce357" table:number-columns-repeated="3"/>
          <table:table-cell table:style-name="ce349" table:formula="of:=ISWINNERWOMEN([.L29:.N29]; [.L28:.N2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30:.F30]; [.D29:.F2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28]));[.$I28]=[.$I29]);[.$I28];IF([.$O28]=&quot;W&quot;;IF(NOT(ISBLANK([.$I28]));[.$I28];&quot;&quot;);IF([.$O29]=&quot;W&quot;;IF(NOT(ISBLANK([.$I29]));[.$I29];&quot;&quot;);&quot;&quot;)))">
            <text:p/>
          </table:table-cell>
          <table:table-cell table:style-name="ce339" table:formula="of:=IF([.$O28]=&quot;W&quot;; IF(NOT(ISBLANK([.J28])); [.J28]; &quot;&quot;); IF([.$O29]=&quot;W&quot;; IF(NOT(ISBLANK([.J29])); [.J29]; &quot;&quot;); &quot;&quot;))">
            <text:p/>
          </table:table-cell>
          <table:table-cell table:style-name="ce361" table:formula="of:=IF(AND(NOT(ISBLANK([.K28])); [.K28]=[.K29]); [.K28]; IF([.$O28]=&quot;W&quot;; IF(NOT(ISBLANK([.K28])); [.K28]; &quot;&quot;); IF([.$O29]=&quot;W&quot;; IF(NOT(ISBLANK([.K29])); [.K29]; &quot;&quot;); &quot;&quot;)))">
            <text:p/>
          </table:table-cell>
          <table:table-cell table:style-name="ce356" table:number-columns-repeated="3"/>
          <table:table-cell table:style-name="ce348" table:formula="of:=ISWINNERWOMEN([.T30:.V30]; [.T31:.V3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31:.F31]; [.D32:.F3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32]));[.$I32]=[.$I33]);[.$I32];IF([.$O32]=&quot;W&quot;;IF(NOT(ISBLANK([.$I32]));[.$I32];&quot;&quot;);IF([.$O33]=&quot;W&quot;;IF(NOT(ISBLANK([.$I33]));[.$I33];&quot;&quot;);&quot;&quot;)))">
            <text:p/>
          </table:table-cell>
          <table:table-cell table:style-name="ce340" table:formula="of:=IF([.$O32]=&quot;W&quot;; IF(NOT(ISBLANK([.J32])); [.J32]; &quot;&quot;); IF([.$O33]=&quot;W&quot;; IF(NOT(ISBLANK([.J33])); [.J33]; &quot;&quot;); &quot;&quot;))">
            <text:p/>
          </table:table-cell>
          <table:table-cell table:style-name="ce362" table:formula="of:=IF(AND(NOT(ISBLANK([.K32])); [.K32]=[.K33]); [.K32]; IF([.$O32]=&quot;W&quot;; IF(NOT(ISBLANK([.K32])); [.K32]; &quot;&quot;); IF([.$O33]=&quot;W&quot;; IF(NOT(ISBLANK([.K33])); [.K33]; &quot;&quot;); &quot;&quot;)))">
            <text:p/>
          </table:table-cell>
          <table:table-cell table:style-name="ce357" table:number-columns-repeated="3"/>
          <table:table-cell table:style-name="ce349" table:formula="of:=ISWINNERWOMEN([.T31:.V31]; [.T30:.V3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32:.F32]; [.D31:.F31])">
            <text:p/>
          </table:table-cell>
          <table:table-cell table:style-name="ce78"/>
          <table:table-cell table:style-name="ce351" table:formula="of:=IF(AND(NOT(ISBLANK([.A31])); [.A31]=[.A32]); [.A31]; IF([.$G31]=&quot;W&quot;; IF(NOT(ISBLANK([.A31])); [.A31]; &quot;&quot;); IF([.$G32]=&quot;W&quot;; IF(NOT(ISBLANK([.A32])); [.A32]; &quot;&quot;); &quot;&quot;)))">
            <text:p/>
          </table:table-cell>
          <table:table-cell table:style-name="ce339" table:formula="of:=IF([.$G31]=&quot;W&quot;; IF(NOT(ISBLANK([.B31])); [.B31]; &quot;&quot;); IF([.$G32]=&quot;W&quot;; IF(NOT(ISBLANK([.B32])); [.B32]; &quot;&quot;); &quot;&quot;))">
            <text:p/>
          </table:table-cell>
          <table:table-cell table:style-name="ce353" table:formula="of:=IF(AND(NOT(ISBLANK([.C31])); [.C31]=[.C32]); [.C31]; IF([.$G31]=&quot;W&quot;; IF(NOT(ISBLANK([.C31])); [.C31]; &quot;&quot;); IF([.$G32]=&quot;W&quot;; IF(NOT(ISBLANK([.C32])); [.C32]; &quot;&quot;); &quot;&quot;)))">
            <text:p/>
          </table:table-cell>
          <table:table-cell table:style-name="ce356" table:number-columns-repeated="3"/>
          <table:table-cell table:style-name="ce348" table:formula="of:=ISWINNERWOMEN([.L32:.N32]; [.L33:.N3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33:.F33]; [.D34:.F34])">
            <text:p/>
          </table:table-cell>
          <table:table-cell table:style-name="ce78"/>
          <table:table-cell table:style-name="ce352" table:formula="of:=IF(AND(NOT(ISBLANK([.A33])); [.A33]=[.A34]); [.A33]; IF([.$G33]=&quot;W&quot;; IF(NOT(ISBLANK([.A33])); [.A33]; &quot;&quot;); IF([.$G34]=&quot;W&quot;; IF(NOT(ISBLANK([.A34])); [.A34]; &quot;&quot;); &quot;&quot;)))">
            <text:p/>
          </table:table-cell>
          <table:table-cell table:style-name="ce340" table:formula="of:=IF([.$G33]=&quot;W&quot;; IF(NOT(ISBLANK([.B33])); [.B33]; &quot;&quot;); IF([.$G34]=&quot;W&quot;; IF(NOT(ISBLANK([.B34])); [.B34]; &quot;&quot;); &quot;&quot;))">
            <text:p/>
          </table:table-cell>
          <table:table-cell table:style-name="ce354" table:formula="of:=IF(AND(NOT(ISBLANK([.C33])); [.C33]=[.C34]); [.C33]; IF([.$G33]=&quot;W&quot;; IF(NOT(ISBLANK([.C33])); [.C33]; &quot;&quot;); IF([.$G34]=&quot;W&quot;; IF(NOT(ISBLANK([.C34])); [.C34]; &quot;&quot;); &quot;&quot;)))">
            <text:p/>
          </table:table-cell>
          <table:table-cell table:style-name="ce357" table:number-columns-repeated="3"/>
          <table:table-cell table:style-name="ce349" table:formula="of:=ISWINNERWOMEN([.L33:.N33]; [.L32:.N3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34:.F34]; [.D33:.F33])">
            <text:p/>
          </table:table-cell>
          <table:table-cell table:style-name="ce78">
            <draw:frame table:end-cell-address="FL.R36" table:end-x="0.0181in" table:end-y="0.0272in" draw:z-index="1" draw:style-name="gr1" draw:text-style-name="P1" svg:width="2.9248in" svg:height="0.2654in" draw:transform="rotate (1.5707963267949) translate (0.0078740157480315in 0.166929133858268in)">
              <draw:text-box>
                <text:p><text:span text:style-name="T1">Section 2</text:span></text:p>
              </draw:text-box>
            </draw:frame>
          </table:table-cell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96"/>
          <table:table-cell table:style-name="ce341"/>
          <table:table-cell table:style-name="ce105"/>
          <table:table-cell table:style-name="ce345" table:number-columns-repeated="3"/>
          <table:table-cell table:style-name="ce350" table:formula="of:=ISWINNERWOMEN([.D35:.F35]; [.D36:.F36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36:.F36]; [.D35:.F35])">
            <text:p/>
          </table:table-cell>
          <table:table-cell table:style-name="ce78"/>
          <table:table-cell table:style-name="ce351" table:formula="of:=IF(AND(NOT(ISBLANK([.A35])); [.A35]=[.A36]); [.A35]; IF([.$G35]=&quot;W&quot;; IF(NOT(ISBLANK([.A35])); [.A35]; &quot;&quot;); IF([.$G36]=&quot;W&quot;; IF(NOT(ISBLANK([.A36])); [.A36]; &quot;&quot;); &quot;&quot;)))">
            <text:p/>
          </table:table-cell>
          <table:table-cell table:style-name="ce339" table:formula="of:=IF([.$G35]=&quot;W&quot;; IF(NOT(ISBLANK([.B35])); [.B35]; &quot;&quot;); IF([.$G36]=&quot;W&quot;; IF(NOT(ISBLANK([.B36])); [.B36]; &quot;&quot;); &quot;&quot;))">
            <text:p/>
          </table:table-cell>
          <table:table-cell table:style-name="ce353" table:formula="of:=IF(AND(NOT(ISBLANK([.C35])); [.C35]=[.C36]); [.C35]; IF([.$G35]=&quot;W&quot;; IF(NOT(ISBLANK([.C35])); [.C35]; &quot;&quot;); IF([.$G36]=&quot;W&quot;; IF(NOT(ISBLANK([.C36])); [.C36]; &quot;&quot;); &quot;&quot;)))">
            <text:p/>
          </table:table-cell>
          <table:table-cell table:style-name="ce356" table:number-columns-repeated="3"/>
          <table:table-cell table:style-name="ce348" table:formula="of:=ISWINNERWOMEN([.L36:.N36]; [.L37:.N3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37:.F37]; [.D38:.F38])">
            <text:p/>
          </table:table-cell>
          <table:table-cell table:style-name="ce78"/>
          <table:table-cell table:style-name="ce352" table:formula="of:=IF(AND(NOT(ISBLANK([.A37])); [.A37]=[.A38]); [.A37]; IF([.$G37]=&quot;W&quot;; IF(NOT(ISBLANK([.A37])); [.A37]; &quot;&quot;); IF([.$G38]=&quot;W&quot;; IF(NOT(ISBLANK([.A38])); [.A38]; &quot;&quot;); &quot;&quot;)))">
            <text:p/>
          </table:table-cell>
          <table:table-cell table:style-name="ce340" table:formula="of:=IF([.$G37]=&quot;W&quot;; IF(NOT(ISBLANK([.B37])); [.B37]; &quot;&quot;); IF([.$G38]=&quot;W&quot;; IF(NOT(ISBLANK([.B38])); [.B38]; &quot;&quot;); &quot;&quot;))">
            <text:p/>
          </table:table-cell>
          <table:table-cell table:style-name="ce354" table:formula="of:=IF(AND(NOT(ISBLANK([.C37])); [.C37]=[.C38]); [.C37]; IF([.$G37]=&quot;W&quot;; IF(NOT(ISBLANK([.C37])); [.C37]; &quot;&quot;); IF([.$G38]=&quot;W&quot;; IF(NOT(ISBLANK([.C38])); [.C38]; &quot;&quot;); &quot;&quot;)))">
            <text:p/>
          </table:table-cell>
          <table:table-cell table:style-name="ce357" table:number-columns-repeated="3"/>
          <table:table-cell table:style-name="ce349" table:formula="of:=ISWINNERWOMEN([.L37:.N37]; [.L36:.N3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38:.F38]; [.D37:.F37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36]));[.$I36]=[.$I37]);[.$I36];IF([.$O36]=&quot;W&quot;;IF(NOT(ISBLANK([.$I36]));[.$I36];&quot;&quot;);IF([.$O37]=&quot;W&quot;;IF(NOT(ISBLANK([.$I37]));[.$I37];&quot;&quot;);&quot;&quot;)))">
            <text:p/>
          </table:table-cell>
          <table:table-cell table:style-name="ce339" table:formula="of:=IF([.$O36]=&quot;W&quot;; IF(NOT(ISBLANK([.J36])); [.J36]; &quot;&quot;); IF([.$O37]=&quot;W&quot;; IF(NOT(ISBLANK([.J37])); [.J37]; &quot;&quot;); &quot;&quot;))">
            <text:p/>
          </table:table-cell>
          <table:table-cell table:style-name="ce361" table:formula="of:=IF(AND(NOT(ISBLANK([.K36])); [.K36]=[.K37]); [.K36]; IF([.$O36]=&quot;W&quot;; IF(NOT(ISBLANK([.K36])); [.K36]; &quot;&quot;); IF([.$O37]=&quot;W&quot;; IF(NOT(ISBLANK([.K37])); [.K37]; &quot;&quot;); &quot;&quot;)))">
            <text:p/>
          </table:table-cell>
          <table:table-cell table:style-name="ce356" table:number-columns-repeated="3"/>
          <table:table-cell table:style-name="ce348" table:formula="of:=ISWINNERWOMEN([.T38:.V38]; [.T39:.V3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39:.F39]; [.D40:.F40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40]));[.$I40]=[.$I41]);[.$I40];IF([.$O40]=&quot;W&quot;;IF(NOT(ISBLANK([.$I40]));[.$I40];&quot;&quot;);IF([.$O41]=&quot;W&quot;;IF(NOT(ISBLANK([.$I41]));[.$I41];&quot;&quot;);&quot;&quot;)))">
            <text:p/>
          </table:table-cell>
          <table:table-cell table:style-name="ce340" table:formula="of:=IF([.$O40]=&quot;W&quot;; IF(NOT(ISBLANK([.J40])); [.J40]; &quot;&quot;); IF([.$O41]=&quot;W&quot;; IF(NOT(ISBLANK([.J41])); [.J41]; &quot;&quot;); &quot;&quot;))">
            <text:p/>
          </table:table-cell>
          <table:table-cell table:style-name="ce362" table:formula="of:=IF(AND(NOT(ISBLANK([.K40])); [.K40]=[.K41]); [.K40]; IF([.$O40]=&quot;W&quot;; IF(NOT(ISBLANK([.K40])); [.K40]; &quot;&quot;); IF([.$O41]=&quot;W&quot;; IF(NOT(ISBLANK([.K41])); [.K41]; &quot;&quot;); &quot;&quot;)))">
            <text:p/>
          </table:table-cell>
          <table:table-cell table:style-name="ce357" table:number-columns-repeated="3"/>
          <table:table-cell table:style-name="ce349" table:formula="of:=ISWINNERWOMEN([.T39:.V39]; [.T38:.V3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40:.F40]; [.D39:.F39])">
            <text:p/>
          </table:table-cell>
          <table:table-cell table:style-name="ce78"/>
          <table:table-cell table:style-name="ce351" table:formula="of:=IF(AND(NOT(ISBLANK([.A39])); [.A39]=[.A40]); [.A39]; IF([.$G39]=&quot;W&quot;; IF(NOT(ISBLANK([.A39])); [.A39]; &quot;&quot;); IF([.$G40]=&quot;W&quot;; IF(NOT(ISBLANK([.A40])); [.A40]; &quot;&quot;); &quot;&quot;)))">
            <text:p/>
          </table:table-cell>
          <table:table-cell table:style-name="ce339" table:formula="of:=IF([.$G39]=&quot;W&quot;; IF(NOT(ISBLANK([.B39])); [.B39]; &quot;&quot;); IF([.$G40]=&quot;W&quot;; IF(NOT(ISBLANK([.B40])); [.B40]; &quot;&quot;); &quot;&quot;))">
            <text:p/>
          </table:table-cell>
          <table:table-cell table:style-name="ce353" table:formula="of:=IF(AND(NOT(ISBLANK([.C39])); [.C39]=[.C40]); [.C39]; IF([.$G39]=&quot;W&quot;; IF(NOT(ISBLANK([.C39])); [.C39]; &quot;&quot;); IF([.$G40]=&quot;W&quot;; IF(NOT(ISBLANK([.C40])); [.C40]; &quot;&quot;); &quot;&quot;)))">
            <text:p/>
          </table:table-cell>
          <table:table-cell table:style-name="ce356" table:number-columns-repeated="3"/>
          <table:table-cell table:style-name="ce348" table:formula="of:=ISWINNERWOMEN([.L40:.N40]; [.L41:.N4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41:.F41]; [.D42:.F42])">
            <text:p/>
          </table:table-cell>
          <table:table-cell table:style-name="ce78"/>
          <table:table-cell table:style-name="ce352" table:formula="of:=IF(AND(NOT(ISBLANK([.A41])); [.A41]=[.A42]); [.A41]; IF([.$G41]=&quot;W&quot;; IF(NOT(ISBLANK([.A41])); [.A41]; &quot;&quot;); IF([.$G42]=&quot;W&quot;; IF(NOT(ISBLANK([.A42])); [.A42]; &quot;&quot;); &quot;&quot;)))">
            <text:p/>
          </table:table-cell>
          <table:table-cell table:style-name="ce340" table:formula="of:=IF([.$G41]=&quot;W&quot;; IF(NOT(ISBLANK([.B41])); [.B41]; &quot;&quot;); IF([.$G42]=&quot;W&quot;; IF(NOT(ISBLANK([.B42])); [.B42]; &quot;&quot;); &quot;&quot;))">
            <text:p/>
          </table:table-cell>
          <table:table-cell table:style-name="ce354" table:formula="of:=IF(AND(NOT(ISBLANK([.C41])); [.C41]=[.C42]); [.C41]; IF([.$G41]=&quot;W&quot;; IF(NOT(ISBLANK([.C41])); [.C41]; &quot;&quot;); IF([.$G42]=&quot;W&quot;; IF(NOT(ISBLANK([.C42])); [.C42]; &quot;&quot;); &quot;&quot;)))">
            <text:p/>
          </table:table-cell>
          <table:table-cell table:style-name="ce357" table:number-columns-repeated="3"/>
          <table:table-cell table:style-name="ce349" table:formula="of:=ISWINNERWOMEN([.L41:.N41]; [.L40:.N4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42:.F42]; [.D41:.F4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3" table:formula="of:=IF(AND(NOT(ISBLANK([.$Q38])); [.$Q38]=[.$Q39]); [.$Q38]; IF([.$W38]=&quot;W&quot;; IF(NOT(ISBLANK([.$Q38])); [.$Q38]; &quot;&quot;); IF([.$W39]=&quot;W&quot;; IF(NOT(ISBLANK([.$Q39])); [.$Q39]; &quot;&quot;); &quot;&quot;)))">
            <text:p/>
          </table:table-cell>
          <table:table-cell table:style-name="ce339" table:formula="of:=IF([.$W38]=&quot;W&quot;; IF(NOT(ISBLANK([.R38])); [.R38]; &quot;&quot;); IF([.$W39]=&quot;W&quot;; IF(NOT(ISBLANK([.R39])); [.R39]; &quot;&quot;); &quot;&quot;))">
            <text:p/>
          </table:table-cell>
          <table:table-cell table:style-name="ce365" table:formula="of:=IF(AND(NOT(ISBLANK([.S38])); [.S38]=[.S39]); [.S38]; IF([.$W38]=&quot;W&quot;; IF(NOT(ISBLANK([.S38])); [.S38]; &quot;&quot;); IF([.$W39]=&quot;W&quot;; IF(NOT(ISBLANK([.S39])); [.S39]; &quot;&quot;); &quot;&quot;)))">
            <text:p/>
          </table:table-cell>
          <table:table-cell table:style-name="ce356" table:formula="of:=IF(NOT(ISBLANK([Finals.D25])); [Finals.D25]; &quot;&quot;)">
            <text:p/>
          </table:table-cell>
          <table:table-cell table:style-name="ce356" table:formula="of:=IF(NOT(ISBLANK([Finals.E25])); [Finals.E25]; &quot;&quot;)">
            <text:p/>
          </table:table-cell>
          <table:table-cell table:style-name="ce356" table:formula="of:=IF(NOT(ISBLANK([Finals.F25])); [Finals.F25]; &quot;&quot;)">
            <text:p/>
          </table:table-cell>
          <table:table-cell table:style-name="ce348" table:formula="of:=IF(NOT(ISBLANK([Finals.I25])); [Finals.I25]; &quot;&quot;)"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43:.F43]; [.D44:.F4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4" table:formula="of:=IF(AND(NOT(ISBLANK([.$Q46])); [.$Q46]=[.$Q47]); [.$Q46]; IF([.$W46]=&quot;W&quot;; IF(NOT(ISBLANK([.$Q46])); [.$Q46]; &quot;&quot;); IF([.$W47]=&quot;W&quot;; IF(NOT(ISBLANK([.$Q47])); [.$Q47]; &quot;&quot;); &quot;&quot;)))">
            <text:p/>
          </table:table-cell>
          <table:table-cell table:style-name="ce340" table:formula="of:=IF([.$W46]=&quot;W&quot;; IF(NOT(ISBLANK([.R46])); [.R46]; &quot;&quot;); IF([.$W47]=&quot;W&quot;; IF(NOT(ISBLANK([.R47])); [.R47]; &quot;&quot;); &quot;&quot;))">
            <text:p/>
          </table:table-cell>
          <table:table-cell table:style-name="ce366" table:formula="of:=IF(AND(NOT(ISBLANK([.S46])); [.S46]=[.S47]); [.S46]; IF([.$W46]=&quot;W&quot;; IF(NOT(ISBLANK([.S46])); [.S46]; &quot;&quot;); IF([.$W47]=&quot;W&quot;; IF(NOT(ISBLANK([.S47])); [.S47]; &quot;&quot;); &quot;&quot;)))">
            <text:p/>
          </table:table-cell>
          <table:table-cell table:style-name="ce357" table:formula="of:=IF(NOT(ISBLANK([Finals.D26])); [Finals.D26]; &quot;&quot;)">
            <text:p/>
          </table:table-cell>
          <table:table-cell table:style-name="ce357" table:formula="of:=IF(NOT(ISBLANK([Finals.E26])); [Finals.E26]; &quot;&quot;)">
            <text:p/>
          </table:table-cell>
          <table:table-cell table:style-name="ce357" table:formula="of:=IF(NOT(ISBLANK([Finals.F26])); [Finals.F26]; &quot;&quot;)">
            <text:p/>
          </table:table-cell>
          <table:table-cell table:style-name="ce349" table:formula="of:=IF(NOT(ISBLANK([Finals.I26])); [Finals.I26]; &quot;&quot;)"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44:.F44]; [.D43:.F43])">
            <text:p/>
          </table:table-cell>
          <table:table-cell table:style-name="ce78"/>
          <table:table-cell table:style-name="ce351" table:formula="of:=IF(AND(NOT(ISBLANK([.A43])); [.A43]=[.A44]); [.A43]; IF([.$G43]=&quot;W&quot;; IF(NOT(ISBLANK([.A43])); [.A43]; &quot;&quot;); IF([.$G44]=&quot;W&quot;; IF(NOT(ISBLANK([.A44])); [.A44]; &quot;&quot;); &quot;&quot;)))">
            <text:p/>
          </table:table-cell>
          <table:table-cell table:style-name="ce339" table:formula="of:=IF([.$G43]=&quot;W&quot;; IF(NOT(ISBLANK([.B43])); [.B43]; &quot;&quot;); IF([.$G44]=&quot;W&quot;; IF(NOT(ISBLANK([.B44])); [.B44]; &quot;&quot;); &quot;&quot;))">
            <text:p/>
          </table:table-cell>
          <table:table-cell table:style-name="ce353" table:formula="of:=IF(AND(NOT(ISBLANK([.C43])); [.C43]=[.C44]); [.C43]; IF([.$G43]=&quot;W&quot;; IF(NOT(ISBLANK([.C43])); [.C43]; &quot;&quot;); IF([.$G44]=&quot;W&quot;; IF(NOT(ISBLANK([.C44])); [.C44]; &quot;&quot;); &quot;&quot;)))">
            <text:p/>
          </table:table-cell>
          <table:table-cell table:style-name="ce356" table:number-columns-repeated="3"/>
          <table:table-cell table:style-name="ce348" table:formula="of:=ISWINNERWOMEN([.L44:.N44]; [.L45:.N4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45:.F45]; [.D46:.F46])">
            <text:p/>
          </table:table-cell>
          <table:table-cell table:style-name="ce78"/>
          <table:table-cell table:style-name="ce352" table:formula="of:=IF(AND(NOT(ISBLANK([.A45])); [.A45]=[.A46]); [.A45]; IF([.$G45]=&quot;W&quot;; IF(NOT(ISBLANK([.A45])); [.A45]; &quot;&quot;); IF([.$G46]=&quot;W&quot;; IF(NOT(ISBLANK([.A46])); [.A46]; &quot;&quot;); &quot;&quot;)))">
            <text:p/>
          </table:table-cell>
          <table:table-cell table:style-name="ce340" table:formula="of:=IF([.$G45]=&quot;W&quot;; IF(NOT(ISBLANK([.B45])); [.B45]; &quot;&quot;); IF([.$G46]=&quot;W&quot;; IF(NOT(ISBLANK([.B46])); [.B46]; &quot;&quot;); &quot;&quot;))">
            <text:p/>
          </table:table-cell>
          <table:table-cell table:style-name="ce354" table:formula="of:=IF(AND(NOT(ISBLANK([.C45])); [.C45]=[.C46]); [.C45]; IF([.$G45]=&quot;W&quot;; IF(NOT(ISBLANK([.C45])); [.C45]; &quot;&quot;); IF([.$G46]=&quot;W&quot;; IF(NOT(ISBLANK([.C46])); [.C46]; &quot;&quot;); &quot;&quot;)))">
            <text:p/>
          </table:table-cell>
          <table:table-cell table:style-name="ce357" table:number-columns-repeated="3"/>
          <table:table-cell table:style-name="ce349" table:formula="of:=ISWINNERWOMEN([.L45:.N45]; [.L44:.N4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46:.F46]; [.D45:.F4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44]));[.$I44]=[.$I45]);[.$I44];IF([.$O44]=&quot;W&quot;;IF(NOT(ISBLANK([.$I44]));[.$I44];&quot;&quot;);IF([.$O45]=&quot;W&quot;;IF(NOT(ISBLANK([.$I45]));[.$I45];&quot;&quot;);&quot;&quot;)))">
            <text:p/>
          </table:table-cell>
          <table:table-cell table:style-name="ce339" table:formula="of:=IF([.$O44]=&quot;W&quot;; IF(NOT(ISBLANK([.J44])); [.J44]; &quot;&quot;); IF([.$O45]=&quot;W&quot;; IF(NOT(ISBLANK([.J45])); [.J45]; &quot;&quot;); &quot;&quot;))">
            <text:p/>
          </table:table-cell>
          <table:table-cell table:style-name="ce361" table:formula="of:=IF(AND(NOT(ISBLANK([.K44])); [.K44]=[.K45]); [.K44]; IF([.$O44]=&quot;W&quot;; IF(NOT(ISBLANK([.K44])); [.K44]; &quot;&quot;); IF([.$O45]=&quot;W&quot;; IF(NOT(ISBLANK([.K45])); [.K45]; &quot;&quot;); &quot;&quot;)))">
            <text:p/>
          </table:table-cell>
          <table:table-cell table:style-name="ce356" table:number-columns-repeated="3"/>
          <table:table-cell table:style-name="ce348" table:formula="of:=ISWINNERWOMEN([.T46:.V46]; [.T47:.V4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47:.F47]; [.D48:.F4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48]));[.$I48]=[.$I49]);[.$I48];IF([.$O48]=&quot;W&quot;;IF(NOT(ISBLANK([.$I48]));[.$I48];&quot;&quot;);IF([.$O49]=&quot;W&quot;;IF(NOT(ISBLANK([.$I49]));[.$I49];&quot;&quot;);&quot;&quot;)))">
            <text:p/>
          </table:table-cell>
          <table:table-cell table:style-name="ce340" table:formula="of:=IF([.$O48]=&quot;W&quot;; IF(NOT(ISBLANK([.J48])); [.J48]; &quot;&quot;); IF([.$O49]=&quot;W&quot;; IF(NOT(ISBLANK([.J49])); [.J49]; &quot;&quot;); &quot;&quot;))">
            <text:p/>
          </table:table-cell>
          <table:table-cell table:style-name="ce362" table:formula="of:=IF(AND(NOT(ISBLANK([.K48])); [.K48]=[.K49]); [.K48]; IF([.$O48]=&quot;W&quot;; IF(NOT(ISBLANK([.K48])); [.K48]; &quot;&quot;); IF([.$O49]=&quot;W&quot;; IF(NOT(ISBLANK([.K49])); [.K49]; &quot;&quot;); &quot;&quot;)))">
            <text:p/>
          </table:table-cell>
          <table:table-cell table:style-name="ce357" table:number-columns-repeated="3"/>
          <table:table-cell table:style-name="ce349" table:formula="of:=ISWINNERWOMEN([.T47:.V47]; [.T46:.V4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48:.F48]; [.D47:.F47])">
            <text:p/>
          </table:table-cell>
          <table:table-cell table:style-name="ce78"/>
          <table:table-cell table:style-name="ce351" table:formula="of:=IF(AND(NOT(ISBLANK([.A47])); [.A47]=[.A48]); [.A47]; IF([.$G47]=&quot;W&quot;; IF(NOT(ISBLANK([.A47])); [.A47]; &quot;&quot;); IF([.$G48]=&quot;W&quot;; IF(NOT(ISBLANK([.A48])); [.A48]; &quot;&quot;); &quot;&quot;)))">
            <text:p/>
          </table:table-cell>
          <table:table-cell table:style-name="ce339" table:formula="of:=IF([.$G47]=&quot;W&quot;; IF(NOT(ISBLANK([.B47])); [.B47]; &quot;&quot;); IF([.$G48]=&quot;W&quot;; IF(NOT(ISBLANK([.B48])); [.B48]; &quot;&quot;); &quot;&quot;))">
            <text:p/>
          </table:table-cell>
          <table:table-cell table:style-name="ce353" table:formula="of:=IF(AND(NOT(ISBLANK([.C47])); [.C47]=[.C48]); [.C47]; IF([.$G47]=&quot;W&quot;; IF(NOT(ISBLANK([.C47])); [.C47]; &quot;&quot;); IF([.$G48]=&quot;W&quot;; IF(NOT(ISBLANK([.C48])); [.C48]; &quot;&quot;); &quot;&quot;)))">
            <text:p/>
          </table:table-cell>
          <table:table-cell table:style-name="ce356" table:number-columns-repeated="3"/>
          <table:table-cell table:style-name="ce348" table:formula="of:=ISWINNERWOMEN([.L48:.N48]; [.L49:.N4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49:.F49]; [.D50:.F50])">
            <text:p/>
          </table:table-cell>
          <table:table-cell table:style-name="ce78"/>
          <table:table-cell table:style-name="ce352" table:formula="of:=IF(AND(NOT(ISBLANK([.A49])); [.A49]=[.A50]); [.A49]; IF([.$G49]=&quot;W&quot;; IF(NOT(ISBLANK([.A49])); [.A49]; &quot;&quot;); IF([.$G50]=&quot;W&quot;; IF(NOT(ISBLANK([.A50])); [.A50]; &quot;&quot;); &quot;&quot;)))">
            <text:p/>
          </table:table-cell>
          <table:table-cell table:style-name="ce340" table:formula="of:=IF([.$G49]=&quot;W&quot;; IF(NOT(ISBLANK([.B49])); [.B49]; &quot;&quot;); IF([.$G50]=&quot;W&quot;; IF(NOT(ISBLANK([.B50])); [.B50]; &quot;&quot;); &quot;&quot;))">
            <text:p/>
          </table:table-cell>
          <table:table-cell table:style-name="ce354" table:formula="of:=IF(AND(NOT(ISBLANK([.C49])); [.C49]=[.C50]); [.C49]; IF([.$G49]=&quot;W&quot;; IF(NOT(ISBLANK([.C49])); [.C49]; &quot;&quot;); IF([.$G50]=&quot;W&quot;; IF(NOT(ISBLANK([.C50])); [.C50]; &quot;&quot;); &quot;&quot;)))">
            <text:p/>
          </table:table-cell>
          <table:table-cell table:style-name="ce357" table:number-columns-repeated="3"/>
          <table:table-cell table:style-name="ce349" table:formula="of:=ISWINNERWOMEN([.L49:.N49]; [.L48:.N4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50:.F50]; [.D49:.F49])">
            <text:p/>
          </table:table-cell>
          <table:table-cell table:style-name="ce78">
            <draw:frame table:end-cell-address="FL.R52" table:end-x="0.0181in" table:end-y="0.0268in" draw:z-index="2" draw:style-name="gr1" draw:text-style-name="P1" svg:width="2.9248in" svg:height="0.2654in" draw:transform="rotate (1.5707963267949) translate (0.0078740157480315in 0.166535433070866in)">
              <draw:text-box>
                <text:p><text:span text:style-name="T1">Section 3</text:span></text:p>
              </draw:text-box>
            </draw:frame>
          </table:table-cell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96"/>
          <table:table-cell table:style-name="ce341"/>
          <table:table-cell table:style-name="ce105"/>
          <table:table-cell table:style-name="ce345" table:number-columns-repeated="3"/>
          <table:table-cell table:style-name="ce350" table:formula="of:=ISWINNERWOMEN([.D51:.F51]; [.D52:.F52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52:.F52]; [.D51:.F51])">
            <text:p/>
          </table:table-cell>
          <table:table-cell table:style-name="ce78"/>
          <table:table-cell table:style-name="ce351" table:formula="of:=IF(AND(NOT(ISBLANK([.A51])); [.A51]=[.A52]); [.A51]; IF([.$G51]=&quot;W&quot;; IF(NOT(ISBLANK([.A51])); [.A51]; &quot;&quot;); IF([.$G52]=&quot;W&quot;; IF(NOT(ISBLANK([.A52])); [.A52]; &quot;&quot;); &quot;&quot;)))">
            <text:p/>
          </table:table-cell>
          <table:table-cell table:style-name="ce339" table:formula="of:=IF([.$G51]=&quot;W&quot;; IF(NOT(ISBLANK([.B51])); [.B51]; &quot;&quot;); IF([.$G52]=&quot;W&quot;; IF(NOT(ISBLANK([.B52])); [.B52]; &quot;&quot;); &quot;&quot;))">
            <text:p/>
          </table:table-cell>
          <table:table-cell table:style-name="ce353" table:formula="of:=IF(AND(NOT(ISBLANK([.C51])); [.C51]=[.C52]); [.C51]; IF([.$G51]=&quot;W&quot;; IF(NOT(ISBLANK([.C51])); [.C51]; &quot;&quot;); IF([.$G52]=&quot;W&quot;; IF(NOT(ISBLANK([.C52])); [.C52]; &quot;&quot;); &quot;&quot;)))">
            <text:p/>
          </table:table-cell>
          <table:table-cell table:style-name="ce356" table:number-columns-repeated="3"/>
          <table:table-cell table:style-name="ce348" table:formula="of:=ISWINNERWOMEN([.L52:.N52]; [.L53:.N5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53:.F53]; [.D54:.F54])">
            <text:p/>
          </table:table-cell>
          <table:table-cell table:style-name="ce78"/>
          <table:table-cell table:style-name="ce352" table:formula="of:=IF(AND(NOT(ISBLANK([.A53])); [.A53]=[.A54]); [.A53]; IF([.$G53]=&quot;W&quot;; IF(NOT(ISBLANK([.A53])); [.A53]; &quot;&quot;); IF([.$G54]=&quot;W&quot;; IF(NOT(ISBLANK([.A54])); [.A54]; &quot;&quot;); &quot;&quot;)))">
            <text:p/>
          </table:table-cell>
          <table:table-cell table:style-name="ce340" table:formula="of:=IF([.$G53]=&quot;W&quot;; IF(NOT(ISBLANK([.B53])); [.B53]; &quot;&quot;); IF([.$G54]=&quot;W&quot;; IF(NOT(ISBLANK([.B54])); [.B54]; &quot;&quot;); &quot;&quot;))">
            <text:p/>
          </table:table-cell>
          <table:table-cell table:style-name="ce354" table:formula="of:=IF(AND(NOT(ISBLANK([.C53])); [.C53]=[.C54]); [.C53]; IF([.$G53]=&quot;W&quot;; IF(NOT(ISBLANK([.C53])); [.C53]; &quot;&quot;); IF([.$G54]=&quot;W&quot;; IF(NOT(ISBLANK([.C54])); [.C54]; &quot;&quot;); &quot;&quot;)))">
            <text:p/>
          </table:table-cell>
          <table:table-cell table:style-name="ce357" table:number-columns-repeated="3"/>
          <table:table-cell table:style-name="ce349" table:formula="of:=ISWINNERWOMEN([.L53:.N53]; [.L52:.N5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54:.F54]; [.D53:.F53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52]));[.$I52]=[.$I53]);[.$I52];IF([.$O52]=&quot;W&quot;;IF(NOT(ISBLANK([.$I52]));[.$I52];&quot;&quot;);IF([.$O53]=&quot;W&quot;;IF(NOT(ISBLANK([.$I53]));[.$I53];&quot;&quot;);&quot;&quot;)))">
            <text:p/>
          </table:table-cell>
          <table:table-cell table:style-name="ce339" table:formula="of:=IF([.$O52]=&quot;W&quot;; IF(NOT(ISBLANK([.J52])); [.J52]; &quot;&quot;); IF([.$O53]=&quot;W&quot;; IF(NOT(ISBLANK([.J53])); [.J53]; &quot;&quot;); &quot;&quot;))">
            <text:p/>
          </table:table-cell>
          <table:table-cell table:style-name="ce361" table:formula="of:=IF(AND(NOT(ISBLANK([.K52])); [.K52]=[.K53]); [.K52]; IF([.$O52]=&quot;W&quot;; IF(NOT(ISBLANK([.K52])); [.K52]; &quot;&quot;); IF([.$O53]=&quot;W&quot;; IF(NOT(ISBLANK([.K53])); [.K53]; &quot;&quot;); &quot;&quot;)))">
            <text:p/>
          </table:table-cell>
          <table:table-cell table:style-name="ce356" table:number-columns-repeated="3"/>
          <table:table-cell table:style-name="ce348" table:formula="of:=ISWINNERWOMEN([.T54:.V54]; [.T55:.V5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55:.F55]; [.D56:.F56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56]));[.$I56]=[.$I57]);[.$I56];IF([.$O56]=&quot;W&quot;;IF(NOT(ISBLANK([.$I56]));[.$I56];&quot;&quot;);IF([.$O57]=&quot;W&quot;;IF(NOT(ISBLANK([.$I57]));[.$I57];&quot;&quot;);&quot;&quot;)))">
            <text:p/>
          </table:table-cell>
          <table:table-cell table:style-name="ce340" table:formula="of:=IF([.$O56]=&quot;W&quot;; IF(NOT(ISBLANK([.J56])); [.J56]; &quot;&quot;); IF([.$O57]=&quot;W&quot;; IF(NOT(ISBLANK([.J57])); [.J57]; &quot;&quot;); &quot;&quot;))">
            <text:p/>
          </table:table-cell>
          <table:table-cell table:style-name="ce362" table:formula="of:=IF(AND(NOT(ISBLANK([.K56])); [.K56]=[.K57]); [.K56]; IF([.$O56]=&quot;W&quot;; IF(NOT(ISBLANK([.K56])); [.K56]; &quot;&quot;); IF([.$O57]=&quot;W&quot;; IF(NOT(ISBLANK([.K57])); [.K57]; &quot;&quot;); &quot;&quot;)))">
            <text:p/>
          </table:table-cell>
          <table:table-cell table:style-name="ce357" table:number-columns-repeated="3"/>
          <table:table-cell table:style-name="ce349" table:formula="of:=ISWINNERWOMEN([.T55:.V55]; [.T54:.V5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56:.F56]; [.D55:.F55])">
            <text:p/>
          </table:table-cell>
          <table:table-cell table:style-name="ce78"/>
          <table:table-cell table:style-name="ce351" table:formula="of:=IF(AND(NOT(ISBLANK([.A55])); [.A55]=[.A56]); [.A55]; IF([.$G55]=&quot;W&quot;; IF(NOT(ISBLANK([.A55])); [.A55]; &quot;&quot;); IF([.$G56]=&quot;W&quot;; IF(NOT(ISBLANK([.A56])); [.A56]; &quot;&quot;); &quot;&quot;)))">
            <text:p/>
          </table:table-cell>
          <table:table-cell table:style-name="ce339" table:formula="of:=IF([.$G55]=&quot;W&quot;; IF(NOT(ISBLANK([.B55])); [.B55]; &quot;&quot;); IF([.$G56]=&quot;W&quot;; IF(NOT(ISBLANK([.B56])); [.B56]; &quot;&quot;); &quot;&quot;))">
            <text:p/>
          </table:table-cell>
          <table:table-cell table:style-name="ce353" table:formula="of:=IF(AND(NOT(ISBLANK([.C55])); [.C55]=[.C56]); [.C55]; IF([.$G55]=&quot;W&quot;; IF(NOT(ISBLANK([.C55])); [.C55]; &quot;&quot;); IF([.$G56]=&quot;W&quot;; IF(NOT(ISBLANK([.C56])); [.C56]; &quot;&quot;); &quot;&quot;)))">
            <text:p/>
          </table:table-cell>
          <table:table-cell table:style-name="ce356" table:number-columns-repeated="3"/>
          <table:table-cell table:style-name="ce348" table:formula="of:=ISWINNERWOMEN([.L56:.N56]; [.L57:.N5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57:.F57]; [.D58:.F58])">
            <text:p/>
          </table:table-cell>
          <table:table-cell table:style-name="ce78"/>
          <table:table-cell table:style-name="ce352" table:formula="of:=IF(AND(NOT(ISBLANK([.A57])); [.A57]=[.A58]); [.A57]; IF([.$G57]=&quot;W&quot;; IF(NOT(ISBLANK([.A57])); [.A57]; &quot;&quot;); IF([.$G58]=&quot;W&quot;; IF(NOT(ISBLANK([.A58])); [.A58]; &quot;&quot;); &quot;&quot;)))">
            <text:p/>
          </table:table-cell>
          <table:table-cell table:style-name="ce340" table:formula="of:=IF([.$G57]=&quot;W&quot;; IF(NOT(ISBLANK([.B57])); [.B57]; &quot;&quot;); IF([.$G58]=&quot;W&quot;; IF(NOT(ISBLANK([.B58])); [.B58]; &quot;&quot;); &quot;&quot;))">
            <text:p/>
          </table:table-cell>
          <table:table-cell table:style-name="ce354" table:formula="of:=IF(AND(NOT(ISBLANK([.C57])); [.C57]=[.C58]); [.C57]; IF([.$G57]=&quot;W&quot;; IF(NOT(ISBLANK([.C57])); [.C57]; &quot;&quot;); IF([.$G58]=&quot;W&quot;; IF(NOT(ISBLANK([.C58])); [.C58]; &quot;&quot;); &quot;&quot;)))">
            <text:p/>
          </table:table-cell>
          <table:table-cell table:style-name="ce357" table:number-columns-repeated="3"/>
          <table:table-cell table:style-name="ce349" table:formula="of:=ISWINNERWOMEN([.L57:.N57]; [.L56:.N5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58:.F58]; [.D57:.F57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3" table:formula="of:=IF(AND(NOT(ISBLANK([.$Q54])); [.$Q54]=[.$Q55]); [.$Q54]; IF([.$W54]=&quot;W&quot;; IF(NOT(ISBLANK([.$Q54])); [.$Q54]; &quot;&quot;); IF([.$W55]=&quot;W&quot;; IF(NOT(ISBLANK([.$Q55])); [.$Q55]; &quot;&quot;); &quot;&quot;)))">
            <text:p/>
          </table:table-cell>
          <table:table-cell table:style-name="ce339" table:formula="of:=IF([.$W54]=&quot;W&quot;; IF(NOT(ISBLANK([.R54])); [.R54]; &quot;&quot;); IF([.$W55]=&quot;W&quot;; IF(NOT(ISBLANK([.R55])); [.R55]; &quot;&quot;); &quot;&quot;))">
            <text:p/>
          </table:table-cell>
          <table:table-cell table:style-name="ce365" table:formula="of:=IF(AND(NOT(ISBLANK([.S54])); [.S54]=[.S55]); [.S54]; IF([.$W54]=&quot;W&quot;; IF(NOT(ISBLANK([.S54])); [.S54]; &quot;&quot;); IF([.$W55]=&quot;W&quot;; IF(NOT(ISBLANK([.S55])); [.S55]; &quot;&quot;); &quot;&quot;)))">
            <text:p/>
          </table:table-cell>
          <table:table-cell table:style-name="ce356" table:formula="of:=IF(NOT(ISBLANK([Finals.D27])); [Finals.D27]; &quot;&quot;)">
            <text:p/>
          </table:table-cell>
          <table:table-cell table:style-name="ce356" table:formula="of:=IF(NOT(ISBLANK([Finals.E27])); [Finals.E27]; &quot;&quot;)">
            <text:p/>
          </table:table-cell>
          <table:table-cell table:style-name="ce356" table:formula="of:=IF(NOT(ISBLANK([Finals.F27])); [Finals.F27]; &quot;&quot;)">
            <text:p/>
          </table:table-cell>
          <table:table-cell table:style-name="ce348" table:formula="of:=IF(NOT(ISBLANK([Finals.I27])); [Finals.I27]; &quot;&quot;)"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59:.F59]; [.D60:.F60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4" table:formula="of:=IF(AND(NOT(ISBLANK([.$Q62])); [.$Q62]=[.$Q63]); [.$Q62]; IF([.$W62]=&quot;W&quot;; IF(NOT(ISBLANK([.$Q62])); [.$Q62]; &quot;&quot;); IF([.$W63]=&quot;W&quot;; IF(NOT(ISBLANK([.$Q63])); [.$Q63]; &quot;&quot;); &quot;&quot;)))">
            <text:p/>
          </table:table-cell>
          <table:table-cell table:style-name="ce340" table:formula="of:=IF([.$W62]=&quot;W&quot;; IF(NOT(ISBLANK([.R62])); [.R62]; &quot;&quot;); IF([.$W63]=&quot;W&quot;; IF(NOT(ISBLANK([.R63])); [.R63]; &quot;&quot;); &quot;&quot;))">
            <text:p/>
          </table:table-cell>
          <table:table-cell table:style-name="ce366" table:formula="of:=IF(AND(NOT(ISBLANK([.S62])); [.S62]=[.S63]); [.S62]; IF([.$W62]=&quot;W&quot;; IF(NOT(ISBLANK([.S62])); [.S62]; &quot;&quot;); IF([.$W63]=&quot;W&quot;; IF(NOT(ISBLANK([.S63])); [.S63]; &quot;&quot;); &quot;&quot;)))">
            <text:p/>
          </table:table-cell>
          <table:table-cell table:style-name="ce357" table:formula="of:=IF(NOT(ISBLANK([Finals.D28])); [Finals.D28]; &quot;&quot;)">
            <text:p/>
          </table:table-cell>
          <table:table-cell table:style-name="ce357" table:formula="of:=IF(NOT(ISBLANK([Finals.E28])); [Finals.E28]; &quot;&quot;)">
            <text:p/>
          </table:table-cell>
          <table:table-cell table:style-name="ce357" table:formula="of:=IF(NOT(ISBLANK([Finals.F28])); [Finals.F28]; &quot;&quot;)">
            <text:p/>
          </table:table-cell>
          <table:table-cell table:style-name="ce349" table:formula="of:=IF(NOT(ISBLANK([Finals.I28])); [Finals.I28]; &quot;&quot;)"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60:.F60]; [.D59:.F59])">
            <text:p/>
          </table:table-cell>
          <table:table-cell table:style-name="ce78"/>
          <table:table-cell table:style-name="ce351" table:formula="of:=IF(AND(NOT(ISBLANK([.A59])); [.A59]=[.A60]); [.A59]; IF([.$G59]=&quot;W&quot;; IF(NOT(ISBLANK([.A59])); [.A59]; &quot;&quot;); IF([.$G60]=&quot;W&quot;; IF(NOT(ISBLANK([.A60])); [.A60]; &quot;&quot;); &quot;&quot;)))">
            <text:p/>
          </table:table-cell>
          <table:table-cell table:style-name="ce339" table:formula="of:=IF([.$G59]=&quot;W&quot;; IF(NOT(ISBLANK([.B59])); [.B59]; &quot;&quot;); IF([.$G60]=&quot;W&quot;; IF(NOT(ISBLANK([.B60])); [.B60]; &quot;&quot;); &quot;&quot;))">
            <text:p/>
          </table:table-cell>
          <table:table-cell table:style-name="ce353" table:formula="of:=IF(AND(NOT(ISBLANK([.C59])); [.C59]=[.C60]); [.C59]; IF([.$G59]=&quot;W&quot;; IF(NOT(ISBLANK([.C59])); [.C59]; &quot;&quot;); IF([.$G60]=&quot;W&quot;; IF(NOT(ISBLANK([.C60])); [.C60]; &quot;&quot;); &quot;&quot;)))">
            <text:p/>
          </table:table-cell>
          <table:table-cell table:style-name="ce356" table:number-columns-repeated="3"/>
          <table:table-cell table:style-name="ce348" table:formula="of:=ISWINNERWOMEN([.L60:.N60]; [.L61:.N6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61:.F61]; [.D62:.F62])">
            <text:p/>
          </table:table-cell>
          <table:table-cell table:style-name="ce78"/>
          <table:table-cell table:style-name="ce352" table:formula="of:=IF(AND(NOT(ISBLANK([.A61])); [.A61]=[.A62]); [.A61]; IF([.$G61]=&quot;W&quot;; IF(NOT(ISBLANK([.A61])); [.A61]; &quot;&quot;); IF([.$G62]=&quot;W&quot;; IF(NOT(ISBLANK([.A62])); [.A62]; &quot;&quot;); &quot;&quot;)))">
            <text:p/>
          </table:table-cell>
          <table:table-cell table:style-name="ce340" table:formula="of:=IF([.$G61]=&quot;W&quot;; IF(NOT(ISBLANK([.B61])); [.B61]; &quot;&quot;); IF([.$G62]=&quot;W&quot;; IF(NOT(ISBLANK([.B62])); [.B62]; &quot;&quot;); &quot;&quot;))">
            <text:p/>
          </table:table-cell>
          <table:table-cell table:style-name="ce354" table:formula="of:=IF(AND(NOT(ISBLANK([.C61])); [.C61]=[.C62]); [.C61]; IF([.$G61]=&quot;W&quot;; IF(NOT(ISBLANK([.C61])); [.C61]; &quot;&quot;); IF([.$G62]=&quot;W&quot;; IF(NOT(ISBLANK([.C62])); [.C62]; &quot;&quot;); &quot;&quot;)))">
            <text:p/>
          </table:table-cell>
          <table:table-cell table:style-name="ce357" table:number-columns-repeated="3"/>
          <table:table-cell table:style-name="ce349" table:formula="of:=ISWINNERWOMEN([.L61:.N61]; [.L60:.N6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62:.F62]; [.D61:.F6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60]));[.$I60]=[.$I61]);[.$I60];IF([.$O60]=&quot;W&quot;;IF(NOT(ISBLANK([.$I60]));[.$I60];&quot;&quot;);IF([.$O61]=&quot;W&quot;;IF(NOT(ISBLANK([.$I61]));[.$I61];&quot;&quot;);&quot;&quot;)))">
            <text:p/>
          </table:table-cell>
          <table:table-cell table:style-name="ce339" table:formula="of:=IF([.$O60]=&quot;W&quot;; IF(NOT(ISBLANK([.J60])); [.J60]; &quot;&quot;); IF([.$O61]=&quot;W&quot;; IF(NOT(ISBLANK([.J61])); [.J61]; &quot;&quot;); &quot;&quot;))">
            <text:p/>
          </table:table-cell>
          <table:table-cell table:style-name="ce361" table:formula="of:=IF(AND(NOT(ISBLANK([.K60])); [.K60]=[.K61]); [.K60]; IF([.$O60]=&quot;W&quot;; IF(NOT(ISBLANK([.K60])); [.K60]; &quot;&quot;); IF([.$O61]=&quot;W&quot;; IF(NOT(ISBLANK([.K61])); [.K61]; &quot;&quot;); &quot;&quot;)))">
            <text:p/>
          </table:table-cell>
          <table:table-cell table:style-name="ce356" table:number-columns-repeated="3"/>
          <table:table-cell table:style-name="ce348" table:formula="of:=ISWINNERWOMEN([.T62:.V62]; [.T63:.V6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63:.F63]; [.D64:.F6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64]));[.$I64]=[.$I65]);[.$I64];IF([.$O64]=&quot;W&quot;;IF(NOT(ISBLANK([.$I64]));[.$I64];&quot;&quot;);IF([.$O65]=&quot;W&quot;;IF(NOT(ISBLANK([.$I65]));[.$I65];&quot;&quot;);&quot;&quot;)))">
            <text:p/>
          </table:table-cell>
          <table:table-cell table:style-name="ce340" table:formula="of:=IF([.$O64]=&quot;W&quot;; IF(NOT(ISBLANK([.J64])); [.J64]; &quot;&quot;); IF([.$O65]=&quot;W&quot;; IF(NOT(ISBLANK([.J65])); [.J65]; &quot;&quot;); &quot;&quot;))">
            <text:p/>
          </table:table-cell>
          <table:table-cell table:style-name="ce362" table:formula="of:=IF(AND(NOT(ISBLANK([.K64])); [.K64]=[.K65]); [.K64]; IF([.$O64]=&quot;W&quot;; IF(NOT(ISBLANK([.K64])); [.K64]; &quot;&quot;); IF([.$O65]=&quot;W&quot;; IF(NOT(ISBLANK([.K65])); [.K65]; &quot;&quot;); &quot;&quot;)))">
            <text:p/>
          </table:table-cell>
          <table:table-cell table:style-name="ce357" table:number-columns-repeated="3"/>
          <table:table-cell table:style-name="ce349" table:formula="of:=ISWINNERWOMEN([.T63:.V63]; [.T62:.V6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64:.F64]; [.D63:.F63])">
            <text:p/>
          </table:table-cell>
          <table:table-cell table:style-name="ce78"/>
          <table:table-cell table:style-name="ce351" table:formula="of:=IF(AND(NOT(ISBLANK([.A63])); [.A63]=[.A64]); [.A63]; IF([.$G63]=&quot;W&quot;; IF(NOT(ISBLANK([.A63])); [.A63]; &quot;&quot;); IF([.$G64]=&quot;W&quot;; IF(NOT(ISBLANK([.A64])); [.A64]; &quot;&quot;); &quot;&quot;)))">
            <text:p/>
          </table:table-cell>
          <table:table-cell table:style-name="ce339" table:formula="of:=IF([.$G63]=&quot;W&quot;; IF(NOT(ISBLANK([.B63])); [.B63]; &quot;&quot;); IF([.$G64]=&quot;W&quot;; IF(NOT(ISBLANK([.B64])); [.B64]; &quot;&quot;); &quot;&quot;))">
            <text:p/>
          </table:table-cell>
          <table:table-cell table:style-name="ce353" table:formula="of:=IF(AND(NOT(ISBLANK([.C63])); [.C63]=[.C64]); [.C63]; IF([.$G63]=&quot;W&quot;; IF(NOT(ISBLANK([.C63])); [.C63]; &quot;&quot;); IF([.$G64]=&quot;W&quot;; IF(NOT(ISBLANK([.C64])); [.C64]; &quot;&quot;); &quot;&quot;)))">
            <text:p/>
          </table:table-cell>
          <table:table-cell table:style-name="ce356" table:number-columns-repeated="3"/>
          <table:table-cell table:style-name="ce348" table:formula="of:=ISWINNERWOMEN([.L64:.N64]; [.L65:.N6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65:.F65]; [.D66:.F66])">
            <text:p/>
          </table:table-cell>
          <table:table-cell table:style-name="ce78"/>
          <table:table-cell table:style-name="ce352" table:formula="of:=IF(AND(NOT(ISBLANK([.A65])); [.A65]=[.A66]); [.A65]; IF([.$G65]=&quot;W&quot;; IF(NOT(ISBLANK([.A65])); [.A65]; &quot;&quot;); IF([.$G66]=&quot;W&quot;; IF(NOT(ISBLANK([.A66])); [.A66]; &quot;&quot;); &quot;&quot;)))">
            <text:p/>
          </table:table-cell>
          <table:table-cell table:style-name="ce340" table:formula="of:=IF([.$G65]=&quot;W&quot;; IF(NOT(ISBLANK([.B65])); [.B65]; &quot;&quot;); IF([.$G66]=&quot;W&quot;; IF(NOT(ISBLANK([.B66])); [.B66]; &quot;&quot;); &quot;&quot;))">
            <text:p/>
          </table:table-cell>
          <table:table-cell table:style-name="ce354" table:formula="of:=IF(AND(NOT(ISBLANK([.C65])); [.C65]=[.C66]); [.C65]; IF([.$G65]=&quot;W&quot;; IF(NOT(ISBLANK([.C65])); [.C65]; &quot;&quot;); IF([.$G66]=&quot;W&quot;; IF(NOT(ISBLANK([.C66])); [.C66]; &quot;&quot;); &quot;&quot;)))">
            <text:p/>
          </table:table-cell>
          <table:table-cell table:style-name="ce357" table:number-columns-repeated="3"/>
          <table:table-cell table:style-name="ce349" table:formula="of:=ISWINNERWOMEN([.L65:.N65]; [.L64:.N6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66:.F66]; [.D65:.F65])">
            <text:p/>
          </table:table-cell>
          <table:table-cell table:style-name="ce78">
            <draw:frame table:end-cell-address="FL.R68" table:end-x="0.0181in" table:end-y="0.0264in" draw:z-index="3" draw:style-name="gr1" draw:text-style-name="P1" svg:width="2.9248in" svg:height="0.2654in" draw:transform="rotate (1.5707963267949) translate (0.0078740157480315in 0.166141732283465in)">
              <draw:text-box>
                <text:p><text:span text:style-name="T1">Section 4</text:span></text:p>
              </draw:text-box>
            </draw:frame>
          </table:table-cell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96"/>
          <table:table-cell table:style-name="ce341"/>
          <table:table-cell table:style-name="ce105"/>
          <table:table-cell table:style-name="ce345" table:number-columns-repeated="3"/>
          <table:table-cell table:style-name="ce350" table:formula="of:=ISWINNERWOMEN([.D67:.F67]; [.D68:.F68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68:.F68]; [.D67:.F67])">
            <text:p/>
          </table:table-cell>
          <table:table-cell table:style-name="ce78"/>
          <table:table-cell table:style-name="ce351" table:formula="of:=IF(AND(NOT(ISBLANK([.A67])); [.A67]=[.A68]); [.A67]; IF([.$G67]=&quot;W&quot;; IF(NOT(ISBLANK([.A67])); [.A67]; &quot;&quot;); IF([.$G68]=&quot;W&quot;; IF(NOT(ISBLANK([.A68])); [.A68]; &quot;&quot;); &quot;&quot;)))">
            <text:p/>
          </table:table-cell>
          <table:table-cell table:style-name="ce339" table:formula="of:=IF([.$G67]=&quot;W&quot;; IF(NOT(ISBLANK([.B67])); [.B67]; &quot;&quot;); IF([.$G68]=&quot;W&quot;; IF(NOT(ISBLANK([.B68])); [.B68]; &quot;&quot;); &quot;&quot;))">
            <text:p/>
          </table:table-cell>
          <table:table-cell table:style-name="ce353" table:formula="of:=IF(AND(NOT(ISBLANK([.C67])); [.C67]=[.C68]); [.C67]; IF([.$G67]=&quot;W&quot;; IF(NOT(ISBLANK([.C67])); [.C67]; &quot;&quot;); IF([.$G68]=&quot;W&quot;; IF(NOT(ISBLANK([.C68])); [.C68]; &quot;&quot;); &quot;&quot;)))">
            <text:p/>
          </table:table-cell>
          <table:table-cell table:style-name="ce356" table:number-columns-repeated="3"/>
          <table:table-cell table:style-name="ce348" table:formula="of:=ISWINNERWOMEN([.L68:.N68]; [.L69:.N6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69:.F69]; [.D70:.F70])">
            <text:p/>
          </table:table-cell>
          <table:table-cell table:style-name="ce78"/>
          <table:table-cell table:style-name="ce352" table:formula="of:=IF(AND(NOT(ISBLANK([.A69])); [.A69]=[.A70]); [.A69]; IF([.$G69]=&quot;W&quot;; IF(NOT(ISBLANK([.A69])); [.A69]; &quot;&quot;); IF([.$G70]=&quot;W&quot;; IF(NOT(ISBLANK([.A70])); [.A70]; &quot;&quot;); &quot;&quot;)))">
            <text:p/>
          </table:table-cell>
          <table:table-cell table:style-name="ce340" table:formula="of:=IF([.$G69]=&quot;W&quot;; IF(NOT(ISBLANK([.B69])); [.B69]; &quot;&quot;); IF([.$G70]=&quot;W&quot;; IF(NOT(ISBLANK([.B70])); [.B70]; &quot;&quot;); &quot;&quot;))">
            <text:p/>
          </table:table-cell>
          <table:table-cell table:style-name="ce354" table:formula="of:=IF(AND(NOT(ISBLANK([.C69])); [.C69]=[.C70]); [.C69]; IF([.$G69]=&quot;W&quot;; IF(NOT(ISBLANK([.C69])); [.C69]; &quot;&quot;); IF([.$G70]=&quot;W&quot;; IF(NOT(ISBLANK([.C70])); [.C70]; &quot;&quot;); &quot;&quot;)))">
            <text:p/>
          </table:table-cell>
          <table:table-cell table:style-name="ce357" table:number-columns-repeated="3"/>
          <table:table-cell table:style-name="ce349" table:formula="of:=ISWINNERWOMEN([.L69:.N69]; [.L68:.N6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70:.F70]; [.D69:.F6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68]));[.$I68]=[.$I69]);[.$I68];IF([.$O68]=&quot;W&quot;;IF(NOT(ISBLANK([.$I68]));[.$I68];&quot;&quot;);IF([.$O69]=&quot;W&quot;;IF(NOT(ISBLANK([.$I69]));[.$I69];&quot;&quot;);&quot;&quot;)))">
            <text:p/>
          </table:table-cell>
          <table:table-cell table:style-name="ce339" table:formula="of:=IF([.$O68]=&quot;W&quot;; IF(NOT(ISBLANK([.J68])); [.J68]; &quot;&quot;); IF([.$O69]=&quot;W&quot;; IF(NOT(ISBLANK([.J69])); [.J69]; &quot;&quot;); &quot;&quot;))">
            <text:p/>
          </table:table-cell>
          <table:table-cell table:style-name="ce361" table:formula="of:=IF(AND(NOT(ISBLANK([.K68])); [.K68]=[.K69]); [.K68]; IF([.$O68]=&quot;W&quot;; IF(NOT(ISBLANK([.K68])); [.K68]; &quot;&quot;); IF([.$O69]=&quot;W&quot;; IF(NOT(ISBLANK([.K69])); [.K69]; &quot;&quot;); &quot;&quot;)))">
            <text:p/>
          </table:table-cell>
          <table:table-cell table:style-name="ce356" table:number-columns-repeated="3"/>
          <table:table-cell table:style-name="ce348" table:formula="of:=ISWINNERWOMEN([.T70:.V70]; [.T71:.V7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71:.F71]; [.D72:.F7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72]));[.$I72]=[.$I73]);[.$I72];IF([.$O72]=&quot;W&quot;;IF(NOT(ISBLANK([.$I72]));[.$I72];&quot;&quot;);IF([.$O73]=&quot;W&quot;;IF(NOT(ISBLANK([.$I73]));[.$I73];&quot;&quot;);&quot;&quot;)))">
            <text:p/>
          </table:table-cell>
          <table:table-cell table:style-name="ce340" table:formula="of:=IF([.$O72]=&quot;W&quot;; IF(NOT(ISBLANK([.J72])); [.J72]; &quot;&quot;); IF([.$O73]=&quot;W&quot;; IF(NOT(ISBLANK([.J73])); [.J73]; &quot;&quot;); &quot;&quot;))">
            <text:p/>
          </table:table-cell>
          <table:table-cell table:style-name="ce362" table:formula="of:=IF(AND(NOT(ISBLANK([.K72])); [.K72]=[.K73]); [.K72]; IF([.$O72]=&quot;W&quot;; IF(NOT(ISBLANK([.K72])); [.K72]; &quot;&quot;); IF([.$O73]=&quot;W&quot;; IF(NOT(ISBLANK([.K73])); [.K73]; &quot;&quot;); &quot;&quot;)))">
            <text:p/>
          </table:table-cell>
          <table:table-cell table:style-name="ce357" table:number-columns-repeated="3"/>
          <table:table-cell table:style-name="ce349" table:formula="of:=ISWINNERWOMEN([.T71:.V71]; [.T70:.V7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72:.F72]; [.D71:.F71])">
            <text:p/>
          </table:table-cell>
          <table:table-cell table:style-name="ce78"/>
          <table:table-cell table:style-name="ce351" table:formula="of:=IF(AND(NOT(ISBLANK([.A71])); [.A71]=[.A72]); [.A71]; IF([.$G71]=&quot;W&quot;; IF(NOT(ISBLANK([.A71])); [.A71]; &quot;&quot;); IF([.$G72]=&quot;W&quot;; IF(NOT(ISBLANK([.A72])); [.A72]; &quot;&quot;); &quot;&quot;)))">
            <text:p/>
          </table:table-cell>
          <table:table-cell table:style-name="ce339" table:formula="of:=IF([.$G71]=&quot;W&quot;; IF(NOT(ISBLANK([.B71])); [.B71]; &quot;&quot;); IF([.$G72]=&quot;W&quot;; IF(NOT(ISBLANK([.B72])); [.B72]; &quot;&quot;); &quot;&quot;))">
            <text:p/>
          </table:table-cell>
          <table:table-cell table:style-name="ce353" table:formula="of:=IF(AND(NOT(ISBLANK([.C71])); [.C71]=[.C72]); [.C71]; IF([.$G71]=&quot;W&quot;; IF(NOT(ISBLANK([.C71])); [.C71]; &quot;&quot;); IF([.$G72]=&quot;W&quot;; IF(NOT(ISBLANK([.C72])); [.C72]; &quot;&quot;); &quot;&quot;)))">
            <text:p/>
          </table:table-cell>
          <table:table-cell table:style-name="ce356" table:number-columns-repeated="3"/>
          <table:table-cell table:style-name="ce348" table:formula="of:=ISWINNERWOMEN([.L72:.N72]; [.L73:.N7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73:.F73]; [.D74:.F74])">
            <text:p/>
          </table:table-cell>
          <table:table-cell table:style-name="ce78"/>
          <table:table-cell table:style-name="ce352" table:formula="of:=IF(AND(NOT(ISBLANK([.A73])); [.A73]=[.A74]); [.A73]; IF([.$G73]=&quot;W&quot;; IF(NOT(ISBLANK([.A73])); [.A73]; &quot;&quot;); IF([.$G74]=&quot;W&quot;; IF(NOT(ISBLANK([.A74])); [.A74]; &quot;&quot;); &quot;&quot;)))">
            <text:p/>
          </table:table-cell>
          <table:table-cell table:style-name="ce340" table:formula="of:=IF([.$G73]=&quot;W&quot;; IF(NOT(ISBLANK([.B73])); [.B73]; &quot;&quot;); IF([.$G74]=&quot;W&quot;; IF(NOT(ISBLANK([.B74])); [.B74]; &quot;&quot;); &quot;&quot;))">
            <text:p/>
          </table:table-cell>
          <table:table-cell table:style-name="ce354" table:formula="of:=IF(AND(NOT(ISBLANK([.C73])); [.C73]=[.C74]); [.C73]; IF([.$G73]=&quot;W&quot;; IF(NOT(ISBLANK([.C73])); [.C73]; &quot;&quot;); IF([.$G74]=&quot;W&quot;; IF(NOT(ISBLANK([.C74])); [.C74]; &quot;&quot;); &quot;&quot;)))">
            <text:p/>
          </table:table-cell>
          <table:table-cell table:style-name="ce357" table:number-columns-repeated="3"/>
          <table:table-cell table:style-name="ce349" table:formula="of:=ISWINNERWOMEN([.L73:.N73]; [.L72:.N7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74:.F74]; [.D73:.F73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3" table:formula="of:=IF(AND(NOT(ISBLANK([.$Q70])); [.$Q70]=[.$Q71]); [.$Q70]; IF([.$W70]=&quot;W&quot;; IF(NOT(ISBLANK([.$Q70])); [.$Q70]; &quot;&quot;); IF([.$W71]=&quot;W&quot;; IF(NOT(ISBLANK([.$Q71])); [.$Q71]; &quot;&quot;); &quot;&quot;)))">
            <text:p/>
          </table:table-cell>
          <table:table-cell table:style-name="ce339" table:formula="of:=IF([.$W70]=&quot;W&quot;; IF(NOT(ISBLANK([.R70])); [.R70]; &quot;&quot;); IF([.$W71]=&quot;W&quot;; IF(NOT(ISBLANK([.R71])); [.R71]; &quot;&quot;); &quot;&quot;))">
            <text:p/>
          </table:table-cell>
          <table:table-cell table:style-name="ce365" table:formula="of:=IF(AND(NOT(ISBLANK([.S70])); [.S70]=[.S71]); [.S70]; IF([.$W70]=&quot;W&quot;; IF(NOT(ISBLANK([.S70])); [.S70]; &quot;&quot;); IF([.$W71]=&quot;W&quot;; IF(NOT(ISBLANK([.S71])); [.S71]; &quot;&quot;); &quot;&quot;)))">
            <text:p/>
          </table:table-cell>
          <table:table-cell table:style-name="ce356" table:formula="of:=IF(NOT(ISBLANK([Finals.D29])); [Finals.D29]; &quot;&quot;)">
            <text:p/>
          </table:table-cell>
          <table:table-cell table:style-name="ce356" table:formula="of:=IF(NOT(ISBLANK([Finals.E29])); [Finals.E29]; &quot;&quot;)">
            <text:p/>
          </table:table-cell>
          <table:table-cell table:style-name="ce356" table:formula="of:=IF(NOT(ISBLANK([Finals.F29])); [Finals.F29]; &quot;&quot;)">
            <text:p/>
          </table:table-cell>
          <table:table-cell table:style-name="ce348" table:formula="of:=IF(NOT(ISBLANK([Finals.I29])); [Finals.I29]; &quot;&quot;)"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75:.F75]; [.D76:.F76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4" table:formula="of:=IF(AND(NOT(ISBLANK([.$Q78])); [.$Q78]=[.$Q79]); [.$Q78]; IF([.$W78]=&quot;W&quot;; IF(NOT(ISBLANK([.$Q78])); [.$Q78]; &quot;&quot;); IF([.$W79]=&quot;W&quot;; IF(NOT(ISBLANK([.$Q79])); [.$Q79]; &quot;&quot;); &quot;&quot;)))">
            <text:p/>
          </table:table-cell>
          <table:table-cell table:style-name="ce340" table:formula="of:=IF([.$W78]=&quot;W&quot;; IF(NOT(ISBLANK([.R78])); [.R78]; &quot;&quot;); IF([.$W79]=&quot;W&quot;; IF(NOT(ISBLANK([.R79])); [.R79]; &quot;&quot;); &quot;&quot;))">
            <text:p/>
          </table:table-cell>
          <table:table-cell table:style-name="ce366" table:formula="of:=IF(AND(NOT(ISBLANK([.S78])); [.S78]=[.S79]); [.S78]; IF([.$W78]=&quot;W&quot;; IF(NOT(ISBLANK([.S78])); [.S78]; &quot;&quot;); IF([.$W79]=&quot;W&quot;; IF(NOT(ISBLANK([.S79])); [.S79]; &quot;&quot;); &quot;&quot;)))">
            <text:p/>
          </table:table-cell>
          <table:table-cell table:style-name="ce357" table:formula="of:=IF(NOT(ISBLANK([Finals.D30])); [Finals.D30]; &quot;&quot;)">
            <text:p/>
          </table:table-cell>
          <table:table-cell table:style-name="ce357" table:formula="of:=IF(NOT(ISBLANK([Finals.E30])); [Finals.E30]; &quot;&quot;)">
            <text:p/>
          </table:table-cell>
          <table:table-cell table:style-name="ce357" table:formula="of:=IF(NOT(ISBLANK([Finals.F30])); [Finals.F30]; &quot;&quot;)">
            <text:p/>
          </table:table-cell>
          <table:table-cell table:style-name="ce349" table:formula="of:=IF(NOT(ISBLANK([Finals.I30])); [Finals.I30]; &quot;&quot;)"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76:.F76]; [.D75:.F75])">
            <text:p/>
          </table:table-cell>
          <table:table-cell table:style-name="ce78"/>
          <table:table-cell table:style-name="ce351" table:formula="of:=IF(AND(NOT(ISBLANK([.A75])); [.A75]=[.A76]); [.A75]; IF([.$G75]=&quot;W&quot;; IF(NOT(ISBLANK([.A75])); [.A75]; &quot;&quot;); IF([.$G76]=&quot;W&quot;; IF(NOT(ISBLANK([.A76])); [.A76]; &quot;&quot;); &quot;&quot;)))">
            <text:p/>
          </table:table-cell>
          <table:table-cell table:style-name="ce339" table:formula="of:=IF([.$G75]=&quot;W&quot;; IF(NOT(ISBLANK([.B75])); [.B75]; &quot;&quot;); IF([.$G76]=&quot;W&quot;; IF(NOT(ISBLANK([.B76])); [.B76]; &quot;&quot;); &quot;&quot;))">
            <text:p/>
          </table:table-cell>
          <table:table-cell table:style-name="ce353" table:formula="of:=IF(AND(NOT(ISBLANK([.C75])); [.C75]=[.C76]); [.C75]; IF([.$G75]=&quot;W&quot;; IF(NOT(ISBLANK([.C75])); [.C75]; &quot;&quot;); IF([.$G76]=&quot;W&quot;; IF(NOT(ISBLANK([.C76])); [.C76]; &quot;&quot;); &quot;&quot;)))">
            <text:p/>
          </table:table-cell>
          <table:table-cell table:style-name="ce356" table:number-columns-repeated="3"/>
          <table:table-cell table:style-name="ce348" table:formula="of:=ISWINNERWOMEN([.L76:.N76]; [.L77:.N7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77:.F77]; [.D78:.F78])">
            <text:p/>
          </table:table-cell>
          <table:table-cell table:style-name="ce78"/>
          <table:table-cell table:style-name="ce352" table:formula="of:=IF(AND(NOT(ISBLANK([.A77])); [.A77]=[.A78]); [.A77]; IF([.$G77]=&quot;W&quot;; IF(NOT(ISBLANK([.A77])); [.A77]; &quot;&quot;); IF([.$G78]=&quot;W&quot;; IF(NOT(ISBLANK([.A78])); [.A78]; &quot;&quot;); &quot;&quot;)))">
            <text:p/>
          </table:table-cell>
          <table:table-cell table:style-name="ce340" table:formula="of:=IF([.$G77]=&quot;W&quot;; IF(NOT(ISBLANK([.B77])); [.B77]; &quot;&quot;); IF([.$G78]=&quot;W&quot;; IF(NOT(ISBLANK([.B78])); [.B78]; &quot;&quot;); &quot;&quot;))">
            <text:p/>
          </table:table-cell>
          <table:table-cell table:style-name="ce354" table:formula="of:=IF(AND(NOT(ISBLANK([.C77])); [.C77]=[.C78]); [.C77]; IF([.$G77]=&quot;W&quot;; IF(NOT(ISBLANK([.C77])); [.C77]; &quot;&quot;); IF([.$G78]=&quot;W&quot;; IF(NOT(ISBLANK([.C78])); [.C78]; &quot;&quot;); &quot;&quot;)))">
            <text:p/>
          </table:table-cell>
          <table:table-cell table:style-name="ce357" table:number-columns-repeated="3"/>
          <table:table-cell table:style-name="ce349" table:formula="of:=ISWINNERWOMEN([.L77:.N77]; [.L76:.N7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78:.F78]; [.D77:.F77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76]));[.$I76]=[.$I77]);[.$I76];IF([.$O76]=&quot;W&quot;;IF(NOT(ISBLANK([.$I76]));[.$I76];&quot;&quot;);IF([.$O77]=&quot;W&quot;;IF(NOT(ISBLANK([.$I77]));[.$I77];&quot;&quot;);&quot;&quot;)))">
            <text:p/>
          </table:table-cell>
          <table:table-cell table:style-name="ce339" table:formula="of:=IF([.$O76]=&quot;W&quot;; IF(NOT(ISBLANK([.J76])); [.J76]; &quot;&quot;); IF([.$O77]=&quot;W&quot;; IF(NOT(ISBLANK([.J77])); [.J77]; &quot;&quot;); &quot;&quot;))">
            <text:p/>
          </table:table-cell>
          <table:table-cell table:style-name="ce361" table:formula="of:=IF(AND(NOT(ISBLANK([.K76])); [.K76]=[.K77]); [.K76]; IF([.$O76]=&quot;W&quot;; IF(NOT(ISBLANK([.K76])); [.K76]; &quot;&quot;); IF([.$O77]=&quot;W&quot;; IF(NOT(ISBLANK([.K77])); [.K77]; &quot;&quot;); &quot;&quot;)))">
            <text:p/>
          </table:table-cell>
          <table:table-cell table:style-name="ce356" table:number-columns-repeated="3"/>
          <table:table-cell table:style-name="ce348" table:formula="of:=ISWINNERWOMEN([.T78:.V78]; [.T79:.V7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79:.F79]; [.D80:.F80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80]));[.$I80]=[.$I81]);[.$I80];IF([.$O80]=&quot;W&quot;;IF(NOT(ISBLANK([.$I80]));[.$I80];&quot;&quot;);IF([.$O81]=&quot;W&quot;;IF(NOT(ISBLANK([.$I81]));[.$I81];&quot;&quot;);&quot;&quot;)))">
            <text:p/>
          </table:table-cell>
          <table:table-cell table:style-name="ce340" table:formula="of:=IF([.$O80]=&quot;W&quot;; IF(NOT(ISBLANK([.J80])); [.J80]; &quot;&quot;); IF([.$O81]=&quot;W&quot;; IF(NOT(ISBLANK([.J81])); [.J81]; &quot;&quot;); &quot;&quot;))">
            <text:p/>
          </table:table-cell>
          <table:table-cell table:style-name="ce362" table:formula="of:=IF(AND(NOT(ISBLANK([.K80])); [.K80]=[.K81]); [.K80]; IF([.$O80]=&quot;W&quot;; IF(NOT(ISBLANK([.K80])); [.K80]; &quot;&quot;); IF([.$O81]=&quot;W&quot;; IF(NOT(ISBLANK([.K81])); [.K81]; &quot;&quot;); &quot;&quot;)))">
            <text:p/>
          </table:table-cell>
          <table:table-cell table:style-name="ce357" table:number-columns-repeated="3"/>
          <table:table-cell table:style-name="ce349" table:formula="of:=ISWINNERWOMEN([.T79:.V79]; [.T78:.V7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80:.F80]; [.D79:.F79])">
            <text:p/>
          </table:table-cell>
          <table:table-cell table:style-name="ce78"/>
          <table:table-cell table:style-name="ce351" table:formula="of:=IF(AND(NOT(ISBLANK([.A79])); [.A79]=[.A80]); [.A79]; IF([.$G79]=&quot;W&quot;; IF(NOT(ISBLANK([.A79])); [.A79]; &quot;&quot;); IF([.$G80]=&quot;W&quot;; IF(NOT(ISBLANK([.A80])); [.A80]; &quot;&quot;); &quot;&quot;)))">
            <text:p/>
          </table:table-cell>
          <table:table-cell table:style-name="ce339" table:formula="of:=IF([.$G79]=&quot;W&quot;; IF(NOT(ISBLANK([.B79])); [.B79]; &quot;&quot;); IF([.$G80]=&quot;W&quot;; IF(NOT(ISBLANK([.B80])); [.B80]; &quot;&quot;); &quot;&quot;))">
            <text:p/>
          </table:table-cell>
          <table:table-cell table:style-name="ce353" table:formula="of:=IF(AND(NOT(ISBLANK([.C79])); [.C79]=[.C80]); [.C79]; IF([.$G79]=&quot;W&quot;; IF(NOT(ISBLANK([.C79])); [.C79]; &quot;&quot;); IF([.$G80]=&quot;W&quot;; IF(NOT(ISBLANK([.C80])); [.C80]; &quot;&quot;); &quot;&quot;)))">
            <text:p/>
          </table:table-cell>
          <table:table-cell table:style-name="ce356" table:number-columns-repeated="3"/>
          <table:table-cell table:style-name="ce348" table:formula="of:=ISWINNERWOMEN([.L80:.N80]; [.L81:.N8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81:.F81]; [.D82:.F82])">
            <text:p/>
          </table:table-cell>
          <table:table-cell table:style-name="ce78"/>
          <table:table-cell table:style-name="ce352" table:formula="of:=IF(AND(NOT(ISBLANK([.A81])); [.A81]=[.A82]); [.A81]; IF([.$G81]=&quot;W&quot;; IF(NOT(ISBLANK([.A81])); [.A81]; &quot;&quot;); IF([.$G82]=&quot;W&quot;; IF(NOT(ISBLANK([.A82])); [.A82]; &quot;&quot;); &quot;&quot;)))">
            <text:p/>
          </table:table-cell>
          <table:table-cell table:style-name="ce340" table:formula="of:=IF([.$G81]=&quot;W&quot;; IF(NOT(ISBLANK([.B81])); [.B81]; &quot;&quot;); IF([.$G82]=&quot;W&quot;; IF(NOT(ISBLANK([.B82])); [.B82]; &quot;&quot;); &quot;&quot;))">
            <text:p/>
          </table:table-cell>
          <table:table-cell table:style-name="ce354" table:formula="of:=IF(AND(NOT(ISBLANK([.C81])); [.C81]=[.C82]); [.C81]; IF([.$G81]=&quot;W&quot;; IF(NOT(ISBLANK([.C81])); [.C81]; &quot;&quot;); IF([.$G82]=&quot;W&quot;; IF(NOT(ISBLANK([.C82])); [.C82]; &quot;&quot;); &quot;&quot;)))">
            <text:p/>
          </table:table-cell>
          <table:table-cell table:style-name="ce357" table:number-columns-repeated="3"/>
          <table:table-cell table:style-name="ce349" table:formula="of:=ISWINNERWOMEN([.L81:.N81]; [.L80:.N8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82:.F82]; [.D81:.F81])">
            <text:p/>
          </table:table-cell>
          <table:table-cell table:style-name="ce78">
            <draw:frame table:end-cell-address="FL.R84" table:end-x="0.0181in" table:end-y="0.026in" draw:z-index="4" draw:style-name="gr1" draw:text-style-name="P1" svg:width="2.9248in" svg:height="0.2654in" draw:transform="rotate (1.5707963267949) translate (0.0078740157480315in 0.165748031496063in)">
              <draw:text-box>
                <text:p><text:span text:style-name="T1">Section 5</text:span></text:p>
              </draw:text-box>
            </draw:frame>
          </table:table-cell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6"/>
          <table:table-cell table:style-name="ce341"/>
          <table:table-cell table:style-name="ce105"/>
          <table:table-cell table:style-name="ce345" table:number-columns-repeated="3"/>
          <table:table-cell table:style-name="ce350" table:formula="of:=ISWINNERWOMEN([.D83:.F83]; [.D84:.F84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84:.F84]; [.D83:.F83])">
            <text:p/>
          </table:table-cell>
          <table:table-cell table:style-name="ce78"/>
          <table:table-cell table:style-name="ce351" table:formula="of:=IF(AND(NOT(ISBLANK([.A83])); [.A83]=[.A84]); [.A83]; IF([.$G83]=&quot;W&quot;; IF(NOT(ISBLANK([.A83])); [.A83]; &quot;&quot;); IF([.$G84]=&quot;W&quot;; IF(NOT(ISBLANK([.A84])); [.A84]; &quot;&quot;); &quot;&quot;)))">
            <text:p/>
          </table:table-cell>
          <table:table-cell table:style-name="ce339" table:formula="of:=IF([.$G83]=&quot;W&quot;; IF(NOT(ISBLANK([.B83])); [.B83]; &quot;&quot;); IF([.$G84]=&quot;W&quot;; IF(NOT(ISBLANK([.B84])); [.B84]; &quot;&quot;); &quot;&quot;))">
            <text:p/>
          </table:table-cell>
          <table:table-cell table:style-name="ce353" table:formula="of:=IF(AND(NOT(ISBLANK([.C83])); [.C83]=[.C84]); [.C83]; IF([.$G83]=&quot;W&quot;; IF(NOT(ISBLANK([.C83])); [.C83]; &quot;&quot;); IF([.$G84]=&quot;W&quot;; IF(NOT(ISBLANK([.C84])); [.C84]; &quot;&quot;); &quot;&quot;)))">
            <text:p/>
          </table:table-cell>
          <table:table-cell table:style-name="ce356" table:number-columns-repeated="3"/>
          <table:table-cell table:style-name="ce348" table:formula="of:=ISWINNERWOMEN([.L84:.N84]; [.L85:.N8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85:.F85]; [.D86:.F86])">
            <text:p/>
          </table:table-cell>
          <table:table-cell table:style-name="ce78"/>
          <table:table-cell table:style-name="ce352" table:formula="of:=IF(AND(NOT(ISBLANK([.A85])); [.A85]=[.A86]); [.A85]; IF([.$G85]=&quot;W&quot;; IF(NOT(ISBLANK([.A85])); [.A85]; &quot;&quot;); IF([.$G86]=&quot;W&quot;; IF(NOT(ISBLANK([.A86])); [.A86]; &quot;&quot;); &quot;&quot;)))">
            <text:p/>
          </table:table-cell>
          <table:table-cell table:style-name="ce340" table:formula="of:=IF([.$G85]=&quot;W&quot;; IF(NOT(ISBLANK([.B85])); [.B85]; &quot;&quot;); IF([.$G86]=&quot;W&quot;; IF(NOT(ISBLANK([.B86])); [.B86]; &quot;&quot;); &quot;&quot;))">
            <text:p/>
          </table:table-cell>
          <table:table-cell table:style-name="ce354" table:formula="of:=IF(AND(NOT(ISBLANK([.C85])); [.C85]=[.C86]); [.C85]; IF([.$G85]=&quot;W&quot;; IF(NOT(ISBLANK([.C85])); [.C85]; &quot;&quot;); IF([.$G86]=&quot;W&quot;; IF(NOT(ISBLANK([.C86])); [.C86]; &quot;&quot;); &quot;&quot;)))">
            <text:p/>
          </table:table-cell>
          <table:table-cell table:style-name="ce357" table:number-columns-repeated="3"/>
          <table:table-cell table:style-name="ce349" table:formula="of:=ISWINNERWOMEN([.L85:.N85]; [.L84:.N8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86:.F86]; [.D85:.F8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84]));[.$I84]=[.$I85]);[.$I84];IF([.$O84]=&quot;W&quot;;IF(NOT(ISBLANK([.$I84]));[.$I84];&quot;&quot;);IF([.$O85]=&quot;W&quot;;IF(NOT(ISBLANK([.$I85]));[.$I85];&quot;&quot;);&quot;&quot;)))">
            <text:p/>
          </table:table-cell>
          <table:table-cell table:style-name="ce339" table:formula="of:=IF([.$O84]=&quot;W&quot;; IF(NOT(ISBLANK([.J84])); [.J84]; &quot;&quot;); IF([.$O85]=&quot;W&quot;; IF(NOT(ISBLANK([.J85])); [.J85]; &quot;&quot;); &quot;&quot;))">
            <text:p/>
          </table:table-cell>
          <table:table-cell table:style-name="ce361" table:formula="of:=IF(AND(NOT(ISBLANK([.K84])); [.K84]=[.K85]); [.K84]; IF([.$O84]=&quot;W&quot;; IF(NOT(ISBLANK([.K84])); [.K84]; &quot;&quot;); IF([.$O85]=&quot;W&quot;; IF(NOT(ISBLANK([.K85])); [.K85]; &quot;&quot;); &quot;&quot;)))">
            <text:p/>
          </table:table-cell>
          <table:table-cell table:style-name="ce356" table:number-columns-repeated="3"/>
          <table:table-cell table:style-name="ce348" table:formula="of:=ISWINNERWOMEN([.T86:.V86]; [.T87:.V8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87:.F87]; [.D88:.F8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88]));[.$I88]=[.$I89]);[.$I88];IF([.$O88]=&quot;W&quot;;IF(NOT(ISBLANK([.$I88]));[.$I88];&quot;&quot;);IF([.$O89]=&quot;W&quot;;IF(NOT(ISBLANK([.$I89]));[.$I89];&quot;&quot;);&quot;&quot;)))">
            <text:p/>
          </table:table-cell>
          <table:table-cell table:style-name="ce340" table:formula="of:=IF([.$O88]=&quot;W&quot;; IF(NOT(ISBLANK([.J88])); [.J88]; &quot;&quot;); IF([.$O89]=&quot;W&quot;; IF(NOT(ISBLANK([.J89])); [.J89]; &quot;&quot;); &quot;&quot;))">
            <text:p/>
          </table:table-cell>
          <table:table-cell table:style-name="ce362" table:formula="of:=IF(AND(NOT(ISBLANK([.K88])); [.K88]=[.K89]); [.K88]; IF([.$O88]=&quot;W&quot;; IF(NOT(ISBLANK([.K88])); [.K88]; &quot;&quot;); IF([.$O89]=&quot;W&quot;; IF(NOT(ISBLANK([.K89])); [.K89]; &quot;&quot;); &quot;&quot;)))">
            <text:p/>
          </table:table-cell>
          <table:table-cell table:style-name="ce357" table:number-columns-repeated="3"/>
          <table:table-cell table:style-name="ce349" table:formula="of:=ISWINNERWOMEN([.T87:.V87]; [.T86:.V8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88:.F88]; [.D87:.F87])">
            <text:p/>
          </table:table-cell>
          <table:table-cell table:style-name="ce78"/>
          <table:table-cell table:style-name="ce351" table:formula="of:=IF(AND(NOT(ISBLANK([.A87])); [.A87]=[.A88]); [.A87]; IF([.$G87]=&quot;W&quot;; IF(NOT(ISBLANK([.A87])); [.A87]; &quot;&quot;); IF([.$G88]=&quot;W&quot;; IF(NOT(ISBLANK([.A88])); [.A88]; &quot;&quot;); &quot;&quot;)))">
            <text:p/>
          </table:table-cell>
          <table:table-cell table:style-name="ce339" table:formula="of:=IF([.$G87]=&quot;W&quot;; IF(NOT(ISBLANK([.B87])); [.B87]; &quot;&quot;); IF([.$G88]=&quot;W&quot;; IF(NOT(ISBLANK([.B88])); [.B88]; &quot;&quot;); &quot;&quot;))">
            <text:p/>
          </table:table-cell>
          <table:table-cell table:style-name="ce353" table:formula="of:=IF(AND(NOT(ISBLANK([.C87])); [.C87]=[.C88]); [.C87]; IF([.$G87]=&quot;W&quot;; IF(NOT(ISBLANK([.C87])); [.C87]; &quot;&quot;); IF([.$G88]=&quot;W&quot;; IF(NOT(ISBLANK([.C88])); [.C88]; &quot;&quot;); &quot;&quot;)))">
            <text:p/>
          </table:table-cell>
          <table:table-cell table:style-name="ce356" table:number-columns-repeated="3"/>
          <table:table-cell table:style-name="ce348" table:formula="of:=ISWINNERWOMEN([.L88:.N88]; [.L89:.N8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89:.F89]; [.D90:.F90])">
            <text:p/>
          </table:table-cell>
          <table:table-cell table:style-name="ce78"/>
          <table:table-cell table:style-name="ce352" table:formula="of:=IF(AND(NOT(ISBLANK([.A89])); [.A89]=[.A90]); [.A89]; IF([.$G89]=&quot;W&quot;; IF(NOT(ISBLANK([.A89])); [.A89]; &quot;&quot;); IF([.$G90]=&quot;W&quot;; IF(NOT(ISBLANK([.A90])); [.A90]; &quot;&quot;); &quot;&quot;)))">
            <text:p/>
          </table:table-cell>
          <table:table-cell table:style-name="ce340" table:formula="of:=IF([.$G89]=&quot;W&quot;; IF(NOT(ISBLANK([.B89])); [.B89]; &quot;&quot;); IF([.$G90]=&quot;W&quot;; IF(NOT(ISBLANK([.B90])); [.B90]; &quot;&quot;); &quot;&quot;))">
            <text:p/>
          </table:table-cell>
          <table:table-cell table:style-name="ce354" table:formula="of:=IF(AND(NOT(ISBLANK([.C89])); [.C89]=[.C90]); [.C89]; IF([.$G89]=&quot;W&quot;; IF(NOT(ISBLANK([.C89])); [.C89]; &quot;&quot;); IF([.$G90]=&quot;W&quot;; IF(NOT(ISBLANK([.C90])); [.C90]; &quot;&quot;); &quot;&quot;)))">
            <text:p/>
          </table:table-cell>
          <table:table-cell table:style-name="ce357" table:number-columns-repeated="3"/>
          <table:table-cell table:style-name="ce349" table:formula="of:=ISWINNERWOMEN([.L89:.N89]; [.L88:.N8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90:.F90]; [.D89:.F8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3" table:formula="of:=IF(AND(NOT(ISBLANK([.$Q86])); [.$Q86]=[.$Q87]); [.$Q86]; IF([.$W86]=&quot;W&quot;; IF(NOT(ISBLANK([.$Q86])); [.$Q86]; &quot;&quot;); IF([.$W87]=&quot;W&quot;; IF(NOT(ISBLANK([.$Q87])); [.$Q87]; &quot;&quot;); &quot;&quot;)))">
            <text:p/>
          </table:table-cell>
          <table:table-cell table:style-name="ce339" table:formula="of:=IF([.$W86]=&quot;W&quot;; IF(NOT(ISBLANK([.R86])); [.R86]; &quot;&quot;); IF([.$W87]=&quot;W&quot;; IF(NOT(ISBLANK([.R87])); [.R87]; &quot;&quot;); &quot;&quot;))">
            <text:p/>
          </table:table-cell>
          <table:table-cell table:style-name="ce365" table:formula="of:=IF(AND(NOT(ISBLANK([.S86])); [.S86]=[.S87]); [.S86]; IF([.$W86]=&quot;W&quot;; IF(NOT(ISBLANK([.S86])); [.S86]; &quot;&quot;); IF([.$W87]=&quot;W&quot;; IF(NOT(ISBLANK([.S87])); [.S87]; &quot;&quot;); &quot;&quot;)))">
            <text:p/>
          </table:table-cell>
          <table:table-cell table:style-name="ce356" table:formula="of:=IF(NOT(ISBLANK([Finals.D31])); [Finals.D31]; &quot;&quot;)">
            <text:p/>
          </table:table-cell>
          <table:table-cell table:style-name="ce356" table:formula="of:=IF(NOT(ISBLANK([Finals.E31])); [Finals.E31]; &quot;&quot;)">
            <text:p/>
          </table:table-cell>
          <table:table-cell table:style-name="ce356" table:formula="of:=IF(NOT(ISBLANK([Finals.F31])); [Finals.F31]; &quot;&quot;)">
            <text:p/>
          </table:table-cell>
          <table:table-cell table:style-name="ce348" table:formula="of:=IF(NOT(ISBLANK([Finals.I31])); [Finals.I31]; &quot;&quot;)"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91:.F91]; [.D92:.F9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4" table:formula="of:=IF(AND(NOT(ISBLANK([.$Q94])); [.$Q94]=[.$Q95]); [.$Q94]; IF([.$W94]=&quot;W&quot;; IF(NOT(ISBLANK([.$Q94])); [.$Q94]; &quot;&quot;); IF([.$W95]=&quot;W&quot;; IF(NOT(ISBLANK([.$Q95])); [.$Q95]; &quot;&quot;); &quot;&quot;)))">
            <text:p/>
          </table:table-cell>
          <table:table-cell table:style-name="ce340" table:formula="of:=IF([.$W94]=&quot;W&quot;; IF(NOT(ISBLANK([.R94])); [.R94]; &quot;&quot;); IF([.$W95]=&quot;W&quot;; IF(NOT(ISBLANK([.R95])); [.R95]; &quot;&quot;); &quot;&quot;))">
            <text:p/>
          </table:table-cell>
          <table:table-cell table:style-name="ce366" table:formula="of:=IF(AND(NOT(ISBLANK([.S94])); [.S94]=[.S95]); [.S94]; IF([.$W94]=&quot;W&quot;; IF(NOT(ISBLANK([.S94])); [.S94]; &quot;&quot;); IF([.$W95]=&quot;W&quot;; IF(NOT(ISBLANK([.S95])); [.S95]; &quot;&quot;); &quot;&quot;)))">
            <text:p/>
          </table:table-cell>
          <table:table-cell table:style-name="ce357" table:formula="of:=IF(NOT(ISBLANK([Finals.D32])); [Finals.D32]; &quot;&quot;)">
            <text:p/>
          </table:table-cell>
          <table:table-cell table:style-name="ce357" table:formula="of:=IF(NOT(ISBLANK([Finals.E32])); [Finals.E32]; &quot;&quot;)">
            <text:p/>
          </table:table-cell>
          <table:table-cell table:style-name="ce357" table:formula="of:=IF(NOT(ISBLANK([Finals.F32])); [Finals.F32]; &quot;&quot;)">
            <text:p/>
          </table:table-cell>
          <table:table-cell table:style-name="ce349" table:formula="of:=IF(NOT(ISBLANK([Finals.I32])); [Finals.I32]; &quot;&quot;)"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92:.F92]; [.D91:.F91])">
            <text:p/>
          </table:table-cell>
          <table:table-cell table:style-name="ce78"/>
          <table:table-cell table:style-name="ce351" table:formula="of:=IF(AND(NOT(ISBLANK([.A91])); [.A91]=[.A92]); [.A91]; IF([.$G91]=&quot;W&quot;; IF(NOT(ISBLANK([.A91])); [.A91]; &quot;&quot;); IF([.$G92]=&quot;W&quot;; IF(NOT(ISBLANK([.A92])); [.A92]; &quot;&quot;); &quot;&quot;)))">
            <text:p/>
          </table:table-cell>
          <table:table-cell table:style-name="ce339" table:formula="of:=IF([.$G91]=&quot;W&quot;; IF(NOT(ISBLANK([.B91])); [.B91]; &quot;&quot;); IF([.$G92]=&quot;W&quot;; IF(NOT(ISBLANK([.B92])); [.B92]; &quot;&quot;); &quot;&quot;))">
            <text:p/>
          </table:table-cell>
          <table:table-cell table:style-name="ce353" table:formula="of:=IF(AND(NOT(ISBLANK([.C91])); [.C91]=[.C92]); [.C91]; IF([.$G91]=&quot;W&quot;; IF(NOT(ISBLANK([.C91])); [.C91]; &quot;&quot;); IF([.$G92]=&quot;W&quot;; IF(NOT(ISBLANK([.C92])); [.C92]; &quot;&quot;); &quot;&quot;)))">
            <text:p/>
          </table:table-cell>
          <table:table-cell table:style-name="ce356" table:number-columns-repeated="3"/>
          <table:table-cell table:style-name="ce348" table:formula="of:=ISWINNERWOMEN([.L92:.N92]; [.L93:.N9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93:.F93]; [.D94:.F94])">
            <text:p/>
          </table:table-cell>
          <table:table-cell table:style-name="ce78"/>
          <table:table-cell table:style-name="ce352" table:formula="of:=IF(AND(NOT(ISBLANK([.A93])); [.A93]=[.A94]); [.A93]; IF([.$G93]=&quot;W&quot;; IF(NOT(ISBLANK([.A93])); [.A93]; &quot;&quot;); IF([.$G94]=&quot;W&quot;; IF(NOT(ISBLANK([.A94])); [.A94]; &quot;&quot;); &quot;&quot;)))">
            <text:p/>
          </table:table-cell>
          <table:table-cell table:style-name="ce340" table:formula="of:=IF([.$G93]=&quot;W&quot;; IF(NOT(ISBLANK([.B93])); [.B93]; &quot;&quot;); IF([.$G94]=&quot;W&quot;; IF(NOT(ISBLANK([.B94])); [.B94]; &quot;&quot;); &quot;&quot;))">
            <text:p/>
          </table:table-cell>
          <table:table-cell table:style-name="ce354" table:formula="of:=IF(AND(NOT(ISBLANK([.C93])); [.C93]=[.C94]); [.C93]; IF([.$G93]=&quot;W&quot;; IF(NOT(ISBLANK([.C93])); [.C93]; &quot;&quot;); IF([.$G94]=&quot;W&quot;; IF(NOT(ISBLANK([.C94])); [.C94]; &quot;&quot;); &quot;&quot;)))">
            <text:p/>
          </table:table-cell>
          <table:table-cell table:style-name="ce357" table:number-columns-repeated="3"/>
          <table:table-cell table:style-name="ce349" table:formula="of:=ISWINNERWOMEN([.L93:.N93]; [.L92:.N9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94:.F94]; [.D93:.F93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92]));[.$I92]=[.$I93]);[.$I92];IF([.$O92]=&quot;W&quot;;IF(NOT(ISBLANK([.$I92]));[.$I92];&quot;&quot;);IF([.$O93]=&quot;W&quot;;IF(NOT(ISBLANK([.$I93]));[.$I93];&quot;&quot;);&quot;&quot;)))">
            <text:p/>
          </table:table-cell>
          <table:table-cell table:style-name="ce339" table:formula="of:=IF([.$O92]=&quot;W&quot;; IF(NOT(ISBLANK([.J92])); [.J92]; &quot;&quot;); IF([.$O93]=&quot;W&quot;; IF(NOT(ISBLANK([.J93])); [.J93]; &quot;&quot;); &quot;&quot;))">
            <text:p/>
          </table:table-cell>
          <table:table-cell table:style-name="ce361" table:formula="of:=IF(AND(NOT(ISBLANK([.K92])); [.K92]=[.K93]); [.K92]; IF([.$O92]=&quot;W&quot;; IF(NOT(ISBLANK([.K92])); [.K92]; &quot;&quot;); IF([.$O93]=&quot;W&quot;; IF(NOT(ISBLANK([.K93])); [.K93]; &quot;&quot;); &quot;&quot;)))">
            <text:p/>
          </table:table-cell>
          <table:table-cell table:style-name="ce356" table:number-columns-repeated="3"/>
          <table:table-cell table:style-name="ce348" table:formula="of:=ISWINNERWOMEN([.T94:.V94]; [.T95:.V9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95:.F95]; [.D96:.F96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96]));[.$I96]=[.$I97]);[.$I96];IF([.$O96]=&quot;W&quot;;IF(NOT(ISBLANK([.$I96]));[.$I96];&quot;&quot;);IF([.$O97]=&quot;W&quot;;IF(NOT(ISBLANK([.$I97]));[.$I97];&quot;&quot;);&quot;&quot;)))">
            <text:p/>
          </table:table-cell>
          <table:table-cell table:style-name="ce340" table:formula="of:=IF([.$O96]=&quot;W&quot;; IF(NOT(ISBLANK([.J96])); [.J96]; &quot;&quot;); IF([.$O97]=&quot;W&quot;; IF(NOT(ISBLANK([.J97])); [.J97]; &quot;&quot;); &quot;&quot;))">
            <text:p/>
          </table:table-cell>
          <table:table-cell table:style-name="ce362" table:formula="of:=IF(AND(NOT(ISBLANK([.K96])); [.K96]=[.K97]); [.K96]; IF([.$O96]=&quot;W&quot;; IF(NOT(ISBLANK([.K96])); [.K96]; &quot;&quot;); IF([.$O97]=&quot;W&quot;; IF(NOT(ISBLANK([.K97])); [.K97]; &quot;&quot;); &quot;&quot;)))">
            <text:p/>
          </table:table-cell>
          <table:table-cell table:style-name="ce357" table:number-columns-repeated="3"/>
          <table:table-cell table:style-name="ce349" table:formula="of:=ISWINNERWOMEN([.T95:.V95]; [.T94:.V9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96:.F96]; [.D95:.F95])">
            <text:p/>
          </table:table-cell>
          <table:table-cell table:style-name="ce78"/>
          <table:table-cell table:style-name="ce351" table:formula="of:=IF(AND(NOT(ISBLANK([.A95])); [.A95]=[.A96]); [.A95]; IF([.$G95]=&quot;W&quot;; IF(NOT(ISBLANK([.A95])); [.A95]; &quot;&quot;); IF([.$G96]=&quot;W&quot;; IF(NOT(ISBLANK([.A96])); [.A96]; &quot;&quot;); &quot;&quot;)))">
            <text:p/>
          </table:table-cell>
          <table:table-cell table:style-name="ce339" table:formula="of:=IF([.$G95]=&quot;W&quot;; IF(NOT(ISBLANK([.B95])); [.B95]; &quot;&quot;); IF([.$G96]=&quot;W&quot;; IF(NOT(ISBLANK([.B96])); [.B96]; &quot;&quot;); &quot;&quot;))">
            <text:p/>
          </table:table-cell>
          <table:table-cell table:style-name="ce353" table:formula="of:=IF(AND(NOT(ISBLANK([.C95])); [.C95]=[.C96]); [.C95]; IF([.$G95]=&quot;W&quot;; IF(NOT(ISBLANK([.C95])); [.C95]; &quot;&quot;); IF([.$G96]=&quot;W&quot;; IF(NOT(ISBLANK([.C96])); [.C96]; &quot;&quot;); &quot;&quot;)))">
            <text:p/>
          </table:table-cell>
          <table:table-cell table:style-name="ce356" table:number-columns-repeated="3"/>
          <table:table-cell table:style-name="ce348" table:formula="of:=ISWINNERWOMEN([.L96:.N96]; [.L97:.N9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97:.F97]; [.D98:.F98])">
            <text:p/>
          </table:table-cell>
          <table:table-cell table:style-name="ce78"/>
          <table:table-cell table:style-name="ce352" table:formula="of:=IF(AND(NOT(ISBLANK([.A97])); [.A97]=[.A98]); [.A97]; IF([.$G97]=&quot;W&quot;; IF(NOT(ISBLANK([.A97])); [.A97]; &quot;&quot;); IF([.$G98]=&quot;W&quot;; IF(NOT(ISBLANK([.A98])); [.A98]; &quot;&quot;); &quot;&quot;)))">
            <text:p/>
          </table:table-cell>
          <table:table-cell table:style-name="ce340" table:formula="of:=IF([.$G97]=&quot;W&quot;; IF(NOT(ISBLANK([.B97])); [.B97]; &quot;&quot;); IF([.$G98]=&quot;W&quot;; IF(NOT(ISBLANK([.B98])); [.B98]; &quot;&quot;); &quot;&quot;))">
            <text:p/>
          </table:table-cell>
          <table:table-cell table:style-name="ce354" table:formula="of:=IF(AND(NOT(ISBLANK([.C97])); [.C97]=[.C98]); [.C97]; IF([.$G97]=&quot;W&quot;; IF(NOT(ISBLANK([.C97])); [.C97]; &quot;&quot;); IF([.$G98]=&quot;W&quot;; IF(NOT(ISBLANK([.C98])); [.C98]; &quot;&quot;); &quot;&quot;)))">
            <text:p/>
          </table:table-cell>
          <table:table-cell table:style-name="ce357" table:number-columns-repeated="3"/>
          <table:table-cell table:style-name="ce349" table:formula="of:=ISWINNERWOMEN([.L97:.N97]; [.L96:.N9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98:.F98]; [.D97:.F97])">
            <text:p/>
          </table:table-cell>
          <table:table-cell table:style-name="ce78">
            <draw:frame table:end-cell-address="FL.R100" table:end-x="0.0181in" table:end-y="0.0256in" draw:z-index="5" draw:style-name="gr1" draw:text-style-name="P1" svg:width="2.9248in" svg:height="0.2654in" draw:transform="rotate (1.5707963267949) translate (0.0078740157480315in 0.165354330708661in)">
              <draw:text-box>
                <text:p><text:span text:style-name="T1">Section 6</text:span></text:p>
              </draw:text-box>
            </draw:frame>
          </table:table-cell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96"/>
          <table:table-cell table:style-name="ce341"/>
          <table:table-cell table:style-name="ce105"/>
          <table:table-cell table:style-name="ce345" table:number-columns-repeated="3"/>
          <table:table-cell table:style-name="ce350" table:formula="of:=ISWINNERWOMEN([.D99:.F99]; [.D100:.F100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00:.F100]; [.D99:.F99])">
            <text:p/>
          </table:table-cell>
          <table:table-cell table:style-name="ce78"/>
          <table:table-cell table:style-name="ce351" table:formula="of:=IF(AND(NOT(ISBLANK([.A99])); [.A99]=[.A100]); [.A99]; IF([.$G99]=&quot;W&quot;; IF(NOT(ISBLANK([.A99])); [.A99]; &quot;&quot;); IF([.$G100]=&quot;W&quot;; IF(NOT(ISBLANK([.A100])); [.A100]; &quot;&quot;); &quot;&quot;)))">
            <text:p/>
          </table:table-cell>
          <table:table-cell table:style-name="ce339" table:formula="of:=IF([.$G99]=&quot;W&quot;; IF(NOT(ISBLANK([.B99])); [.B99]; &quot;&quot;); IF([.$G100]=&quot;W&quot;; IF(NOT(ISBLANK([.B100])); [.B100]; &quot;&quot;); &quot;&quot;))">
            <text:p/>
          </table:table-cell>
          <table:table-cell table:style-name="ce353" table:formula="of:=IF(AND(NOT(ISBLANK([.C99])); [.C99]=[.C100]); [.C99]; IF([.$G99]=&quot;W&quot;; IF(NOT(ISBLANK([.C99])); [.C99]; &quot;&quot;); IF([.$G100]=&quot;W&quot;; IF(NOT(ISBLANK([.C100])); [.C100]; &quot;&quot;); &quot;&quot;)))">
            <text:p/>
          </table:table-cell>
          <table:table-cell table:style-name="ce356" table:number-columns-repeated="3"/>
          <table:table-cell table:style-name="ce348" table:formula="of:=ISWINNERWOMEN([.L100:.N100]; [.L101:.N10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01:.F101]; [.D102:.F102])">
            <text:p/>
          </table:table-cell>
          <table:table-cell table:style-name="ce78"/>
          <table:table-cell table:style-name="ce352" table:formula="of:=IF(AND(NOT(ISBLANK([.A101])); [.A101]=[.A102]); [.A101]; IF([.$G101]=&quot;W&quot;; IF(NOT(ISBLANK([.A101])); [.A101]; &quot;&quot;); IF([.$G102]=&quot;W&quot;; IF(NOT(ISBLANK([.A102])); [.A102]; &quot;&quot;); &quot;&quot;)))">
            <text:p/>
          </table:table-cell>
          <table:table-cell table:style-name="ce340" table:formula="of:=IF([.$G101]=&quot;W&quot;; IF(NOT(ISBLANK([.B101])); [.B101]; &quot;&quot;); IF([.$G102]=&quot;W&quot;; IF(NOT(ISBLANK([.B102])); [.B102]; &quot;&quot;); &quot;&quot;))">
            <text:p/>
          </table:table-cell>
          <table:table-cell table:style-name="ce354" table:formula="of:=IF(AND(NOT(ISBLANK([.C101])); [.C101]=[.C102]); [.C101]; IF([.$G101]=&quot;W&quot;; IF(NOT(ISBLANK([.C101])); [.C101]; &quot;&quot;); IF([.$G102]=&quot;W&quot;; IF(NOT(ISBLANK([.C102])); [.C102]; &quot;&quot;); &quot;&quot;)))">
            <text:p/>
          </table:table-cell>
          <table:table-cell table:style-name="ce357" table:number-columns-repeated="3"/>
          <table:table-cell table:style-name="ce349" table:formula="of:=ISWINNERWOMEN([.L101:.N101]; [.L100:.N10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02:.F102]; [.D101:.F10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100]));[.$I100]=[.$I101]);[.$I100];IF([.$O100]=&quot;W&quot;;IF(NOT(ISBLANK([.$I100]));[.$I100];&quot;&quot;);IF([.$O101]=&quot;W&quot;;IF(NOT(ISBLANK([.$I101]));[.$I101];&quot;&quot;);&quot;&quot;)))">
            <text:p/>
          </table:table-cell>
          <table:table-cell table:style-name="ce339" table:formula="of:=IF([.$O100]=&quot;W&quot;; IF(NOT(ISBLANK([.J100])); [.J100]; &quot;&quot;); IF([.$O101]=&quot;W&quot;; IF(NOT(ISBLANK([.J101])); [.J101]; &quot;&quot;); &quot;&quot;))">
            <text:p/>
          </table:table-cell>
          <table:table-cell table:style-name="ce361" table:formula="of:=IF(AND(NOT(ISBLANK([.K100])); [.K100]=[.K101]); [.K100]; IF([.$O100]=&quot;W&quot;; IF(NOT(ISBLANK([.K100])); [.K100]; &quot;&quot;); IF([.$O101]=&quot;W&quot;; IF(NOT(ISBLANK([.K101])); [.K101]; &quot;&quot;); &quot;&quot;)))">
            <text:p/>
          </table:table-cell>
          <table:table-cell table:style-name="ce356" table:number-columns-repeated="3"/>
          <table:table-cell table:style-name="ce348" table:formula="of:=ISWINNERWOMEN([.T102:.V102]; [.T103:.V10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03:.F103]; [.D104:.F10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104]));[.$I104]=[.$I105]);[.$I104];IF([.$O104]=&quot;W&quot;;IF(NOT(ISBLANK([.$I104]));[.$I104];&quot;&quot;);IF([.$O105]=&quot;W&quot;;IF(NOT(ISBLANK([.$I105]));[.$I105];&quot;&quot;);&quot;&quot;)))">
            <text:p/>
          </table:table-cell>
          <table:table-cell table:style-name="ce340" table:formula="of:=IF([.$O104]=&quot;W&quot;; IF(NOT(ISBLANK([.J104])); [.J104]; &quot;&quot;); IF([.$O105]=&quot;W&quot;; IF(NOT(ISBLANK([.J105])); [.J105]; &quot;&quot;); &quot;&quot;))">
            <text:p/>
          </table:table-cell>
          <table:table-cell table:style-name="ce362" table:formula="of:=IF(AND(NOT(ISBLANK([.K104])); [.K104]=[.K105]); [.K104]; IF([.$O104]=&quot;W&quot;; IF(NOT(ISBLANK([.K104])); [.K104]; &quot;&quot;); IF([.$O105]=&quot;W&quot;; IF(NOT(ISBLANK([.K105])); [.K105]; &quot;&quot;); &quot;&quot;)))">
            <text:p/>
          </table:table-cell>
          <table:table-cell table:style-name="ce357" table:number-columns-repeated="3"/>
          <table:table-cell table:style-name="ce349" table:formula="of:=ISWINNERWOMEN([.T103:.V103]; [.T102:.V10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04:.F104]; [.D103:.F103])">
            <text:p/>
          </table:table-cell>
          <table:table-cell table:style-name="ce78"/>
          <table:table-cell table:style-name="ce351" table:formula="of:=IF(AND(NOT(ISBLANK([.A103])); [.A103]=[.A104]); [.A103]; IF([.$G103]=&quot;W&quot;; IF(NOT(ISBLANK([.A103])); [.A103]; &quot;&quot;); IF([.$G104]=&quot;W&quot;; IF(NOT(ISBLANK([.A104])); [.A104]; &quot;&quot;); &quot;&quot;)))">
            <text:p/>
          </table:table-cell>
          <table:table-cell table:style-name="ce339" table:formula="of:=IF([.$G103]=&quot;W&quot;; IF(NOT(ISBLANK([.B103])); [.B103]; &quot;&quot;); IF([.$G104]=&quot;W&quot;; IF(NOT(ISBLANK([.B104])); [.B104]; &quot;&quot;); &quot;&quot;))">
            <text:p/>
          </table:table-cell>
          <table:table-cell table:style-name="ce353" table:formula="of:=IF(AND(NOT(ISBLANK([.C103])); [.C103]=[.C104]); [.C103]; IF([.$G103]=&quot;W&quot;; IF(NOT(ISBLANK([.C103])); [.C103]; &quot;&quot;); IF([.$G104]=&quot;W&quot;; IF(NOT(ISBLANK([.C104])); [.C104]; &quot;&quot;); &quot;&quot;)))">
            <text:p/>
          </table:table-cell>
          <table:table-cell table:style-name="ce356" table:number-columns-repeated="3"/>
          <table:table-cell table:style-name="ce348" table:formula="of:=ISWINNERWOMEN([.L104:.N104]; [.L105:.N10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05:.F105]; [.D106:.F106])">
            <text:p/>
          </table:table-cell>
          <table:table-cell table:style-name="ce78"/>
          <table:table-cell table:style-name="ce352" table:formula="of:=IF(AND(NOT(ISBLANK([.A105])); [.A105]=[.A106]); [.A105]; IF([.$G105]=&quot;W&quot;; IF(NOT(ISBLANK([.A105])); [.A105]; &quot;&quot;); IF([.$G106]=&quot;W&quot;; IF(NOT(ISBLANK([.A106])); [.A106]; &quot;&quot;); &quot;&quot;)))">
            <text:p/>
          </table:table-cell>
          <table:table-cell table:style-name="ce340" table:formula="of:=IF([.$G105]=&quot;W&quot;; IF(NOT(ISBLANK([.B105])); [.B105]; &quot;&quot;); IF([.$G106]=&quot;W&quot;; IF(NOT(ISBLANK([.B106])); [.B106]; &quot;&quot;); &quot;&quot;))">
            <text:p/>
          </table:table-cell>
          <table:table-cell table:style-name="ce354" table:formula="of:=IF(AND(NOT(ISBLANK([.C105])); [.C105]=[.C106]); [.C105]; IF([.$G105]=&quot;W&quot;; IF(NOT(ISBLANK([.C105])); [.C105]; &quot;&quot;); IF([.$G106]=&quot;W&quot;; IF(NOT(ISBLANK([.C106])); [.C106]; &quot;&quot;); &quot;&quot;)))">
            <text:p/>
          </table:table-cell>
          <table:table-cell table:style-name="ce357" table:number-columns-repeated="3"/>
          <table:table-cell table:style-name="ce349" table:formula="of:=ISWINNERWOMEN([.L105:.N105]; [.L104:.N10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06:.F106]; [.D105:.F10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3" table:formula="of:=IF(AND(NOT(ISBLANK([.$Q102])); [.$Q102]=[.$Q103]); [.$Q102]; IF([.$W102]=&quot;W&quot;; IF(NOT(ISBLANK([.$Q102])); [.$Q102]; &quot;&quot;); IF([.$W103]=&quot;W&quot;; IF(NOT(ISBLANK([.$Q103])); [.$Q103]; &quot;&quot;); &quot;&quot;)))">
            <text:p/>
          </table:table-cell>
          <table:table-cell table:style-name="ce339" table:formula="of:=IF([.$W102]=&quot;W&quot;; IF(NOT(ISBLANK([.R102])); [.R102]; &quot;&quot;); IF([.$W103]=&quot;W&quot;; IF(NOT(ISBLANK([.R103])); [.R103]; &quot;&quot;); &quot;&quot;))">
            <text:p/>
          </table:table-cell>
          <table:table-cell table:style-name="ce365" table:formula="of:=IF(AND(NOT(ISBLANK([.S102])); [.S102]=[.S103]); [.S102]; IF([.$W102]=&quot;W&quot;; IF(NOT(ISBLANK([.S102])); [.S102]; &quot;&quot;); IF([.$W103]=&quot;W&quot;; IF(NOT(ISBLANK([.S103])); [.S103]; &quot;&quot;); &quot;&quot;)))">
            <text:p/>
          </table:table-cell>
          <table:table-cell table:style-name="ce356" table:formula="of:=IF(NOT(ISBLANK([Finals.D33])); [Finals.D33]; &quot;&quot;)">
            <text:p/>
          </table:table-cell>
          <table:table-cell table:style-name="ce356" table:formula="of:=IF(NOT(ISBLANK([Finals.E33])); [Finals.E33]; &quot;&quot;)">
            <text:p/>
          </table:table-cell>
          <table:table-cell table:style-name="ce356" table:formula="of:=IF(NOT(ISBLANK([Finals.F33])); [Finals.F33]; &quot;&quot;)">
            <text:p/>
          </table:table-cell>
          <table:table-cell table:style-name="ce348" table:formula="of:=IF(NOT(ISBLANK([Finals.I33])); [Finals.I33]; &quot;&quot;)"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07:.F107]; [.D108:.F10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4" table:formula="of:=IF(AND(NOT(ISBLANK([.$Q110])); [.$Q110]=[.$Q111]); [.$Q110]; IF([.$W110]=&quot;W&quot;; IF(NOT(ISBLANK([.$Q110])); [.$Q110]; &quot;&quot;); IF([.$W111]=&quot;W&quot;; IF(NOT(ISBLANK([.$Q111])); [.$Q111]; &quot;&quot;); &quot;&quot;)))">
            <text:p/>
          </table:table-cell>
          <table:table-cell table:style-name="ce340" table:formula="of:=IF([.$W110]=&quot;W&quot;; IF(NOT(ISBLANK([.R110])); [.R110]; &quot;&quot;); IF([.$W111]=&quot;W&quot;; IF(NOT(ISBLANK([.R111])); [.R111]; &quot;&quot;); &quot;&quot;))">
            <text:p/>
          </table:table-cell>
          <table:table-cell table:style-name="ce366" table:formula="of:=IF(AND(NOT(ISBLANK([.S110])); [.S110]=[.S111]); [.S110]; IF([.$W110]=&quot;W&quot;; IF(NOT(ISBLANK([.S110])); [.S110]; &quot;&quot;); IF([.$W111]=&quot;W&quot;; IF(NOT(ISBLANK([.S111])); [.S111]; &quot;&quot;); &quot;&quot;)))">
            <text:p/>
          </table:table-cell>
          <table:table-cell table:style-name="ce357" table:formula="of:=IF(NOT(ISBLANK([Finals.D34])); [Finals.D34]; &quot;&quot;)">
            <text:p/>
          </table:table-cell>
          <table:table-cell table:style-name="ce357" table:formula="of:=IF(NOT(ISBLANK([Finals.E34])); [Finals.E34]; &quot;&quot;)">
            <text:p/>
          </table:table-cell>
          <table:table-cell table:style-name="ce357" table:formula="of:=IF(NOT(ISBLANK([Finals.F34])); [Finals.F34]; &quot;&quot;)">
            <text:p/>
          </table:table-cell>
          <table:table-cell table:style-name="ce349" table:formula="of:=IF(NOT(ISBLANK([Finals.I34])); [Finals.I34]; &quot;&quot;)"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08:.F108]; [.D107:.F107])">
            <text:p/>
          </table:table-cell>
          <table:table-cell table:style-name="ce78"/>
          <table:table-cell table:style-name="ce351" table:formula="of:=IF(AND(NOT(ISBLANK([.A107])); [.A107]=[.A108]); [.A107]; IF([.$G107]=&quot;W&quot;; IF(NOT(ISBLANK([.A107])); [.A107]; &quot;&quot;); IF([.$G108]=&quot;W&quot;; IF(NOT(ISBLANK([.A108])); [.A108]; &quot;&quot;); &quot;&quot;)))">
            <text:p/>
          </table:table-cell>
          <table:table-cell table:style-name="ce339" table:formula="of:=IF([.$G107]=&quot;W&quot;; IF(NOT(ISBLANK([.B107])); [.B107]; &quot;&quot;); IF([.$G108]=&quot;W&quot;; IF(NOT(ISBLANK([.B108])); [.B108]; &quot;&quot;); &quot;&quot;))">
            <text:p/>
          </table:table-cell>
          <table:table-cell table:style-name="ce353" table:formula="of:=IF(AND(NOT(ISBLANK([.C107])); [.C107]=[.C108]); [.C107]; IF([.$G107]=&quot;W&quot;; IF(NOT(ISBLANK([.C107])); [.C107]; &quot;&quot;); IF([.$G108]=&quot;W&quot;; IF(NOT(ISBLANK([.C108])); [.C108]; &quot;&quot;); &quot;&quot;)))">
            <text:p/>
          </table:table-cell>
          <table:table-cell table:style-name="ce356" table:number-columns-repeated="3"/>
          <table:table-cell table:style-name="ce348" table:formula="of:=ISWINNERWOMEN([.L108:.N108]; [.L109:.N10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09:.F109]; [.D110:.F110])">
            <text:p/>
          </table:table-cell>
          <table:table-cell table:style-name="ce78"/>
          <table:table-cell table:style-name="ce352" table:formula="of:=IF(AND(NOT(ISBLANK([.A109])); [.A109]=[.A110]); [.A109]; IF([.$G109]=&quot;W&quot;; IF(NOT(ISBLANK([.A109])); [.A109]; &quot;&quot;); IF([.$G110]=&quot;W&quot;; IF(NOT(ISBLANK([.A110])); [.A110]; &quot;&quot;); &quot;&quot;)))">
            <text:p/>
          </table:table-cell>
          <table:table-cell table:style-name="ce340" table:formula="of:=IF([.$G109]=&quot;W&quot;; IF(NOT(ISBLANK([.B109])); [.B109]; &quot;&quot;); IF([.$G110]=&quot;W&quot;; IF(NOT(ISBLANK([.B110])); [.B110]; &quot;&quot;); &quot;&quot;))">
            <text:p/>
          </table:table-cell>
          <table:table-cell table:style-name="ce354" table:formula="of:=IF(AND(NOT(ISBLANK([.C109])); [.C109]=[.C110]); [.C109]; IF([.$G109]=&quot;W&quot;; IF(NOT(ISBLANK([.C109])); [.C109]; &quot;&quot;); IF([.$G110]=&quot;W&quot;; IF(NOT(ISBLANK([.C110])); [.C110]; &quot;&quot;); &quot;&quot;)))">
            <text:p/>
          </table:table-cell>
          <table:table-cell table:style-name="ce357" table:number-columns-repeated="3"/>
          <table:table-cell table:style-name="ce349" table:formula="of:=ISWINNERWOMEN([.L109:.N109]; [.L108:.N10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10:.F110]; [.D109:.F109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108]));[.$I108]=[.$I109]);[.$I108];IF([.$O108]=&quot;W&quot;;IF(NOT(ISBLANK([.$I108]));[.$I108];&quot;&quot;);IF([.$O109]=&quot;W&quot;;IF(NOT(ISBLANK([.$I109]));[.$I109];&quot;&quot;);&quot;&quot;)))">
            <text:p/>
          </table:table-cell>
          <table:table-cell table:style-name="ce339" table:formula="of:=IF([.$O108]=&quot;W&quot;; IF(NOT(ISBLANK([.J108])); [.J108]; &quot;&quot;); IF([.$O109]=&quot;W&quot;; IF(NOT(ISBLANK([.J109])); [.J109]; &quot;&quot;); &quot;&quot;))">
            <text:p/>
          </table:table-cell>
          <table:table-cell table:style-name="ce361" table:formula="of:=IF(AND(NOT(ISBLANK([.K108])); [.K108]=[.K109]); [.K108]; IF([.$O108]=&quot;W&quot;; IF(NOT(ISBLANK([.K108])); [.K108]; &quot;&quot;); IF([.$O109]=&quot;W&quot;; IF(NOT(ISBLANK([.K109])); [.K109]; &quot;&quot;); &quot;&quot;)))">
            <text:p/>
          </table:table-cell>
          <table:table-cell table:style-name="ce356" table:number-columns-repeated="3"/>
          <table:table-cell table:style-name="ce348" table:formula="of:=ISWINNERWOMEN([.T110:.V110]; [.T111:.V11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11:.F111]; [.D112:.F112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112]));[.$I112]=[.$I113]);[.$I112];IF([.$O112]=&quot;W&quot;;IF(NOT(ISBLANK([.$I112]));[.$I112];&quot;&quot;);IF([.$O113]=&quot;W&quot;;IF(NOT(ISBLANK([.$I113]));[.$I113];&quot;&quot;);&quot;&quot;)))">
            <text:p/>
          </table:table-cell>
          <table:table-cell table:style-name="ce340" table:formula="of:=IF([.$O112]=&quot;W&quot;; IF(NOT(ISBLANK([.J112])); [.J112]; &quot;&quot;); IF([.$O113]=&quot;W&quot;; IF(NOT(ISBLANK([.J113])); [.J113]; &quot;&quot;); &quot;&quot;))">
            <text:p/>
          </table:table-cell>
          <table:table-cell table:style-name="ce362" table:formula="of:=IF(AND(NOT(ISBLANK([.K112])); [.K112]=[.K113]); [.K112]; IF([.$O112]=&quot;W&quot;; IF(NOT(ISBLANK([.K112])); [.K112]; &quot;&quot;); IF([.$O113]=&quot;W&quot;; IF(NOT(ISBLANK([.K113])); [.K113]; &quot;&quot;); &quot;&quot;)))">
            <text:p/>
          </table:table-cell>
          <table:table-cell table:style-name="ce357" table:number-columns-repeated="3"/>
          <table:table-cell table:style-name="ce349" table:formula="of:=ISWINNERWOMEN([.T111:.V111]; [.T110:.V11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12:.F112]; [.D111:.F111])">
            <text:p/>
          </table:table-cell>
          <table:table-cell table:style-name="ce78"/>
          <table:table-cell table:style-name="ce351" table:formula="of:=IF(AND(NOT(ISBLANK([.A111])); [.A111]=[.A112]); [.A111]; IF([.$G111]=&quot;W&quot;; IF(NOT(ISBLANK([.A111])); [.A111]; &quot;&quot;); IF([.$G112]=&quot;W&quot;; IF(NOT(ISBLANK([.A112])); [.A112]; &quot;&quot;); &quot;&quot;)))">
            <text:p/>
          </table:table-cell>
          <table:table-cell table:style-name="ce339" table:formula="of:=IF([.$G111]=&quot;W&quot;; IF(NOT(ISBLANK([.B111])); [.B111]; &quot;&quot;); IF([.$G112]=&quot;W&quot;; IF(NOT(ISBLANK([.B112])); [.B112]; &quot;&quot;); &quot;&quot;))">
            <text:p/>
          </table:table-cell>
          <table:table-cell table:style-name="ce353" table:formula="of:=IF(AND(NOT(ISBLANK([.C111])); [.C111]=[.C112]); [.C111]; IF([.$G111]=&quot;W&quot;; IF(NOT(ISBLANK([.C111])); [.C111]; &quot;&quot;); IF([.$G112]=&quot;W&quot;; IF(NOT(ISBLANK([.C112])); [.C112]; &quot;&quot;); &quot;&quot;)))">
            <text:p/>
          </table:table-cell>
          <table:table-cell table:style-name="ce356" table:number-columns-repeated="3"/>
          <table:table-cell table:style-name="ce348" table:formula="of:=ISWINNERWOMEN([.L112:.N112]; [.L113:.N113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13:.F113]; [.D114:.F114])">
            <text:p/>
          </table:table-cell>
          <table:table-cell table:style-name="ce78"/>
          <table:table-cell table:style-name="ce352" table:formula="of:=IF(AND(NOT(ISBLANK([.A113])); [.A113]=[.A114]); [.A113]; IF([.$G113]=&quot;W&quot;; IF(NOT(ISBLANK([.A113])); [.A113]; &quot;&quot;); IF([.$G114]=&quot;W&quot;; IF(NOT(ISBLANK([.A114])); [.A114]; &quot;&quot;); &quot;&quot;)))">
            <text:p/>
          </table:table-cell>
          <table:table-cell table:style-name="ce340" table:formula="of:=IF([.$G113]=&quot;W&quot;; IF(NOT(ISBLANK([.B113])); [.B113]; &quot;&quot;); IF([.$G114]=&quot;W&quot;; IF(NOT(ISBLANK([.B114])); [.B114]; &quot;&quot;); &quot;&quot;))">
            <text:p/>
          </table:table-cell>
          <table:table-cell table:style-name="ce354" table:formula="of:=IF(AND(NOT(ISBLANK([.C113])); [.C113]=[.C114]); [.C113]; IF([.$G113]=&quot;W&quot;; IF(NOT(ISBLANK([.C113])); [.C113]; &quot;&quot;); IF([.$G114]=&quot;W&quot;; IF(NOT(ISBLANK([.C114])); [.C114]; &quot;&quot;); &quot;&quot;)))">
            <text:p/>
          </table:table-cell>
          <table:table-cell table:style-name="ce357" table:number-columns-repeated="3"/>
          <table:table-cell table:style-name="ce349" table:formula="of:=ISWINNERWOMEN([.L113:.N113]; [.L112:.N112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14:.F114]; [.D113:.F113])">
            <text:p/>
          </table:table-cell>
          <table:table-cell table:style-name="ce78">
            <draw:frame table:end-cell-address="FL.R116" table:end-x="0.0181in" table:end-y="0.0248in" draw:z-index="6" draw:style-name="gr1" draw:text-style-name="P1" svg:width="2.9248in" svg:height="0.2654in" draw:transform="rotate (1.5707963267949) translate (0.0078740157480315in 0.164566929133858in)">
              <draw:text-box>
                <text:p><text:span text:style-name="T1">Section 7</text:span></text:p>
              </draw:text-box>
            </draw:frame>
          </table:table-cell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96"/>
          <table:table-cell table:style-name="ce341"/>
          <table:table-cell table:style-name="ce105"/>
          <table:table-cell table:style-name="ce345" table:number-columns-repeated="3"/>
          <table:table-cell table:style-name="ce350" table:formula="of:=ISWINNERWOMEN([.D115:.F115]; [.D116:.F116])">
            <text:p/>
          </table:table-cell>
          <table:table-cell table:style-name="ce81"/>
          <table:table-cell table:style-name="ce119"/>
          <table:table-cell table:style-name="ce81" table:number-columns-repeated="2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 table:number-columns-repeated="5"/>
          <table:table-cell table:style-name="ce358" table:number-columns-repeated="3"/>
          <table:table-cell table:style-name="ce81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16:.F116]; [.D115:.F115])">
            <text:p/>
          </table:table-cell>
          <table:table-cell table:style-name="ce78"/>
          <table:table-cell table:style-name="ce351" table:formula="of:=IF(AND(NOT(ISBLANK([.A115])); [.A115]=[.A116]); [.A115]; IF([.$G115]=&quot;W&quot;; IF(NOT(ISBLANK([.A115])); [.A115]; &quot;&quot;); IF([.$G116]=&quot;W&quot;; IF(NOT(ISBLANK([.A116])); [.A116]; &quot;&quot;); &quot;&quot;)))">
            <text:p/>
          </table:table-cell>
          <table:table-cell table:style-name="ce339" table:formula="of:=IF([.$G115]=&quot;W&quot;; IF(NOT(ISBLANK([.B115])); [.B115]; &quot;&quot;); IF([.$G116]=&quot;W&quot;; IF(NOT(ISBLANK([.B116])); [.B116]; &quot;&quot;); &quot;&quot;))">
            <text:p/>
          </table:table-cell>
          <table:table-cell table:style-name="ce353" table:formula="of:=IF(AND(NOT(ISBLANK([.C115])); [.C115]=[.C116]); [.C115]; IF([.$G115]=&quot;W&quot;; IF(NOT(ISBLANK([.C115])); [.C115]; &quot;&quot;); IF([.$G116]=&quot;W&quot;; IF(NOT(ISBLANK([.C116])); [.C116]; &quot;&quot;); &quot;&quot;)))">
            <text:p/>
          </table:table-cell>
          <table:table-cell table:style-name="ce356" table:number-columns-repeated="3"/>
          <table:table-cell table:style-name="ce348" table:formula="of:=ISWINNERWOMEN([.L116:.N116]; [.L117:.N11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17:.F117]; [.D118:.F118])">
            <text:p/>
          </table:table-cell>
          <table:table-cell table:style-name="ce78"/>
          <table:table-cell table:style-name="ce352" table:formula="of:=IF(AND(NOT(ISBLANK([.A117])); [.A117]=[.A118]); [.A117]; IF([.$G117]=&quot;W&quot;; IF(NOT(ISBLANK([.A117])); [.A117]; &quot;&quot;); IF([.$G118]=&quot;W&quot;; IF(NOT(ISBLANK([.A118])); [.A118]; &quot;&quot;); &quot;&quot;)))">
            <text:p/>
          </table:table-cell>
          <table:table-cell table:style-name="ce340" table:formula="of:=IF([.$G117]=&quot;W&quot;; IF(NOT(ISBLANK([.B117])); [.B117]; &quot;&quot;); IF([.$G118]=&quot;W&quot;; IF(NOT(ISBLANK([.B118])); [.B118]; &quot;&quot;); &quot;&quot;))">
            <text:p/>
          </table:table-cell>
          <table:table-cell table:style-name="ce354" table:formula="of:=IF(AND(NOT(ISBLANK([.C117])); [.C117]=[.C118]); [.C117]; IF([.$G117]=&quot;W&quot;; IF(NOT(ISBLANK([.C117])); [.C117]; &quot;&quot;); IF([.$G118]=&quot;W&quot;; IF(NOT(ISBLANK([.C118])); [.C118]; &quot;&quot;); &quot;&quot;)))">
            <text:p/>
          </table:table-cell>
          <table:table-cell table:style-name="ce357" table:number-columns-repeated="3"/>
          <table:table-cell table:style-name="ce349" table:formula="of:=ISWINNERWOMEN([.L117:.N117]; [.L116:.N11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18:.F118]; [.D117:.F117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116]));[.$I116]=[.$I117]);[.$I116];IF([.$O116]=&quot;W&quot;;IF(NOT(ISBLANK([.$I116]));[.$I116];&quot;&quot;);IF([.$O117]=&quot;W&quot;;IF(NOT(ISBLANK([.$I117]));[.$I117];&quot;&quot;);&quot;&quot;)))">
            <text:p/>
          </table:table-cell>
          <table:table-cell table:style-name="ce339" table:formula="of:=IF([.$O116]=&quot;W&quot;; IF(NOT(ISBLANK([.J116])); [.J116]; &quot;&quot;); IF([.$O117]=&quot;W&quot;; IF(NOT(ISBLANK([.J117])); [.J117]; &quot;&quot;); &quot;&quot;))">
            <text:p/>
          </table:table-cell>
          <table:table-cell table:style-name="ce361" table:formula="of:=IF(AND(NOT(ISBLANK([.K116])); [.K116]=[.K117]); [.K116]; IF([.$O116]=&quot;W&quot;; IF(NOT(ISBLANK([.K116])); [.K116]; &quot;&quot;); IF([.$O117]=&quot;W&quot;; IF(NOT(ISBLANK([.K117])); [.K117]; &quot;&quot;); &quot;&quot;)))">
            <text:p/>
          </table:table-cell>
          <table:table-cell table:style-name="ce356" table:number-columns-repeated="3"/>
          <table:table-cell table:style-name="ce348" table:formula="of:=ISWINNERWOMEN([.T118:.V118]; [.T119:.V11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19:.F119]; [.D120:.F120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120]));[.$I120]=[.$I121]);[.$I120];IF([.$O120]=&quot;W&quot;;IF(NOT(ISBLANK([.$I120]));[.$I120];&quot;&quot;);IF([.$O121]=&quot;W&quot;;IF(NOT(ISBLANK([.$I121]));[.$I121];&quot;&quot;);&quot;&quot;)))">
            <text:p/>
          </table:table-cell>
          <table:table-cell table:style-name="ce340" table:formula="of:=IF([.$O120]=&quot;W&quot;; IF(NOT(ISBLANK([.J120])); [.J120]; &quot;&quot;); IF([.$O121]=&quot;W&quot;; IF(NOT(ISBLANK([.J121])); [.J121]; &quot;&quot;); &quot;&quot;))">
            <text:p/>
          </table:table-cell>
          <table:table-cell table:style-name="ce362" table:formula="of:=IF(AND(NOT(ISBLANK([.K120])); [.K120]=[.K121]); [.K120]; IF([.$O120]=&quot;W&quot;; IF(NOT(ISBLANK([.K120])); [.K120]; &quot;&quot;); IF([.$O121]=&quot;W&quot;; IF(NOT(ISBLANK([.K121])); [.K121]; &quot;&quot;); &quot;&quot;)))">
            <text:p/>
          </table:table-cell>
          <table:table-cell table:style-name="ce357" table:number-columns-repeated="3"/>
          <table:table-cell table:style-name="ce349" table:formula="of:=ISWINNERWOMEN([.T119:.V119]; [.T118:.V11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20:.F120]; [.D119:.F119])">
            <text:p/>
          </table:table-cell>
          <table:table-cell table:style-name="ce78"/>
          <table:table-cell table:style-name="ce351" table:formula="of:=IF(AND(NOT(ISBLANK([.A119])); [.A119]=[.A120]); [.A119]; IF([.$G119]=&quot;W&quot;; IF(NOT(ISBLANK([.A119])); [.A119]; &quot;&quot;); IF([.$G120]=&quot;W&quot;; IF(NOT(ISBLANK([.A120])); [.A120]; &quot;&quot;); &quot;&quot;)))">
            <text:p/>
          </table:table-cell>
          <table:table-cell table:style-name="ce339" table:formula="of:=IF([.$G119]=&quot;W&quot;; IF(NOT(ISBLANK([.B119])); [.B119]; &quot;&quot;); IF([.$G120]=&quot;W&quot;; IF(NOT(ISBLANK([.B120])); [.B120]; &quot;&quot;); &quot;&quot;))">
            <text:p/>
          </table:table-cell>
          <table:table-cell table:style-name="ce353" table:formula="of:=IF(AND(NOT(ISBLANK([.C119])); [.C119]=[.C120]); [.C119]; IF([.$G119]=&quot;W&quot;; IF(NOT(ISBLANK([.C119])); [.C119]; &quot;&quot;); IF([.$G120]=&quot;W&quot;; IF(NOT(ISBLANK([.C120])); [.C120]; &quot;&quot;); &quot;&quot;)))">
            <text:p/>
          </table:table-cell>
          <table:table-cell table:style-name="ce356" table:number-columns-repeated="3"/>
          <table:table-cell table:style-name="ce348" table:formula="of:=ISWINNERWOMEN([.L120:.N120]; [.L121:.N121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21:.F121]; [.D122:.F122])">
            <text:p/>
          </table:table-cell>
          <table:table-cell table:style-name="ce78"/>
          <table:table-cell table:style-name="ce352" table:formula="of:=IF(AND(NOT(ISBLANK([.A121])); [.A121]=[.A122]); [.A121]; IF([.$G121]=&quot;W&quot;; IF(NOT(ISBLANK([.A121])); [.A121]; &quot;&quot;); IF([.$G122]=&quot;W&quot;; IF(NOT(ISBLANK([.A122])); [.A122]; &quot;&quot;); &quot;&quot;)))">
            <text:p/>
          </table:table-cell>
          <table:table-cell table:style-name="ce340" table:formula="of:=IF([.$G121]=&quot;W&quot;; IF(NOT(ISBLANK([.B121])); [.B121]; &quot;&quot;); IF([.$G122]=&quot;W&quot;; IF(NOT(ISBLANK([.B122])); [.B122]; &quot;&quot;); &quot;&quot;))">
            <text:p/>
          </table:table-cell>
          <table:table-cell table:style-name="ce354" table:formula="of:=IF(AND(NOT(ISBLANK([.C121])); [.C121]=[.C122]); [.C121]; IF([.$G121]=&quot;W&quot;; IF(NOT(ISBLANK([.C121])); [.C121]; &quot;&quot;); IF([.$G122]=&quot;W&quot;; IF(NOT(ISBLANK([.C122])); [.C122]; &quot;&quot;); &quot;&quot;)))">
            <text:p/>
          </table:table-cell>
          <table:table-cell table:style-name="ce357" table:number-columns-repeated="3"/>
          <table:table-cell table:style-name="ce349" table:formula="of:=ISWINNERWOMEN([.L121:.N121]; [.L120:.N120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22:.F122]; [.D121:.F121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3" table:formula="of:=IF(AND(NOT(ISBLANK([.$Q118])); [.$Q118]=[.$Q119]); [.$Q118]; IF([.$W118]=&quot;W&quot;; IF(NOT(ISBLANK([.$Q118])); [.$Q118]; &quot;&quot;); IF([.$W119]=&quot;W&quot;; IF(NOT(ISBLANK([.$Q119])); [.$Q119]; &quot;&quot;); &quot;&quot;)))">
            <text:p/>
          </table:table-cell>
          <table:table-cell table:style-name="ce339" table:formula="of:=IF([.$W118]=&quot;W&quot;; IF(NOT(ISBLANK([.R118])); [.R118]; &quot;&quot;); IF([.$W119]=&quot;W&quot;; IF(NOT(ISBLANK([.R119])); [.R119]; &quot;&quot;); &quot;&quot;))">
            <text:p/>
          </table:table-cell>
          <table:table-cell table:style-name="ce365" table:formula="of:=IF(AND(NOT(ISBLANK([.S118])); [.S118]=[.S119]); [.S118]; IF([.$W118]=&quot;W&quot;; IF(NOT(ISBLANK([.S118])); [.S118]; &quot;&quot;); IF([.$W119]=&quot;W&quot;; IF(NOT(ISBLANK([.S119])); [.S119]; &quot;&quot;); &quot;&quot;)))">
            <text:p/>
          </table:table-cell>
          <table:table-cell table:style-name="ce356" table:formula="of:=IF(NOT(ISBLANK([Finals.D35])); [Finals.D35]; &quot;&quot;)">
            <text:p/>
          </table:table-cell>
          <table:table-cell table:style-name="ce356" table:formula="of:=IF(NOT(ISBLANK([Finals.E35])); [Finals.E35]; &quot;&quot;)">
            <text:p/>
          </table:table-cell>
          <table:table-cell table:style-name="ce356" table:formula="of:=IF(NOT(ISBLANK([Finals.F35])); [Finals.F35]; &quot;&quot;)">
            <text:p/>
          </table:table-cell>
          <table:table-cell table:style-name="ce348" table:formula="of:=IF(NOT(ISBLANK([Finals.I35])); [Finals.I35]; &quot;&quot;)"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23:.F123]; [.D124:.F124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2"/>
          <table:table-cell table:style-name="ce364" table:formula="of:=IF(AND(NOT(ISBLANK([.$Q126])); [.$Q126]=[.$Q127]); [.$Q126]; IF([.$W126]=&quot;W&quot;; IF(NOT(ISBLANK([.$Q126])); [.$Q126]; &quot;&quot;); IF([.$W127]=&quot;W&quot;; IF(NOT(ISBLANK([.$Q127])); [.$Q127]; &quot;&quot;); &quot;&quot;)))">
            <text:p/>
          </table:table-cell>
          <table:table-cell table:style-name="ce340" table:formula="of:=IF([.$W126]=&quot;W&quot;; IF(NOT(ISBLANK([.R126])); [.R126]; &quot;&quot;); IF([.$W127]=&quot;W&quot;; IF(NOT(ISBLANK([.R127])); [.R127]; &quot;&quot;); &quot;&quot;))">
            <text:p/>
          </table:table-cell>
          <table:table-cell table:style-name="ce366" table:formula="of:=IF(AND(NOT(ISBLANK([.S126])); [.S126]=[.S127]); [.S126]; IF([.$W126]=&quot;W&quot;; IF(NOT(ISBLANK([.S126])); [.S126]; &quot;&quot;); IF([.$W127]=&quot;W&quot;; IF(NOT(ISBLANK([.S127])); [.S127]; &quot;&quot;); &quot;&quot;)))">
            <text:p/>
          </table:table-cell>
          <table:table-cell table:style-name="ce357" table:formula="of:=IF(NOT(ISBLANK([Finals.D36])); [Finals.D36]; &quot;&quot;)">
            <text:p/>
          </table:table-cell>
          <table:table-cell table:style-name="ce357" table:formula="of:=IF(NOT(ISBLANK([Finals.E36])); [Finals.E36]; &quot;&quot;)">
            <text:p/>
          </table:table-cell>
          <table:table-cell table:style-name="ce357" table:formula="of:=IF(NOT(ISBLANK([Finals.F36])); [Finals.F36]; &quot;&quot;)">
            <text:p/>
          </table:table-cell>
          <table:table-cell table:style-name="ce349" table:formula="of:=IF(NOT(ISBLANK([Finals.I36])); [Finals.I36]; &quot;&quot;)"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24:.F124]; [.D123:.F123])">
            <text:p/>
          </table:table-cell>
          <table:table-cell table:style-name="ce78"/>
          <table:table-cell table:style-name="ce351" table:formula="of:=IF(AND(NOT(ISBLANK([.A123])); [.A123]=[.A124]); [.A123]; IF([.$G123]=&quot;W&quot;; IF(NOT(ISBLANK([.A123])); [.A123]; &quot;&quot;); IF([.$G124]=&quot;W&quot;; IF(NOT(ISBLANK([.A124])); [.A124]; &quot;&quot;); &quot;&quot;)))">
            <text:p/>
          </table:table-cell>
          <table:table-cell table:style-name="ce339" table:formula="of:=IF([.$G123]=&quot;W&quot;; IF(NOT(ISBLANK([.B123])); [.B123]; &quot;&quot;); IF([.$G124]=&quot;W&quot;; IF(NOT(ISBLANK([.B124])); [.B124]; &quot;&quot;); &quot;&quot;))">
            <text:p/>
          </table:table-cell>
          <table:table-cell table:style-name="ce353" table:formula="of:=IF(AND(NOT(ISBLANK([.C123])); [.C123]=[.C124]); [.C123]; IF([.$G123]=&quot;W&quot;; IF(NOT(ISBLANK([.C123])); [.C123]; &quot;&quot;); IF([.$G124]=&quot;W&quot;; IF(NOT(ISBLANK([.C124])); [.C124]; &quot;&quot;); &quot;&quot;)))">
            <text:p/>
          </table:table-cell>
          <table:table-cell table:style-name="ce356" table:number-columns-repeated="3"/>
          <table:table-cell table:style-name="ce348" table:formula="of:=ISWINNERWOMEN([.L124:.N124]; [.L125:.N125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25:.F125]; [.D126:.F126])">
            <text:p/>
          </table:table-cell>
          <table:table-cell table:style-name="ce78"/>
          <table:table-cell table:style-name="ce352" table:formula="of:=IF(AND(NOT(ISBLANK([.A125])); [.A125]=[.A126]); [.A125]; IF([.$G125]=&quot;W&quot;; IF(NOT(ISBLANK([.A125])); [.A125]; &quot;&quot;); IF([.$G126]=&quot;W&quot;; IF(NOT(ISBLANK([.A126])); [.A126]; &quot;&quot;); &quot;&quot;)))">
            <text:p/>
          </table:table-cell>
          <table:table-cell table:style-name="ce340" table:formula="of:=IF([.$G125]=&quot;W&quot;; IF(NOT(ISBLANK([.B125])); [.B125]; &quot;&quot;); IF([.$G126]=&quot;W&quot;; IF(NOT(ISBLANK([.B126])); [.B126]; &quot;&quot;); &quot;&quot;))">
            <text:p/>
          </table:table-cell>
          <table:table-cell table:style-name="ce354" table:formula="of:=IF(AND(NOT(ISBLANK([.C125])); [.C125]=[.C126]); [.C125]; IF([.$G125]=&quot;W&quot;; IF(NOT(ISBLANK([.C125])); [.C125]; &quot;&quot;); IF([.$G126]=&quot;W&quot;; IF(NOT(ISBLANK([.C126])); [.C126]; &quot;&quot;); &quot;&quot;)))">
            <text:p/>
          </table:table-cell>
          <table:table-cell table:style-name="ce357" table:number-columns-repeated="3"/>
          <table:table-cell table:style-name="ce349" table:formula="of:=ISWINNERWOMEN([.L125:.N125]; [.L124:.N124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26:.F126]; [.D125:.F125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59" table:formula="of:=IF(AND(NOT(ISBLANK([.$I124]));[.$I124]=[.$I125]);[.$I124];IF([.$O124]=&quot;W&quot;;IF(NOT(ISBLANK([.$I124]));[.$I124];&quot;&quot;);IF([.$O125]=&quot;W&quot;;IF(NOT(ISBLANK([.$I125]));[.$I125];&quot;&quot;);&quot;&quot;)))">
            <text:p/>
          </table:table-cell>
          <table:table-cell table:style-name="ce339" table:formula="of:=IF([.$O124]=&quot;W&quot;; IF(NOT(ISBLANK([.J124])); [.J124]; &quot;&quot;); IF([.$O125]=&quot;W&quot;; IF(NOT(ISBLANK([.J125])); [.J125]; &quot;&quot;); &quot;&quot;))">
            <text:p/>
          </table:table-cell>
          <table:table-cell table:style-name="ce361" table:formula="of:=IF(AND(NOT(ISBLANK([.K124])); [.K124]=[.K125]); [.K124]; IF([.$O124]=&quot;W&quot;; IF(NOT(ISBLANK([.K124])); [.K124]; &quot;&quot;); IF([.$O125]=&quot;W&quot;; IF(NOT(ISBLANK([.K125])); [.K125]; &quot;&quot;); &quot;&quot;)))">
            <text:p/>
          </table:table-cell>
          <table:table-cell table:style-name="ce356" table:number-columns-repeated="3"/>
          <table:table-cell table:style-name="ce348" table:formula="of:=ISWINNERWOMEN([.T126:.V126]; [.T127:.V127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27:.F127]; [.D128:.F128])">
            <text:p/>
          </table:table-cell>
          <table:table-cell table:style-name="ce78"/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2"/>
          <table:table-cell table:style-name="ce360" table:formula="of:=IF(AND(NOT(ISBLANK([.$I128]));[.$I128]=[.$I129]);[.$I128];IF([.$O128]=&quot;W&quot;;IF(NOT(ISBLANK([.$I128]));[.$I128];&quot;&quot;);IF([.$O129]=&quot;W&quot;;IF(NOT(ISBLANK([.$I129]));[.$I129];&quot;&quot;);&quot;&quot;)))">
            <text:p/>
          </table:table-cell>
          <table:table-cell table:style-name="ce340" table:formula="of:=IF([.$O128]=&quot;W&quot;; IF(NOT(ISBLANK([.J128])); [.J128]; &quot;&quot;); IF([.$O129]=&quot;W&quot;; IF(NOT(ISBLANK([.J129])); [.J129]; &quot;&quot;); &quot;&quot;))">
            <text:p/>
          </table:table-cell>
          <table:table-cell table:style-name="ce362" table:formula="of:=IF(AND(NOT(ISBLANK([.K128])); [.K128]=[.K129]); [.K128]; IF([.$O128]=&quot;W&quot;; IF(NOT(ISBLANK([.K128])); [.K128]; &quot;&quot;); IF([.$O129]=&quot;W&quot;; IF(NOT(ISBLANK([.K129])); [.K129]; &quot;&quot;); &quot;&quot;)))">
            <text:p/>
          </table:table-cell>
          <table:table-cell table:style-name="ce357" table:number-columns-repeated="3"/>
          <table:table-cell table:style-name="ce349" table:formula="of:=ISWINNERWOMEN([.T127:.V127]; [.T126:.V126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28:.F128]; [.D127:.F127])">
            <text:p/>
          </table:table-cell>
          <table:table-cell table:style-name="ce78"/>
          <table:table-cell table:style-name="ce351" table:formula="of:=IF(AND(NOT(ISBLANK([.A127])); [.A127]=[.A128]); [.A127]; IF([.$G127]=&quot;W&quot;; IF(NOT(ISBLANK([.A127])); [.A127]; &quot;&quot;); IF([.$G128]=&quot;W&quot;; IF(NOT(ISBLANK([.A128])); [.A128]; &quot;&quot;); &quot;&quot;)))">
            <text:p/>
          </table:table-cell>
          <table:table-cell table:style-name="ce339" table:formula="of:=IF([.$G127]=&quot;W&quot;; IF(NOT(ISBLANK([.B127])); [.B127]; &quot;&quot;); IF([.$G128]=&quot;W&quot;; IF(NOT(ISBLANK([.B128])); [.B128]; &quot;&quot;); &quot;&quot;))">
            <text:p/>
          </table:table-cell>
          <table:table-cell table:style-name="ce353" table:formula="of:=IF(AND(NOT(ISBLANK([.C127])); [.C127]=[.C128]); [.C127]; IF([.$G127]=&quot;W&quot;; IF(NOT(ISBLANK([.C127])); [.C127]; &quot;&quot;); IF([.$G128]=&quot;W&quot;; IF(NOT(ISBLANK([.C128])); [.C128]; &quot;&quot;); &quot;&quot;)))">
            <text:p/>
          </table:table-cell>
          <table:table-cell table:style-name="ce356" table:number-columns-repeated="3"/>
          <table:table-cell table:style-name="ce348" table:formula="of:=ISWINNERWOMEN([.L128:.N128]; [.L129:.N129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4"/>
          <table:table-cell table:style-name="ce339"/>
          <table:table-cell table:style-name="ce103"/>
          <table:table-cell table:style-name="ce342" table:number-columns-repeated="3"/>
          <table:table-cell table:style-name="ce348" table:formula="of:=ISWINNERWOMEN([.D129:.F129]; [.D130:.F130])">
            <text:p/>
          </table:table-cell>
          <table:table-cell table:style-name="ce78"/>
          <table:table-cell table:style-name="ce352" table:formula="of:=IF(AND(NOT(ISBLANK([.A129])); [.A129]=[.A130]); [.A129]; IF([.$G129]=&quot;W&quot;; IF(NOT(ISBLANK([.A129])); [.A129]; &quot;&quot;); IF([.$G130]=&quot;W&quot;; IF(NOT(ISBLANK([.A130])); [.A130]; &quot;&quot;); &quot;&quot;)))">
            <text:p/>
          </table:table-cell>
          <table:table-cell table:style-name="ce340" table:formula="of:=IF([.$G129]=&quot;W&quot;; IF(NOT(ISBLANK([.B129])); [.B129]; &quot;&quot;); IF([.$G130]=&quot;W&quot;; IF(NOT(ISBLANK([.B130])); [.B130]; &quot;&quot;); &quot;&quot;))">
            <text:p/>
          </table:table-cell>
          <table:table-cell table:style-name="ce354" table:formula="of:=IF(AND(NOT(ISBLANK([.C129])); [.C129]=[.C130]); [.C129]; IF([.$G129]=&quot;W&quot;; IF(NOT(ISBLANK([.C129])); [.C129]; &quot;&quot;); IF([.$G130]=&quot;W&quot;; IF(NOT(ISBLANK([.C130])); [.C130]; &quot;&quot;); &quot;&quot;)))">
            <text:p/>
          </table:table-cell>
          <table:table-cell table:style-name="ce357" table:number-columns-repeated="3"/>
          <table:table-cell table:style-name="ce349" table:formula="of:=ISWINNERWOMEN([.L129:.N129]; [.L128:.N128])">
            <text:p/>
          </table:table-cell>
          <table:table-cell table:style-name="ce78" table:number-columns-repeated="4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95"/>
          <table:table-cell table:style-name="ce340"/>
          <table:table-cell table:style-name="ce104"/>
          <table:table-cell table:style-name="ce344" table:number-columns-repeated="3"/>
          <table:table-cell table:style-name="ce349" table:formula="of:=ISWINNERWOMEN([.D130:.F130]; [.D129:.F129])">
            <text:p/>
          </table:table-cell>
          <table:table-cell table:style-name="ce78">
            <draw:frame table:end-cell-address="FL.R132" table:end-x="0.0181in" table:end-y="0.0366in" draw:z-index="7" draw:style-name="gr2" draw:text-style-name="P1" svg:width="2.9248in" svg:height="0.2654in" draw:transform="rotate (1.5707963267949) translate (0.0078740157480315in 0.164566929133858in)">
              <draw:text-box>
                <text:p><text:span text:style-name="T1">Section 8</text:span></text:p>
              </draw:text-box>
            </draw:frame>
          </table:table-cell>
          <table:table-cell table:style-name="ce116"/>
          <table:table-cell table:style-name="ce78" table:number-columns-repeated="2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 table:number-columns-repeated="5"/>
          <table:table-cell table:style-name="ce355" table:number-columns-repeated="3"/>
          <table:table-cell table:style-name="ce78"/>
          <table:table-cell office:value-type="float" office:value="8" calcext:value-type="float">
            <text:p>8</text:p>
          </table:table-cell>
        </table:table-row>
        <table:table-row table:style-name="ro4" table:number-rows-repeated="65405">
          <table:table-cell table:number-columns-repeated="32"/>
        </table:table-row>
        <table:table-row table:style-name="ro4">
          <table:table-cell table:number-columns-repeated="32"/>
        </table:table-row>
        <calcext:conditional-formats>
          <calcext:conditional-format calcext:target-range-address="FL.J4:FL.J5 FL.R6:FL.R7 FL.J8:FL.J9 FL.Z10:FL.Z11 FL.J12:FL.J13 FL.R14:FL.R15 FL.J16:FL.J17 FL.J20:FL.J21 FL.R22:FL.R23 FL.J24:FL.J25 FL.Z26:FL.Z27 FL.J28:FL.J29 FL.R30:FL.R31 FL.J32:FL.J33 FL.J36:FL.J37 FL.R38:FL.R39 FL.J40:FL.J41 FL.Z42:FL.Z43 FL.J44:FL.J45 FL.R46:FL.R47 FL.J48:FL.J49 FL.J52:FL.J53 FL.R54:FL.R55 FL.J56:FL.J57 FL.Z58:FL.Z59 FL.J60:FL.J61 FL.R62:FL.R63 FL.J64:FL.J65 FL.J68:FL.J69 FL.R70:FL.R71 FL.J72:FL.J73 FL.Z74:FL.Z75 FL.J76:FL.J77 FL.R78:FL.R79 FL.J80:FL.J81 FL.J84:FL.J85 FL.R86:FL.R87 FL.J88:FL.J89 FL.Z90:FL.Z91 FL.J92:FL.J93 FL.R94:FL.R95 FL.J96:FL.J97 FL.J100:FL.J101 FL.R102:FL.R103 FL.J104:FL.J105 FL.Z106:FL.Z107 FL.J108:FL.J109 FL.R110:FL.R111 FL.J112:FL.J113 FL.J116:FL.J117 FL.R118:FL.R119 FL.J120:FL.J121 FL.Z122:FL.Z123 FL.J124:FL.J125 FL.R126:FL.R127 FL.J128:FL.J129 FL.B3:FL.B130">
            <calcext:condition calcext:apply-style-name="MatchWinner" calcext:value="formula-is([.G3] = &quot;W&quot;)" calcext:base-cell-address="FL.B3"/>
            <calcext:condition calcext:apply-style-name="MatchInProgress" calcext:value="formula-is(AND([.G3]=&quot;&quot;; NOT([.D3]=&quot;&quot;)))" calcext:base-cell-address="FL.B3"/>
            <calcext:condition calcext:apply-style-name="MatchStilltoStart" calcext:value="formula-is([.D3]=&quot;&quot;)" calcext:base-cell-address="FL.B3"/>
          </calcext:conditional-format>
          <calcext:conditional-format calcext:target-range-address="FL.D3:FL.F130">
            <calcext:condition calcext:apply-style-name="SetWinner" calcext:value="formula-is(OR(AND(ISODD(ROW()); [.F130]&gt;[.F131]); AND(ISEVEN(ROW()); [.F130]&gt;[.F129])))" calcext:base-cell-address="FL.F130"/>
          </calcext:conditional-format>
          <calcext:conditional-format calcext:target-range-address="FL.O4:FL.O5 FL.W6:FL.W7 FL.O8:FL.O9 FL.AE10:FL.AE11 FL.O12:FL.O13 FL.W14:FL.W15 FL.O16:FL.O17 FL.O20:FL.O21 FL.W22:FL.W23 FL.O24:FL.O25 FL.AE26:FL.AE27 FL.O28:FL.O29 FL.W30:FL.W31 FL.O32:FL.O33 FL.O36:FL.O37 FL.W38:FL.W39 FL.O40:FL.O41 FL.AE42:FL.AE43 FL.O44:FL.O45 FL.W46:FL.W47 FL.O48:FL.O49 FL.O52:FL.O53 FL.W54:FL.W55 FL.O56:FL.O57 FL.AE58:FL.AE59 FL.O60:FL.O61 FL.W62:FL.W63 FL.O64:FL.O65 FL.O68:FL.O69 FL.W70:FL.W71 FL.O72:FL.O73 FL.AE74:FL.AE75 FL.O76:FL.O77 FL.W78:FL.W79 FL.O80:FL.O81 FL.O84:FL.O85 FL.W86:FL.W87 FL.O88:FL.O89 FL.AE90:FL.AE91 FL.O92:FL.O93 FL.W94:FL.W95 FL.O96:FL.O97 FL.O100:FL.O101 FL.W102:FL.W103 FL.O104:FL.O105 FL.AE106:FL.AE107 FL.O108:FL.O109 FL.W110:FL.W111 FL.O112:FL.O113 FL.O116:FL.O117 FL.W118:FL.W119 FL.O120:FL.O121 FL.AE122:FL.AE123 FL.O124:FL.O125 FL.W126:FL.W127 FL.O128:FL.O129 FL.G3:FL.G130">
            <calcext:condition calcext:apply-style-name="WLRWinner" calcext:value="=&quot;W&quot;" calcext:base-cell-address="Finals.I3"/>
            <calcext:condition calcext:apply-style-name="WLRRetired" calcext:value="=&quot;R&quot;" calcext:base-cell-address="Finals.I3"/>
          </calcext:conditional-format>
          <calcext:conditional-format calcext:target-range-address="FL.I4:FL.I5 FL.I8:FL.I9 FL.I12:FL.I13 FL.I16:FL.I17 FL.I20:FL.I21 FL.I24:FL.I25 FL.I28:FL.I29 FL.I32:FL.I33 FL.I36:FL.I37 FL.I40:FL.I41 FL.I44:FL.I45 FL.I48:FL.I49 FL.I52:FL.I53 FL.I56:FL.I57 FL.I60:FL.I61 FL.I64:FL.I65 FL.I68:FL.I69 FL.I72:FL.I73 FL.I76:FL.I77 FL.I80:FL.I81 FL.I84:FL.I85 FL.I88:FL.I89 FL.I92:FL.I93 FL.I96:FL.I97 FL.I100:FL.I101 FL.I104:FL.I105 FL.I108:FL.I109 FL.I112:FL.I113 FL.I116:FL.I117 FL.I120:FL.I121 FL.I124:FL.I125 FL.I128:FL.I129 FL.K4:FL.K5 FL.K8:FL.K9 FL.K12:FL.K13 FL.K16:FL.K17 FL.K20:FL.K21 FL.K24:FL.K25 FL.K28:FL.K29 FL.K32:FL.K33 FL.K36:FL.K37 FL.K40:FL.K41 FL.K44:FL.K45 FL.K48:FL.K49 FL.K52:FL.K53 FL.K56:FL.K57 FL.K60:FL.K61 FL.K64:FL.K65 FL.K68:FL.K69 FL.K72:FL.K73 FL.K76:FL.K77 FL.K80:FL.K81 FL.K84:FL.K85 FL.K88:FL.K89 FL.K92:FL.K93 FL.K96:FL.K97 FL.K100:FL.K101 FL.K104:FL.K105 FL.K108:FL.K109 FL.K112:FL.K113 FL.K116:FL.K117 FL.K120:FL.K121 FL.K124:FL.K125 FL.K128:FL.K129">
            <calcext:condition calcext:apply-style-name="DecidedEvenBeforeMatch" calcext:value="formula-is(AND(NOT(ISBLANK([.C4])); OR(AND(ISODD(ROW()); [.C4]=[.C5]); AND(ISEVEN(ROW()); [.C4]=[.C3]))))" calcext:base-cell-address="FL.K4"/>
          </calcext:conditional-format>
          <calcext:conditional-format calcext:target-range-address="FL.AB3:FL.AD130 FL.T3:FL.V130 FL.L3:FL.N130">
            <calcext:condition calcext:apply-style-name="SetWinner" calcext:value="formula-is(OR(AND(ISEVEN(ROW()); [.AD130]&gt;[.AD131]); AND(ISODD(ROW()); [.AD130]&gt;[.AD129])))" calcext:base-cell-address="FL.AD130"/>
          </calcext:conditional-format>
          <calcext:conditional-format calcext:target-range-address="FL.Q6:FL.Q7 FL.Q14:FL.Q15 FL.Q22:FL.Q23 FL.Q30:FL.Q31 FL.Q38:FL.Q39 FL.Q46:FL.Q47 FL.Q54:FL.Q55 FL.Q62:FL.Q63 FL.Q70:FL.Q71 FL.Q78:FL.Q79 FL.Q86:FL.Q87 FL.Q94:FL.Q95 FL.Q102:FL.Q103 FL.Q110:FL.Q111 FL.Q118:FL.Q119 FL.Q126:FL.Q127 FL.S6:FL.S7 FL.S14:FL.S15 FL.S22:FL.S23 FL.S30:FL.S31 FL.S38:FL.S39 FL.S46:FL.S47 FL.S54:FL.S55 FL.S62:FL.S63 FL.S70:FL.S71 FL.S78:FL.S79 FL.S86:FL.S87 FL.S94:FL.S95 FL.S102:FL.S103 FL.S110:FL.S111 FL.S118:FL.S119 FL.S126:FL.S127">
            <calcext:condition calcext:apply-style-name="DecidedEvenBeforeMatch" calcext:value="formula-is(OR(AND(ISEVEN(ROW()); NOT(ISBLANK([.K4])); [.K4]=[.K5]); AND(ISODD(ROW()); NOT(ISBLANK([.K7])); [.K7]=[.K8])))" calcext:base-cell-address="FL.S6"/>
          </calcext:conditional-format>
          <calcext:conditional-format calcext:target-range-address="FL.Y10:FL.Y11 FL.Y26:FL.Y27 FL.Y42:FL.Y43 FL.Y58:FL.Y59 FL.Y74:FL.Y75 FL.Y90:FL.Y91 FL.Y106:FL.Y107 FL.Y122:FL.Y123 FL.AA10:FL.AA11 FL.AA26:FL.AA27 FL.AA42:FL.AA43 FL.AA58:FL.AA59 FL.AA74:FL.AA75 FL.AA90:FL.AA91 FL.AA106:FL.AA107 FL.AA122:FL.AA123">
            <calcext:condition calcext:apply-style-name="DecidedEvenBeforeMatch" calcext:value="formula-is(OR(AND(ISEVEN(ROW()); NOT(ISBLANK([.S6])); [.S6]=[.S7]); AND(ISODD(ROW()); NOT(ISBLANK([.S13])); [.S13]=[.S14])))" calcext:base-cell-address="FL.AA10"/>
          </calcext:conditional-format>
        </calcext:conditional-formats>
      </table:table>
      <table:table table:name="Seeds" table:style-name="ta1" table:print="false">
        <table:table-column table:style-name="co1" table:default-cell-style-name="ce97"/>
        <table:table-column table:style-name="co34" table:default-cell-style-name="Default"/>
        <table:table-column table:style-name="co11" table:default-cell-style-name="ce106"/>
        <table:table-column table:style-name="co27" table:default-cell-style-name="ce106"/>
        <table:table-column table:style-name="co35" table:default-cell-style-name="ce185"/>
        <table:table-column table:style-name="co36" table:number-columns-repeated="2" table:default-cell-style-name="ce106"/>
        <table:table-column table:style-name="co37" table:default-cell-style-name="ce192"/>
        <table:table-column table:style-name="co38" table:default-cell-style-name="ce198"/>
        <table:table-column table:style-name="co11" table:default-cell-style-name="ce200"/>
        <table:table-column table:style-name="co39" table:default-cell-style-name="ce205"/>
        <table:table-column table:style-name="co27" table:default-cell-style-name="ce211"/>
        <table:table-column table:style-name="co40" table:default-cell-style-name="Default"/>
        <table:table-column table:style-name="co25" table:default-cell-style-name="ce106"/>
        <table:table-column table:style-name="co27" table:default-cell-style-name="ce106"/>
        <table:table-column table:style-name="co35" table:default-cell-style-name="ce185"/>
        <table:table-column table:style-name="co36" table:number-columns-repeated="2" table:default-cell-style-name="ce106"/>
        <table:table-column table:style-name="co41" table:default-cell-style-name="ce222"/>
        <table:table-column table:style-name="co42" table:default-cell-style-name="ce198"/>
        <table:table-column table:style-name="co43" table:default-cell-style-name="ce222"/>
        <table:table-column table:style-name="co39" table:default-cell-style-name="ce205"/>
        <table:table-column table:style-name="co25" table:default-cell-style-name="ce194"/>
        <table:table-row table:style-name="ro1"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9"/>
          <table:table-cell/>
        </table:table-row>
        <table:table-row table:style-name="ro1">
          <table:table-cell table:style-name="ce162">
            <office:annotation draw:style-name="gr3" draw:text-style-name="P3" svg:width="1.472in" svg:height="0.2346in" svg:x="0.4941in" svg:y="0.0059in" draw:caption-point-x="-0.239in" draw:caption-point-y="0.176in">
              <dc:creator>NJ</dc:creator>
              <dc:date>2008-07-07T00:00:00</dc:date>
              <text:p text:style-name="P2"><text:span text:style-name="T2">This year's seeding</text:span></text:p>
            </office:annotation>
          </table:table-cell>
          <table:table-cell table:style-name="ce167" office:value-type="string" calcext:value-type="string">
            <text:p>Gentlemen</text:p>
          </table:table-cell>
          <table:table-cell table:style-name="ce173"/>
          <table:table-cell table:style-name="ce173">
            <office:annotation draw:style-name="gr4" draw:text-style-name="P3" svg:width="1.1307in" svg:height="0.7012in" svg:x="1.8945in" svg:y="0.0059in" draw:caption-point-x="-0.2339in" draw:caption-point-y="0.176in">
              <dc:creator>NJ</dc:creator>
              <dc:date>2008-08-25T00:00:00</dc:date>
              <text:p text:style-name="P2"><text:span text:style-name="T2">Last Years Seeding</text:span></text:p>
              <text:p text:style-name="P2"><text:span text:style-name="T2">U for unseeded</text:span></text:p>
              <text:p text:style-name="P2"><text:span text:style-name="T2">D for did not play</text:span></text:p>
            </office:annotation>
          </table:table-cell>
          <table:table-cell table:style-name="ce179"/>
          <table:table-cell table:style-name="ce173" office:value-type="string" calcext:value-type="string">
            <office:annotation draw:style-name="gr5" draw:text-style-name="P3" svg:width="1.1307in" svg:height="1.6343in" svg:x="2.5724in" svg:y="0.0059in" draw:caption-point-x="-0.2311in" draw:caption-point-y="0.176in">
              <dc:creator>NJ</dc:creator>
              <dc:date>2009-01-18T00:00:00</dc:date>
              <text:p text:style-name="P2"><text:span text:style-name="T2">W for Winner</text:span></text:p>
              <text:p text:style-name="P2"><text:span text:style-name="T2">F for Finalist</text:span></text:p>
              <text:p text:style-name="P2"><text:span text:style-name="T2">SF for Semi-finalist</text:span></text:p>
              <text:p text:style-name="P2"><text:span text:style-name="T2">QF for Quarter-finalist</text:span></text:p>
              <text:p text:style-name="P2"><text:span text:style-name="T2">1st,2nd,3rd,4th for respective rounds</text:span></text:p>
              <text:p text:style-name="P2"><text:span text:style-name="T2">D for did not play</text:span></text:p>
            </office:annotation>
            <text:p>2009</text:p>
          </table:table-cell>
          <table:table-cell table:style-name="ce186" table:formula="of:=[.F2]+1" office:value-type="float" office:value="2010" calcext:value-type="float">
            <text:p>2010</text:p>
          </table:table-cell>
          <table:table-cell table:style-name="ce187"/>
          <table:table-cell table:style-name="ce193" office:value-type="string" calcext:value-type="string">
            <text:p>Opponent</text:p>
          </table:table-cell>
          <table:table-cell table:style-name="ce199"/>
          <table:table-cell table:style-name="ce201"/>
          <table:table-cell table:style-name="ce206"/>
          <table:table-cell table:style-name="ce212" office:value-type="string" calcext:value-type="string">
            <text:p>Ladies</text:p>
          </table:table-cell>
          <table:table-cell table:style-name="ce186"/>
          <table:table-cell table:style-name="ce186">
            <office:annotation draw:style-name="gr6" draw:text-style-name="P3" svg:width="1.1287in" svg:height="0.3902in" svg:x="6.765in" svg:y="0.0059in" draw:caption-point-x="-0.3571in" draw:caption-point-y="0.176in">
              <dc:creator>NJ</dc:creator>
              <dc:date>2008-07-07T00:00:00</dc:date>
              <text:p text:style-name="P2"><text:span text:style-name="T2">Last year's seeding</text:span></text:p>
            </office:annotation>
          </table:table-cell>
          <table:table-cell table:style-name="ce217"/>
          <table:table-cell table:style-name="ce186" table:formula="of:=[.F2]" office:value-type="string" office:string-value="2009" calcext:value-type="string">
            <text:p>2009</text:p>
          </table:table-cell>
          <table:table-cell table:style-name="ce186" table:formula="of:=[.Q2]+1" office:value-type="float" office:value="2010" calcext:value-type="float">
            <text:p>2010</text:p>
          </table:table-cell>
          <table:table-cell table:style-name="ce219"/>
          <table:table-cell table:style-name="ce193" office:value-type="string" calcext:value-type="string">
            <text:p>Opponent</text:p>
          </table:table-cell>
          <table:table-cell table:style-name="ce219"/>
          <table:table-cell table:style-name="ce201"/>
          <table:table-cell/>
        </table:table-row>
        <table:table-row table:style-name="ro1">
          <table:table-cell table:style-name="ce163" office:value-type="float" office:value="1" calcext:value-type="float">
            <text:p>1</text:p>
          </table:table-cell>
          <table:table-cell table:style-name="ce389" table:formula="of:=IF(COUNTIF([$ML.$A$3:.$A$130]; FIXED([.A3]; 0; 0))&gt;0; INDEX([$ML.$A$3:.$B$130]; MATCH(FIXED([.A3]; 0; 0); [$ML.$A$3:.$A$130]; 0); 2); &quot;&quot;)">
            <text:p/>
          </table:table-cell>
          <table:table-cell table:style-name="ce174" table:formula="of:=IF(COUNTIF([$ML.$A$3:.$A$130]; FIXED([.A3]; 0; 0)); INDEX([$ML.$B$3:.$C$130]; MATCH(FIXED([.A3]; 0; 0); [$ML.$A$3:.$A$130]; 0); 2); &quot;&quot;)">
            <text:p/>
          </table:table-cell>
          <table:table-cell table:style-name="ce174" office:value-type="string" calcext:value-type="string">
            <text:p>?</text:p>
          </table:table-cell>
          <table:table-cell table:style-name="ce180" table:formula="of:=IF(OR(ISBLANK([.$D3]); [.$D3]=&quot;Q&quot;; [.$D3]=&quot;W&quot;; [.$D3]=&quot;L&quot;; [.$D3]=&quot;U&quot;; [.$D3]=&quot;D&quot;; [.$D3]=&quot;?&quot;); &quot;&quot;; [.$D3]-[.$A3])">
            <text:p/>
          </table:table-cell>
          <table:table-cell table:style-name="ce174" office:value-type="string" calcext:value-type="string">
            <text:p>?</text:p>
          </table:table-cell>
          <table:table-cell table:style-name="ce176" table:formula="of:=IF([.B3]=&quot;&quot;; &quot;&quot;; WHICHROUND(COUNTIF([$ML.$A$3:.$V$130]; [.B3]) + COUNTIF([$Finals.$A$3:.$AF$19]; [.B3])))">
            <text:p/>
          </table:table-cell>
          <table:table-cell table:style-name="ce188" table:formula="of:=IF([.G3]=&quot;&quot;; &quot;&quot;; IF([.G3]=&quot;W&quot;; 8; IF(HASLOST(VLOOKUP(FIXED([.$A3]; 0; 0);  INDIRECT(VLOOKUP([.$G3]; [Extra.$W$2:.$Z$9]; 3; 0)); 9; 0)); 0; 1)))">
            <text:p/>
          </table:table-cell>
          <table:table-cell table:style-name="ce415" table:formula="of:=IF([.G3]=&quot;&quot;; &quot;&quot;; INDIRECT(CONCATENATE(VLOOKUP([.G3]; [Extra.$W$2:.$AG$9]; 7; 0); ROWOFFSETED(MATCH([.B3]; INDIRECT(VLOOKUP([.G3]; [Extra.$W$2:.$AI$9]; 12; 0)); 0)+2; WHICHROUNDN([.G3])))))">
            <text:p/>
          </table:table-cell>
          <table:table-cell table:style-name="ce176" table:formula="of:=IF([.G3]=&quot;&quot;; &quot;&quot;; INDIRECT(CONCATENATE(VLOOKUP([.G3]; [Extra.$W$2:.$AG$9]; 8; 0); ROWOFFSETED(MATCH([.B3]; INDIRECT(VLOOKUP([.G3]; [Extra.$W$2:.$AI$9]; 12; 0)); 0)+2; WHICHROUNDN([.G3])))))">
            <text:p/>
          </table:table-cell>
          <table:table-cell table:style-name="ce202" table:formula="of:=IF(AND(NOT([.F3]=&quot;D&quot;); NOT([.F3]=&quot;?&quot;); NOT([.G3]=&quot;D&quot;); NOT(ISBLANK([.F3])); NOT(ISBLANK([.G3]))); DIFFROUND([.F3]; [.G3]); &quot;&quot;)">
            <text:p/>
          </table:table-cell>
          <table:table-cell table:style-name="ce207" table:formula="of:=[.A3]" office:value-type="float" office:value="1" calcext:value-type="float">
            <text:p>1</text:p>
          </table:table-cell>
          <table:table-cell table:style-name="ce434" table:formula="of:=IF(COUNTIF([$FL.$A$3:.$A$130]; FIXED([.A3]; 0; 0))&gt;0; INDEX([$FL.$A$3:.$B$130]; MATCH(FIXED([.A3]; 0; 0); [$FL.$A$3:.$A$130]; 0); 2); &quot;&quot;)">
            <text:p/>
          </table:table-cell>
          <table:table-cell table:style-name="ce176" table:formula="of:=IF(COUNTIF([$FL.$A$3:.$A$130]; FIXED([.A3]; 0; 0)); INDEX([$FL.$B$3:.$C$130]; MATCH(FIXED([.A3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3]); [.$O3]=&quot;Q&quot;; [.$O3]=&quot;W&quot;; [.$O3]=&quot;L&quot;; [.$O3]=&quot;U&quot;; [.$O3]=&quot;D&quot;; [.$O3]=&quot;?&quot;); &quot;&quot;; [.$O3]-[.$A3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3]=&quot;&quot;; &quot;&quot;; WHICHROUND(COUNTIF([$FL.$A$3:.$R$130]; [.M3]) + COUNTIF([$Finals.$A$20:.$AF$36]; [.M3])))">
            <text:p/>
          </table:table-cell>
          <table:table-cell table:style-name="ce220" table:formula="of:=IF([.R3]=&quot;&quot;; &quot;&quot;; IF([.R3]=&quot;W&quot;; 8; IF(HASLOST(VLOOKUP(FIXED([.$A3]; 0; 0);  INDIRECT(VLOOKUP([.$R3]; [Extra.$W$2:.$Z$9]; 4; 0)); VLOOKUP([.R3]; [Extra.$W$2:.$AA$9]; 5; 0); 0)); 0; 1)))">
            <text:p/>
          </table:table-cell>
          <table:table-cell table:style-name="ce444" table:formula="of:=IF([.R3]=&quot;&quot;; &quot;&quot;; INDIRECT(CONCATENATE(VLOOKUP([.R3]; [Extra.$W$2:.$AG$9]; 10; 0); ROWOFFSETED(MATCH([.M3]; INDIRECT(VLOOKUP([.R3]; [Extra.$W$2:.$AI$9]; 13; 0)); 0)+2+VLOOKUP([.R3]; [Extra.$W$2:.$AJ$9]; 14; 0); WHICHROUNDN([.R3])))))">
            <text:p/>
          </table:table-cell>
          <table:table-cell table:style-name="ce220" table:formula="of:=IF([.R3]=&quot;&quot;; &quot;&quot;; INDIRECT(CONCATENATE(VLOOKUP([.R3]; [Extra.$W$2:.$AG$9]; 11; 0); ROWOFFSETED(MATCH([.M3]; INDIRECT(VLOOKUP([.R3]; [Extra.$W$2:.$AI$9]; 13; 0)); 0)+2+VLOOKUP([.R3]; [Extra.$W$2:.$AJ$9]; 14; 0); WHICHROUNDN([.R3])))))">
            <text:p/>
          </table:table-cell>
          <table:table-cell table:style-name="ce202" table:formula="of:=IF(AND(NOT([.Q3]=&quot;D&quot;); NOT([.Q3]=&quot;?&quot;); NOT([.R3]=&quot;D&quot;); NOT(ISBLANK([.Q3])); NOT(ISBLANK([.R3]))); DIFFROUND([.Q3]; [.R3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4" table:formula="of:=[.A3]+1" office:value-type="float" office:value="2" calcext:value-type="float">
            <text:p>2</text:p>
          </table:table-cell>
          <table:table-cell table:style-name="ce390" table:formula="of:=IF(COUNTIF([$ML.$A$3:.$A$130]; FIXED([.A4]; 0; 0))&gt;0; INDEX([$ML.$A$3:.$B$130]; MATCH(FIXED([.A4]; 0; 0); [$ML.$A$3:.$A$130]; 0); 2); &quot;&quot;)">
            <text:p/>
          </table:table-cell>
          <table:table-cell table:style-name="ce175" table:formula="of:=IF(COUNTIF([$ML.$A$3:.$A$130]; FIXED([.A4]; 0; 0)); INDEX([$ML.$B$3:.$C$130]; MATCH(FIXED([.A4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4]); [.$D4]=&quot;Q&quot;; [.$D4]=&quot;W&quot;; [.$D4]=&quot;L&quot;; [.$D4]=&quot;U&quot;; [.$D4]=&quot;D&quot;; [.$D4]=&quot;?&quot;); &quot;&quot;; [.$D4]-[.$A4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4]=&quot;&quot;; &quot;&quot;; WHICHROUND(COUNTIF([$ML.$A$3:.$V$130]; [.B4]) + COUNTIF([$Finals.$A$3:.$AF$19]; [.B4])))">
            <text:p/>
          </table:table-cell>
          <table:table-cell table:style-name="ce189" table:formula="of:=IF([.G4]=&quot;&quot;; &quot;&quot;; IF([.G4]=&quot;W&quot;; 8; IF(HASLOST(VLOOKUP(FIXED([.$A4]; 0; 0);  INDIRECT(VLOOKUP([.$G4]; [Extra.$W$2:.$Z$9]; 3; 0)); 9; 0)); 0; 1)))">
            <text:p/>
          </table:table-cell>
          <table:table-cell table:style-name="ce416" table:formula="of:=IF([.G4]=&quot;&quot;; &quot;&quot;; INDIRECT(CONCATENATE(VLOOKUP([.G4]; [Extra.$W$2:.$AG$9]; 7; 0); ROWOFFSETED(MATCH([.B4]; INDIRECT(VLOOKUP([.G4]; [Extra.$W$2:.$AI$9]; 12; 0)); 0)+2; WHICHROUNDN([.G4])))))">
            <text:p/>
          </table:table-cell>
          <table:table-cell table:style-name="ce175" table:formula="of:=IF([.G4]=&quot;&quot;; &quot;&quot;; INDIRECT(CONCATENATE(VLOOKUP([.G4]; [Extra.$W$2:.$AG$9]; 8; 0); ROWOFFSETED(MATCH([.B4]; INDIRECT(VLOOKUP([.G4]; [Extra.$W$2:.$AI$9]; 12; 0)); 0)+2; WHICHROUNDN([.G4])))))">
            <text:p/>
          </table:table-cell>
          <table:table-cell table:style-name="ce203" table:formula="of:=IF(AND(NOT([.F4]=&quot;D&quot;); NOT([.F4]=&quot;?&quot;); NOT([.G4]=&quot;D&quot;); NOT(ISBLANK([.F4])); NOT(ISBLANK([.G4]))); DIFFROUND([.F4]; [.G4]); &quot;&quot;)">
            <text:p/>
          </table:table-cell>
          <table:table-cell table:style-name="ce208" table:formula="of:=[.A4]" office:value-type="float" office:value="2" calcext:value-type="float">
            <text:p>2</text:p>
          </table:table-cell>
          <table:table-cell table:style-name="ce435" table:formula="of:=IF(COUNTIF([$FL.$A$3:.$A$130]; FIXED([.A4]; 0; 0))&gt;0; INDEX([$FL.$A$3:.$B$130]; MATCH(FIXED([.A4]; 0; 0); [$FL.$A$3:.$A$130]; 0); 2); &quot;&quot;)">
            <text:p/>
          </table:table-cell>
          <table:table-cell table:style-name="ce175" table:formula="of:=IF(COUNTIF([$FL.$A$3:.$A$130]; FIXED([.A4]; 0; 0)); INDEX([$FL.$B$3:.$C$130]; MATCH(FIXED([.A4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4]); [.$O4]=&quot;Q&quot;; [.$O4]=&quot;W&quot;; [.$O4]=&quot;L&quot;; [.$O4]=&quot;U&quot;; [.$O4]=&quot;D&quot;; [.$O4]=&quot;?&quot;); &quot;&quot;; [.$O4]-[.$A4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4]=&quot;&quot;; &quot;&quot;; WHICHROUND(COUNTIF([$FL.$A$3:.$R$130]; [.M4]) + COUNTIF([$Finals.$A$20:.$AF$36]; [.M4])))">
            <text:p/>
          </table:table-cell>
          <table:table-cell table:style-name="ce189" table:formula="of:=IF([.R4]=&quot;&quot;; &quot;&quot;; IF([.R4]=&quot;W&quot;; 8; IF(HASLOST(VLOOKUP(FIXED([.$A4]; 0; 0);  INDIRECT(VLOOKUP([.$R4]; [Extra.$W$2:.$Z$9]; 4; 0)); VLOOKUP([.R4]; [Extra.$W$2:.$AA$9]; 5; 0); 0)); 0; 1)))">
            <text:p/>
          </table:table-cell>
          <table:table-cell table:style-name="ce445" table:formula="of:=IF([.R4]=&quot;&quot;; &quot;&quot;; INDIRECT(CONCATENATE(VLOOKUP([.R4]; [Extra.$W$2:.$AG$9]; 10; 0); ROWOFFSETED(MATCH([.M4]; INDIRECT(VLOOKUP([.R4]; [Extra.$W$2:.$AI$9]; 13; 0)); 0)+2+VLOOKUP([.R4]; [Extra.$W$2:.$AJ$9]; 14; 0); WHICHROUNDN([.R4])))))">
            <text:p/>
          </table:table-cell>
          <table:table-cell table:style-name="ce226" table:formula="of:=IF([.R4]=&quot;&quot;; &quot;&quot;; INDIRECT(CONCATENATE(VLOOKUP([.R4]; [Extra.$W$2:.$AG$9]; 11; 0); ROWOFFSETED(MATCH([.M4]; INDIRECT(VLOOKUP([.R4]; [Extra.$W$2:.$AI$9]; 13; 0)); 0)+2+VLOOKUP([.R4]; [Extra.$W$2:.$AJ$9]; 14; 0); WHICHROUNDN([.R4])))))">
            <text:p/>
          </table:table-cell>
          <table:table-cell table:style-name="ce203" table:formula="of:=IF(AND(NOT([.Q4]=&quot;D&quot;); NOT([.Q4]=&quot;?&quot;); NOT([.R4]=&quot;D&quot;); NOT(ISBLANK([.Q4])); NOT(ISBLANK([.R4]))); DIFFROUND([.Q4]; [.R4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3" table:formula="of:=[.A4]+1" office:value-type="float" office:value="3" calcext:value-type="float">
            <text:p>3</text:p>
          </table:table-cell>
          <table:table-cell table:style-name="ce391" table:formula="of:=IF(COUNTIF([$ML.$A$3:.$A$130]; FIXED([.A5]; 0; 0))&gt;0; INDEX([$ML.$A$3:.$B$130]; MATCH(FIXED([.A5]; 0; 0); [$ML.$A$3:.$A$130]; 0); 2); &quot;&quot;)">
            <text:p/>
          </table:table-cell>
          <table:table-cell table:style-name="ce176" table:formula="of:=IF(COUNTIF([$ML.$A$3:.$A$130]; FIXED([.A5]; 0; 0)); INDEX([$ML.$B$3:.$C$130]; MATCH(FIXED([.A5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5]); [.$D5]=&quot;Q&quot;; [.$D5]=&quot;W&quot;; [.$D5]=&quot;L&quot;; [.$D5]=&quot;U&quot;; [.$D5]=&quot;D&quot;; [.$D5]=&quot;?&quot;); &quot;&quot;; [.$D5]-[.$A5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5]=&quot;&quot;; &quot;&quot;; WHICHROUND(COUNTIF([$ML.$A$3:.$V$130]; [.B5]) + COUNTIF([$Finals.$A$3:.$AF$19]; [.B5])))">
            <text:p/>
          </table:table-cell>
          <table:table-cell table:style-name="ce188" table:formula="of:=IF([.G5]=&quot;&quot;; &quot;&quot;; IF([.G5]=&quot;W&quot;; 8; IF(HASLOST(VLOOKUP(FIXED([.$A5]; 0; 0);  INDIRECT(VLOOKUP([.$G5]; [Extra.$W$2:.$Z$9]; 3; 0)); 9; 0)); 0; 1)))">
            <text:p/>
          </table:table-cell>
          <table:table-cell table:style-name="ce415" table:formula="of:=IF([.G5]=&quot;&quot;; &quot;&quot;; INDIRECT(CONCATENATE(VLOOKUP([.G5]; [Extra.$W$2:.$AG$9]; 7; 0); ROWOFFSETED(MATCH([.B5]; INDIRECT(VLOOKUP([.G5]; [Extra.$W$2:.$AI$9]; 12; 0)); 0)+2; WHICHROUNDN([.G5])))))">
            <text:p/>
          </table:table-cell>
          <table:table-cell table:style-name="ce176" table:formula="of:=IF([.G5]=&quot;&quot;; &quot;&quot;; INDIRECT(CONCATENATE(VLOOKUP([.G5]; [Extra.$W$2:.$AG$9]; 8; 0); ROWOFFSETED(MATCH([.B5]; INDIRECT(VLOOKUP([.G5]; [Extra.$W$2:.$AI$9]; 12; 0)); 0)+2; WHICHROUNDN([.G5])))))">
            <text:p/>
          </table:table-cell>
          <table:table-cell table:style-name="ce202" table:formula="of:=IF(AND(NOT([.F5]=&quot;D&quot;); NOT([.F5]=&quot;?&quot;); NOT([.G5]=&quot;D&quot;); NOT(ISBLANK([.F5])); NOT(ISBLANK([.G5]))); DIFFROUND([.F5]; [.G5]); &quot;&quot;)">
            <text:p/>
          </table:table-cell>
          <table:table-cell table:style-name="ce207" table:formula="of:=[.A5]" office:value-type="float" office:value="3" calcext:value-type="float">
            <text:p>3</text:p>
          </table:table-cell>
          <table:table-cell table:style-name="ce436" table:formula="of:=IF(COUNTIF([$FL.$A$3:.$A$130]; FIXED([.A5]; 0; 0))&gt;0; INDEX([$FL.$A$3:.$B$130]; MATCH(FIXED([.A5]; 0; 0); [$FL.$A$3:.$A$130]; 0); 2); &quot;&quot;)">
            <text:p/>
          </table:table-cell>
          <table:table-cell table:style-name="ce176" table:formula="of:=IF(COUNTIF([$FL.$A$3:.$A$130]; FIXED([.A5]; 0; 0)); INDEX([$FL.$B$3:.$C$130]; MATCH(FIXED([.A5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5]); [.$O5]=&quot;Q&quot;; [.$O5]=&quot;W&quot;; [.$O5]=&quot;L&quot;; [.$O5]=&quot;U&quot;; [.$O5]=&quot;D&quot;; [.$O5]=&quot;?&quot;); &quot;&quot;; [.$O5]-[.$A5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5]=&quot;&quot;; &quot;&quot;; WHICHROUND(COUNTIF([$FL.$A$3:.$R$130]; [.M5]) + COUNTIF([$Finals.$A$20:.$AF$36]; [.M5])))">
            <text:p/>
          </table:table-cell>
          <table:table-cell table:style-name="ce188" table:formula="of:=IF([.R5]=&quot;&quot;; &quot;&quot;; IF([.R5]=&quot;W&quot;; 8; IF(HASLOST(VLOOKUP(FIXED([.$A5]; 0; 0);  INDIRECT(VLOOKUP([.$R5]; [Extra.$W$2:.$Z$9]; 4; 0)); VLOOKUP([.R5]; [Extra.$W$2:.$AA$9]; 5; 0); 0)); 0; 1)))">
            <text:p/>
          </table:table-cell>
          <table:table-cell table:style-name="ce444" table:formula="of:=IF([.R5]=&quot;&quot;; &quot;&quot;; INDIRECT(CONCATENATE(VLOOKUP([.R5]; [Extra.$W$2:.$AG$9]; 10; 0); ROWOFFSETED(MATCH([.M5]; INDIRECT(VLOOKUP([.R5]; [Extra.$W$2:.$AI$9]; 13; 0)); 0)+2+VLOOKUP([.R5]; [Extra.$W$2:.$AJ$9]; 14; 0); WHICHROUNDN([.R5])))))">
            <text:p/>
          </table:table-cell>
          <table:table-cell table:style-name="ce220" table:formula="of:=IF([.R5]=&quot;&quot;; &quot;&quot;; INDIRECT(CONCATENATE(VLOOKUP([.R5]; [Extra.$W$2:.$AG$9]; 11; 0); ROWOFFSETED(MATCH([.M5]; INDIRECT(VLOOKUP([.R5]; [Extra.$W$2:.$AI$9]; 13; 0)); 0)+2+VLOOKUP([.R5]; [Extra.$W$2:.$AJ$9]; 14; 0); WHICHROUNDN([.R5])))))">
            <text:p/>
          </table:table-cell>
          <table:table-cell table:style-name="ce202" table:formula="of:=IF(AND(NOT([.Q5]=&quot;D&quot;); NOT([.Q5]=&quot;?&quot;); NOT([.R5]=&quot;D&quot;); NOT(ISBLANK([.Q5])); NOT(ISBLANK([.R5]))); DIFFROUND([.Q5]; [.R5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4" table:formula="of:=[.A5]+1" office:value-type="float" office:value="4" calcext:value-type="float">
            <text:p>4</text:p>
          </table:table-cell>
          <table:table-cell table:style-name="ce390" table:formula="of:=IF(COUNTIF([$ML.$A$3:.$A$130]; FIXED([.A6]; 0; 0))&gt;0; INDEX([$ML.$A$3:.$B$130]; MATCH(FIXED([.A6]; 0; 0); [$ML.$A$3:.$A$130]; 0); 2); &quot;&quot;)">
            <text:p/>
          </table:table-cell>
          <table:table-cell table:style-name="ce175" table:formula="of:=IF(COUNTIF([$ML.$A$3:.$A$130]; FIXED([.A6]; 0; 0)); INDEX([$ML.$B$3:.$C$130]; MATCH(FIXED([.A6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6]); [.$D6]=&quot;Q&quot;; [.$D6]=&quot;W&quot;; [.$D6]=&quot;L&quot;; [.$D6]=&quot;U&quot;; [.$D6]=&quot;D&quot;; [.$D6]=&quot;?&quot;); &quot;&quot;; [.$D6]-[.$A6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6]=&quot;&quot;; &quot;&quot;; WHICHROUND(COUNTIF([$ML.$A$3:.$V$130]; [.B6]) + COUNTIF([$Finals.$A$3:.$AF$19]; [.B6])))">
            <text:p/>
          </table:table-cell>
          <table:table-cell table:style-name="ce189" table:formula="of:=IF([.G6]=&quot;&quot;; &quot;&quot;; IF([.G6]=&quot;W&quot;; 8; IF(HASLOST(VLOOKUP(FIXED([.$A6]; 0; 0);  INDIRECT(VLOOKUP([.$G6]; [Extra.$W$2:.$Z$9]; 3; 0)); 9; 0)); 0; 1)))">
            <text:p/>
          </table:table-cell>
          <table:table-cell table:style-name="ce416" table:formula="of:=IF([.G6]=&quot;&quot;; &quot;&quot;; INDIRECT(CONCATENATE(VLOOKUP([.G6]; [Extra.$W$2:.$AG$9]; 7; 0); ROWOFFSETED(MATCH([.B6]; INDIRECT(VLOOKUP([.G6]; [Extra.$W$2:.$AI$9]; 12; 0)); 0)+2; WHICHROUNDN([.G6])))))">
            <text:p/>
          </table:table-cell>
          <table:table-cell table:style-name="ce175" table:formula="of:=IF([.G6]=&quot;&quot;; &quot;&quot;; INDIRECT(CONCATENATE(VLOOKUP([.G6]; [Extra.$W$2:.$AG$9]; 8; 0); ROWOFFSETED(MATCH([.B6]; INDIRECT(VLOOKUP([.G6]; [Extra.$W$2:.$AI$9]; 12; 0)); 0)+2; WHICHROUNDN([.G6])))))">
            <text:p/>
          </table:table-cell>
          <table:table-cell table:style-name="ce203" table:formula="of:=IF(AND(NOT([.F6]=&quot;D&quot;); NOT([.F6]=&quot;?&quot;); NOT([.G6]=&quot;D&quot;); NOT(ISBLANK([.F6])); NOT(ISBLANK([.G6]))); DIFFROUND([.F6]; [.G6]); &quot;&quot;)">
            <text:p/>
          </table:table-cell>
          <table:table-cell table:style-name="ce208" table:formula="of:=[.A6]" office:value-type="float" office:value="4" calcext:value-type="float">
            <text:p>4</text:p>
          </table:table-cell>
          <table:table-cell table:style-name="ce435" table:formula="of:=IF(COUNTIF([$FL.$A$3:.$A$130]; FIXED([.A6]; 0; 0))&gt;0; INDEX([$FL.$A$3:.$B$130]; MATCH(FIXED([.A6]; 0; 0); [$FL.$A$3:.$A$130]; 0); 2); &quot;&quot;)">
            <text:p/>
          </table:table-cell>
          <table:table-cell table:style-name="ce175" table:formula="of:=IF(COUNTIF([$FL.$A$3:.$A$130]; FIXED([.A6]; 0; 0)); INDEX([$FL.$B$3:.$C$130]; MATCH(FIXED([.A6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6]); [.$O6]=&quot;Q&quot;; [.$O6]=&quot;W&quot;; [.$O6]=&quot;L&quot;; [.$O6]=&quot;U&quot;; [.$O6]=&quot;D&quot;; [.$O6]=&quot;?&quot;); &quot;&quot;; [.$O6]-[.$A6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6]=&quot;&quot;; &quot;&quot;; WHICHROUND(COUNTIF([$FL.$A$3:.$R$130]; [.M6]) + COUNTIF([$Finals.$A$20:.$AF$36]; [.M6])))">
            <text:p/>
          </table:table-cell>
          <table:table-cell table:style-name="ce189" table:formula="of:=IF([.R6]=&quot;&quot;; &quot;&quot;; IF([.R6]=&quot;W&quot;; 8; IF(HASLOST(VLOOKUP(FIXED([.$A6]; 0; 0);  INDIRECT(VLOOKUP([.$R6]; [Extra.$W$2:.$Z$9]; 4; 0)); VLOOKUP([.R6]; [Extra.$W$2:.$AA$9]; 5; 0); 0)); 0; 1)))">
            <text:p/>
          </table:table-cell>
          <table:table-cell table:style-name="ce445" table:formula="of:=IF([.R6]=&quot;&quot;; &quot;&quot;; INDIRECT(CONCATENATE(VLOOKUP([.R6]; [Extra.$W$2:.$AG$9]; 10; 0); ROWOFFSETED(MATCH([.M6]; INDIRECT(VLOOKUP([.R6]; [Extra.$W$2:.$AI$9]; 13; 0)); 0)+2+VLOOKUP([.R6]; [Extra.$W$2:.$AJ$9]; 14; 0); WHICHROUNDN([.R6])))))">
            <text:p/>
          </table:table-cell>
          <table:table-cell table:style-name="ce226" table:formula="of:=IF([.R6]=&quot;&quot;; &quot;&quot;; INDIRECT(CONCATENATE(VLOOKUP([.R6]; [Extra.$W$2:.$AG$9]; 11; 0); ROWOFFSETED(MATCH([.M6]; INDIRECT(VLOOKUP([.R6]; [Extra.$W$2:.$AI$9]; 13; 0)); 0)+2+VLOOKUP([.R6]; [Extra.$W$2:.$AJ$9]; 14; 0); WHICHROUNDN([.R6])))))">
            <text:p/>
          </table:table-cell>
          <table:table-cell table:style-name="ce203" table:formula="of:=IF(AND(NOT([.Q6]=&quot;D&quot;); NOT([.Q6]=&quot;?&quot;); NOT([.R6]=&quot;D&quot;); NOT(ISBLANK([.Q6])); NOT(ISBLANK([.R6]))); DIFFROUND([.Q6]; [.R6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3" table:formula="of:=[.A6]+1" office:value-type="float" office:value="5" calcext:value-type="float">
            <text:p>5</text:p>
          </table:table-cell>
          <table:table-cell table:style-name="ce391" table:formula="of:=IF(COUNTIF([$ML.$A$3:.$A$130]; FIXED([.A7]; 0; 0))&gt;0; INDEX([$ML.$A$3:.$B$130]; MATCH(FIXED([.A7]; 0; 0); [$ML.$A$3:.$A$130]; 0); 2); &quot;&quot;)">
            <text:p/>
          </table:table-cell>
          <table:table-cell table:style-name="ce176" table:formula="of:=IF(COUNTIF([$ML.$A$3:.$A$130]; FIXED([.A7]; 0; 0)); INDEX([$ML.$B$3:.$C$130]; MATCH(FIXED([.A7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7]); [.$D7]=&quot;Q&quot;; [.$D7]=&quot;W&quot;; [.$D7]=&quot;L&quot;; [.$D7]=&quot;U&quot;; [.$D7]=&quot;D&quot;; [.$D7]=&quot;?&quot;); &quot;&quot;; [.$D7]-[.$A7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7]=&quot;&quot;; &quot;&quot;; WHICHROUND(COUNTIF([$ML.$A$3:.$V$130]; [.B7]) + COUNTIF([$Finals.$A$3:.$AF$19]; [.B7])))">
            <text:p/>
          </table:table-cell>
          <table:table-cell table:style-name="ce188" table:formula="of:=IF([.G7]=&quot;&quot;; &quot;&quot;; IF([.G7]=&quot;W&quot;; 8; IF(HASLOST(VLOOKUP(FIXED([.$A7]; 0; 0);  INDIRECT(VLOOKUP([.$G7]; [Extra.$W$2:.$Z$9]; 3; 0)); 9; 0)); 0; 1)))">
            <text:p/>
          </table:table-cell>
          <table:table-cell table:style-name="ce415" table:formula="of:=IF([.G7]=&quot;&quot;; &quot;&quot;; INDIRECT(CONCATENATE(VLOOKUP([.G7]; [Extra.$W$2:.$AG$9]; 7; 0); ROWOFFSETED(MATCH([.B7]; INDIRECT(VLOOKUP([.G7]; [Extra.$W$2:.$AI$9]; 12; 0)); 0)+2; WHICHROUNDN([.G7])))))">
            <text:p/>
          </table:table-cell>
          <table:table-cell table:style-name="ce176" table:formula="of:=IF([.G7]=&quot;&quot;; &quot;&quot;; INDIRECT(CONCATENATE(VLOOKUP([.G7]; [Extra.$W$2:.$AG$9]; 8; 0); ROWOFFSETED(MATCH([.B7]; INDIRECT(VLOOKUP([.G7]; [Extra.$W$2:.$AI$9]; 12; 0)); 0)+2; WHICHROUNDN([.G7])))))">
            <text:p/>
          </table:table-cell>
          <table:table-cell table:style-name="ce202" table:formula="of:=IF(AND(NOT([.F7]=&quot;D&quot;); NOT([.F7]=&quot;?&quot;); NOT([.G7]=&quot;D&quot;); NOT(ISBLANK([.F7])); NOT(ISBLANK([.G7]))); DIFFROUND([.F7]; [.G7]); &quot;&quot;)">
            <text:p/>
          </table:table-cell>
          <table:table-cell table:style-name="ce207" table:formula="of:=[.A7]" office:value-type="float" office:value="5" calcext:value-type="float">
            <text:p>5</text:p>
          </table:table-cell>
          <table:table-cell table:style-name="ce436" table:formula="of:=IF(COUNTIF([$FL.$A$3:.$A$130]; FIXED([.A7]; 0; 0))&gt;0; INDEX([$FL.$A$3:.$B$130]; MATCH(FIXED([.A7]; 0; 0); [$FL.$A$3:.$A$130]; 0); 2); &quot;&quot;)">
            <text:p/>
          </table:table-cell>
          <table:table-cell table:style-name="ce176" table:formula="of:=IF(COUNTIF([$FL.$A$3:.$A$130]; FIXED([.A7]; 0; 0)); INDEX([$FL.$B$3:.$C$130]; MATCH(FIXED([.A7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7]); [.$O7]=&quot;Q&quot;; [.$O7]=&quot;W&quot;; [.$O7]=&quot;L&quot;; [.$O7]=&quot;U&quot;; [.$O7]=&quot;D&quot;; [.$O7]=&quot;?&quot;); &quot;&quot;; [.$O7]-[.$A7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7]=&quot;&quot;; &quot;&quot;; WHICHROUND(COUNTIF([$FL.$A$3:.$R$130]; [.M7]) + COUNTIF([$Finals.$A$20:.$AF$36]; [.M7])))">
            <text:p/>
          </table:table-cell>
          <table:table-cell table:style-name="ce188" table:formula="of:=IF([.R7]=&quot;&quot;; &quot;&quot;; IF([.R7]=&quot;W&quot;; 8; IF(HASLOST(VLOOKUP(FIXED([.$A7]; 0; 0);  INDIRECT(VLOOKUP([.$R7]; [Extra.$W$2:.$Z$9]; 4; 0)); VLOOKUP([.R7]; [Extra.$W$2:.$AA$9]; 5; 0); 0)); 0; 1)))">
            <text:p/>
          </table:table-cell>
          <table:table-cell table:style-name="ce444" table:formula="of:=IF([.R7]=&quot;&quot;; &quot;&quot;; INDIRECT(CONCATENATE(VLOOKUP([.R7]; [Extra.$W$2:.$AG$9]; 10; 0); ROWOFFSETED(MATCH([.M7]; INDIRECT(VLOOKUP([.R7]; [Extra.$W$2:.$AI$9]; 13; 0)); 0)+2+VLOOKUP([.R7]; [Extra.$W$2:.$AJ$9]; 14; 0); WHICHROUNDN([.R7])))))">
            <text:p/>
          </table:table-cell>
          <table:table-cell table:style-name="ce220" table:formula="of:=IF([.R7]=&quot;&quot;; &quot;&quot;; INDIRECT(CONCATENATE(VLOOKUP([.R7]; [Extra.$W$2:.$AG$9]; 11; 0); ROWOFFSETED(MATCH([.M7]; INDIRECT(VLOOKUP([.R7]; [Extra.$W$2:.$AI$9]; 13; 0)); 0)+2+VLOOKUP([.R7]; [Extra.$W$2:.$AJ$9]; 14; 0); WHICHROUNDN([.R7])))))">
            <text:p/>
          </table:table-cell>
          <table:table-cell table:style-name="ce202" table:formula="of:=IF(AND(NOT([.Q7]=&quot;D&quot;); NOT([.Q7]=&quot;?&quot;); NOT([.R7]=&quot;D&quot;); NOT(ISBLANK([.Q7])); NOT(ISBLANK([.R7]))); DIFFROUND([.Q7]; [.R7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4" table:formula="of:=[.A7]+1" office:value-type="float" office:value="6" calcext:value-type="float">
            <text:p>6</text:p>
          </table:table-cell>
          <table:table-cell table:style-name="ce390" table:formula="of:=IF(COUNTIF([$ML.$A$3:.$A$130]; FIXED([.A8]; 0; 0))&gt;0; INDEX([$ML.$A$3:.$B$130]; MATCH(FIXED([.A8]; 0; 0); [$ML.$A$3:.$A$130]; 0); 2); &quot;&quot;)">
            <text:p/>
          </table:table-cell>
          <table:table-cell table:style-name="ce175" table:formula="of:=IF(COUNTIF([$ML.$A$3:.$A$130]; FIXED([.A8]; 0; 0)); INDEX([$ML.$B$3:.$C$130]; MATCH(FIXED([.A8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8]); [.$D8]=&quot;Q&quot;; [.$D8]=&quot;W&quot;; [.$D8]=&quot;L&quot;; [.$D8]=&quot;U&quot;; [.$D8]=&quot;D&quot;; [.$D8]=&quot;?&quot;); &quot;&quot;; [.$D8]-[.$A8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8]=&quot;&quot;; &quot;&quot;; WHICHROUND(COUNTIF([$ML.$A$3:.$V$130]; [.B8]) + COUNTIF([$Finals.$A$3:.$AF$19]; [.B8])))">
            <text:p/>
          </table:table-cell>
          <table:table-cell table:style-name="ce189" table:formula="of:=IF([.G8]=&quot;&quot;; &quot;&quot;; IF([.G8]=&quot;W&quot;; 8; IF(HASLOST(VLOOKUP(FIXED([.$A8]; 0; 0);  INDIRECT(VLOOKUP([.$G8]; [Extra.$W$2:.$Z$9]; 3; 0)); 9; 0)); 0; 1)))">
            <text:p/>
          </table:table-cell>
          <table:table-cell table:style-name="ce416" table:formula="of:=IF([.G8]=&quot;&quot;; &quot;&quot;; INDIRECT(CONCATENATE(VLOOKUP([.G8]; [Extra.$W$2:.$AG$9]; 7; 0); ROWOFFSETED(MATCH([.B8]; INDIRECT(VLOOKUP([.G8]; [Extra.$W$2:.$AI$9]; 12; 0)); 0)+2; WHICHROUNDN([.G8])))))">
            <text:p/>
          </table:table-cell>
          <table:table-cell table:style-name="ce175" table:formula="of:=IF([.G8]=&quot;&quot;; &quot;&quot;; INDIRECT(CONCATENATE(VLOOKUP([.G8]; [Extra.$W$2:.$AG$9]; 8; 0); ROWOFFSETED(MATCH([.B8]; INDIRECT(VLOOKUP([.G8]; [Extra.$W$2:.$AI$9]; 12; 0)); 0)+2; WHICHROUNDN([.G8])))))">
            <text:p/>
          </table:table-cell>
          <table:table-cell table:style-name="ce203" table:formula="of:=IF(AND(NOT([.F8]=&quot;D&quot;); NOT([.F8]=&quot;?&quot;); NOT([.G8]=&quot;D&quot;); NOT(ISBLANK([.F8])); NOT(ISBLANK([.G8]))); DIFFROUND([.F8]; [.G8]); &quot;&quot;)">
            <text:p/>
          </table:table-cell>
          <table:table-cell table:style-name="ce208" table:formula="of:=[.A8]" office:value-type="float" office:value="6" calcext:value-type="float">
            <text:p>6</text:p>
          </table:table-cell>
          <table:table-cell table:style-name="ce435" table:formula="of:=IF(COUNTIF([$FL.$A$3:.$A$130]; FIXED([.A8]; 0; 0))&gt;0; INDEX([$FL.$A$3:.$B$130]; MATCH(FIXED([.A8]; 0; 0); [$FL.$A$3:.$A$130]; 0); 2); &quot;&quot;)">
            <text:p/>
          </table:table-cell>
          <table:table-cell table:style-name="ce175" table:formula="of:=IF(COUNTIF([$FL.$A$3:.$A$130]; FIXED([.A8]; 0; 0)); INDEX([$FL.$B$3:.$C$130]; MATCH(FIXED([.A8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8]); [.$O8]=&quot;Q&quot;; [.$O8]=&quot;W&quot;; [.$O8]=&quot;L&quot;; [.$O8]=&quot;U&quot;; [.$O8]=&quot;D&quot;; [.$O8]=&quot;?&quot;); &quot;&quot;; [.$O8]-[.$A8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8]=&quot;&quot;; &quot;&quot;; WHICHROUND(COUNTIF([$FL.$A$3:.$R$130]; [.M8]) + COUNTIF([$Finals.$A$20:.$AF$36]; [.M8])))">
            <text:p/>
          </table:table-cell>
          <table:table-cell table:style-name="ce189" table:formula="of:=IF([.R8]=&quot;&quot;; &quot;&quot;; IF([.R8]=&quot;W&quot;; 8; IF(HASLOST(VLOOKUP(FIXED([.$A8]; 0; 0);  INDIRECT(VLOOKUP([.$R8]; [Extra.$W$2:.$Z$9]; 4; 0)); VLOOKUP([.R8]; [Extra.$W$2:.$AA$9]; 5; 0); 0)); 0; 1)))">
            <text:p/>
          </table:table-cell>
          <table:table-cell table:style-name="ce445" table:formula="of:=IF([.R8]=&quot;&quot;; &quot;&quot;; INDIRECT(CONCATENATE(VLOOKUP([.R8]; [Extra.$W$2:.$AG$9]; 10; 0); ROWOFFSETED(MATCH([.M8]; INDIRECT(VLOOKUP([.R8]; [Extra.$W$2:.$AI$9]; 13; 0)); 0)+2+VLOOKUP([.R8]; [Extra.$W$2:.$AJ$9]; 14; 0); WHICHROUNDN([.R8])))))">
            <text:p/>
          </table:table-cell>
          <table:table-cell table:style-name="ce226" table:formula="of:=IF([.R8]=&quot;&quot;; &quot;&quot;; INDIRECT(CONCATENATE(VLOOKUP([.R8]; [Extra.$W$2:.$AG$9]; 11; 0); ROWOFFSETED(MATCH([.M8]; INDIRECT(VLOOKUP([.R8]; [Extra.$W$2:.$AI$9]; 13; 0)); 0)+2+VLOOKUP([.R8]; [Extra.$W$2:.$AJ$9]; 14; 0); WHICHROUNDN([.R8])))))">
            <text:p/>
          </table:table-cell>
          <table:table-cell table:style-name="ce203" table:formula="of:=IF(AND(NOT([.Q8]=&quot;D&quot;); NOT([.Q8]=&quot;?&quot;); NOT([.R8]=&quot;D&quot;); NOT(ISBLANK([.Q8])); NOT(ISBLANK([.R8]))); DIFFROUND([.Q8]; [.R8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3" table:formula="of:=[.A8]+1" office:value-type="float" office:value="7" calcext:value-type="float">
            <text:p>7</text:p>
          </table:table-cell>
          <table:table-cell table:style-name="ce391" table:formula="of:=IF(COUNTIF([$ML.$A$3:.$A$130]; FIXED([.A9]; 0; 0))&gt;0; INDEX([$ML.$A$3:.$B$130]; MATCH(FIXED([.A9]; 0; 0); [$ML.$A$3:.$A$130]; 0); 2); &quot;&quot;)">
            <text:p/>
          </table:table-cell>
          <table:table-cell table:style-name="ce176" table:formula="of:=IF(COUNTIF([$ML.$A$3:.$A$130]; FIXED([.A9]; 0; 0)); INDEX([$ML.$B$3:.$C$130]; MATCH(FIXED([.A9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9]); [.$D9]=&quot;Q&quot;; [.$D9]=&quot;W&quot;; [.$D9]=&quot;L&quot;; [.$D9]=&quot;U&quot;; [.$D9]=&quot;D&quot;; [.$D9]=&quot;?&quot;); &quot;&quot;; [.$D9]-[.$A9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9]=&quot;&quot;; &quot;&quot;; WHICHROUND(COUNTIF([$ML.$A$3:.$V$130]; [.B9]) + COUNTIF([$Finals.$A$3:.$AF$19]; [.B9])))">
            <text:p/>
          </table:table-cell>
          <table:table-cell table:style-name="ce188" table:formula="of:=IF([.G9]=&quot;&quot;; &quot;&quot;; IF([.G9]=&quot;W&quot;; 8; IF(HASLOST(VLOOKUP(FIXED([.$A9]; 0; 0);  INDIRECT(VLOOKUP([.$G9]; [Extra.$W$2:.$Z$9]; 3; 0)); 9; 0)); 0; 1)))">
            <text:p/>
          </table:table-cell>
          <table:table-cell table:style-name="ce415" table:formula="of:=IF([.G9]=&quot;&quot;; &quot;&quot;; INDIRECT(CONCATENATE(VLOOKUP([.G9]; [Extra.$W$2:.$AG$9]; 7; 0); ROWOFFSETED(MATCH([.B9]; INDIRECT(VLOOKUP([.G9]; [Extra.$W$2:.$AI$9]; 12; 0)); 0)+2; WHICHROUNDN([.G9])))))">
            <text:p/>
          </table:table-cell>
          <table:table-cell table:style-name="ce176" table:formula="of:=IF([.G9]=&quot;&quot;; &quot;&quot;; INDIRECT(CONCATENATE(VLOOKUP([.G9]; [Extra.$W$2:.$AG$9]; 8; 0); ROWOFFSETED(MATCH([.B9]; INDIRECT(VLOOKUP([.G9]; [Extra.$W$2:.$AI$9]; 12; 0)); 0)+2; WHICHROUNDN([.G9])))))">
            <text:p/>
          </table:table-cell>
          <table:table-cell table:style-name="ce202" table:formula="of:=IF(AND(NOT([.F9]=&quot;D&quot;); NOT([.F9]=&quot;?&quot;); NOT([.G9]=&quot;D&quot;); NOT(ISBLANK([.F9])); NOT(ISBLANK([.G9]))); DIFFROUND([.F9]; [.G9]); &quot;&quot;)">
            <text:p/>
          </table:table-cell>
          <table:table-cell table:style-name="ce207" table:formula="of:=[.A9]" office:value-type="float" office:value="7" calcext:value-type="float">
            <text:p>7</text:p>
          </table:table-cell>
          <table:table-cell table:style-name="ce436" table:formula="of:=IF(COUNTIF([$FL.$A$3:.$A$130]; FIXED([.A9]; 0; 0))&gt;0; INDEX([$FL.$A$3:.$B$130]; MATCH(FIXED([.A9]; 0; 0); [$FL.$A$3:.$A$130]; 0); 2); &quot;&quot;)">
            <text:p/>
          </table:table-cell>
          <table:table-cell table:style-name="ce176" table:formula="of:=IF(COUNTIF([$FL.$A$3:.$A$130]; FIXED([.A9]; 0; 0)); INDEX([$FL.$B$3:.$C$130]; MATCH(FIXED([.A9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9]); [.$O9]=&quot;Q&quot;; [.$O9]=&quot;W&quot;; [.$O9]=&quot;L&quot;; [.$O9]=&quot;U&quot;; [.$O9]=&quot;D&quot;; [.$O9]=&quot;?&quot;); &quot;&quot;; [.$O9]-[.$A9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9]=&quot;&quot;; &quot;&quot;; WHICHROUND(COUNTIF([$FL.$A$3:.$R$130]; [.M9]) + COUNTIF([$Finals.$A$20:.$AF$36]; [.M9])))">
            <text:p/>
          </table:table-cell>
          <table:table-cell table:style-name="ce188" table:formula="of:=IF([.R9]=&quot;&quot;; &quot;&quot;; IF([.R9]=&quot;W&quot;; 8; IF(HASLOST(VLOOKUP(FIXED([.$A9]; 0; 0);  INDIRECT(VLOOKUP([.$R9]; [Extra.$W$2:.$Z$9]; 4; 0)); VLOOKUP([.R9]; [Extra.$W$2:.$AA$9]; 5; 0); 0)); 0; 1)))">
            <text:p/>
          </table:table-cell>
          <table:table-cell table:style-name="ce444" table:formula="of:=IF([.R9]=&quot;&quot;; &quot;&quot;; INDIRECT(CONCATENATE(VLOOKUP([.R9]; [Extra.$W$2:.$AG$9]; 10; 0); ROWOFFSETED(MATCH([.M9]; INDIRECT(VLOOKUP([.R9]; [Extra.$W$2:.$AI$9]; 13; 0)); 0)+2+VLOOKUP([.R9]; [Extra.$W$2:.$AJ$9]; 14; 0); WHICHROUNDN([.R9])))))">
            <text:p/>
          </table:table-cell>
          <table:table-cell table:style-name="ce220" table:formula="of:=IF([.R9]=&quot;&quot;; &quot;&quot;; INDIRECT(CONCATENATE(VLOOKUP([.R9]; [Extra.$W$2:.$AG$9]; 11; 0); ROWOFFSETED(MATCH([.M9]; INDIRECT(VLOOKUP([.R9]; [Extra.$W$2:.$AI$9]; 13; 0)); 0)+2+VLOOKUP([.R9]; [Extra.$W$2:.$AJ$9]; 14; 0); WHICHROUNDN([.R9])))))">
            <text:p/>
          </table:table-cell>
          <table:table-cell table:style-name="ce202" table:formula="of:=IF(AND(NOT([.Q9]=&quot;D&quot;); NOT([.Q9]=&quot;?&quot;); NOT([.R9]=&quot;D&quot;); NOT(ISBLANK([.Q9])); NOT(ISBLANK([.R9]))); DIFFROUND([.Q9]; [.R9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4" table:formula="of:=[.A9]+1" office:value-type="float" office:value="8" calcext:value-type="float">
            <text:p>8</text:p>
          </table:table-cell>
          <table:table-cell table:style-name="ce390" table:formula="of:=IF(COUNTIF([$ML.$A$3:.$A$130]; FIXED([.A10]; 0; 0))&gt;0; INDEX([$ML.$A$3:.$B$130]; MATCH(FIXED([.A10]; 0; 0); [$ML.$A$3:.$A$130]; 0); 2); &quot;&quot;)">
            <text:p/>
          </table:table-cell>
          <table:table-cell table:style-name="ce175" table:formula="of:=IF(COUNTIF([$ML.$A$3:.$A$130]; FIXED([.A10]; 0; 0)); INDEX([$ML.$B$3:.$C$130]; MATCH(FIXED([.A10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10]); [.$D10]=&quot;Q&quot;; [.$D10]=&quot;W&quot;; [.$D10]=&quot;L&quot;; [.$D10]=&quot;U&quot;; [.$D10]=&quot;D&quot;; [.$D10]=&quot;?&quot;); &quot;&quot;; [.$D10]-[.$A10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10]=&quot;&quot;; &quot;&quot;; WHICHROUND(COUNTIF([$ML.$A$3:.$V$130]; [.B10]) + COUNTIF([$Finals.$A$3:.$AF$19]; [.B10])))">
            <text:p/>
          </table:table-cell>
          <table:table-cell table:style-name="ce189" table:formula="of:=IF([.G10]=&quot;&quot;; &quot;&quot;; IF([.G10]=&quot;W&quot;; 8; IF(HASLOST(VLOOKUP(FIXED([.$A10]; 0; 0);  INDIRECT(VLOOKUP([.$G10]; [Extra.$W$2:.$Z$9]; 3; 0)); 9; 0)); 0; 1)))">
            <text:p/>
          </table:table-cell>
          <table:table-cell table:style-name="ce416" table:formula="of:=IF([.G10]=&quot;&quot;; &quot;&quot;; INDIRECT(CONCATENATE(VLOOKUP([.G10]; [Extra.$W$2:.$AG$9]; 7; 0); ROWOFFSETED(MATCH([.B10]; INDIRECT(VLOOKUP([.G10]; [Extra.$W$2:.$AI$9]; 12; 0)); 0)+2; WHICHROUNDN([.G10])))))">
            <text:p/>
          </table:table-cell>
          <table:table-cell table:style-name="ce175" table:formula="of:=IF([.G10]=&quot;&quot;; &quot;&quot;; INDIRECT(CONCATENATE(VLOOKUP([.G10]; [Extra.$W$2:.$AG$9]; 8; 0); ROWOFFSETED(MATCH([.B10]; INDIRECT(VLOOKUP([.G10]; [Extra.$W$2:.$AI$9]; 12; 0)); 0)+2; WHICHROUNDN([.G10])))))">
            <text:p/>
          </table:table-cell>
          <table:table-cell table:style-name="ce203" table:formula="of:=IF(AND(NOT([.F10]=&quot;D&quot;); NOT([.F10]=&quot;?&quot;); NOT([.G10]=&quot;D&quot;); NOT(ISBLANK([.F10])); NOT(ISBLANK([.G10]))); DIFFROUND([.F10]; [.G10]); &quot;&quot;)">
            <text:p/>
          </table:table-cell>
          <table:table-cell table:style-name="ce208" table:formula="of:=[.A10]" office:value-type="float" office:value="8" calcext:value-type="float">
            <text:p>8</text:p>
          </table:table-cell>
          <table:table-cell table:style-name="ce435" table:formula="of:=IF(COUNTIF([$FL.$A$3:.$A$130]; FIXED([.A10]; 0; 0))&gt;0; INDEX([$FL.$A$3:.$B$130]; MATCH(FIXED([.A10]; 0; 0); [$FL.$A$3:.$A$130]; 0); 2); &quot;&quot;)">
            <text:p/>
          </table:table-cell>
          <table:table-cell table:style-name="ce175" table:formula="of:=IF(COUNTIF([$FL.$A$3:.$A$130]; FIXED([.A10]; 0; 0)); INDEX([$FL.$B$3:.$C$130]; MATCH(FIXED([.A10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10]); [.$O10]=&quot;Q&quot;; [.$O10]=&quot;W&quot;; [.$O10]=&quot;L&quot;; [.$O10]=&quot;U&quot;; [.$O10]=&quot;D&quot;; [.$O10]=&quot;?&quot;); &quot;&quot;; [.$O10]-[.$A10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10]=&quot;&quot;; &quot;&quot;; WHICHROUND(COUNTIF([$FL.$A$3:.$R$130]; [.M10]) + COUNTIF([$Finals.$A$20:.$AF$36]; [.M10])))">
            <text:p/>
          </table:table-cell>
          <table:table-cell table:style-name="ce189" table:formula="of:=IF([.R10]=&quot;&quot;; &quot;&quot;; IF([.R10]=&quot;W&quot;; 8; IF(HASLOST(VLOOKUP(FIXED([.$A10]; 0; 0);  INDIRECT(VLOOKUP([.$R10]; [Extra.$W$2:.$Z$9]; 4; 0)); VLOOKUP([.R10]; [Extra.$W$2:.$AA$9]; 5; 0); 0)); 0; 1)))">
            <text:p/>
          </table:table-cell>
          <table:table-cell table:style-name="ce445" table:formula="of:=IF([.R10]=&quot;&quot;; &quot;&quot;; INDIRECT(CONCATENATE(VLOOKUP([.R10]; [Extra.$W$2:.$AG$9]; 10; 0); ROWOFFSETED(MATCH([.M10]; INDIRECT(VLOOKUP([.R10]; [Extra.$W$2:.$AI$9]; 13; 0)); 0)+2+VLOOKUP([.R10]; [Extra.$W$2:.$AJ$9]; 14; 0); WHICHROUNDN([.R10])))))">
            <text:p/>
          </table:table-cell>
          <table:table-cell table:style-name="ce226" table:formula="of:=IF([.R10]=&quot;&quot;; &quot;&quot;; INDIRECT(CONCATENATE(VLOOKUP([.R10]; [Extra.$W$2:.$AG$9]; 11; 0); ROWOFFSETED(MATCH([.M10]; INDIRECT(VLOOKUP([.R10]; [Extra.$W$2:.$AI$9]; 13; 0)); 0)+2+VLOOKUP([.R10]; [Extra.$W$2:.$AJ$9]; 14; 0); WHICHROUNDN([.R10])))))">
            <text:p/>
          </table:table-cell>
          <table:table-cell table:style-name="ce203" table:formula="of:=IF(AND(NOT([.Q10]=&quot;D&quot;); NOT([.Q10]=&quot;?&quot;); NOT([.R10]=&quot;D&quot;); NOT(ISBLANK([.Q10])); NOT(ISBLANK([.R10]))); DIFFROUND([.Q10]; [.R10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3" table:formula="of:=[.A10]+1" office:value-type="float" office:value="9" calcext:value-type="float">
            <text:p>9</text:p>
          </table:table-cell>
          <table:table-cell table:style-name="ce391" table:formula="of:=IF(COUNTIF([$ML.$A$3:.$A$130]; FIXED([.A11]; 0; 0))&gt;0; INDEX([$ML.$A$3:.$B$130]; MATCH(FIXED([.A11]; 0; 0); [$ML.$A$3:.$A$130]; 0); 2); &quot;&quot;)">
            <text:p/>
          </table:table-cell>
          <table:table-cell table:style-name="ce176" table:formula="of:=IF(COUNTIF([$ML.$A$3:.$A$130]; FIXED([.A11]; 0; 0)); INDEX([$ML.$B$3:.$C$130]; MATCH(FIXED([.A11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11]); [.$D11]=&quot;Q&quot;; [.$D11]=&quot;W&quot;; [.$D11]=&quot;L&quot;; [.$D11]=&quot;U&quot;; [.$D11]=&quot;D&quot;; [.$D11]=&quot;?&quot;); &quot;&quot;; [.$D11]-[.$A11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11]=&quot;&quot;; &quot;&quot;; WHICHROUND(COUNTIF([$ML.$A$3:.$V$130]; [.B11]) + COUNTIF([$Finals.$A$3:.$AF$19]; [.B11])))">
            <text:p/>
          </table:table-cell>
          <table:table-cell table:style-name="ce188" table:formula="of:=IF([.G11]=&quot;&quot;; &quot;&quot;; IF([.G11]=&quot;W&quot;; 8; IF(HASLOST(VLOOKUP(FIXED([.$A11]; 0; 0);  INDIRECT(VLOOKUP([.$G11]; [Extra.$W$2:.$Z$9]; 3; 0)); 9; 0)); 0; 1)))">
            <text:p/>
          </table:table-cell>
          <table:table-cell table:style-name="ce415" table:formula="of:=IF([.G11]=&quot;&quot;; &quot;&quot;; INDIRECT(CONCATENATE(VLOOKUP([.G11]; [Extra.$W$2:.$AG$9]; 7; 0); ROWOFFSETED(MATCH([.B11]; INDIRECT(VLOOKUP([.G11]; [Extra.$W$2:.$AI$9]; 12; 0)); 0)+2; WHICHROUNDN([.G11])))))">
            <text:p/>
          </table:table-cell>
          <table:table-cell table:style-name="ce176" table:formula="of:=IF([.G11]=&quot;&quot;; &quot;&quot;; INDIRECT(CONCATENATE(VLOOKUP([.G11]; [Extra.$W$2:.$AG$9]; 8; 0); ROWOFFSETED(MATCH([.B11]; INDIRECT(VLOOKUP([.G11]; [Extra.$W$2:.$AI$9]; 12; 0)); 0)+2; WHICHROUNDN([.G11])))))">
            <text:p/>
          </table:table-cell>
          <table:table-cell table:style-name="ce202" table:formula="of:=IF(AND(NOT([.F11]=&quot;D&quot;); NOT([.F11]=&quot;?&quot;); NOT([.G11]=&quot;D&quot;); NOT(ISBLANK([.F11])); NOT(ISBLANK([.G11]))); DIFFROUND([.F11]; [.G11]); &quot;&quot;)">
            <text:p/>
          </table:table-cell>
          <table:table-cell table:style-name="ce207" table:formula="of:=[.A11]" office:value-type="float" office:value="9" calcext:value-type="float">
            <text:p>9</text:p>
          </table:table-cell>
          <table:table-cell table:style-name="ce436" table:formula="of:=IF(COUNTIF([$FL.$A$3:.$A$130]; FIXED([.A11]; 0; 0))&gt;0; INDEX([$FL.$A$3:.$B$130]; MATCH(FIXED([.A11]; 0; 0); [$FL.$A$3:.$A$130]; 0); 2); &quot;&quot;)">
            <text:p/>
          </table:table-cell>
          <table:table-cell table:style-name="ce176" table:formula="of:=IF(COUNTIF([$FL.$A$3:.$A$130]; FIXED([.A11]; 0; 0)); INDEX([$FL.$B$3:.$C$130]; MATCH(FIXED([.A11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11]); [.$O11]=&quot;Q&quot;; [.$O11]=&quot;W&quot;; [.$O11]=&quot;L&quot;; [.$O11]=&quot;U&quot;; [.$O11]=&quot;D&quot;; [.$O11]=&quot;?&quot;); &quot;&quot;; [.$O11]-[.$A11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11]=&quot;&quot;; &quot;&quot;; WHICHROUND(COUNTIF([$FL.$A$3:.$R$130]; [.M11]) + COUNTIF([$Finals.$A$20:.$AF$36]; [.M11])))">
            <text:p/>
          </table:table-cell>
          <table:table-cell table:style-name="ce188" table:formula="of:=IF([.R11]=&quot;&quot;; &quot;&quot;; IF([.R11]=&quot;W&quot;; 8; IF(HASLOST(VLOOKUP(FIXED([.$A11]; 0; 0);  INDIRECT(VLOOKUP([.$R11]; [Extra.$W$2:.$Z$9]; 4; 0)); VLOOKUP([.R11]; [Extra.$W$2:.$AA$9]; 5; 0); 0)); 0; 1)))">
            <text:p/>
          </table:table-cell>
          <table:table-cell table:style-name="ce444" table:formula="of:=IF([.R11]=&quot;&quot;; &quot;&quot;; INDIRECT(CONCATENATE(VLOOKUP([.R11]; [Extra.$W$2:.$AG$9]; 10; 0); ROWOFFSETED(MATCH([.M11]; INDIRECT(VLOOKUP([.R11]; [Extra.$W$2:.$AI$9]; 13; 0)); 0)+2+VLOOKUP([.R11]; [Extra.$W$2:.$AJ$9]; 14; 0); WHICHROUNDN([.R11])))))">
            <text:p/>
          </table:table-cell>
          <table:table-cell table:style-name="ce220" table:formula="of:=IF([.R11]=&quot;&quot;; &quot;&quot;; INDIRECT(CONCATENATE(VLOOKUP([.R11]; [Extra.$W$2:.$AG$9]; 11; 0); ROWOFFSETED(MATCH([.M11]; INDIRECT(VLOOKUP([.R11]; [Extra.$W$2:.$AI$9]; 13; 0)); 0)+2+VLOOKUP([.R11]; [Extra.$W$2:.$AJ$9]; 14; 0); WHICHROUNDN([.R11])))))">
            <text:p/>
          </table:table-cell>
          <table:table-cell table:style-name="ce202" table:formula="of:=IF(AND(NOT([.Q11]=&quot;D&quot;); NOT([.Q11]=&quot;?&quot;); NOT([.R11]=&quot;D&quot;); NOT(ISBLANK([.Q11])); NOT(ISBLANK([.R11]))); DIFFROUND([.Q11]; [.R11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4" table:formula="of:=[.A11]+1" office:value-type="float" office:value="10" calcext:value-type="float">
            <text:p>10</text:p>
          </table:table-cell>
          <table:table-cell table:style-name="ce390" table:formula="of:=IF(COUNTIF([$ML.$A$3:.$A$130]; FIXED([.A12]; 0; 0))&gt;0; INDEX([$ML.$A$3:.$B$130]; MATCH(FIXED([.A12]; 0; 0); [$ML.$A$3:.$A$130]; 0); 2); &quot;&quot;)">
            <text:p/>
          </table:table-cell>
          <table:table-cell table:style-name="ce175" table:formula="of:=IF(COUNTIF([$ML.$A$3:.$A$130]; FIXED([.A12]; 0; 0)); INDEX([$ML.$B$3:.$C$130]; MATCH(FIXED([.A12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12]); [.$D12]=&quot;Q&quot;; [.$D12]=&quot;W&quot;; [.$D12]=&quot;L&quot;; [.$D12]=&quot;U&quot;; [.$D12]=&quot;D&quot;; [.$D12]=&quot;?&quot;); &quot;&quot;; [.$D12]-[.$A12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12]=&quot;&quot;; &quot;&quot;; WHICHROUND(COUNTIF([$ML.$A$3:.$V$130]; [.B12]) + COUNTIF([$Finals.$A$3:.$AF$19]; [.B12])))">
            <text:p/>
          </table:table-cell>
          <table:table-cell table:style-name="ce189" table:formula="of:=IF([.G12]=&quot;&quot;; &quot;&quot;; IF([.G12]=&quot;W&quot;; 8; IF(HASLOST(VLOOKUP(FIXED([.$A12]; 0; 0);  INDIRECT(VLOOKUP([.$G12]; [Extra.$W$2:.$Z$9]; 3; 0)); 9; 0)); 0; 1)))">
            <text:p/>
          </table:table-cell>
          <table:table-cell table:style-name="ce416" table:formula="of:=IF([.G12]=&quot;&quot;; &quot;&quot;; INDIRECT(CONCATENATE(VLOOKUP([.G12]; [Extra.$W$2:.$AG$9]; 7; 0); ROWOFFSETED(MATCH([.B12]; INDIRECT(VLOOKUP([.G12]; [Extra.$W$2:.$AI$9]; 12; 0)); 0)+2; WHICHROUNDN([.G12])))))">
            <text:p/>
          </table:table-cell>
          <table:table-cell table:style-name="ce175" table:formula="of:=IF([.G12]=&quot;&quot;; &quot;&quot;; INDIRECT(CONCATENATE(VLOOKUP([.G12]; [Extra.$W$2:.$AG$9]; 8; 0); ROWOFFSETED(MATCH([.B12]; INDIRECT(VLOOKUP([.G12]; [Extra.$W$2:.$AI$9]; 12; 0)); 0)+2; WHICHROUNDN([.G12])))))">
            <text:p/>
          </table:table-cell>
          <table:table-cell table:style-name="ce203" table:formula="of:=IF(AND(NOT([.F12]=&quot;D&quot;); NOT([.F12]=&quot;?&quot;); NOT([.G12]=&quot;D&quot;); NOT(ISBLANK([.F12])); NOT(ISBLANK([.G12]))); DIFFROUND([.F12]; [.G12]); &quot;&quot;)">
            <text:p/>
          </table:table-cell>
          <table:table-cell table:style-name="ce208" table:formula="of:=[.A12]" office:value-type="float" office:value="10" calcext:value-type="float">
            <text:p>10</text:p>
          </table:table-cell>
          <table:table-cell table:style-name="ce435" table:formula="of:=IF(COUNTIF([$FL.$A$3:.$A$130]; FIXED([.A12]; 0; 0))&gt;0; INDEX([$FL.$A$3:.$B$130]; MATCH(FIXED([.A12]; 0; 0); [$FL.$A$3:.$A$130]; 0); 2); &quot;&quot;)">
            <text:p/>
          </table:table-cell>
          <table:table-cell table:style-name="ce175" table:formula="of:=IF(COUNTIF([$FL.$A$3:.$A$130]; FIXED([.A12]; 0; 0)); INDEX([$FL.$B$3:.$C$130]; MATCH(FIXED([.A12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12]); [.$O12]=&quot;Q&quot;; [.$O12]=&quot;W&quot;; [.$O12]=&quot;L&quot;; [.$O12]=&quot;U&quot;; [.$O12]=&quot;D&quot;; [.$O12]=&quot;?&quot;); &quot;&quot;; [.$O12]-[.$A12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12]=&quot;&quot;; &quot;&quot;; WHICHROUND(COUNTIF([$FL.$A$3:.$R$130]; [.M12]) + COUNTIF([$Finals.$A$20:.$AF$36]; [.M12])))">
            <text:p/>
          </table:table-cell>
          <table:table-cell table:style-name="ce189" table:formula="of:=IF([.R12]=&quot;&quot;; &quot;&quot;; IF([.R12]=&quot;W&quot;; 8; IF(HASLOST(VLOOKUP(FIXED([.$A12]; 0; 0);  INDIRECT(VLOOKUP([.$R12]; [Extra.$W$2:.$Z$9]; 4; 0)); VLOOKUP([.R12]; [Extra.$W$2:.$AA$9]; 5; 0); 0)); 0; 1)))">
            <text:p/>
          </table:table-cell>
          <table:table-cell table:style-name="ce445" table:formula="of:=IF([.R12]=&quot;&quot;; &quot;&quot;; INDIRECT(CONCATENATE(VLOOKUP([.R12]; [Extra.$W$2:.$AG$9]; 10; 0); ROWOFFSETED(MATCH([.M12]; INDIRECT(VLOOKUP([.R12]; [Extra.$W$2:.$AI$9]; 13; 0)); 0)+2+VLOOKUP([.R12]; [Extra.$W$2:.$AJ$9]; 14; 0); WHICHROUNDN([.R12])))))">
            <text:p/>
          </table:table-cell>
          <table:table-cell table:style-name="ce226" table:formula="of:=IF([.R12]=&quot;&quot;; &quot;&quot;; INDIRECT(CONCATENATE(VLOOKUP([.R12]; [Extra.$W$2:.$AG$9]; 11; 0); ROWOFFSETED(MATCH([.M12]; INDIRECT(VLOOKUP([.R12]; [Extra.$W$2:.$AI$9]; 13; 0)); 0)+2+VLOOKUP([.R12]; [Extra.$W$2:.$AJ$9]; 14; 0); WHICHROUNDN([.R12])))))">
            <text:p/>
          </table:table-cell>
          <table:table-cell table:style-name="ce203" table:formula="of:=IF(AND(NOT([.Q12]=&quot;D&quot;); NOT([.Q12]=&quot;?&quot;); NOT([.R12]=&quot;D&quot;); NOT(ISBLANK([.Q12])); NOT(ISBLANK([.R12]))); DIFFROUND([.Q12]; [.R12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3" table:formula="of:=[.A12]+1" office:value-type="float" office:value="11" calcext:value-type="float">
            <text:p>11</text:p>
          </table:table-cell>
          <table:table-cell table:style-name="ce391" table:formula="of:=IF(COUNTIF([$ML.$A$3:.$A$130]; FIXED([.A13]; 0; 0))&gt;0; INDEX([$ML.$A$3:.$B$130]; MATCH(FIXED([.A13]; 0; 0); [$ML.$A$3:.$A$130]; 0); 2); &quot;&quot;)">
            <text:p/>
          </table:table-cell>
          <table:table-cell table:style-name="ce176" table:formula="of:=IF(COUNTIF([$ML.$A$3:.$A$130]; FIXED([.A13]; 0; 0)); INDEX([$ML.$B$3:.$C$130]; MATCH(FIXED([.A13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13]); [.$D13]=&quot;Q&quot;; [.$D13]=&quot;W&quot;; [.$D13]=&quot;L&quot;; [.$D13]=&quot;U&quot;; [.$D13]=&quot;D&quot;; [.$D13]=&quot;?&quot;); &quot;&quot;; [.$D13]-[.$A13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13]=&quot;&quot;; &quot;&quot;; WHICHROUND(COUNTIF([$ML.$A$3:.$V$130]; [.B13]) + COUNTIF([$Finals.$A$3:.$AF$19]; [.B13])))">
            <text:p/>
          </table:table-cell>
          <table:table-cell table:style-name="ce188" table:formula="of:=IF([.G13]=&quot;&quot;; &quot;&quot;; IF([.G13]=&quot;W&quot;; 8; IF(HASLOST(VLOOKUP(FIXED([.$A13]; 0; 0);  INDIRECT(VLOOKUP([.$G13]; [Extra.$W$2:.$Z$9]; 3; 0)); 9; 0)); 0; 1)))">
            <text:p/>
          </table:table-cell>
          <table:table-cell table:style-name="ce415" table:formula="of:=IF([.G13]=&quot;&quot;; &quot;&quot;; INDIRECT(CONCATENATE(VLOOKUP([.G13]; [Extra.$W$2:.$AG$9]; 7; 0); ROWOFFSETED(MATCH([.B13]; INDIRECT(VLOOKUP([.G13]; [Extra.$W$2:.$AI$9]; 12; 0)); 0)+2; WHICHROUNDN([.G13])))))">
            <text:p/>
          </table:table-cell>
          <table:table-cell table:style-name="ce176" table:formula="of:=IF([.G13]=&quot;&quot;; &quot;&quot;; INDIRECT(CONCATENATE(VLOOKUP([.G13]; [Extra.$W$2:.$AG$9]; 8; 0); ROWOFFSETED(MATCH([.B13]; INDIRECT(VLOOKUP([.G13]; [Extra.$W$2:.$AI$9]; 12; 0)); 0)+2; WHICHROUNDN([.G13])))))">
            <text:p/>
          </table:table-cell>
          <table:table-cell table:style-name="ce202" table:formula="of:=IF(AND(NOT([.F13]=&quot;D&quot;); NOT([.F13]=&quot;?&quot;); NOT([.G13]=&quot;D&quot;); NOT(ISBLANK([.F13])); NOT(ISBLANK([.G13]))); DIFFROUND([.F13]; [.G13]); &quot;&quot;)">
            <text:p/>
          </table:table-cell>
          <table:table-cell table:style-name="ce207" table:formula="of:=[.A13]" office:value-type="float" office:value="11" calcext:value-type="float">
            <text:p>11</text:p>
          </table:table-cell>
          <table:table-cell table:style-name="ce436" table:formula="of:=IF(COUNTIF([$FL.$A$3:.$A$130]; FIXED([.A13]; 0; 0))&gt;0; INDEX([$FL.$A$3:.$B$130]; MATCH(FIXED([.A13]; 0; 0); [$FL.$A$3:.$A$130]; 0); 2); &quot;&quot;)">
            <text:p/>
          </table:table-cell>
          <table:table-cell table:style-name="ce176" table:formula="of:=IF(COUNTIF([$FL.$A$3:.$A$130]; FIXED([.A13]; 0; 0)); INDEX([$FL.$B$3:.$C$130]; MATCH(FIXED([.A13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13]); [.$O13]=&quot;Q&quot;; [.$O13]=&quot;W&quot;; [.$O13]=&quot;L&quot;; [.$O13]=&quot;U&quot;; [.$O13]=&quot;D&quot;; [.$O13]=&quot;?&quot;); &quot;&quot;; [.$O13]-[.$A13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13]=&quot;&quot;; &quot;&quot;; WHICHROUND(COUNTIF([$FL.$A$3:.$R$130]; [.M13]) + COUNTIF([$Finals.$A$20:.$AF$36]; [.M13])))">
            <text:p/>
          </table:table-cell>
          <table:table-cell table:style-name="ce188" table:formula="of:=IF([.R13]=&quot;&quot;; &quot;&quot;; IF([.R13]=&quot;W&quot;; 8; IF(HASLOST(VLOOKUP(FIXED([.$A13]; 0; 0);  INDIRECT(VLOOKUP([.$R13]; [Extra.$W$2:.$Z$9]; 4; 0)); VLOOKUP([.R13]; [Extra.$W$2:.$AA$9]; 5; 0); 0)); 0; 1)))">
            <text:p/>
          </table:table-cell>
          <table:table-cell table:style-name="ce444" table:formula="of:=IF([.R13]=&quot;&quot;; &quot;&quot;; INDIRECT(CONCATENATE(VLOOKUP([.R13]; [Extra.$W$2:.$AG$9]; 10; 0); ROWOFFSETED(MATCH([.M13]; INDIRECT(VLOOKUP([.R13]; [Extra.$W$2:.$AI$9]; 13; 0)); 0)+2+VLOOKUP([.R13]; [Extra.$W$2:.$AJ$9]; 14; 0); WHICHROUNDN([.R13])))))">
            <text:p/>
          </table:table-cell>
          <table:table-cell table:style-name="ce220" table:formula="of:=IF([.R13]=&quot;&quot;; &quot;&quot;; INDIRECT(CONCATENATE(VLOOKUP([.R13]; [Extra.$W$2:.$AG$9]; 11; 0); ROWOFFSETED(MATCH([.M13]; INDIRECT(VLOOKUP([.R13]; [Extra.$W$2:.$AI$9]; 13; 0)); 0)+2+VLOOKUP([.R13]; [Extra.$W$2:.$AJ$9]; 14; 0); WHICHROUNDN([.R13])))))">
            <text:p/>
          </table:table-cell>
          <table:table-cell table:style-name="ce202" table:formula="of:=IF(AND(NOT([.Q13]=&quot;D&quot;); NOT([.Q13]=&quot;?&quot;); NOT([.R13]=&quot;D&quot;); NOT(ISBLANK([.Q13])); NOT(ISBLANK([.R13]))); DIFFROUND([.Q13]; [.R13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4" table:formula="of:=[.A13]+1" office:value-type="float" office:value="12" calcext:value-type="float">
            <text:p>12</text:p>
          </table:table-cell>
          <table:table-cell table:style-name="ce390" table:formula="of:=IF(COUNTIF([$ML.$A$3:.$A$130]; FIXED([.A14]; 0; 0))&gt;0; INDEX([$ML.$A$3:.$B$130]; MATCH(FIXED([.A14]; 0; 0); [$ML.$A$3:.$A$130]; 0); 2); &quot;&quot;)">
            <text:p/>
          </table:table-cell>
          <table:table-cell table:style-name="ce175" table:formula="of:=IF(COUNTIF([$ML.$A$3:.$A$130]; FIXED([.A14]; 0; 0)); INDEX([$ML.$B$3:.$C$130]; MATCH(FIXED([.A14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14]); [.$D14]=&quot;Q&quot;; [.$D14]=&quot;W&quot;; [.$D14]=&quot;L&quot;; [.$D14]=&quot;U&quot;; [.$D14]=&quot;D&quot;; [.$D14]=&quot;?&quot;); &quot;&quot;; [.$D14]-[.$A14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14]=&quot;&quot;; &quot;&quot;; WHICHROUND(COUNTIF([$ML.$A$3:.$V$130]; [.B14]) + COUNTIF([$Finals.$A$3:.$AF$19]; [.B14])))">
            <text:p/>
          </table:table-cell>
          <table:table-cell table:style-name="ce189" table:formula="of:=IF([.G14]=&quot;&quot;; &quot;&quot;; IF([.G14]=&quot;W&quot;; 8; IF(HASLOST(VLOOKUP(FIXED([.$A14]; 0; 0);  INDIRECT(VLOOKUP([.$G14]; [Extra.$W$2:.$Z$9]; 3; 0)); 9; 0)); 0; 1)))">
            <text:p/>
          </table:table-cell>
          <table:table-cell table:style-name="ce416" table:formula="of:=IF([.G14]=&quot;&quot;; &quot;&quot;; INDIRECT(CONCATENATE(VLOOKUP([.G14]; [Extra.$W$2:.$AG$9]; 7; 0); ROWOFFSETED(MATCH([.B14]; INDIRECT(VLOOKUP([.G14]; [Extra.$W$2:.$AI$9]; 12; 0)); 0)+2; WHICHROUNDN([.G14])))))">
            <text:p/>
          </table:table-cell>
          <table:table-cell table:style-name="ce175" table:formula="of:=IF([.G14]=&quot;&quot;; &quot;&quot;; INDIRECT(CONCATENATE(VLOOKUP([.G14]; [Extra.$W$2:.$AG$9]; 8; 0); ROWOFFSETED(MATCH([.B14]; INDIRECT(VLOOKUP([.G14]; [Extra.$W$2:.$AI$9]; 12; 0)); 0)+2; WHICHROUNDN([.G14])))))">
            <text:p/>
          </table:table-cell>
          <table:table-cell table:style-name="ce203" table:formula="of:=IF(AND(NOT([.F14]=&quot;D&quot;); NOT([.F14]=&quot;?&quot;); NOT([.G14]=&quot;D&quot;); NOT(ISBLANK([.F14])); NOT(ISBLANK([.G14]))); DIFFROUND([.F14]; [.G14]); &quot;&quot;)">
            <text:p/>
          </table:table-cell>
          <table:table-cell table:style-name="ce208" table:formula="of:=[.A14]" office:value-type="float" office:value="12" calcext:value-type="float">
            <text:p>12</text:p>
          </table:table-cell>
          <table:table-cell table:style-name="ce435" table:formula="of:=IF(COUNTIF([$FL.$A$3:.$A$130]; FIXED([.A14]; 0; 0))&gt;0; INDEX([$FL.$A$3:.$B$130]; MATCH(FIXED([.A14]; 0; 0); [$FL.$A$3:.$A$130]; 0); 2); &quot;&quot;)">
            <text:p/>
          </table:table-cell>
          <table:table-cell table:style-name="ce175" table:formula="of:=IF(COUNTIF([$FL.$A$3:.$A$130]; FIXED([.A14]; 0; 0)); INDEX([$FL.$B$3:.$C$130]; MATCH(FIXED([.A14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14]); [.$O14]=&quot;Q&quot;; [.$O14]=&quot;W&quot;; [.$O14]=&quot;L&quot;; [.$O14]=&quot;U&quot;; [.$O14]=&quot;D&quot;; [.$O14]=&quot;?&quot;); &quot;&quot;; [.$O14]-[.$A14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14]=&quot;&quot;; &quot;&quot;; WHICHROUND(COUNTIF([$FL.$A$3:.$R$130]; [.M14]) + COUNTIF([$Finals.$A$20:.$AF$36]; [.M14])))">
            <text:p/>
          </table:table-cell>
          <table:table-cell table:style-name="ce189" table:formula="of:=IF([.R14]=&quot;&quot;; &quot;&quot;; IF([.R14]=&quot;W&quot;; 8; IF(HASLOST(VLOOKUP(FIXED([.$A14]; 0; 0);  INDIRECT(VLOOKUP([.$R14]; [Extra.$W$2:.$Z$9]; 4; 0)); VLOOKUP([.R14]; [Extra.$W$2:.$AA$9]; 5; 0); 0)); 0; 1)))">
            <text:p/>
          </table:table-cell>
          <table:table-cell table:style-name="ce445" table:formula="of:=IF([.R14]=&quot;&quot;; &quot;&quot;; INDIRECT(CONCATENATE(VLOOKUP([.R14]; [Extra.$W$2:.$AG$9]; 10; 0); ROWOFFSETED(MATCH([.M14]; INDIRECT(VLOOKUP([.R14]; [Extra.$W$2:.$AI$9]; 13; 0)); 0)+2+VLOOKUP([.R14]; [Extra.$W$2:.$AJ$9]; 14; 0); WHICHROUNDN([.R14])))))">
            <text:p/>
          </table:table-cell>
          <table:table-cell table:style-name="ce226" table:formula="of:=IF([.R14]=&quot;&quot;; &quot;&quot;; INDIRECT(CONCATENATE(VLOOKUP([.R14]; [Extra.$W$2:.$AG$9]; 11; 0); ROWOFFSETED(MATCH([.M14]; INDIRECT(VLOOKUP([.R14]; [Extra.$W$2:.$AI$9]; 13; 0)); 0)+2+VLOOKUP([.R14]; [Extra.$W$2:.$AJ$9]; 14; 0); WHICHROUNDN([.R14])))))">
            <text:p/>
          </table:table-cell>
          <table:table-cell table:style-name="ce203" table:formula="of:=IF(AND(NOT([.Q14]=&quot;D&quot;); NOT([.Q14]=&quot;?&quot;); NOT([.R14]=&quot;D&quot;); NOT(ISBLANK([.Q14])); NOT(ISBLANK([.R14]))); DIFFROUND([.Q14]; [.R14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3" table:formula="of:=[.A14]+1" office:value-type="float" office:value="13" calcext:value-type="float">
            <text:p>13</text:p>
          </table:table-cell>
          <table:table-cell table:style-name="ce391" table:formula="of:=IF(COUNTIF([$ML.$A$3:.$A$130]; FIXED([.A15]; 0; 0))&gt;0; INDEX([$ML.$A$3:.$B$130]; MATCH(FIXED([.A15]; 0; 0); [$ML.$A$3:.$A$130]; 0); 2); &quot;&quot;)">
            <text:p/>
          </table:table-cell>
          <table:table-cell table:style-name="ce176" table:formula="of:=IF(COUNTIF([$ML.$A$3:.$A$130]; FIXED([.A15]; 0; 0)); INDEX([$ML.$B$3:.$C$130]; MATCH(FIXED([.A15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15]); [.$D15]=&quot;Q&quot;; [.$D15]=&quot;W&quot;; [.$D15]=&quot;L&quot;; [.$D15]=&quot;U&quot;; [.$D15]=&quot;D&quot;; [.$D15]=&quot;?&quot;); &quot;&quot;; [.$D15]-[.$A15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15]=&quot;&quot;; &quot;&quot;; WHICHROUND(COUNTIF([$ML.$A$3:.$V$130]; [.B15]) + COUNTIF([$Finals.$A$3:.$AF$19]; [.B15])))">
            <text:p/>
          </table:table-cell>
          <table:table-cell table:style-name="ce188" table:formula="of:=IF([.G15]=&quot;&quot;; &quot;&quot;; IF([.G15]=&quot;W&quot;; 8; IF(HASLOST(VLOOKUP(FIXED([.$A15]; 0; 0);  INDIRECT(VLOOKUP([.$G15]; [Extra.$W$2:.$Z$9]; 3; 0)); 9; 0)); 0; 1)))">
            <text:p/>
          </table:table-cell>
          <table:table-cell table:style-name="ce415" table:formula="of:=IF([.G15]=&quot;&quot;; &quot;&quot;; INDIRECT(CONCATENATE(VLOOKUP([.G15]; [Extra.$W$2:.$AG$9]; 7; 0); ROWOFFSETED(MATCH([.B15]; INDIRECT(VLOOKUP([.G15]; [Extra.$W$2:.$AI$9]; 12; 0)); 0)+2; WHICHROUNDN([.G15])))))">
            <text:p/>
          </table:table-cell>
          <table:table-cell table:style-name="ce176" table:formula="of:=IF([.G15]=&quot;&quot;; &quot;&quot;; INDIRECT(CONCATENATE(VLOOKUP([.G15]; [Extra.$W$2:.$AG$9]; 8; 0); ROWOFFSETED(MATCH([.B15]; INDIRECT(VLOOKUP([.G15]; [Extra.$W$2:.$AI$9]; 12; 0)); 0)+2; WHICHROUNDN([.G15])))))">
            <text:p/>
          </table:table-cell>
          <table:table-cell table:style-name="ce202" table:formula="of:=IF(AND(NOT([.F15]=&quot;D&quot;); NOT([.F15]=&quot;?&quot;); NOT([.G15]=&quot;D&quot;); NOT(ISBLANK([.F15])); NOT(ISBLANK([.G15]))); DIFFROUND([.F15]; [.G15]); &quot;&quot;)">
            <text:p/>
          </table:table-cell>
          <table:table-cell table:style-name="ce207" table:formula="of:=[.A15]" office:value-type="float" office:value="13" calcext:value-type="float">
            <text:p>13</text:p>
          </table:table-cell>
          <table:table-cell table:style-name="ce436" table:formula="of:=IF(COUNTIF([$FL.$A$3:.$A$130]; FIXED([.A15]; 0; 0))&gt;0; INDEX([$FL.$A$3:.$B$130]; MATCH(FIXED([.A15]; 0; 0); [$FL.$A$3:.$A$130]; 0); 2); &quot;&quot;)">
            <text:p/>
          </table:table-cell>
          <table:table-cell table:style-name="ce176" table:formula="of:=IF(COUNTIF([$FL.$A$3:.$A$130]; FIXED([.A15]; 0; 0)); INDEX([$FL.$B$3:.$C$130]; MATCH(FIXED([.A15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15]); [.$O15]=&quot;Q&quot;; [.$O15]=&quot;W&quot;; [.$O15]=&quot;L&quot;; [.$O15]=&quot;U&quot;; [.$O15]=&quot;D&quot;; [.$O15]=&quot;?&quot;); &quot;&quot;; [.$O15]-[.$A15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15]=&quot;&quot;; &quot;&quot;; WHICHROUND(COUNTIF([$FL.$A$3:.$R$130]; [.M15]) + COUNTIF([$Finals.$A$20:.$AF$36]; [.M15])))">
            <text:p/>
          </table:table-cell>
          <table:table-cell table:style-name="ce188" table:formula="of:=IF([.R15]=&quot;&quot;; &quot;&quot;; IF([.R15]=&quot;W&quot;; 8; IF(HASLOST(VLOOKUP(FIXED([.$A15]; 0; 0);  INDIRECT(VLOOKUP([.$R15]; [Extra.$W$2:.$Z$9]; 4; 0)); VLOOKUP([.R15]; [Extra.$W$2:.$AA$9]; 5; 0); 0)); 0; 1)))">
            <text:p/>
          </table:table-cell>
          <table:table-cell table:style-name="ce444" table:formula="of:=IF([.R15]=&quot;&quot;; &quot;&quot;; INDIRECT(CONCATENATE(VLOOKUP([.R15]; [Extra.$W$2:.$AG$9]; 10; 0); ROWOFFSETED(MATCH([.M15]; INDIRECT(VLOOKUP([.R15]; [Extra.$W$2:.$AI$9]; 13; 0)); 0)+2+VLOOKUP([.R15]; [Extra.$W$2:.$AJ$9]; 14; 0); WHICHROUNDN([.R15])))))">
            <text:p/>
          </table:table-cell>
          <table:table-cell table:style-name="ce220" table:formula="of:=IF([.R15]=&quot;&quot;; &quot;&quot;; INDIRECT(CONCATENATE(VLOOKUP([.R15]; [Extra.$W$2:.$AG$9]; 11; 0); ROWOFFSETED(MATCH([.M15]; INDIRECT(VLOOKUP([.R15]; [Extra.$W$2:.$AI$9]; 13; 0)); 0)+2+VLOOKUP([.R15]; [Extra.$W$2:.$AJ$9]; 14; 0); WHICHROUNDN([.R15])))))">
            <text:p/>
          </table:table-cell>
          <table:table-cell table:style-name="ce202" table:formula="of:=IF(AND(NOT([.Q15]=&quot;D&quot;); NOT([.Q15]=&quot;?&quot;); NOT([.R15]=&quot;D&quot;); NOT(ISBLANK([.Q15])); NOT(ISBLANK([.R15]))); DIFFROUND([.Q15]; [.R15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4" table:formula="of:=[.A15]+1" office:value-type="float" office:value="14" calcext:value-type="float">
            <text:p>14</text:p>
          </table:table-cell>
          <table:table-cell table:style-name="ce390" table:formula="of:=IF(COUNTIF([$ML.$A$3:.$A$130]; FIXED([.A16]; 0; 0))&gt;0; INDEX([$ML.$A$3:.$B$130]; MATCH(FIXED([.A16]; 0; 0); [$ML.$A$3:.$A$130]; 0); 2); &quot;&quot;)">
            <text:p/>
          </table:table-cell>
          <table:table-cell table:style-name="ce175" table:formula="of:=IF(COUNTIF([$ML.$A$3:.$A$130]; FIXED([.A16]; 0; 0)); INDEX([$ML.$B$3:.$C$130]; MATCH(FIXED([.A16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16]); [.$D16]=&quot;Q&quot;; [.$D16]=&quot;W&quot;; [.$D16]=&quot;L&quot;; [.$D16]=&quot;U&quot;; [.$D16]=&quot;D&quot;; [.$D16]=&quot;?&quot;); &quot;&quot;; [.$D16]-[.$A16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16]=&quot;&quot;; &quot;&quot;; WHICHROUND(COUNTIF([$ML.$A$3:.$V$130]; [.B16]) + COUNTIF([$Finals.$A$3:.$AF$19]; [.B16])))">
            <text:p/>
          </table:table-cell>
          <table:table-cell table:style-name="ce189" table:formula="of:=IF([.G16]=&quot;&quot;; &quot;&quot;; IF([.G16]=&quot;W&quot;; 8; IF(HASLOST(VLOOKUP(FIXED([.$A16]; 0; 0);  INDIRECT(VLOOKUP([.$G16]; [Extra.$W$2:.$Z$9]; 3; 0)); 9; 0)); 0; 1)))">
            <text:p/>
          </table:table-cell>
          <table:table-cell table:style-name="ce416" table:formula="of:=IF([.G16]=&quot;&quot;; &quot;&quot;; INDIRECT(CONCATENATE(VLOOKUP([.G16]; [Extra.$W$2:.$AG$9]; 7; 0); ROWOFFSETED(MATCH([.B16]; INDIRECT(VLOOKUP([.G16]; [Extra.$W$2:.$AI$9]; 12; 0)); 0)+2; WHICHROUNDN([.G16])))))">
            <text:p/>
          </table:table-cell>
          <table:table-cell table:style-name="ce175" table:formula="of:=IF([.G16]=&quot;&quot;; &quot;&quot;; INDIRECT(CONCATENATE(VLOOKUP([.G16]; [Extra.$W$2:.$AG$9]; 8; 0); ROWOFFSETED(MATCH([.B16]; INDIRECT(VLOOKUP([.G16]; [Extra.$W$2:.$AI$9]; 12; 0)); 0)+2; WHICHROUNDN([.G16])))))">
            <text:p/>
          </table:table-cell>
          <table:table-cell table:style-name="ce203" table:formula="of:=IF(AND(NOT([.F16]=&quot;D&quot;); NOT([.F16]=&quot;?&quot;); NOT([.G16]=&quot;D&quot;); NOT(ISBLANK([.F16])); NOT(ISBLANK([.G16]))); DIFFROUND([.F16]; [.G16]); &quot;&quot;)">
            <text:p/>
          </table:table-cell>
          <table:table-cell table:style-name="ce208" table:formula="of:=[.A16]" office:value-type="float" office:value="14" calcext:value-type="float">
            <text:p>14</text:p>
          </table:table-cell>
          <table:table-cell table:style-name="ce435" table:formula="of:=IF(COUNTIF([$FL.$A$3:.$A$130]; FIXED([.A16]; 0; 0))&gt;0; INDEX([$FL.$A$3:.$B$130]; MATCH(FIXED([.A16]; 0; 0); [$FL.$A$3:.$A$130]; 0); 2); &quot;&quot;)">
            <text:p/>
          </table:table-cell>
          <table:table-cell table:style-name="ce175" table:formula="of:=IF(COUNTIF([$FL.$A$3:.$A$130]; FIXED([.A16]; 0; 0)); INDEX([$FL.$B$3:.$C$130]; MATCH(FIXED([.A16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16]); [.$O16]=&quot;Q&quot;; [.$O16]=&quot;W&quot;; [.$O16]=&quot;L&quot;; [.$O16]=&quot;U&quot;; [.$O16]=&quot;D&quot;; [.$O16]=&quot;?&quot;); &quot;&quot;; [.$O16]-[.$A16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16]=&quot;&quot;; &quot;&quot;; WHICHROUND(COUNTIF([$FL.$A$3:.$R$130]; [.M16]) + COUNTIF([$Finals.$A$20:.$AF$36]; [.M16])))">
            <text:p/>
          </table:table-cell>
          <table:table-cell table:style-name="ce189" table:formula="of:=IF([.R16]=&quot;&quot;; &quot;&quot;; IF([.R16]=&quot;W&quot;; 8; IF(HASLOST(VLOOKUP(FIXED([.$A16]; 0; 0);  INDIRECT(VLOOKUP([.$R16]; [Extra.$W$2:.$Z$9]; 4; 0)); VLOOKUP([.R16]; [Extra.$W$2:.$AA$9]; 5; 0); 0)); 0; 1)))">
            <text:p/>
          </table:table-cell>
          <table:table-cell table:style-name="ce445" table:formula="of:=IF([.R16]=&quot;&quot;; &quot;&quot;; INDIRECT(CONCATENATE(VLOOKUP([.R16]; [Extra.$W$2:.$AG$9]; 10; 0); ROWOFFSETED(MATCH([.M16]; INDIRECT(VLOOKUP([.R16]; [Extra.$W$2:.$AI$9]; 13; 0)); 0)+2+VLOOKUP([.R16]; [Extra.$W$2:.$AJ$9]; 14; 0); WHICHROUNDN([.R16])))))">
            <text:p/>
          </table:table-cell>
          <table:table-cell table:style-name="ce226" table:formula="of:=IF([.R16]=&quot;&quot;; &quot;&quot;; INDIRECT(CONCATENATE(VLOOKUP([.R16]; [Extra.$W$2:.$AG$9]; 11; 0); ROWOFFSETED(MATCH([.M16]; INDIRECT(VLOOKUP([.R16]; [Extra.$W$2:.$AI$9]; 13; 0)); 0)+2+VLOOKUP([.R16]; [Extra.$W$2:.$AJ$9]; 14; 0); WHICHROUNDN([.R16])))))">
            <text:p/>
          </table:table-cell>
          <table:table-cell table:style-name="ce203" table:formula="of:=IF(AND(NOT([.Q16]=&quot;D&quot;); NOT([.Q16]=&quot;?&quot;); NOT([.R16]=&quot;D&quot;); NOT(ISBLANK([.Q16])); NOT(ISBLANK([.R16]))); DIFFROUND([.Q16]; [.R16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3" table:formula="of:=[.A16]+1" office:value-type="float" office:value="15" calcext:value-type="float">
            <text:p>15</text:p>
          </table:table-cell>
          <table:table-cell table:style-name="ce391" table:formula="of:=IF(COUNTIF([$ML.$A$3:.$A$130]; FIXED([.A17]; 0; 0))&gt;0; INDEX([$ML.$A$3:.$B$130]; MATCH(FIXED([.A17]; 0; 0); [$ML.$A$3:.$A$130]; 0); 2); &quot;&quot;)">
            <text:p/>
          </table:table-cell>
          <table:table-cell table:style-name="ce176" table:formula="of:=IF(COUNTIF([$ML.$A$3:.$A$130]; FIXED([.A17]; 0; 0)); INDEX([$ML.$B$3:.$C$130]; MATCH(FIXED([.A17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17]); [.$D17]=&quot;Q&quot;; [.$D17]=&quot;W&quot;; [.$D17]=&quot;L&quot;; [.$D17]=&quot;U&quot;; [.$D17]=&quot;D&quot;; [.$D17]=&quot;?&quot;); &quot;&quot;; [.$D17]-[.$A17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17]=&quot;&quot;; &quot;&quot;; WHICHROUND(COUNTIF([$ML.$A$3:.$V$130]; [.B17]) + COUNTIF([$Finals.$A$3:.$AF$19]; [.B17])))">
            <text:p/>
          </table:table-cell>
          <table:table-cell table:style-name="ce188" table:formula="of:=IF([.G17]=&quot;&quot;; &quot;&quot;; IF([.G17]=&quot;W&quot;; 8; IF(HASLOST(VLOOKUP(FIXED([.$A17]; 0; 0);  INDIRECT(VLOOKUP([.$G17]; [Extra.$W$2:.$Z$9]; 3; 0)); 9; 0)); 0; 1)))">
            <text:p/>
          </table:table-cell>
          <table:table-cell table:style-name="ce415" table:formula="of:=IF([.G17]=&quot;&quot;; &quot;&quot;; INDIRECT(CONCATENATE(VLOOKUP([.G17]; [Extra.$W$2:.$AG$9]; 7; 0); ROWOFFSETED(MATCH([.B17]; INDIRECT(VLOOKUP([.G17]; [Extra.$W$2:.$AI$9]; 12; 0)); 0)+2; WHICHROUNDN([.G17])))))">
            <text:p/>
          </table:table-cell>
          <table:table-cell table:style-name="ce176" table:formula="of:=IF([.G17]=&quot;&quot;; &quot;&quot;; INDIRECT(CONCATENATE(VLOOKUP([.G17]; [Extra.$W$2:.$AG$9]; 8; 0); ROWOFFSETED(MATCH([.B17]; INDIRECT(VLOOKUP([.G17]; [Extra.$W$2:.$AI$9]; 12; 0)); 0)+2; WHICHROUNDN([.G17])))))">
            <text:p/>
          </table:table-cell>
          <table:table-cell table:style-name="ce202" table:formula="of:=IF(AND(NOT([.F17]=&quot;D&quot;); NOT([.F17]=&quot;?&quot;); NOT([.G17]=&quot;D&quot;); NOT(ISBLANK([.F17])); NOT(ISBLANK([.G17]))); DIFFROUND([.F17]; [.G17]); &quot;&quot;)">
            <text:p/>
          </table:table-cell>
          <table:table-cell table:style-name="ce207" table:formula="of:=[.A17]" office:value-type="float" office:value="15" calcext:value-type="float">
            <text:p>15</text:p>
          </table:table-cell>
          <table:table-cell table:style-name="ce436" table:formula="of:=IF(COUNTIF([$FL.$A$3:.$A$130]; FIXED([.A17]; 0; 0))&gt;0; INDEX([$FL.$A$3:.$B$130]; MATCH(FIXED([.A17]; 0; 0); [$FL.$A$3:.$A$130]; 0); 2); &quot;&quot;)">
            <text:p/>
          </table:table-cell>
          <table:table-cell table:style-name="ce176" table:formula="of:=IF(COUNTIF([$FL.$A$3:.$A$130]; FIXED([.A17]; 0; 0)); INDEX([$FL.$B$3:.$C$130]; MATCH(FIXED([.A17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17]); [.$O17]=&quot;Q&quot;; [.$O17]=&quot;W&quot;; [.$O17]=&quot;L&quot;; [.$O17]=&quot;U&quot;; [.$O17]=&quot;D&quot;; [.$O17]=&quot;?&quot;); &quot;&quot;; [.$O17]-[.$A17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17]=&quot;&quot;; &quot;&quot;; WHICHROUND(COUNTIF([$FL.$A$3:.$R$130]; [.M17]) + COUNTIF([$Finals.$A$20:.$AF$36]; [.M17])))">
            <text:p/>
          </table:table-cell>
          <table:table-cell table:style-name="ce188" table:formula="of:=IF([.R17]=&quot;&quot;; &quot;&quot;; IF([.R17]=&quot;W&quot;; 8; IF(HASLOST(VLOOKUP(FIXED([.$A17]; 0; 0);  INDIRECT(VLOOKUP([.$R17]; [Extra.$W$2:.$Z$9]; 4; 0)); VLOOKUP([.R17]; [Extra.$W$2:.$AA$9]; 5; 0); 0)); 0; 1)))">
            <text:p/>
          </table:table-cell>
          <table:table-cell table:style-name="ce444" table:formula="of:=IF([.R17]=&quot;&quot;; &quot;&quot;; INDIRECT(CONCATENATE(VLOOKUP([.R17]; [Extra.$W$2:.$AG$9]; 10; 0); ROWOFFSETED(MATCH([.M17]; INDIRECT(VLOOKUP([.R17]; [Extra.$W$2:.$AI$9]; 13; 0)); 0)+2+VLOOKUP([.R17]; [Extra.$W$2:.$AJ$9]; 14; 0); WHICHROUNDN([.R17])))))">
            <text:p/>
          </table:table-cell>
          <table:table-cell table:style-name="ce220" table:formula="of:=IF([.R17]=&quot;&quot;; &quot;&quot;; INDIRECT(CONCATENATE(VLOOKUP([.R17]; [Extra.$W$2:.$AG$9]; 11; 0); ROWOFFSETED(MATCH([.M17]; INDIRECT(VLOOKUP([.R17]; [Extra.$W$2:.$AI$9]; 13; 0)); 0)+2+VLOOKUP([.R17]; [Extra.$W$2:.$AJ$9]; 14; 0); WHICHROUNDN([.R17])))))">
            <text:p/>
          </table:table-cell>
          <table:table-cell table:style-name="ce202" table:formula="of:=IF(AND(NOT([.Q17]=&quot;D&quot;); NOT([.Q17]=&quot;?&quot;); NOT([.R17]=&quot;D&quot;); NOT(ISBLANK([.Q17])); NOT(ISBLANK([.R17]))); DIFFROUND([.Q17]; [.R17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4" table:formula="of:=[.A17]+1" office:value-type="float" office:value="16" calcext:value-type="float">
            <text:p>16</text:p>
          </table:table-cell>
          <table:table-cell table:style-name="ce390" table:formula="of:=IF(COUNTIF([$ML.$A$3:.$A$130]; FIXED([.A18]; 0; 0))&gt;0; INDEX([$ML.$A$3:.$B$130]; MATCH(FIXED([.A18]; 0; 0); [$ML.$A$3:.$A$130]; 0); 2); &quot;&quot;)">
            <text:p/>
          </table:table-cell>
          <table:table-cell table:style-name="ce175" table:formula="of:=IF(COUNTIF([$ML.$A$3:.$A$130]; FIXED([.A18]; 0; 0)); INDEX([$ML.$B$3:.$C$130]; MATCH(FIXED([.A18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18]); [.$D18]=&quot;Q&quot;; [.$D18]=&quot;W&quot;; [.$D18]=&quot;L&quot;; [.$D18]=&quot;U&quot;; [.$D18]=&quot;D&quot;; [.$D18]=&quot;?&quot;); &quot;&quot;; [.$D18]-[.$A18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18]=&quot;&quot;; &quot;&quot;; WHICHROUND(COUNTIF([$ML.$A$3:.$V$130]; [.B18]) + COUNTIF([$Finals.$A$3:.$AF$19]; [.B18])))">
            <text:p/>
          </table:table-cell>
          <table:table-cell table:style-name="ce189" table:formula="of:=IF([.G18]=&quot;&quot;; &quot;&quot;; IF([.G18]=&quot;W&quot;; 8; IF(HASLOST(VLOOKUP(FIXED([.$A18]; 0; 0);  INDIRECT(VLOOKUP([.$G18]; [Extra.$W$2:.$Z$9]; 3; 0)); 9; 0)); 0; 1)))">
            <text:p/>
          </table:table-cell>
          <table:table-cell table:style-name="ce416" table:formula="of:=IF([.G18]=&quot;&quot;; &quot;&quot;; INDIRECT(CONCATENATE(VLOOKUP([.G18]; [Extra.$W$2:.$AG$9]; 7; 0); ROWOFFSETED(MATCH([.B18]; INDIRECT(VLOOKUP([.G18]; [Extra.$W$2:.$AI$9]; 12; 0)); 0)+2; WHICHROUNDN([.G18])))))">
            <text:p/>
          </table:table-cell>
          <table:table-cell table:style-name="ce175" table:formula="of:=IF([.G18]=&quot;&quot;; &quot;&quot;; INDIRECT(CONCATENATE(VLOOKUP([.G18]; [Extra.$W$2:.$AG$9]; 8; 0); ROWOFFSETED(MATCH([.B18]; INDIRECT(VLOOKUP([.G18]; [Extra.$W$2:.$AI$9]; 12; 0)); 0)+2; WHICHROUNDN([.G18])))))">
            <text:p/>
          </table:table-cell>
          <table:table-cell table:style-name="ce203" table:formula="of:=IF(AND(NOT([.F18]=&quot;D&quot;); NOT([.F18]=&quot;?&quot;); NOT([.G18]=&quot;D&quot;); NOT(ISBLANK([.F18])); NOT(ISBLANK([.G18]))); DIFFROUND([.F18]; [.G18]); &quot;&quot;)">
            <text:p/>
          </table:table-cell>
          <table:table-cell table:style-name="ce208" table:formula="of:=[.A18]" office:value-type="float" office:value="16" calcext:value-type="float">
            <text:p>16</text:p>
          </table:table-cell>
          <table:table-cell table:style-name="ce435" table:formula="of:=IF(COUNTIF([$FL.$A$3:.$A$130]; FIXED([.A18]; 0; 0))&gt;0; INDEX([$FL.$A$3:.$B$130]; MATCH(FIXED([.A18]; 0; 0); [$FL.$A$3:.$A$130]; 0); 2); &quot;&quot;)">
            <text:p/>
          </table:table-cell>
          <table:table-cell table:style-name="ce175" table:formula="of:=IF(COUNTIF([$FL.$A$3:.$A$130]; FIXED([.A18]; 0; 0)); INDEX([$FL.$B$3:.$C$130]; MATCH(FIXED([.A18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18]); [.$O18]=&quot;Q&quot;; [.$O18]=&quot;W&quot;; [.$O18]=&quot;L&quot;; [.$O18]=&quot;U&quot;; [.$O18]=&quot;D&quot;; [.$O18]=&quot;?&quot;); &quot;&quot;; [.$O18]-[.$A18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18]=&quot;&quot;; &quot;&quot;; WHICHROUND(COUNTIF([$FL.$A$3:.$R$130]; [.M18]) + COUNTIF([$Finals.$A$20:.$AF$36]; [.M18])))">
            <text:p/>
          </table:table-cell>
          <table:table-cell table:style-name="ce189" table:formula="of:=IF([.R18]=&quot;&quot;; &quot;&quot;; IF([.R18]=&quot;W&quot;; 8; IF(HASLOST(VLOOKUP(FIXED([.$A18]; 0; 0);  INDIRECT(VLOOKUP([.$R18]; [Extra.$W$2:.$Z$9]; 4; 0)); VLOOKUP([.R18]; [Extra.$W$2:.$AA$9]; 5; 0); 0)); 0; 1)))">
            <text:p/>
          </table:table-cell>
          <table:table-cell table:style-name="ce445" table:formula="of:=IF([.R18]=&quot;&quot;; &quot;&quot;; INDIRECT(CONCATENATE(VLOOKUP([.R18]; [Extra.$W$2:.$AG$9]; 10; 0); ROWOFFSETED(MATCH([.M18]; INDIRECT(VLOOKUP([.R18]; [Extra.$W$2:.$AI$9]; 13; 0)); 0)+2+VLOOKUP([.R18]; [Extra.$W$2:.$AJ$9]; 14; 0); WHICHROUNDN([.R18])))))">
            <text:p/>
          </table:table-cell>
          <table:table-cell table:style-name="ce226" table:formula="of:=IF([.R18]=&quot;&quot;; &quot;&quot;; INDIRECT(CONCATENATE(VLOOKUP([.R18]; [Extra.$W$2:.$AG$9]; 11; 0); ROWOFFSETED(MATCH([.M18]; INDIRECT(VLOOKUP([.R18]; [Extra.$W$2:.$AI$9]; 13; 0)); 0)+2+VLOOKUP([.R18]; [Extra.$W$2:.$AJ$9]; 14; 0); WHICHROUNDN([.R18])))))">
            <text:p/>
          </table:table-cell>
          <table:table-cell table:style-name="ce203" table:formula="of:=IF(AND(NOT([.Q18]=&quot;D&quot;); NOT([.Q18]=&quot;?&quot;); NOT([.R18]=&quot;D&quot;); NOT(ISBLANK([.Q18])); NOT(ISBLANK([.R18]))); DIFFROUND([.Q18]; [.R18]); &quot;&quot;)">
            <text:p/>
          </table:table-cell>
          <table:table-cell table:style-name="ce93" office:value-type="string" calcext:value-type="string">
            <text:p>Top</text:p>
          </table:table-cell>
        </table:table-row>
        <table:table-row table:style-name="ro1">
          <table:table-cell table:style-name="ce165" table:formula="of:=[.A18]+1" office:value-type="float" office:value="17" calcext:value-type="float">
            <text:p>17</text:p>
          </table:table-cell>
          <table:table-cell table:style-name="ce392" table:formula="of:=IF(COUNTIF([$ML.$A$3:.$A$130]; FIXED([.A19]; 0; 0))&gt;0; INDEX([$ML.$A$3:.$B$130]; MATCH(FIXED([.A19]; 0; 0); [$ML.$A$3:.$A$130]; 0); 2); &quot;&quot;)">
            <text:p/>
          </table:table-cell>
          <table:table-cell table:style-name="ce177" table:formula="of:=IF(COUNTIF([$ML.$A$3:.$A$130]; FIXED([.A19]; 0; 0)); INDEX([$ML.$B$3:.$C$130]; MATCH(FIXED([.A19]; 0; 0); [$ML.$A$3:.$A$130]; 0); 2); &quot;&quot;)">
            <text:p/>
          </table:table-cell>
          <table:table-cell table:style-name="ce177" office:value-type="string" calcext:value-type="string">
            <text:p>?</text:p>
          </table:table-cell>
          <table:table-cell table:style-name="ce183" table:formula="of:=IF(OR(ISBLANK([.$D19]); [.$D19]=&quot;Q&quot;; [.$D19]=&quot;W&quot;; [.$D19]=&quot;L&quot;; [.$D19]=&quot;U&quot;; [.$D19]=&quot;D&quot;; [.$D19]=&quot;?&quot;); &quot;&quot;; [.$D19]-[.$A19])">
            <text:p/>
          </table:table-cell>
          <table:table-cell table:style-name="ce177" office:value-type="string" calcext:value-type="string">
            <text:p>?</text:p>
          </table:table-cell>
          <table:table-cell table:style-name="ce177" table:formula="of:=IF([.B19]=&quot;&quot;; &quot;&quot;; WHICHROUND(COUNTIF([$ML.$A$3:.$V$130]; [.B19]) + COUNTIF([$Finals.$A$3:.$AF$19]; [.B19])))">
            <text:p/>
          </table:table-cell>
          <table:table-cell table:style-name="ce190" table:formula="of:=IF([.G19]=&quot;&quot;; &quot;&quot;; IF([.G19]=&quot;W&quot;; 8; IF(HASLOST(VLOOKUP(FIXED([.$A19]; 0; 0);  INDIRECT(VLOOKUP([.$G19]; [Extra.$W$2:.$Z$9]; 3; 0)); 9; 0)); 0; 1)))">
            <text:p/>
          </table:table-cell>
          <table:table-cell table:style-name="ce417" table:formula="of:=IF([.G19]=&quot;&quot;; &quot;&quot;; INDIRECT(CONCATENATE(VLOOKUP([.G19]; [Extra.$W$2:.$AG$9]; 7; 0); ROWOFFSETED(MATCH([.B19]; INDIRECT(VLOOKUP([.G19]; [Extra.$W$2:.$AI$9]; 12; 0)); 0)+2; WHICHROUNDN([.G19])))))">
            <text:p/>
          </table:table-cell>
          <table:table-cell table:style-name="ce177" table:formula="of:=IF([.G19]=&quot;&quot;; &quot;&quot;; INDIRECT(CONCATENATE(VLOOKUP([.G19]; [Extra.$W$2:.$AG$9]; 8; 0); ROWOFFSETED(MATCH([.B19]; INDIRECT(VLOOKUP([.G19]; [Extra.$W$2:.$AI$9]; 12; 0)); 0)+2; WHICHROUNDN([.G19])))))">
            <text:p/>
          </table:table-cell>
          <table:table-cell table:style-name="ce204" table:formula="of:=IF(AND(NOT([.F19]=&quot;D&quot;); NOT([.F19]=&quot;?&quot;); NOT([.G19]=&quot;D&quot;); NOT(ISBLANK([.F19])); NOT(ISBLANK([.G19]))); DIFFROUND([.F19]; [.G19]); &quot;&quot;)">
            <text:p/>
          </table:table-cell>
          <table:table-cell table:style-name="ce209" table:formula="of:=[.A19]" office:value-type="float" office:value="17" calcext:value-type="float">
            <text:p>17</text:p>
          </table:table-cell>
          <table:table-cell table:style-name="ce437" table:formula="of:=IF(COUNTIF([$FL.$A$3:.$A$130]; FIXED([.A19]; 0; 0))&gt;0; INDEX([$FL.$A$3:.$B$130]; MATCH(FIXED([.A19]; 0; 0); [$FL.$A$3:.$A$130]; 0); 2); &quot;&quot;)">
            <text:p/>
          </table:table-cell>
          <table:table-cell table:style-name="ce177" table:formula="of:=IF(COUNTIF([$FL.$A$3:.$A$130]; FIXED([.A19]; 0; 0)); INDEX([$FL.$B$3:.$C$130]; MATCH(FIXED([.A19]; 0; 0); [$FL.$A$3:.$A$130]; 0); 2); &quot;&quot;)">
            <text:p/>
          </table:table-cell>
          <table:table-cell table:style-name="ce177" office:value-type="string" calcext:value-type="string">
            <text:p>?</text:p>
          </table:table-cell>
          <table:table-cell table:style-name="ce183" table:formula="of:=IF(OR(ISBLANK([.$O19]); [.$O19]=&quot;Q&quot;; [.$O19]=&quot;W&quot;; [.$O19]=&quot;L&quot;; [.$O19]=&quot;U&quot;; [.$O19]=&quot;D&quot;; [.$O19]=&quot;?&quot;); &quot;&quot;; [.$O19]-[.$A19])">
            <text:p/>
          </table:table-cell>
          <table:table-cell table:style-name="ce177" office:value-type="string" calcext:value-type="string">
            <text:p>?</text:p>
          </table:table-cell>
          <table:table-cell table:style-name="ce177" table:formula="of:=IF([.M19]=&quot;&quot;; &quot;&quot;; WHICHROUND(COUNTIF([$FL.$A$3:.$R$130]; [.M19]) + COUNTIF([$Finals.$A$20:.$AF$36]; [.M19])))">
            <text:p/>
          </table:table-cell>
          <table:table-cell table:style-name="ce190" table:formula="of:=IF([.R19]=&quot;&quot;; &quot;&quot;; IF([.R19]=&quot;W&quot;; 8; IF(HASLOST(VLOOKUP(FIXED([.$A19]; 0; 0);  INDIRECT(VLOOKUP([.$R19]; [Extra.$W$2:.$Z$9]; 4; 0)); VLOOKUP([.R19]; [Extra.$W$2:.$AA$9]; 5; 0); 0)); 0; 1)))">
            <text:p/>
          </table:table-cell>
          <table:table-cell table:style-name="ce446" table:formula="of:=IF([.R19]=&quot;&quot;; &quot;&quot;; INDIRECT(CONCATENATE(VLOOKUP([.R19]; [Extra.$W$2:.$AG$9]; 10; 0); ROWOFFSETED(MATCH([.M19]; INDIRECT(VLOOKUP([.R19]; [Extra.$W$2:.$AI$9]; 13; 0)); 0)+2+VLOOKUP([.R19]; [Extra.$W$2:.$AJ$9]; 14; 0); WHICHROUNDN([.R19])))))">
            <text:p/>
          </table:table-cell>
          <table:table-cell table:style-name="ce227" table:formula="of:=IF([.R19]=&quot;&quot;; &quot;&quot;; INDIRECT(CONCATENATE(VLOOKUP([.R19]; [Extra.$W$2:.$AG$9]; 11; 0); ROWOFFSETED(MATCH([.M19]; INDIRECT(VLOOKUP([.R19]; [Extra.$W$2:.$AI$9]; 13; 0)); 0)+2+VLOOKUP([.R19]; [Extra.$W$2:.$AJ$9]; 14; 0); WHICHROUNDN([.R19])))))">
            <text:p/>
          </table:table-cell>
          <table:table-cell table:style-name="ce204" table:formula="of:=IF(AND(NOT([.Q19]=&quot;D&quot;); NOT([.Q19]=&quot;?&quot;); NOT([.R19]=&quot;D&quot;); NOT(ISBLANK([.Q19])); NOT(ISBLANK([.R19]))); DIFFROUND([.Q19]; [.R19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4" table:formula="of:=[.A19]+1" office:value-type="float" office:value="18" calcext:value-type="float">
            <text:p>18</text:p>
          </table:table-cell>
          <table:table-cell table:style-name="ce390" table:formula="of:=IF(COUNTIF([$ML.$A$3:.$A$130]; FIXED([.A20]; 0; 0))&gt;0; INDEX([$ML.$A$3:.$B$130]; MATCH(FIXED([.A20]; 0; 0); [$ML.$A$3:.$A$130]; 0); 2); &quot;&quot;)">
            <text:p/>
          </table:table-cell>
          <table:table-cell table:style-name="ce175" table:formula="of:=IF(COUNTIF([$ML.$A$3:.$A$130]; FIXED([.A20]; 0; 0)); INDEX([$ML.$B$3:.$C$130]; MATCH(FIXED([.A20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20]); [.$D20]=&quot;Q&quot;; [.$D20]=&quot;W&quot;; [.$D20]=&quot;L&quot;; [.$D20]=&quot;U&quot;; [.$D20]=&quot;D&quot;; [.$D20]=&quot;?&quot;); &quot;&quot;; [.$D20]-[.$A20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20]=&quot;&quot;; &quot;&quot;; WHICHROUND(COUNTIF([$ML.$A$3:.$V$130]; [.B20]) + COUNTIF([$Finals.$A$3:.$AF$19]; [.B20])))">
            <text:p/>
          </table:table-cell>
          <table:table-cell table:style-name="ce189" table:formula="of:=IF([.G20]=&quot;&quot;; &quot;&quot;; IF([.G20]=&quot;W&quot;; 8; IF(HASLOST(VLOOKUP(FIXED([.$A20]; 0; 0);  INDIRECT(VLOOKUP([.$G20]; [Extra.$W$2:.$Z$9]; 3; 0)); 9; 0)); 0; 1)))">
            <text:p/>
          </table:table-cell>
          <table:table-cell table:style-name="ce416" table:formula="of:=IF([.G20]=&quot;&quot;; &quot;&quot;; INDIRECT(CONCATENATE(VLOOKUP([.G20]; [Extra.$W$2:.$AG$9]; 7; 0); ROWOFFSETED(MATCH([.B20]; INDIRECT(VLOOKUP([.G20]; [Extra.$W$2:.$AI$9]; 12; 0)); 0)+2; WHICHROUNDN([.G20])))))">
            <text:p/>
          </table:table-cell>
          <table:table-cell table:style-name="ce175" table:formula="of:=IF([.G20]=&quot;&quot;; &quot;&quot;; INDIRECT(CONCATENATE(VLOOKUP([.G20]; [Extra.$W$2:.$AG$9]; 8; 0); ROWOFFSETED(MATCH([.B20]; INDIRECT(VLOOKUP([.G20]; [Extra.$W$2:.$AI$9]; 12; 0)); 0)+2; WHICHROUNDN([.G20])))))">
            <text:p/>
          </table:table-cell>
          <table:table-cell table:style-name="ce203" table:formula="of:=IF(AND(NOT([.F20]=&quot;D&quot;); NOT([.F20]=&quot;?&quot;); NOT([.G20]=&quot;D&quot;); NOT(ISBLANK([.F20])); NOT(ISBLANK([.G20]))); DIFFROUND([.F20]; [.G20]); &quot;&quot;)">
            <text:p/>
          </table:table-cell>
          <table:table-cell table:style-name="ce208" table:formula="of:=[.A20]" office:value-type="float" office:value="18" calcext:value-type="float">
            <text:p>18</text:p>
          </table:table-cell>
          <table:table-cell table:style-name="ce435" table:formula="of:=IF(COUNTIF([$FL.$A$3:.$A$130]; FIXED([.A20]; 0; 0))&gt;0; INDEX([$FL.$A$3:.$B$130]; MATCH(FIXED([.A20]; 0; 0); [$FL.$A$3:.$A$130]; 0); 2); &quot;&quot;)">
            <text:p/>
          </table:table-cell>
          <table:table-cell table:style-name="ce175" table:formula="of:=IF(COUNTIF([$FL.$A$3:.$A$130]; FIXED([.A20]; 0; 0)); INDEX([$FL.$B$3:.$C$130]; MATCH(FIXED([.A20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20]); [.$O20]=&quot;Q&quot;; [.$O20]=&quot;W&quot;; [.$O20]=&quot;L&quot;; [.$O20]=&quot;U&quot;; [.$O20]=&quot;D&quot;; [.$O20]=&quot;?&quot;); &quot;&quot;; [.$O20]-[.$A20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20]=&quot;&quot;; &quot;&quot;; WHICHROUND(COUNTIF([$FL.$A$3:.$R$130]; [.M20]) + COUNTIF([$Finals.$A$20:.$AF$36]; [.M20])))">
            <text:p/>
          </table:table-cell>
          <table:table-cell table:style-name="ce189" table:formula="of:=IF([.R20]=&quot;&quot;; &quot;&quot;; IF([.R20]=&quot;W&quot;; 8; IF(HASLOST(VLOOKUP(FIXED([.$A20]; 0; 0);  INDIRECT(VLOOKUP([.$R20]; [Extra.$W$2:.$Z$9]; 4; 0)); VLOOKUP([.R20]; [Extra.$W$2:.$AA$9]; 5; 0); 0)); 0; 1)))">
            <text:p/>
          </table:table-cell>
          <table:table-cell table:style-name="ce445" table:formula="of:=IF([.R20]=&quot;&quot;; &quot;&quot;; INDIRECT(CONCATENATE(VLOOKUP([.R20]; [Extra.$W$2:.$AG$9]; 10; 0); ROWOFFSETED(MATCH([.M20]; INDIRECT(VLOOKUP([.R20]; [Extra.$W$2:.$AI$9]; 13; 0)); 0)+2+VLOOKUP([.R20]; [Extra.$W$2:.$AJ$9]; 14; 0); WHICHROUNDN([.R20])))))">
            <text:p/>
          </table:table-cell>
          <table:table-cell table:style-name="ce226" table:formula="of:=IF([.R20]=&quot;&quot;; &quot;&quot;; INDIRECT(CONCATENATE(VLOOKUP([.R20]; [Extra.$W$2:.$AG$9]; 11; 0); ROWOFFSETED(MATCH([.M20]; INDIRECT(VLOOKUP([.R20]; [Extra.$W$2:.$AI$9]; 13; 0)); 0)+2+VLOOKUP([.R20]; [Extra.$W$2:.$AJ$9]; 14; 0); WHICHROUNDN([.R20])))))">
            <text:p/>
          </table:table-cell>
          <table:table-cell table:style-name="ce203" table:formula="of:=IF(AND(NOT([.Q20]=&quot;D&quot;); NOT([.Q20]=&quot;?&quot;); NOT([.R20]=&quot;D&quot;); NOT(ISBLANK([.Q20])); NOT(ISBLANK([.R20]))); DIFFROUND([.Q20]; [.R20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3" table:formula="of:=[.A20]+1" office:value-type="float" office:value="19" calcext:value-type="float">
            <text:p>19</text:p>
          </table:table-cell>
          <table:table-cell table:style-name="ce391" table:formula="of:=IF(COUNTIF([$ML.$A$3:.$A$130]; FIXED([.A21]; 0; 0))&gt;0; INDEX([$ML.$A$3:.$B$130]; MATCH(FIXED([.A21]; 0; 0); [$ML.$A$3:.$A$130]; 0); 2); &quot;&quot;)">
            <text:p/>
          </table:table-cell>
          <table:table-cell table:style-name="ce176" table:formula="of:=IF(COUNTIF([$ML.$A$3:.$A$130]; FIXED([.A21]; 0; 0)); INDEX([$ML.$B$3:.$C$130]; MATCH(FIXED([.A21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21]); [.$D21]=&quot;Q&quot;; [.$D21]=&quot;W&quot;; [.$D21]=&quot;L&quot;; [.$D21]=&quot;U&quot;; [.$D21]=&quot;D&quot;; [.$D21]=&quot;?&quot;); &quot;&quot;; [.$D21]-[.$A21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21]=&quot;&quot;; &quot;&quot;; WHICHROUND(COUNTIF([$ML.$A$3:.$V$130]; [.B21]) + COUNTIF([$Finals.$A$3:.$AF$19]; [.B21])))">
            <text:p/>
          </table:table-cell>
          <table:table-cell table:style-name="ce188" table:formula="of:=IF([.G21]=&quot;&quot;; &quot;&quot;; IF([.G21]=&quot;W&quot;; 8; IF(HASLOST(VLOOKUP(FIXED([.$A21]; 0; 0);  INDIRECT(VLOOKUP([.$G21]; [Extra.$W$2:.$Z$9]; 3; 0)); 9; 0)); 0; 1)))">
            <text:p/>
          </table:table-cell>
          <table:table-cell table:style-name="ce415" table:formula="of:=IF([.G21]=&quot;&quot;; &quot;&quot;; INDIRECT(CONCATENATE(VLOOKUP([.G21]; [Extra.$W$2:.$AG$9]; 7; 0); ROWOFFSETED(MATCH([.B21]; INDIRECT(VLOOKUP([.G21]; [Extra.$W$2:.$AI$9]; 12; 0)); 0)+2; WHICHROUNDN([.G21])))))">
            <text:p/>
          </table:table-cell>
          <table:table-cell table:style-name="ce176" table:formula="of:=IF([.G21]=&quot;&quot;; &quot;&quot;; INDIRECT(CONCATENATE(VLOOKUP([.G21]; [Extra.$W$2:.$AG$9]; 8; 0); ROWOFFSETED(MATCH([.B21]; INDIRECT(VLOOKUP([.G21]; [Extra.$W$2:.$AI$9]; 12; 0)); 0)+2; WHICHROUNDN([.G21])))))">
            <text:p/>
          </table:table-cell>
          <table:table-cell table:style-name="ce202" table:formula="of:=IF(AND(NOT([.F21]=&quot;D&quot;); NOT([.F21]=&quot;?&quot;); NOT([.G21]=&quot;D&quot;); NOT(ISBLANK([.F21])); NOT(ISBLANK([.G21]))); DIFFROUND([.F21]; [.G21]); &quot;&quot;)">
            <text:p/>
          </table:table-cell>
          <table:table-cell table:style-name="ce207" table:formula="of:=[.A21]" office:value-type="float" office:value="19" calcext:value-type="float">
            <text:p>19</text:p>
          </table:table-cell>
          <table:table-cell table:style-name="ce436" table:formula="of:=IF(COUNTIF([$FL.$A$3:.$A$130]; FIXED([.A21]; 0; 0))&gt;0; INDEX([$FL.$A$3:.$B$130]; MATCH(FIXED([.A21]; 0; 0); [$FL.$A$3:.$A$130]; 0); 2); &quot;&quot;)">
            <text:p/>
          </table:table-cell>
          <table:table-cell table:style-name="ce176" table:formula="of:=IF(COUNTIF([$FL.$A$3:.$A$130]; FIXED([.A21]; 0; 0)); INDEX([$FL.$B$3:.$C$130]; MATCH(FIXED([.A21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21]); [.$O21]=&quot;Q&quot;; [.$O21]=&quot;W&quot;; [.$O21]=&quot;L&quot;; [.$O21]=&quot;U&quot;; [.$O21]=&quot;D&quot;; [.$O21]=&quot;?&quot;); &quot;&quot;; [.$O21]-[.$A21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21]=&quot;&quot;; &quot;&quot;; WHICHROUND(COUNTIF([$FL.$A$3:.$R$130]; [.M21]) + COUNTIF([$Finals.$A$20:.$AF$36]; [.M21])))">
            <text:p/>
          </table:table-cell>
          <table:table-cell table:style-name="ce188" table:formula="of:=IF([.R21]=&quot;&quot;; &quot;&quot;; IF([.R21]=&quot;W&quot;; 8; IF(HASLOST(VLOOKUP(FIXED([.$A21]; 0; 0);  INDIRECT(VLOOKUP([.$R21]; [Extra.$W$2:.$Z$9]; 4; 0)); VLOOKUP([.R21]; [Extra.$W$2:.$AA$9]; 5; 0); 0)); 0; 1)))">
            <text:p/>
          </table:table-cell>
          <table:table-cell table:style-name="ce444" table:formula="of:=IF([.R21]=&quot;&quot;; &quot;&quot;; INDIRECT(CONCATENATE(VLOOKUP([.R21]; [Extra.$W$2:.$AG$9]; 10; 0); ROWOFFSETED(MATCH([.M21]; INDIRECT(VLOOKUP([.R21]; [Extra.$W$2:.$AI$9]; 13; 0)); 0)+2+VLOOKUP([.R21]; [Extra.$W$2:.$AJ$9]; 14; 0); WHICHROUNDN([.R21])))))">
            <text:p/>
          </table:table-cell>
          <table:table-cell table:style-name="ce220" table:formula="of:=IF([.R21]=&quot;&quot;; &quot;&quot;; INDIRECT(CONCATENATE(VLOOKUP([.R21]; [Extra.$W$2:.$AG$9]; 11; 0); ROWOFFSETED(MATCH([.M21]; INDIRECT(VLOOKUP([.R21]; [Extra.$W$2:.$AI$9]; 13; 0)); 0)+2+VLOOKUP([.R21]; [Extra.$W$2:.$AJ$9]; 14; 0); WHICHROUNDN([.R21])))))">
            <text:p/>
          </table:table-cell>
          <table:table-cell table:style-name="ce202" table:formula="of:=IF(AND(NOT([.Q21]=&quot;D&quot;); NOT([.Q21]=&quot;?&quot;); NOT([.R21]=&quot;D&quot;); NOT(ISBLANK([.Q21])); NOT(ISBLANK([.R21]))); DIFFROUND([.Q21]; [.R21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4" table:formula="of:=[.A21]+1" office:value-type="float" office:value="20" calcext:value-type="float">
            <text:p>20</text:p>
          </table:table-cell>
          <table:table-cell table:style-name="ce390" table:formula="of:=IF(COUNTIF([$ML.$A$3:.$A$130]; FIXED([.A22]; 0; 0))&gt;0; INDEX([$ML.$A$3:.$B$130]; MATCH(FIXED([.A22]; 0; 0); [$ML.$A$3:.$A$130]; 0); 2); &quot;&quot;)">
            <text:p/>
          </table:table-cell>
          <table:table-cell table:style-name="ce175" table:formula="of:=IF(COUNTIF([$ML.$A$3:.$A$130]; FIXED([.A22]; 0; 0)); INDEX([$ML.$B$3:.$C$130]; MATCH(FIXED([.A22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22]); [.$D22]=&quot;Q&quot;; [.$D22]=&quot;W&quot;; [.$D22]=&quot;L&quot;; [.$D22]=&quot;U&quot;; [.$D22]=&quot;D&quot;; [.$D22]=&quot;?&quot;); &quot;&quot;; [.$D22]-[.$A22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22]=&quot;&quot;; &quot;&quot;; WHICHROUND(COUNTIF([$ML.$A$3:.$V$130]; [.B22]) + COUNTIF([$Finals.$A$3:.$AF$19]; [.B22])))">
            <text:p/>
          </table:table-cell>
          <table:table-cell table:style-name="ce189" table:formula="of:=IF([.G22]=&quot;&quot;; &quot;&quot;; IF([.G22]=&quot;W&quot;; 8; IF(HASLOST(VLOOKUP(FIXED([.$A22]; 0; 0);  INDIRECT(VLOOKUP([.$G22]; [Extra.$W$2:.$Z$9]; 3; 0)); 9; 0)); 0; 1)))">
            <text:p/>
          </table:table-cell>
          <table:table-cell table:style-name="ce416" table:formula="of:=IF([.G22]=&quot;&quot;; &quot;&quot;; INDIRECT(CONCATENATE(VLOOKUP([.G22]; [Extra.$W$2:.$AG$9]; 7; 0); ROWOFFSETED(MATCH([.B22]; INDIRECT(VLOOKUP([.G22]; [Extra.$W$2:.$AI$9]; 12; 0)); 0)+2; WHICHROUNDN([.G22])))))">
            <text:p/>
          </table:table-cell>
          <table:table-cell table:style-name="ce175" table:formula="of:=IF([.G22]=&quot;&quot;; &quot;&quot;; INDIRECT(CONCATENATE(VLOOKUP([.G22]; [Extra.$W$2:.$AG$9]; 8; 0); ROWOFFSETED(MATCH([.B22]; INDIRECT(VLOOKUP([.G22]; [Extra.$W$2:.$AI$9]; 12; 0)); 0)+2; WHICHROUNDN([.G22])))))">
            <text:p/>
          </table:table-cell>
          <table:table-cell table:style-name="ce203" table:formula="of:=IF(AND(NOT([.F22]=&quot;D&quot;); NOT([.F22]=&quot;?&quot;); NOT([.G22]=&quot;D&quot;); NOT(ISBLANK([.F22])); NOT(ISBLANK([.G22]))); DIFFROUND([.F22]; [.G22]); &quot;&quot;)">
            <text:p/>
          </table:table-cell>
          <table:table-cell table:style-name="ce208" table:formula="of:=[.A22]" office:value-type="float" office:value="20" calcext:value-type="float">
            <text:p>20</text:p>
          </table:table-cell>
          <table:table-cell table:style-name="ce435" table:formula="of:=IF(COUNTIF([$FL.$A$3:.$A$130]; FIXED([.A22]; 0; 0))&gt;0; INDEX([$FL.$A$3:.$B$130]; MATCH(FIXED([.A22]; 0; 0); [$FL.$A$3:.$A$130]; 0); 2); &quot;&quot;)">
            <text:p/>
          </table:table-cell>
          <table:table-cell table:style-name="ce175" table:formula="of:=IF(COUNTIF([$FL.$A$3:.$A$130]; FIXED([.A22]; 0; 0)); INDEX([$FL.$B$3:.$C$130]; MATCH(FIXED([.A22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22]); [.$O22]=&quot;Q&quot;; [.$O22]=&quot;W&quot;; [.$O22]=&quot;L&quot;; [.$O22]=&quot;U&quot;; [.$O22]=&quot;D&quot;; [.$O22]=&quot;?&quot;); &quot;&quot;; [.$O22]-[.$A22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22]=&quot;&quot;; &quot;&quot;; WHICHROUND(COUNTIF([$FL.$A$3:.$R$130]; [.M22]) + COUNTIF([$Finals.$A$20:.$AF$36]; [.M22])))">
            <text:p/>
          </table:table-cell>
          <table:table-cell table:style-name="ce189" table:formula="of:=IF([.R22]=&quot;&quot;; &quot;&quot;; IF([.R22]=&quot;W&quot;; 8; IF(HASLOST(VLOOKUP(FIXED([.$A22]; 0; 0);  INDIRECT(VLOOKUP([.$R22]; [Extra.$W$2:.$Z$9]; 4; 0)); VLOOKUP([.R22]; [Extra.$W$2:.$AA$9]; 5; 0); 0)); 0; 1)))">
            <text:p/>
          </table:table-cell>
          <table:table-cell table:style-name="ce445" table:formula="of:=IF([.R22]=&quot;&quot;; &quot;&quot;; INDIRECT(CONCATENATE(VLOOKUP([.R22]; [Extra.$W$2:.$AG$9]; 10; 0); ROWOFFSETED(MATCH([.M22]; INDIRECT(VLOOKUP([.R22]; [Extra.$W$2:.$AI$9]; 13; 0)); 0)+2+VLOOKUP([.R22]; [Extra.$W$2:.$AJ$9]; 14; 0); WHICHROUNDN([.R22])))))">
            <text:p/>
          </table:table-cell>
          <table:table-cell table:style-name="ce226" table:formula="of:=IF([.R22]=&quot;&quot;; &quot;&quot;; INDIRECT(CONCATENATE(VLOOKUP([.R22]; [Extra.$W$2:.$AG$9]; 11; 0); ROWOFFSETED(MATCH([.M22]; INDIRECT(VLOOKUP([.R22]; [Extra.$W$2:.$AI$9]; 13; 0)); 0)+2+VLOOKUP([.R22]; [Extra.$W$2:.$AJ$9]; 14; 0); WHICHROUNDN([.R22])))))">
            <text:p/>
          </table:table-cell>
          <table:table-cell table:style-name="ce203" table:formula="of:=IF(AND(NOT([.Q22]=&quot;D&quot;); NOT([.Q22]=&quot;?&quot;); NOT([.R22]=&quot;D&quot;); NOT(ISBLANK([.Q22])); NOT(ISBLANK([.R22]))); DIFFROUND([.Q22]; [.R22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3" table:formula="of:=[.A22]+1" office:value-type="float" office:value="21" calcext:value-type="float">
            <text:p>21</text:p>
          </table:table-cell>
          <table:table-cell table:style-name="ce391" table:formula="of:=IF(COUNTIF([$ML.$A$3:.$A$130]; FIXED([.A23]; 0; 0))&gt;0; INDEX([$ML.$A$3:.$B$130]; MATCH(FIXED([.A23]; 0; 0); [$ML.$A$3:.$A$130]; 0); 2); &quot;&quot;)">
            <text:p/>
          </table:table-cell>
          <table:table-cell table:style-name="ce176" table:formula="of:=IF(COUNTIF([$ML.$A$3:.$A$130]; FIXED([.A23]; 0; 0)); INDEX([$ML.$B$3:.$C$130]; MATCH(FIXED([.A23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23]); [.$D23]=&quot;Q&quot;; [.$D23]=&quot;W&quot;; [.$D23]=&quot;L&quot;; [.$D23]=&quot;U&quot;; [.$D23]=&quot;D&quot;; [.$D23]=&quot;?&quot;); &quot;&quot;; [.$D23]-[.$A23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23]=&quot;&quot;; &quot;&quot;; WHICHROUND(COUNTIF([$ML.$A$3:.$V$130]; [.B23]) + COUNTIF([$Finals.$A$3:.$AF$19]; [.B23])))">
            <text:p/>
          </table:table-cell>
          <table:table-cell table:style-name="ce188" table:formula="of:=IF([.G23]=&quot;&quot;; &quot;&quot;; IF([.G23]=&quot;W&quot;; 8; IF(HASLOST(VLOOKUP(FIXED([.$A23]; 0; 0);  INDIRECT(VLOOKUP([.$G23]; [Extra.$W$2:.$Z$9]; 3; 0)); 9; 0)); 0; 1)))">
            <text:p/>
          </table:table-cell>
          <table:table-cell table:style-name="ce415" table:formula="of:=IF([.G23]=&quot;&quot;; &quot;&quot;; INDIRECT(CONCATENATE(VLOOKUP([.G23]; [Extra.$W$2:.$AG$9]; 7; 0); ROWOFFSETED(MATCH([.B23]; INDIRECT(VLOOKUP([.G23]; [Extra.$W$2:.$AI$9]; 12; 0)); 0)+2; WHICHROUNDN([.G23])))))">
            <text:p/>
          </table:table-cell>
          <table:table-cell table:style-name="ce176" table:formula="of:=IF([.G23]=&quot;&quot;; &quot;&quot;; INDIRECT(CONCATENATE(VLOOKUP([.G23]; [Extra.$W$2:.$AG$9]; 8; 0); ROWOFFSETED(MATCH([.B23]; INDIRECT(VLOOKUP([.G23]; [Extra.$W$2:.$AI$9]; 12; 0)); 0)+2; WHICHROUNDN([.G23])))))">
            <text:p/>
          </table:table-cell>
          <table:table-cell table:style-name="ce202" table:formula="of:=IF(AND(NOT([.F23]=&quot;D&quot;); NOT([.F23]=&quot;?&quot;); NOT([.G23]=&quot;D&quot;); NOT(ISBLANK([.F23])); NOT(ISBLANK([.G23]))); DIFFROUND([.F23]; [.G23]); &quot;&quot;)">
            <text:p/>
          </table:table-cell>
          <table:table-cell table:style-name="ce207" table:formula="of:=[.A23]" office:value-type="float" office:value="21" calcext:value-type="float">
            <text:p>21</text:p>
          </table:table-cell>
          <table:table-cell table:style-name="ce436" table:formula="of:=IF(COUNTIF([$FL.$A$3:.$A$130]; FIXED([.A23]; 0; 0))&gt;0; INDEX([$FL.$A$3:.$B$130]; MATCH(FIXED([.A23]; 0; 0); [$FL.$A$3:.$A$130]; 0); 2); &quot;&quot;)">
            <text:p/>
          </table:table-cell>
          <table:table-cell table:style-name="ce176" table:formula="of:=IF(COUNTIF([$FL.$A$3:.$A$130]; FIXED([.A23]; 0; 0)); INDEX([$FL.$B$3:.$C$130]; MATCH(FIXED([.A23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23]); [.$O23]=&quot;Q&quot;; [.$O23]=&quot;W&quot;; [.$O23]=&quot;L&quot;; [.$O23]=&quot;U&quot;; [.$O23]=&quot;D&quot;; [.$O23]=&quot;?&quot;); &quot;&quot;; [.$O23]-[.$A23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23]=&quot;&quot;; &quot;&quot;; WHICHROUND(COUNTIF([$FL.$A$3:.$R$130]; [.M23]) + COUNTIF([$Finals.$A$20:.$AF$36]; [.M23])))">
            <text:p/>
          </table:table-cell>
          <table:table-cell table:style-name="ce188" table:formula="of:=IF([.R23]=&quot;&quot;; &quot;&quot;; IF([.R23]=&quot;W&quot;; 8; IF(HASLOST(VLOOKUP(FIXED([.$A23]; 0; 0);  INDIRECT(VLOOKUP([.$R23]; [Extra.$W$2:.$Z$9]; 4; 0)); VLOOKUP([.R23]; [Extra.$W$2:.$AA$9]; 5; 0); 0)); 0; 1)))">
            <text:p/>
          </table:table-cell>
          <table:table-cell table:style-name="ce444" table:formula="of:=IF([.R23]=&quot;&quot;; &quot;&quot;; INDIRECT(CONCATENATE(VLOOKUP([.R23]; [Extra.$W$2:.$AG$9]; 10; 0); ROWOFFSETED(MATCH([.M23]; INDIRECT(VLOOKUP([.R23]; [Extra.$W$2:.$AI$9]; 13; 0)); 0)+2+VLOOKUP([.R23]; [Extra.$W$2:.$AJ$9]; 14; 0); WHICHROUNDN([.R23])))))">
            <text:p/>
          </table:table-cell>
          <table:table-cell table:style-name="ce220" table:formula="of:=IF([.R23]=&quot;&quot;; &quot;&quot;; INDIRECT(CONCATENATE(VLOOKUP([.R23]; [Extra.$W$2:.$AG$9]; 11; 0); ROWOFFSETED(MATCH([.M23]; INDIRECT(VLOOKUP([.R23]; [Extra.$W$2:.$AI$9]; 13; 0)); 0)+2+VLOOKUP([.R23]; [Extra.$W$2:.$AJ$9]; 14; 0); WHICHROUNDN([.R23])))))">
            <text:p/>
          </table:table-cell>
          <table:table-cell table:style-name="ce202" table:formula="of:=IF(AND(NOT([.Q23]=&quot;D&quot;); NOT([.Q23]=&quot;?&quot;); NOT([.R23]=&quot;D&quot;); NOT(ISBLANK([.Q23])); NOT(ISBLANK([.R23]))); DIFFROUND([.Q23]; [.R23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4" table:formula="of:=[.A23]+1" office:value-type="float" office:value="22" calcext:value-type="float">
            <text:p>22</text:p>
          </table:table-cell>
          <table:table-cell table:style-name="ce390" table:formula="of:=IF(COUNTIF([$ML.$A$3:.$A$130]; FIXED([.A24]; 0; 0))&gt;0; INDEX([$ML.$A$3:.$B$130]; MATCH(FIXED([.A24]; 0; 0); [$ML.$A$3:.$A$130]; 0); 2); &quot;&quot;)">
            <text:p/>
          </table:table-cell>
          <table:table-cell table:style-name="ce175" table:formula="of:=IF(COUNTIF([$ML.$A$3:.$A$130]; FIXED([.A24]; 0; 0)); INDEX([$ML.$B$3:.$C$130]; MATCH(FIXED([.A24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24]); [.$D24]=&quot;Q&quot;; [.$D24]=&quot;W&quot;; [.$D24]=&quot;L&quot;; [.$D24]=&quot;U&quot;; [.$D24]=&quot;D&quot;; [.$D24]=&quot;?&quot;); &quot;&quot;; [.$D24]-[.$A24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24]=&quot;&quot;; &quot;&quot;; WHICHROUND(COUNTIF([$ML.$A$3:.$V$130]; [.B24]) + COUNTIF([$Finals.$A$3:.$AF$19]; [.B24])))">
            <text:p/>
          </table:table-cell>
          <table:table-cell table:style-name="ce189" table:formula="of:=IF([.G24]=&quot;&quot;; &quot;&quot;; IF([.G24]=&quot;W&quot;; 8; IF(HASLOST(VLOOKUP(FIXED([.$A24]; 0; 0);  INDIRECT(VLOOKUP([.$G24]; [Extra.$W$2:.$Z$9]; 3; 0)); 9; 0)); 0; 1)))">
            <text:p/>
          </table:table-cell>
          <table:table-cell table:style-name="ce416" table:formula="of:=IF([.G24]=&quot;&quot;; &quot;&quot;; INDIRECT(CONCATENATE(VLOOKUP([.G24]; [Extra.$W$2:.$AG$9]; 7; 0); ROWOFFSETED(MATCH([.B24]; INDIRECT(VLOOKUP([.G24]; [Extra.$W$2:.$AI$9]; 12; 0)); 0)+2; WHICHROUNDN([.G24])))))">
            <text:p/>
          </table:table-cell>
          <table:table-cell table:style-name="ce175" table:formula="of:=IF([.G24]=&quot;&quot;; &quot;&quot;; INDIRECT(CONCATENATE(VLOOKUP([.G24]; [Extra.$W$2:.$AG$9]; 8; 0); ROWOFFSETED(MATCH([.B24]; INDIRECT(VLOOKUP([.G24]; [Extra.$W$2:.$AI$9]; 12; 0)); 0)+2; WHICHROUNDN([.G24])))))">
            <text:p/>
          </table:table-cell>
          <table:table-cell table:style-name="ce203" table:formula="of:=IF(AND(NOT([.F24]=&quot;D&quot;); NOT([.F24]=&quot;?&quot;); NOT([.G24]=&quot;D&quot;); NOT(ISBLANK([.F24])); NOT(ISBLANK([.G24]))); DIFFROUND([.F24]; [.G24]); &quot;&quot;)">
            <text:p/>
          </table:table-cell>
          <table:table-cell table:style-name="ce208" table:formula="of:=[.A24]" office:value-type="float" office:value="22" calcext:value-type="float">
            <text:p>22</text:p>
          </table:table-cell>
          <table:table-cell table:style-name="ce435" table:formula="of:=IF(COUNTIF([$FL.$A$3:.$A$130]; FIXED([.A24]; 0; 0))&gt;0; INDEX([$FL.$A$3:.$B$130]; MATCH(FIXED([.A24]; 0; 0); [$FL.$A$3:.$A$130]; 0); 2); &quot;&quot;)">
            <text:p/>
          </table:table-cell>
          <table:table-cell table:style-name="ce175" table:formula="of:=IF(COUNTIF([$FL.$A$3:.$A$130]; FIXED([.A24]; 0; 0)); INDEX([$FL.$B$3:.$C$130]; MATCH(FIXED([.A24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24]); [.$O24]=&quot;Q&quot;; [.$O24]=&quot;W&quot;; [.$O24]=&quot;L&quot;; [.$O24]=&quot;U&quot;; [.$O24]=&quot;D&quot;; [.$O24]=&quot;?&quot;); &quot;&quot;; [.$O24]-[.$A24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24]=&quot;&quot;; &quot;&quot;; WHICHROUND(COUNTIF([$FL.$A$3:.$R$130]; [.M24]) + COUNTIF([$Finals.$A$20:.$AF$36]; [.M24])))">
            <text:p/>
          </table:table-cell>
          <table:table-cell table:style-name="ce189" table:formula="of:=IF([.R24]=&quot;&quot;; &quot;&quot;; IF([.R24]=&quot;W&quot;; 8; IF(HASLOST(VLOOKUP(FIXED([.$A24]; 0; 0);  INDIRECT(VLOOKUP([.$R24]; [Extra.$W$2:.$Z$9]; 4; 0)); VLOOKUP([.R24]; [Extra.$W$2:.$AA$9]; 5; 0); 0)); 0; 1)))">
            <text:p/>
          </table:table-cell>
          <table:table-cell table:style-name="ce445" table:formula="of:=IF([.R24]=&quot;&quot;; &quot;&quot;; INDIRECT(CONCATENATE(VLOOKUP([.R24]; [Extra.$W$2:.$AG$9]; 10; 0); ROWOFFSETED(MATCH([.M24]; INDIRECT(VLOOKUP([.R24]; [Extra.$W$2:.$AI$9]; 13; 0)); 0)+2+VLOOKUP([.R24]; [Extra.$W$2:.$AJ$9]; 14; 0); WHICHROUNDN([.R24])))))">
            <text:p/>
          </table:table-cell>
          <table:table-cell table:style-name="ce226" table:formula="of:=IF([.R24]=&quot;&quot;; &quot;&quot;; INDIRECT(CONCATENATE(VLOOKUP([.R24]; [Extra.$W$2:.$AG$9]; 11; 0); ROWOFFSETED(MATCH([.M24]; INDIRECT(VLOOKUP([.R24]; [Extra.$W$2:.$AI$9]; 13; 0)); 0)+2+VLOOKUP([.R24]; [Extra.$W$2:.$AJ$9]; 14; 0); WHICHROUNDN([.R24])))))">
            <text:p/>
          </table:table-cell>
          <table:table-cell table:style-name="ce203" table:formula="of:=IF(AND(NOT([.Q24]=&quot;D&quot;); NOT([.Q24]=&quot;?&quot;); NOT([.R24]=&quot;D&quot;); NOT(ISBLANK([.Q24])); NOT(ISBLANK([.R24]))); DIFFROUND([.Q24]; [.R24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3" table:formula="of:=[.A24]+1" office:value-type="float" office:value="23" calcext:value-type="float">
            <text:p>23</text:p>
          </table:table-cell>
          <table:table-cell table:style-name="ce391" table:formula="of:=IF(COUNTIF([$ML.$A$3:.$A$130]; FIXED([.A25]; 0; 0))&gt;0; INDEX([$ML.$A$3:.$B$130]; MATCH(FIXED([.A25]; 0; 0); [$ML.$A$3:.$A$130]; 0); 2); &quot;&quot;)">
            <text:p/>
          </table:table-cell>
          <table:table-cell table:style-name="ce176" table:formula="of:=IF(COUNTIF([$ML.$A$3:.$A$130]; FIXED([.A25]; 0; 0)); INDEX([$ML.$B$3:.$C$130]; MATCH(FIXED([.A25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25]); [.$D25]=&quot;Q&quot;; [.$D25]=&quot;W&quot;; [.$D25]=&quot;L&quot;; [.$D25]=&quot;U&quot;; [.$D25]=&quot;D&quot;; [.$D25]=&quot;?&quot;); &quot;&quot;; [.$D25]-[.$A25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25]=&quot;&quot;; &quot;&quot;; WHICHROUND(COUNTIF([$ML.$A$3:.$V$130]; [.B25]) + COUNTIF([$Finals.$A$3:.$AF$19]; [.B25])))">
            <text:p/>
          </table:table-cell>
          <table:table-cell table:style-name="ce188" table:formula="of:=IF([.G25]=&quot;&quot;; &quot;&quot;; IF([.G25]=&quot;W&quot;; 8; IF(HASLOST(VLOOKUP(FIXED([.$A25]; 0; 0);  INDIRECT(VLOOKUP([.$G25]; [Extra.$W$2:.$Z$9]; 3; 0)); 9; 0)); 0; 1)))">
            <text:p/>
          </table:table-cell>
          <table:table-cell table:style-name="ce415" table:formula="of:=IF([.G25]=&quot;&quot;; &quot;&quot;; INDIRECT(CONCATENATE(VLOOKUP([.G25]; [Extra.$W$2:.$AG$9]; 7; 0); ROWOFFSETED(MATCH([.B25]; INDIRECT(VLOOKUP([.G25]; [Extra.$W$2:.$AI$9]; 12; 0)); 0)+2; WHICHROUNDN([.G25])))))">
            <text:p/>
          </table:table-cell>
          <table:table-cell table:style-name="ce176" table:formula="of:=IF([.G25]=&quot;&quot;; &quot;&quot;; INDIRECT(CONCATENATE(VLOOKUP([.G25]; [Extra.$W$2:.$AG$9]; 8; 0); ROWOFFSETED(MATCH([.B25]; INDIRECT(VLOOKUP([.G25]; [Extra.$W$2:.$AI$9]; 12; 0)); 0)+2; WHICHROUNDN([.G25])))))">
            <text:p/>
          </table:table-cell>
          <table:table-cell table:style-name="ce202" table:formula="of:=IF(AND(NOT([.F25]=&quot;D&quot;); NOT([.F25]=&quot;?&quot;); NOT([.G25]=&quot;D&quot;); NOT(ISBLANK([.F25])); NOT(ISBLANK([.G25]))); DIFFROUND([.F25]; [.G25]); &quot;&quot;)">
            <text:p/>
          </table:table-cell>
          <table:table-cell table:style-name="ce207" table:formula="of:=[.A25]" office:value-type="float" office:value="23" calcext:value-type="float">
            <text:p>23</text:p>
          </table:table-cell>
          <table:table-cell table:style-name="ce436" table:formula="of:=IF(COUNTIF([$FL.$A$3:.$A$130]; FIXED([.A25]; 0; 0))&gt;0; INDEX([$FL.$A$3:.$B$130]; MATCH(FIXED([.A25]; 0; 0); [$FL.$A$3:.$A$130]; 0); 2); &quot;&quot;)">
            <text:p/>
          </table:table-cell>
          <table:table-cell table:style-name="ce176" table:formula="of:=IF(COUNTIF([$FL.$A$3:.$A$130]; FIXED([.A25]; 0; 0)); INDEX([$FL.$B$3:.$C$130]; MATCH(FIXED([.A25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25]); [.$O25]=&quot;Q&quot;; [.$O25]=&quot;W&quot;; [.$O25]=&quot;L&quot;; [.$O25]=&quot;U&quot;; [.$O25]=&quot;D&quot;; [.$O25]=&quot;?&quot;); &quot;&quot;; [.$O25]-[.$A25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25]=&quot;&quot;; &quot;&quot;; WHICHROUND(COUNTIF([$FL.$A$3:.$R$130]; [.M25]) + COUNTIF([$Finals.$A$20:.$AF$36]; [.M25])))">
            <text:p/>
          </table:table-cell>
          <table:table-cell table:style-name="ce188" table:formula="of:=IF([.R25]=&quot;&quot;; &quot;&quot;; IF([.R25]=&quot;W&quot;; 8; IF(HASLOST(VLOOKUP(FIXED([.$A25]; 0; 0);  INDIRECT(VLOOKUP([.$R25]; [Extra.$W$2:.$Z$9]; 4; 0)); VLOOKUP([.R25]; [Extra.$W$2:.$AA$9]; 5; 0); 0)); 0; 1)))">
            <text:p/>
          </table:table-cell>
          <table:table-cell table:style-name="ce444" table:formula="of:=IF([.R25]=&quot;&quot;; &quot;&quot;; INDIRECT(CONCATENATE(VLOOKUP([.R25]; [Extra.$W$2:.$AG$9]; 10; 0); ROWOFFSETED(MATCH([.M25]; INDIRECT(VLOOKUP([.R25]; [Extra.$W$2:.$AI$9]; 13; 0)); 0)+2+VLOOKUP([.R25]; [Extra.$W$2:.$AJ$9]; 14; 0); WHICHROUNDN([.R25])))))">
            <text:p/>
          </table:table-cell>
          <table:table-cell table:style-name="ce220" table:formula="of:=IF([.R25]=&quot;&quot;; &quot;&quot;; INDIRECT(CONCATENATE(VLOOKUP([.R25]; [Extra.$W$2:.$AG$9]; 11; 0); ROWOFFSETED(MATCH([.M25]; INDIRECT(VLOOKUP([.R25]; [Extra.$W$2:.$AI$9]; 13; 0)); 0)+2+VLOOKUP([.R25]; [Extra.$W$2:.$AJ$9]; 14; 0); WHICHROUNDN([.R25])))))">
            <text:p/>
          </table:table-cell>
          <table:table-cell table:style-name="ce202" table:formula="of:=IF(AND(NOT([.Q25]=&quot;D&quot;); NOT([.Q25]=&quot;?&quot;); NOT([.R25]=&quot;D&quot;); NOT(ISBLANK([.Q25])); NOT(ISBLANK([.R25]))); DIFFROUND([.Q25]; [.R25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4" table:formula="of:=[.A25]+1" office:value-type="float" office:value="24" calcext:value-type="float">
            <text:p>24</text:p>
          </table:table-cell>
          <table:table-cell table:style-name="ce390" table:formula="of:=IF(COUNTIF([$ML.$A$3:.$A$130]; FIXED([.A26]; 0; 0))&gt;0; INDEX([$ML.$A$3:.$B$130]; MATCH(FIXED([.A26]; 0; 0); [$ML.$A$3:.$A$130]; 0); 2); &quot;&quot;)">
            <text:p/>
          </table:table-cell>
          <table:table-cell table:style-name="ce175" table:formula="of:=IF(COUNTIF([$ML.$A$3:.$A$130]; FIXED([.A26]; 0; 0)); INDEX([$ML.$B$3:.$C$130]; MATCH(FIXED([.A26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26]); [.$D26]=&quot;Q&quot;; [.$D26]=&quot;W&quot;; [.$D26]=&quot;L&quot;; [.$D26]=&quot;U&quot;; [.$D26]=&quot;D&quot;; [.$D26]=&quot;?&quot;); &quot;&quot;; [.$D26]-[.$A26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26]=&quot;&quot;; &quot;&quot;; WHICHROUND(COUNTIF([$ML.$A$3:.$V$130]; [.B26]) + COUNTIF([$Finals.$A$3:.$AF$19]; [.B26])))">
            <text:p/>
          </table:table-cell>
          <table:table-cell table:style-name="ce189" table:formula="of:=IF([.G26]=&quot;&quot;; &quot;&quot;; IF([.G26]=&quot;W&quot;; 8; IF(HASLOST(VLOOKUP(FIXED([.$A26]; 0; 0);  INDIRECT(VLOOKUP([.$G26]; [Extra.$W$2:.$Z$9]; 3; 0)); 9; 0)); 0; 1)))">
            <text:p/>
          </table:table-cell>
          <table:table-cell table:style-name="ce416" table:formula="of:=IF([.G26]=&quot;&quot;; &quot;&quot;; INDIRECT(CONCATENATE(VLOOKUP([.G26]; [Extra.$W$2:.$AG$9]; 7; 0); ROWOFFSETED(MATCH([.B26]; INDIRECT(VLOOKUP([.G26]; [Extra.$W$2:.$AI$9]; 12; 0)); 0)+2; WHICHROUNDN([.G26])))))">
            <text:p/>
          </table:table-cell>
          <table:table-cell table:style-name="ce175" table:formula="of:=IF([.G26]=&quot;&quot;; &quot;&quot;; INDIRECT(CONCATENATE(VLOOKUP([.G26]; [Extra.$W$2:.$AG$9]; 8; 0); ROWOFFSETED(MATCH([.B26]; INDIRECT(VLOOKUP([.G26]; [Extra.$W$2:.$AI$9]; 12; 0)); 0)+2; WHICHROUNDN([.G26])))))">
            <text:p/>
          </table:table-cell>
          <table:table-cell table:style-name="ce203" table:formula="of:=IF(AND(NOT([.F26]=&quot;D&quot;); NOT([.F26]=&quot;?&quot;); NOT([.G26]=&quot;D&quot;); NOT(ISBLANK([.F26])); NOT(ISBLANK([.G26]))); DIFFROUND([.F26]; [.G26]); &quot;&quot;)">
            <text:p/>
          </table:table-cell>
          <table:table-cell table:style-name="ce208" table:formula="of:=[.A26]" office:value-type="float" office:value="24" calcext:value-type="float">
            <text:p>24</text:p>
          </table:table-cell>
          <table:table-cell table:style-name="ce435" table:formula="of:=IF(COUNTIF([$FL.$A$3:.$A$130]; FIXED([.A26]; 0; 0))&gt;0; INDEX([$FL.$A$3:.$B$130]; MATCH(FIXED([.A26]; 0; 0); [$FL.$A$3:.$A$130]; 0); 2); &quot;&quot;)">
            <text:p/>
          </table:table-cell>
          <table:table-cell table:style-name="ce175" table:formula="of:=IF(COUNTIF([$FL.$A$3:.$A$130]; FIXED([.A26]; 0; 0)); INDEX([$FL.$B$3:.$C$130]; MATCH(FIXED([.A26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26]); [.$O26]=&quot;Q&quot;; [.$O26]=&quot;W&quot;; [.$O26]=&quot;L&quot;; [.$O26]=&quot;U&quot;; [.$O26]=&quot;D&quot;; [.$O26]=&quot;?&quot;); &quot;&quot;; [.$O26]-[.$A26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26]=&quot;&quot;; &quot;&quot;; WHICHROUND(COUNTIF([$FL.$A$3:.$R$130]; [.M26]) + COUNTIF([$Finals.$A$20:.$AF$36]; [.M26])))">
            <text:p/>
          </table:table-cell>
          <table:table-cell table:style-name="ce189" table:formula="of:=IF([.R26]=&quot;&quot;; &quot;&quot;; IF([.R26]=&quot;W&quot;; 8; IF(HASLOST(VLOOKUP(FIXED([.$A26]; 0; 0);  INDIRECT(VLOOKUP([.$R26]; [Extra.$W$2:.$Z$9]; 4; 0)); VLOOKUP([.R26]; [Extra.$W$2:.$AA$9]; 5; 0); 0)); 0; 1)))">
            <text:p/>
          </table:table-cell>
          <table:table-cell table:style-name="ce445" table:formula="of:=IF([.R26]=&quot;&quot;; &quot;&quot;; INDIRECT(CONCATENATE(VLOOKUP([.R26]; [Extra.$W$2:.$AG$9]; 10; 0); ROWOFFSETED(MATCH([.M26]; INDIRECT(VLOOKUP([.R26]; [Extra.$W$2:.$AI$9]; 13; 0)); 0)+2+VLOOKUP([.R26]; [Extra.$W$2:.$AJ$9]; 14; 0); WHICHROUNDN([.R26])))))">
            <text:p/>
          </table:table-cell>
          <table:table-cell table:style-name="ce226" table:formula="of:=IF([.R26]=&quot;&quot;; &quot;&quot;; INDIRECT(CONCATENATE(VLOOKUP([.R26]; [Extra.$W$2:.$AG$9]; 11; 0); ROWOFFSETED(MATCH([.M26]; INDIRECT(VLOOKUP([.R26]; [Extra.$W$2:.$AI$9]; 13; 0)); 0)+2+VLOOKUP([.R26]; [Extra.$W$2:.$AJ$9]; 14; 0); WHICHROUNDN([.R26])))))">
            <text:p/>
          </table:table-cell>
          <table:table-cell table:style-name="ce203" table:formula="of:=IF(AND(NOT([.Q26]=&quot;D&quot;); NOT([.Q26]=&quot;?&quot;); NOT([.R26]=&quot;D&quot;); NOT(ISBLANK([.Q26])); NOT(ISBLANK([.R26]))); DIFFROUND([.Q26]; [.R26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3" table:formula="of:=[.A26]+1" office:value-type="float" office:value="25" calcext:value-type="float">
            <text:p>25</text:p>
          </table:table-cell>
          <table:table-cell table:style-name="ce391" table:formula="of:=IF(COUNTIF([$ML.$A$3:.$A$130]; FIXED([.A27]; 0; 0))&gt;0; INDEX([$ML.$A$3:.$B$130]; MATCH(FIXED([.A27]; 0; 0); [$ML.$A$3:.$A$130]; 0); 2); &quot;&quot;)">
            <text:p/>
          </table:table-cell>
          <table:table-cell table:style-name="ce176" table:formula="of:=IF(COUNTIF([$ML.$A$3:.$A$130]; FIXED([.A27]; 0; 0)); INDEX([$ML.$B$3:.$C$130]; MATCH(FIXED([.A27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27]); [.$D27]=&quot;Q&quot;; [.$D27]=&quot;W&quot;; [.$D27]=&quot;L&quot;; [.$D27]=&quot;U&quot;; [.$D27]=&quot;D&quot;; [.$D27]=&quot;?&quot;); &quot;&quot;; [.$D27]-[.$A27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27]=&quot;&quot;; &quot;&quot;; WHICHROUND(COUNTIF([$ML.$A$3:.$V$130]; [.B27]) + COUNTIF([$Finals.$A$3:.$AF$19]; [.B27])))">
            <text:p/>
          </table:table-cell>
          <table:table-cell table:style-name="ce188" table:formula="of:=IF([.G27]=&quot;&quot;; &quot;&quot;; IF([.G27]=&quot;W&quot;; 8; IF(HASLOST(VLOOKUP(FIXED([.$A27]; 0; 0);  INDIRECT(VLOOKUP([.$G27]; [Extra.$W$2:.$Z$9]; 3; 0)); 9; 0)); 0; 1)))">
            <text:p/>
          </table:table-cell>
          <table:table-cell table:style-name="ce415" table:formula="of:=IF([.G27]=&quot;&quot;; &quot;&quot;; INDIRECT(CONCATENATE(VLOOKUP([.G27]; [Extra.$W$2:.$AG$9]; 7; 0); ROWOFFSETED(MATCH([.B27]; INDIRECT(VLOOKUP([.G27]; [Extra.$W$2:.$AI$9]; 12; 0)); 0)+2; WHICHROUNDN([.G27])))))">
            <text:p/>
          </table:table-cell>
          <table:table-cell table:style-name="ce176" table:formula="of:=IF([.G27]=&quot;&quot;; &quot;&quot;; INDIRECT(CONCATENATE(VLOOKUP([.G27]; [Extra.$W$2:.$AG$9]; 8; 0); ROWOFFSETED(MATCH([.B27]; INDIRECT(VLOOKUP([.G27]; [Extra.$W$2:.$AI$9]; 12; 0)); 0)+2; WHICHROUNDN([.G27])))))">
            <text:p/>
          </table:table-cell>
          <table:table-cell table:style-name="ce202" table:formula="of:=IF(AND(NOT([.F27]=&quot;D&quot;); NOT([.F27]=&quot;?&quot;); NOT([.G27]=&quot;D&quot;); NOT(ISBLANK([.F27])); NOT(ISBLANK([.G27]))); DIFFROUND([.F27]; [.G27]); &quot;&quot;)">
            <text:p/>
          </table:table-cell>
          <table:table-cell table:style-name="ce207" table:formula="of:=[.A27]" office:value-type="float" office:value="25" calcext:value-type="float">
            <text:p>25</text:p>
          </table:table-cell>
          <table:table-cell table:style-name="ce436" table:formula="of:=IF(COUNTIF([$FL.$A$3:.$A$130]; FIXED([.A27]; 0; 0))&gt;0; INDEX([$FL.$A$3:.$B$130]; MATCH(FIXED([.A27]; 0; 0); [$FL.$A$3:.$A$130]; 0); 2); &quot;&quot;)">
            <text:p/>
          </table:table-cell>
          <table:table-cell table:style-name="ce176" table:formula="of:=IF(COUNTIF([$FL.$A$3:.$A$130]; FIXED([.A27]; 0; 0)); INDEX([$FL.$B$3:.$C$130]; MATCH(FIXED([.A27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27]); [.$O27]=&quot;Q&quot;; [.$O27]=&quot;W&quot;; [.$O27]=&quot;L&quot;; [.$O27]=&quot;U&quot;; [.$O27]=&quot;D&quot;; [.$O27]=&quot;?&quot;); &quot;&quot;; [.$O27]-[.$A27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27]=&quot;&quot;; &quot;&quot;; WHICHROUND(COUNTIF([$FL.$A$3:.$R$130]; [.M27]) + COUNTIF([$Finals.$A$20:.$AF$36]; [.M27])))">
            <text:p/>
          </table:table-cell>
          <table:table-cell table:style-name="ce188" table:formula="of:=IF([.R27]=&quot;&quot;; &quot;&quot;; IF([.R27]=&quot;W&quot;; 8; IF(HASLOST(VLOOKUP(FIXED([.$A27]; 0; 0);  INDIRECT(VLOOKUP([.$R27]; [Extra.$W$2:.$Z$9]; 4; 0)); VLOOKUP([.R27]; [Extra.$W$2:.$AA$9]; 5; 0); 0)); 0; 1)))">
            <text:p/>
          </table:table-cell>
          <table:table-cell table:style-name="ce444" table:formula="of:=IF([.R27]=&quot;&quot;; &quot;&quot;; INDIRECT(CONCATENATE(VLOOKUP([.R27]; [Extra.$W$2:.$AG$9]; 10; 0); ROWOFFSETED(MATCH([.M27]; INDIRECT(VLOOKUP([.R27]; [Extra.$W$2:.$AI$9]; 13; 0)); 0)+2+VLOOKUP([.R27]; [Extra.$W$2:.$AJ$9]; 14; 0); WHICHROUNDN([.R27])))))">
            <text:p/>
          </table:table-cell>
          <table:table-cell table:style-name="ce220" table:formula="of:=IF([.R27]=&quot;&quot;; &quot;&quot;; INDIRECT(CONCATENATE(VLOOKUP([.R27]; [Extra.$W$2:.$AG$9]; 11; 0); ROWOFFSETED(MATCH([.M27]; INDIRECT(VLOOKUP([.R27]; [Extra.$W$2:.$AI$9]; 13; 0)); 0)+2+VLOOKUP([.R27]; [Extra.$W$2:.$AJ$9]; 14; 0); WHICHROUNDN([.R27])))))">
            <text:p/>
          </table:table-cell>
          <table:table-cell table:style-name="ce202" table:formula="of:=IF(AND(NOT([.Q27]=&quot;D&quot;); NOT([.Q27]=&quot;?&quot;); NOT([.R27]=&quot;D&quot;); NOT(ISBLANK([.Q27])); NOT(ISBLANK([.R27]))); DIFFROUND([.Q27]; [.R27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4" table:formula="of:=[.A27]+1" office:value-type="float" office:value="26" calcext:value-type="float">
            <text:p>26</text:p>
          </table:table-cell>
          <table:table-cell table:style-name="ce390" table:formula="of:=IF(COUNTIF([$ML.$A$3:.$A$130]; FIXED([.A28]; 0; 0))&gt;0; INDEX([$ML.$A$3:.$B$130]; MATCH(FIXED([.A28]; 0; 0); [$ML.$A$3:.$A$130]; 0); 2); &quot;&quot;)">
            <text:p/>
          </table:table-cell>
          <table:table-cell table:style-name="ce175" table:formula="of:=IF(COUNTIF([$ML.$A$3:.$A$130]; FIXED([.A28]; 0; 0)); INDEX([$ML.$B$3:.$C$130]; MATCH(FIXED([.A28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28]); [.$D28]=&quot;Q&quot;; [.$D28]=&quot;W&quot;; [.$D28]=&quot;L&quot;; [.$D28]=&quot;U&quot;; [.$D28]=&quot;D&quot;; [.$D28]=&quot;?&quot;); &quot;&quot;; [.$D28]-[.$A28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28]=&quot;&quot;; &quot;&quot;; WHICHROUND(COUNTIF([$ML.$A$3:.$V$130]; [.B28]) + COUNTIF([$Finals.$A$3:.$AF$19]; [.B28])))">
            <text:p/>
          </table:table-cell>
          <table:table-cell table:style-name="ce189" table:formula="of:=IF([.G28]=&quot;&quot;; &quot;&quot;; IF([.G28]=&quot;W&quot;; 8; IF(HASLOST(VLOOKUP(FIXED([.$A28]; 0; 0);  INDIRECT(VLOOKUP([.$G28]; [Extra.$W$2:.$Z$9]; 3; 0)); 9; 0)); 0; 1)))">
            <text:p/>
          </table:table-cell>
          <table:table-cell table:style-name="ce416" table:formula="of:=IF([.G28]=&quot;&quot;; &quot;&quot;; INDIRECT(CONCATENATE(VLOOKUP([.G28]; [Extra.$W$2:.$AG$9]; 7; 0); ROWOFFSETED(MATCH([.B28]; INDIRECT(VLOOKUP([.G28]; [Extra.$W$2:.$AI$9]; 12; 0)); 0)+2; WHICHROUNDN([.G28])))))">
            <text:p/>
          </table:table-cell>
          <table:table-cell table:style-name="ce175" table:formula="of:=IF([.G28]=&quot;&quot;; &quot;&quot;; INDIRECT(CONCATENATE(VLOOKUP([.G28]; [Extra.$W$2:.$AG$9]; 8; 0); ROWOFFSETED(MATCH([.B28]; INDIRECT(VLOOKUP([.G28]; [Extra.$W$2:.$AI$9]; 12; 0)); 0)+2; WHICHROUNDN([.G28])))))">
            <text:p/>
          </table:table-cell>
          <table:table-cell table:style-name="ce203" table:formula="of:=IF(AND(NOT([.F28]=&quot;D&quot;); NOT([.F28]=&quot;?&quot;); NOT([.G28]=&quot;D&quot;); NOT(ISBLANK([.F28])); NOT(ISBLANK([.G28]))); DIFFROUND([.F28]; [.G28]); &quot;&quot;)">
            <text:p/>
          </table:table-cell>
          <table:table-cell table:style-name="ce208" table:formula="of:=[.A28]" office:value-type="float" office:value="26" calcext:value-type="float">
            <text:p>26</text:p>
          </table:table-cell>
          <table:table-cell table:style-name="ce435" table:formula="of:=IF(COUNTIF([$FL.$A$3:.$A$130]; FIXED([.A28]; 0; 0))&gt;0; INDEX([$FL.$A$3:.$B$130]; MATCH(FIXED([.A28]; 0; 0); [$FL.$A$3:.$A$130]; 0); 2); &quot;&quot;)">
            <text:p/>
          </table:table-cell>
          <table:table-cell table:style-name="ce175" table:formula="of:=IF(COUNTIF([$FL.$A$3:.$A$130]; FIXED([.A28]; 0; 0)); INDEX([$FL.$B$3:.$C$130]; MATCH(FIXED([.A28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28]); [.$O28]=&quot;Q&quot;; [.$O28]=&quot;W&quot;; [.$O28]=&quot;L&quot;; [.$O28]=&quot;U&quot;; [.$O28]=&quot;D&quot;; [.$O28]=&quot;?&quot;); &quot;&quot;; [.$O28]-[.$A28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28]=&quot;&quot;; &quot;&quot;; WHICHROUND(COUNTIF([$FL.$A$3:.$R$130]; [.M28]) + COUNTIF([$Finals.$A$20:.$AF$36]; [.M28])))">
            <text:p/>
          </table:table-cell>
          <table:table-cell table:style-name="ce189" table:formula="of:=IF([.R28]=&quot;&quot;; &quot;&quot;; IF([.R28]=&quot;W&quot;; 8; IF(HASLOST(VLOOKUP(FIXED([.$A28]; 0; 0);  INDIRECT(VLOOKUP([.$R28]; [Extra.$W$2:.$Z$9]; 4; 0)); VLOOKUP([.R28]; [Extra.$W$2:.$AA$9]; 5; 0); 0)); 0; 1)))">
            <text:p/>
          </table:table-cell>
          <table:table-cell table:style-name="ce445" table:formula="of:=IF([.R28]=&quot;&quot;; &quot;&quot;; INDIRECT(CONCATENATE(VLOOKUP([.R28]; [Extra.$W$2:.$AG$9]; 10; 0); ROWOFFSETED(MATCH([.M28]; INDIRECT(VLOOKUP([.R28]; [Extra.$W$2:.$AI$9]; 13; 0)); 0)+2+VLOOKUP([.R28]; [Extra.$W$2:.$AJ$9]; 14; 0); WHICHROUNDN([.R28])))))">
            <text:p/>
          </table:table-cell>
          <table:table-cell table:style-name="ce226" table:formula="of:=IF([.R28]=&quot;&quot;; &quot;&quot;; INDIRECT(CONCATENATE(VLOOKUP([.R28]; [Extra.$W$2:.$AG$9]; 11; 0); ROWOFFSETED(MATCH([.M28]; INDIRECT(VLOOKUP([.R28]; [Extra.$W$2:.$AI$9]; 13; 0)); 0)+2+VLOOKUP([.R28]; [Extra.$W$2:.$AJ$9]; 14; 0); WHICHROUNDN([.R28])))))">
            <text:p/>
          </table:table-cell>
          <table:table-cell table:style-name="ce203" table:formula="of:=IF(AND(NOT([.Q28]=&quot;D&quot;); NOT([.Q28]=&quot;?&quot;); NOT([.R28]=&quot;D&quot;); NOT(ISBLANK([.Q28])); NOT(ISBLANK([.R28]))); DIFFROUND([.Q28]; [.R28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3" table:formula="of:=[.A28]+1" office:value-type="float" office:value="27" calcext:value-type="float">
            <text:p>27</text:p>
          </table:table-cell>
          <table:table-cell table:style-name="ce391" table:formula="of:=IF(COUNTIF([$ML.$A$3:.$A$130]; FIXED([.A29]; 0; 0))&gt;0; INDEX([$ML.$A$3:.$B$130]; MATCH(FIXED([.A29]; 0; 0); [$ML.$A$3:.$A$130]; 0); 2); &quot;&quot;)">
            <text:p/>
          </table:table-cell>
          <table:table-cell table:style-name="ce176" table:formula="of:=IF(COUNTIF([$ML.$A$3:.$A$130]; FIXED([.A29]; 0; 0)); INDEX([$ML.$B$3:.$C$130]; MATCH(FIXED([.A29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29]); [.$D29]=&quot;Q&quot;; [.$D29]=&quot;W&quot;; [.$D29]=&quot;L&quot;; [.$D29]=&quot;U&quot;; [.$D29]=&quot;D&quot;; [.$D29]=&quot;?&quot;); &quot;&quot;; [.$D29]-[.$A29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29]=&quot;&quot;; &quot;&quot;; WHICHROUND(COUNTIF([$ML.$A$3:.$V$130]; [.B29]) + COUNTIF([$Finals.$A$3:.$AF$19]; [.B29])))">
            <text:p/>
          </table:table-cell>
          <table:table-cell table:style-name="ce188" table:formula="of:=IF([.G29]=&quot;&quot;; &quot;&quot;; IF([.G29]=&quot;W&quot;; 8; IF(HASLOST(VLOOKUP(FIXED([.$A29]; 0; 0);  INDIRECT(VLOOKUP([.$G29]; [Extra.$W$2:.$Z$9]; 3; 0)); 9; 0)); 0; 1)))">
            <text:p/>
          </table:table-cell>
          <table:table-cell table:style-name="ce415" table:formula="of:=IF([.G29]=&quot;&quot;; &quot;&quot;; INDIRECT(CONCATENATE(VLOOKUP([.G29]; [Extra.$W$2:.$AG$9]; 7; 0); ROWOFFSETED(MATCH([.B29]; INDIRECT(VLOOKUP([.G29]; [Extra.$W$2:.$AI$9]; 12; 0)); 0)+2; WHICHROUNDN([.G29])))))">
            <text:p/>
          </table:table-cell>
          <table:table-cell table:style-name="ce176" table:formula="of:=IF([.G29]=&quot;&quot;; &quot;&quot;; INDIRECT(CONCATENATE(VLOOKUP([.G29]; [Extra.$W$2:.$AG$9]; 8; 0); ROWOFFSETED(MATCH([.B29]; INDIRECT(VLOOKUP([.G29]; [Extra.$W$2:.$AI$9]; 12; 0)); 0)+2; WHICHROUNDN([.G29])))))">
            <text:p/>
          </table:table-cell>
          <table:table-cell table:style-name="ce202" table:formula="of:=IF(AND(NOT([.F29]=&quot;D&quot;); NOT([.F29]=&quot;?&quot;); NOT([.G29]=&quot;D&quot;); NOT(ISBLANK([.F29])); NOT(ISBLANK([.G29]))); DIFFROUND([.F29]; [.G29]); &quot;&quot;)">
            <text:p/>
          </table:table-cell>
          <table:table-cell table:style-name="ce207" table:formula="of:=[.A29]" office:value-type="float" office:value="27" calcext:value-type="float">
            <text:p>27</text:p>
          </table:table-cell>
          <table:table-cell table:style-name="ce436" table:formula="of:=IF(COUNTIF([$FL.$A$3:.$A$130]; FIXED([.A29]; 0; 0))&gt;0; INDEX([$FL.$A$3:.$B$130]; MATCH(FIXED([.A29]; 0; 0); [$FL.$A$3:.$A$130]; 0); 2); &quot;&quot;)">
            <text:p/>
          </table:table-cell>
          <table:table-cell table:style-name="ce176" table:formula="of:=IF(COUNTIF([$FL.$A$3:.$A$130]; FIXED([.A29]; 0; 0)); INDEX([$FL.$B$3:.$C$130]; MATCH(FIXED([.A29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29]); [.$O29]=&quot;Q&quot;; [.$O29]=&quot;W&quot;; [.$O29]=&quot;L&quot;; [.$O29]=&quot;U&quot;; [.$O29]=&quot;D&quot;; [.$O29]=&quot;?&quot;); &quot;&quot;; [.$O29]-[.$A29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29]=&quot;&quot;; &quot;&quot;; WHICHROUND(COUNTIF([$FL.$A$3:.$R$130]; [.M29]) + COUNTIF([$Finals.$A$20:.$AF$36]; [.M29])))">
            <text:p/>
          </table:table-cell>
          <table:table-cell table:style-name="ce188" table:formula="of:=IF([.R29]=&quot;&quot;; &quot;&quot;; IF([.R29]=&quot;W&quot;; 8; IF(HASLOST(VLOOKUP(FIXED([.$A29]; 0; 0);  INDIRECT(VLOOKUP([.$R29]; [Extra.$W$2:.$Z$9]; 4; 0)); VLOOKUP([.R29]; [Extra.$W$2:.$AA$9]; 5; 0); 0)); 0; 1)))">
            <text:p/>
          </table:table-cell>
          <table:table-cell table:style-name="ce444" table:formula="of:=IF([.R29]=&quot;&quot;; &quot;&quot;; INDIRECT(CONCATENATE(VLOOKUP([.R29]; [Extra.$W$2:.$AG$9]; 10; 0); ROWOFFSETED(MATCH([.M29]; INDIRECT(VLOOKUP([.R29]; [Extra.$W$2:.$AI$9]; 13; 0)); 0)+2+VLOOKUP([.R29]; [Extra.$W$2:.$AJ$9]; 14; 0); WHICHROUNDN([.R29])))))">
            <text:p/>
          </table:table-cell>
          <table:table-cell table:style-name="ce220" table:formula="of:=IF([.R29]=&quot;&quot;; &quot;&quot;; INDIRECT(CONCATENATE(VLOOKUP([.R29]; [Extra.$W$2:.$AG$9]; 11; 0); ROWOFFSETED(MATCH([.M29]; INDIRECT(VLOOKUP([.R29]; [Extra.$W$2:.$AI$9]; 13; 0)); 0)+2+VLOOKUP([.R29]; [Extra.$W$2:.$AJ$9]; 14; 0); WHICHROUNDN([.R29])))))">
            <text:p/>
          </table:table-cell>
          <table:table-cell table:style-name="ce202" table:formula="of:=IF(AND(NOT([.Q29]=&quot;D&quot;); NOT([.Q29]=&quot;?&quot;); NOT([.R29]=&quot;D&quot;); NOT(ISBLANK([.Q29])); NOT(ISBLANK([.R29]))); DIFFROUND([.Q29]; [.R29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4" table:formula="of:=[.A29]+1" office:value-type="float" office:value="28" calcext:value-type="float">
            <text:p>28</text:p>
          </table:table-cell>
          <table:table-cell table:style-name="ce390" table:formula="of:=IF(COUNTIF([$ML.$A$3:.$A$130]; FIXED([.A30]; 0; 0))&gt;0; INDEX([$ML.$A$3:.$B$130]; MATCH(FIXED([.A30]; 0; 0); [$ML.$A$3:.$A$130]; 0); 2); &quot;&quot;)">
            <text:p/>
          </table:table-cell>
          <table:table-cell table:style-name="ce175" table:formula="of:=IF(COUNTIF([$ML.$A$3:.$A$130]; FIXED([.A30]; 0; 0)); INDEX([$ML.$B$3:.$C$130]; MATCH(FIXED([.A30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30]); [.$D30]=&quot;Q&quot;; [.$D30]=&quot;W&quot;; [.$D30]=&quot;L&quot;; [.$D30]=&quot;U&quot;; [.$D30]=&quot;D&quot;; [.$D30]=&quot;?&quot;); &quot;&quot;; [.$D30]-[.$A30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30]=&quot;&quot;; &quot;&quot;; WHICHROUND(COUNTIF([$ML.$A$3:.$V$130]; [.B30]) + COUNTIF([$Finals.$A$3:.$AF$19]; [.B30])))">
            <text:p/>
          </table:table-cell>
          <table:table-cell table:style-name="ce189" table:formula="of:=IF([.G30]=&quot;&quot;; &quot;&quot;; IF([.G30]=&quot;W&quot;; 8; IF(HASLOST(VLOOKUP(FIXED([.$A30]; 0; 0);  INDIRECT(VLOOKUP([.$G30]; [Extra.$W$2:.$Z$9]; 3; 0)); 9; 0)); 0; 1)))">
            <text:p/>
          </table:table-cell>
          <table:table-cell table:style-name="ce416" table:formula="of:=IF([.G30]=&quot;&quot;; &quot;&quot;; INDIRECT(CONCATENATE(VLOOKUP([.G30]; [Extra.$W$2:.$AG$9]; 7; 0); ROWOFFSETED(MATCH([.B30]; INDIRECT(VLOOKUP([.G30]; [Extra.$W$2:.$AI$9]; 12; 0)); 0)+2; WHICHROUNDN([.G30])))))">
            <text:p/>
          </table:table-cell>
          <table:table-cell table:style-name="ce175" table:formula="of:=IF([.G30]=&quot;&quot;; &quot;&quot;; INDIRECT(CONCATENATE(VLOOKUP([.G30]; [Extra.$W$2:.$AG$9]; 8; 0); ROWOFFSETED(MATCH([.B30]; INDIRECT(VLOOKUP([.G30]; [Extra.$W$2:.$AI$9]; 12; 0)); 0)+2; WHICHROUNDN([.G30])))))">
            <text:p/>
          </table:table-cell>
          <table:table-cell table:style-name="ce203" table:formula="of:=IF(AND(NOT([.F30]=&quot;D&quot;); NOT([.F30]=&quot;?&quot;); NOT([.G30]=&quot;D&quot;); NOT(ISBLANK([.F30])); NOT(ISBLANK([.G30]))); DIFFROUND([.F30]; [.G30]); &quot;&quot;)">
            <text:p/>
          </table:table-cell>
          <table:table-cell table:style-name="ce208" table:formula="of:=[.A30]" office:value-type="float" office:value="28" calcext:value-type="float">
            <text:p>28</text:p>
          </table:table-cell>
          <table:table-cell table:style-name="ce435" table:formula="of:=IF(COUNTIF([$FL.$A$3:.$A$130]; FIXED([.A30]; 0; 0))&gt;0; INDEX([$FL.$A$3:.$B$130]; MATCH(FIXED([.A30]; 0; 0); [$FL.$A$3:.$A$130]; 0); 2); &quot;&quot;)">
            <text:p/>
          </table:table-cell>
          <table:table-cell table:style-name="ce175" table:formula="of:=IF(COUNTIF([$FL.$A$3:.$A$130]; FIXED([.A30]; 0; 0)); INDEX([$FL.$B$3:.$C$130]; MATCH(FIXED([.A30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30]); [.$O30]=&quot;Q&quot;; [.$O30]=&quot;W&quot;; [.$O30]=&quot;L&quot;; [.$O30]=&quot;U&quot;; [.$O30]=&quot;D&quot;; [.$O30]=&quot;?&quot;); &quot;&quot;; [.$O30]-[.$A30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30]=&quot;&quot;; &quot;&quot;; WHICHROUND(COUNTIF([$FL.$A$3:.$R$130]; [.M30]) + COUNTIF([$Finals.$A$20:.$AF$36]; [.M30])))">
            <text:p/>
          </table:table-cell>
          <table:table-cell table:style-name="ce189" table:formula="of:=IF([.R30]=&quot;&quot;; &quot;&quot;; IF([.R30]=&quot;W&quot;; 8; IF(HASLOST(VLOOKUP(FIXED([.$A30]; 0; 0);  INDIRECT(VLOOKUP([.$R30]; [Extra.$W$2:.$Z$9]; 4; 0)); VLOOKUP([.R30]; [Extra.$W$2:.$AA$9]; 5; 0); 0)); 0; 1)))">
            <text:p/>
          </table:table-cell>
          <table:table-cell table:style-name="ce445" table:formula="of:=IF([.R30]=&quot;&quot;; &quot;&quot;; INDIRECT(CONCATENATE(VLOOKUP([.R30]; [Extra.$W$2:.$AG$9]; 10; 0); ROWOFFSETED(MATCH([.M30]; INDIRECT(VLOOKUP([.R30]; [Extra.$W$2:.$AI$9]; 13; 0)); 0)+2+VLOOKUP([.R30]; [Extra.$W$2:.$AJ$9]; 14; 0); WHICHROUNDN([.R30])))))">
            <text:p/>
          </table:table-cell>
          <table:table-cell table:style-name="ce226" table:formula="of:=IF([.R30]=&quot;&quot;; &quot;&quot;; INDIRECT(CONCATENATE(VLOOKUP([.R30]; [Extra.$W$2:.$AG$9]; 11; 0); ROWOFFSETED(MATCH([.M30]; INDIRECT(VLOOKUP([.R30]; [Extra.$W$2:.$AI$9]; 13; 0)); 0)+2+VLOOKUP([.R30]; [Extra.$W$2:.$AJ$9]; 14; 0); WHICHROUNDN([.R30])))))">
            <text:p/>
          </table:table-cell>
          <table:table-cell table:style-name="ce203" table:formula="of:=IF(AND(NOT([.Q30]=&quot;D&quot;); NOT([.Q30]=&quot;?&quot;); NOT([.R30]=&quot;D&quot;); NOT(ISBLANK([.Q30])); NOT(ISBLANK([.R30]))); DIFFROUND([.Q30]; [.R30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3" table:formula="of:=[.A30]+1" office:value-type="float" office:value="29" calcext:value-type="float">
            <text:p>29</text:p>
          </table:table-cell>
          <table:table-cell table:style-name="ce391" table:formula="of:=IF(COUNTIF([$ML.$A$3:.$A$130]; FIXED([.A31]; 0; 0))&gt;0; INDEX([$ML.$A$3:.$B$130]; MATCH(FIXED([.A31]; 0; 0); [$ML.$A$3:.$A$130]; 0); 2); &quot;&quot;)">
            <text:p/>
          </table:table-cell>
          <table:table-cell table:style-name="ce176" table:formula="of:=IF(COUNTIF([$ML.$A$3:.$A$130]; FIXED([.A31]; 0; 0)); INDEX([$ML.$B$3:.$C$130]; MATCH(FIXED([.A31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31]); [.$D31]=&quot;Q&quot;; [.$D31]=&quot;W&quot;; [.$D31]=&quot;L&quot;; [.$D31]=&quot;U&quot;; [.$D31]=&quot;D&quot;; [.$D31]=&quot;?&quot;); &quot;&quot;; [.$D31]-[.$A31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31]=&quot;&quot;; &quot;&quot;; WHICHROUND(COUNTIF([$ML.$A$3:.$V$130]; [.B31]) + COUNTIF([$Finals.$A$3:.$AF$19]; [.B31])))">
            <text:p/>
          </table:table-cell>
          <table:table-cell table:style-name="ce188" table:formula="of:=IF([.G31]=&quot;&quot;; &quot;&quot;; IF([.G31]=&quot;W&quot;; 8; IF(HASLOST(VLOOKUP(FIXED([.$A31]; 0; 0);  INDIRECT(VLOOKUP([.$G31]; [Extra.$W$2:.$Z$9]; 3; 0)); 9; 0)); 0; 1)))">
            <text:p/>
          </table:table-cell>
          <table:table-cell table:style-name="ce415" table:formula="of:=IF([.G31]=&quot;&quot;; &quot;&quot;; INDIRECT(CONCATENATE(VLOOKUP([.G31]; [Extra.$W$2:.$AG$9]; 7; 0); ROWOFFSETED(MATCH([.B31]; INDIRECT(VLOOKUP([.G31]; [Extra.$W$2:.$AI$9]; 12; 0)); 0)+2; WHICHROUNDN([.G31])))))">
            <text:p/>
          </table:table-cell>
          <table:table-cell table:style-name="ce176" table:formula="of:=IF([.G31]=&quot;&quot;; &quot;&quot;; INDIRECT(CONCATENATE(VLOOKUP([.G31]; [Extra.$W$2:.$AG$9]; 8; 0); ROWOFFSETED(MATCH([.B31]; INDIRECT(VLOOKUP([.G31]; [Extra.$W$2:.$AI$9]; 12; 0)); 0)+2; WHICHROUNDN([.G31])))))">
            <text:p/>
          </table:table-cell>
          <table:table-cell table:style-name="ce202" table:formula="of:=IF(AND(NOT([.F31]=&quot;D&quot;); NOT([.F31]=&quot;?&quot;); NOT([.G31]=&quot;D&quot;); NOT(ISBLANK([.F31])); NOT(ISBLANK([.G31]))); DIFFROUND([.F31]; [.G31]); &quot;&quot;)">
            <text:p/>
          </table:table-cell>
          <table:table-cell table:style-name="ce207" table:formula="of:=[.A31]" office:value-type="float" office:value="29" calcext:value-type="float">
            <text:p>29</text:p>
          </table:table-cell>
          <table:table-cell table:style-name="ce436" table:formula="of:=IF(COUNTIF([$FL.$A$3:.$A$130]; FIXED([.A31]; 0; 0))&gt;0; INDEX([$FL.$A$3:.$B$130]; MATCH(FIXED([.A31]; 0; 0); [$FL.$A$3:.$A$130]; 0); 2); &quot;&quot;)">
            <text:p/>
          </table:table-cell>
          <table:table-cell table:style-name="ce176" table:formula="of:=IF(COUNTIF([$FL.$A$3:.$A$130]; FIXED([.A31]; 0; 0)); INDEX([$FL.$B$3:.$C$130]; MATCH(FIXED([.A31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31]); [.$O31]=&quot;Q&quot;; [.$O31]=&quot;W&quot;; [.$O31]=&quot;L&quot;; [.$O31]=&quot;U&quot;; [.$O31]=&quot;D&quot;; [.$O31]=&quot;?&quot;); &quot;&quot;; [.$O31]-[.$A31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31]=&quot;&quot;; &quot;&quot;; WHICHROUND(COUNTIF([$FL.$A$3:.$R$130]; [.M31]) + COUNTIF([$Finals.$A$20:.$AF$36]; [.M31])))">
            <text:p/>
          </table:table-cell>
          <table:table-cell table:style-name="ce188" table:formula="of:=IF([.R31]=&quot;&quot;; &quot;&quot;; IF([.R31]=&quot;W&quot;; 8; IF(HASLOST(VLOOKUP(FIXED([.$A31]; 0; 0);  INDIRECT(VLOOKUP([.$R31]; [Extra.$W$2:.$Z$9]; 4; 0)); VLOOKUP([.R31]; [Extra.$W$2:.$AA$9]; 5; 0); 0)); 0; 1)))">
            <text:p/>
          </table:table-cell>
          <table:table-cell table:style-name="ce444" table:formula="of:=IF([.R31]=&quot;&quot;; &quot;&quot;; INDIRECT(CONCATENATE(VLOOKUP([.R31]; [Extra.$W$2:.$AG$9]; 10; 0); ROWOFFSETED(MATCH([.M31]; INDIRECT(VLOOKUP([.R31]; [Extra.$W$2:.$AI$9]; 13; 0)); 0)+2+VLOOKUP([.R31]; [Extra.$W$2:.$AJ$9]; 14; 0); WHICHROUNDN([.R31])))))">
            <text:p/>
          </table:table-cell>
          <table:table-cell table:style-name="ce220" table:formula="of:=IF([.R31]=&quot;&quot;; &quot;&quot;; INDIRECT(CONCATENATE(VLOOKUP([.R31]; [Extra.$W$2:.$AG$9]; 11; 0); ROWOFFSETED(MATCH([.M31]; INDIRECT(VLOOKUP([.R31]; [Extra.$W$2:.$AI$9]; 13; 0)); 0)+2+VLOOKUP([.R31]; [Extra.$W$2:.$AJ$9]; 14; 0); WHICHROUNDN([.R31])))))">
            <text:p/>
          </table:table-cell>
          <table:table-cell table:style-name="ce202" table:formula="of:=IF(AND(NOT([.Q31]=&quot;D&quot;); NOT([.Q31]=&quot;?&quot;); NOT([.R31]=&quot;D&quot;); NOT(ISBLANK([.Q31])); NOT(ISBLANK([.R31]))); DIFFROUND([.Q31]; [.R31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4" table:formula="of:=[.A31]+1" office:value-type="float" office:value="30" calcext:value-type="float">
            <text:p>30</text:p>
          </table:table-cell>
          <table:table-cell table:style-name="ce390" table:formula="of:=IF(COUNTIF([$ML.$A$3:.$A$130]; FIXED([.A32]; 0; 0))&gt;0; INDEX([$ML.$A$3:.$B$130]; MATCH(FIXED([.A32]; 0; 0); [$ML.$A$3:.$A$130]; 0); 2); &quot;&quot;)">
            <text:p/>
          </table:table-cell>
          <table:table-cell table:style-name="ce175" table:formula="of:=IF(COUNTIF([$ML.$A$3:.$A$130]; FIXED([.A32]; 0; 0)); INDEX([$ML.$B$3:.$C$130]; MATCH(FIXED([.A32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32]); [.$D32]=&quot;Q&quot;; [.$D32]=&quot;W&quot;; [.$D32]=&quot;L&quot;; [.$D32]=&quot;U&quot;; [.$D32]=&quot;D&quot;; [.$D32]=&quot;?&quot;); &quot;&quot;; [.$D32]-[.$A32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32]=&quot;&quot;; &quot;&quot;; WHICHROUND(COUNTIF([$ML.$A$3:.$V$130]; [.B32]) + COUNTIF([$Finals.$A$3:.$AF$19]; [.B32])))">
            <text:p/>
          </table:table-cell>
          <table:table-cell table:style-name="ce189" table:formula="of:=IF([.G32]=&quot;&quot;; &quot;&quot;; IF([.G32]=&quot;W&quot;; 8; IF(HASLOST(VLOOKUP(FIXED([.$A32]; 0; 0);  INDIRECT(VLOOKUP([.$G32]; [Extra.$W$2:.$Z$9]; 3; 0)); 9; 0)); 0; 1)))">
            <text:p/>
          </table:table-cell>
          <table:table-cell table:style-name="ce416" table:formula="of:=IF([.G32]=&quot;&quot;; &quot;&quot;; INDIRECT(CONCATENATE(VLOOKUP([.G32]; [Extra.$W$2:.$AG$9]; 7; 0); ROWOFFSETED(MATCH([.B32]; INDIRECT(VLOOKUP([.G32]; [Extra.$W$2:.$AI$9]; 12; 0)); 0)+2; WHICHROUNDN([.G32])))))">
            <text:p/>
          </table:table-cell>
          <table:table-cell table:style-name="ce175" table:formula="of:=IF([.G32]=&quot;&quot;; &quot;&quot;; INDIRECT(CONCATENATE(VLOOKUP([.G32]; [Extra.$W$2:.$AG$9]; 8; 0); ROWOFFSETED(MATCH([.B32]; INDIRECT(VLOOKUP([.G32]; [Extra.$W$2:.$AI$9]; 12; 0)); 0)+2; WHICHROUNDN([.G32])))))">
            <text:p/>
          </table:table-cell>
          <table:table-cell table:style-name="ce203" table:formula="of:=IF(AND(NOT([.F32]=&quot;D&quot;); NOT([.F32]=&quot;?&quot;); NOT([.G32]=&quot;D&quot;); NOT(ISBLANK([.F32])); NOT(ISBLANK([.G32]))); DIFFROUND([.F32]; [.G32]); &quot;&quot;)">
            <text:p/>
          </table:table-cell>
          <table:table-cell table:style-name="ce208" table:formula="of:=[.A32]" office:value-type="float" office:value="30" calcext:value-type="float">
            <text:p>30</text:p>
          </table:table-cell>
          <table:table-cell table:style-name="ce435" table:formula="of:=IF(COUNTIF([$FL.$A$3:.$A$130]; FIXED([.A32]; 0; 0))&gt;0; INDEX([$FL.$A$3:.$B$130]; MATCH(FIXED([.A32]; 0; 0); [$FL.$A$3:.$A$130]; 0); 2); &quot;&quot;)">
            <text:p/>
          </table:table-cell>
          <table:table-cell table:style-name="ce175" table:formula="of:=IF(COUNTIF([$FL.$A$3:.$A$130]; FIXED([.A32]; 0; 0)); INDEX([$FL.$B$3:.$C$130]; MATCH(FIXED([.A32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32]); [.$O32]=&quot;Q&quot;; [.$O32]=&quot;W&quot;; [.$O32]=&quot;L&quot;; [.$O32]=&quot;U&quot;; [.$O32]=&quot;D&quot;; [.$O32]=&quot;?&quot;); &quot;&quot;; [.$O32]-[.$A32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32]=&quot;&quot;; &quot;&quot;; WHICHROUND(COUNTIF([$FL.$A$3:.$R$130]; [.M32]) + COUNTIF([$Finals.$A$20:.$AF$36]; [.M32])))">
            <text:p/>
          </table:table-cell>
          <table:table-cell table:style-name="ce189" table:formula="of:=IF([.R32]=&quot;&quot;; &quot;&quot;; IF([.R32]=&quot;W&quot;; 8; IF(HASLOST(VLOOKUP(FIXED([.$A32]; 0; 0);  INDIRECT(VLOOKUP([.$R32]; [Extra.$W$2:.$Z$9]; 4; 0)); VLOOKUP([.R32]; [Extra.$W$2:.$AA$9]; 5; 0); 0)); 0; 1)))">
            <text:p/>
          </table:table-cell>
          <table:table-cell table:style-name="ce445" table:formula="of:=IF([.R32]=&quot;&quot;; &quot;&quot;; INDIRECT(CONCATENATE(VLOOKUP([.R32]; [Extra.$W$2:.$AG$9]; 10; 0); ROWOFFSETED(MATCH([.M32]; INDIRECT(VLOOKUP([.R32]; [Extra.$W$2:.$AI$9]; 13; 0)); 0)+2+VLOOKUP([.R32]; [Extra.$W$2:.$AJ$9]; 14; 0); WHICHROUNDN([.R32])))))">
            <text:p/>
          </table:table-cell>
          <table:table-cell table:style-name="ce226" table:formula="of:=IF([.R32]=&quot;&quot;; &quot;&quot;; INDIRECT(CONCATENATE(VLOOKUP([.R32]; [Extra.$W$2:.$AG$9]; 11; 0); ROWOFFSETED(MATCH([.M32]; INDIRECT(VLOOKUP([.R32]; [Extra.$W$2:.$AI$9]; 13; 0)); 0)+2+VLOOKUP([.R32]; [Extra.$W$2:.$AJ$9]; 14; 0); WHICHROUNDN([.R32])))))">
            <text:p/>
          </table:table-cell>
          <table:table-cell table:style-name="ce203" table:formula="of:=IF(AND(NOT([.Q32]=&quot;D&quot;); NOT([.Q32]=&quot;?&quot;); NOT([.R32]=&quot;D&quot;); NOT(ISBLANK([.Q32])); NOT(ISBLANK([.R32]))); DIFFROUND([.Q32]; [.R32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3" table:formula="of:=[.A32]+1" office:value-type="float" office:value="31" calcext:value-type="float">
            <text:p>31</text:p>
          </table:table-cell>
          <table:table-cell table:style-name="ce391" table:formula="of:=IF(COUNTIF([$ML.$A$3:.$A$130]; FIXED([.A33]; 0; 0))&gt;0; INDEX([$ML.$A$3:.$B$130]; MATCH(FIXED([.A33]; 0; 0); [$ML.$A$3:.$A$130]; 0); 2); &quot;&quot;)">
            <text:p/>
          </table:table-cell>
          <table:table-cell table:style-name="ce176" table:formula="of:=IF(COUNTIF([$ML.$A$3:.$A$130]; FIXED([.A33]; 0; 0)); INDEX([$ML.$B$3:.$C$130]; MATCH(FIXED([.A33]; 0; 0); [$M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D33]); [.$D33]=&quot;Q&quot;; [.$D33]=&quot;W&quot;; [.$D33]=&quot;L&quot;; [.$D33]=&quot;U&quot;; [.$D33]=&quot;D&quot;; [.$D33]=&quot;?&quot;); &quot;&quot;; [.$D33]-[.$A33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B33]=&quot;&quot;; &quot;&quot;; WHICHROUND(COUNTIF([$ML.$A$3:.$V$130]; [.B33]) + COUNTIF([$Finals.$A$3:.$AF$19]; [.B33])))">
            <text:p/>
          </table:table-cell>
          <table:table-cell table:style-name="ce188" table:formula="of:=IF([.G33]=&quot;&quot;; &quot;&quot;; IF([.G33]=&quot;W&quot;; 8; IF(HASLOST(VLOOKUP(FIXED([.$A33]; 0; 0);  INDIRECT(VLOOKUP([.$G33]; [Extra.$W$2:.$Z$9]; 3; 0)); 9; 0)); 0; 1)))">
            <text:p/>
          </table:table-cell>
          <table:table-cell table:style-name="ce415" table:formula="of:=IF([.G33]=&quot;&quot;; &quot;&quot;; INDIRECT(CONCATENATE(VLOOKUP([.G33]; [Extra.$W$2:.$AG$9]; 7; 0); ROWOFFSETED(MATCH([.B33]; INDIRECT(VLOOKUP([.G33]; [Extra.$W$2:.$AI$9]; 12; 0)); 0)+2; WHICHROUNDN([.G33])))))">
            <text:p/>
          </table:table-cell>
          <table:table-cell table:style-name="ce176" table:formula="of:=IF([.G33]=&quot;&quot;; &quot;&quot;; INDIRECT(CONCATENATE(VLOOKUP([.G33]; [Extra.$W$2:.$AG$9]; 8; 0); ROWOFFSETED(MATCH([.B33]; INDIRECT(VLOOKUP([.G33]; [Extra.$W$2:.$AI$9]; 12; 0)); 0)+2; WHICHROUNDN([.G33])))))">
            <text:p/>
          </table:table-cell>
          <table:table-cell table:style-name="ce202" table:formula="of:=IF(AND(NOT([.F33]=&quot;D&quot;); NOT([.F33]=&quot;?&quot;); NOT([.G33]=&quot;D&quot;); NOT(ISBLANK([.F33])); NOT(ISBLANK([.G33]))); DIFFROUND([.F33]; [.G33]); &quot;&quot;)">
            <text:p/>
          </table:table-cell>
          <table:table-cell table:style-name="ce207" table:formula="of:=[.A33]" office:value-type="float" office:value="31" calcext:value-type="float">
            <text:p>31</text:p>
          </table:table-cell>
          <table:table-cell table:style-name="ce436" table:formula="of:=IF(COUNTIF([$FL.$A$3:.$A$130]; FIXED([.A33]; 0; 0))&gt;0; INDEX([$FL.$A$3:.$B$130]; MATCH(FIXED([.A33]; 0; 0); [$FL.$A$3:.$A$130]; 0); 2); &quot;&quot;)">
            <text:p/>
          </table:table-cell>
          <table:table-cell table:style-name="ce176" table:formula="of:=IF(COUNTIF([$FL.$A$3:.$A$130]; FIXED([.A33]; 0; 0)); INDEX([$FL.$B$3:.$C$130]; MATCH(FIXED([.A33]; 0; 0); [$FL.$A$3:.$A$130]; 0); 2); &quot;&quot;)">
            <text:p/>
          </table:table-cell>
          <table:table-cell table:style-name="ce176" office:value-type="string" calcext:value-type="string">
            <text:p>?</text:p>
          </table:table-cell>
          <table:table-cell table:style-name="ce182" table:formula="of:=IF(OR(ISBLANK([.$O33]); [.$O33]=&quot;Q&quot;; [.$O33]=&quot;W&quot;; [.$O33]=&quot;L&quot;; [.$O33]=&quot;U&quot;; [.$O33]=&quot;D&quot;; [.$O33]=&quot;?&quot;); &quot;&quot;; [.$O33]-[.$A33])">
            <text:p/>
          </table:table-cell>
          <table:table-cell table:style-name="ce176" office:value-type="string" calcext:value-type="string">
            <text:p>?</text:p>
          </table:table-cell>
          <table:table-cell table:style-name="ce176" table:formula="of:=IF([.M33]=&quot;&quot;; &quot;&quot;; WHICHROUND(COUNTIF([$FL.$A$3:.$R$130]; [.M33]) + COUNTIF([$Finals.$A$20:.$AF$36]; [.M33])))">
            <text:p/>
          </table:table-cell>
          <table:table-cell table:style-name="ce188" table:formula="of:=IF([.R33]=&quot;&quot;; &quot;&quot;; IF([.R33]=&quot;W&quot;; 8; IF(HASLOST(VLOOKUP(FIXED([.$A33]; 0; 0);  INDIRECT(VLOOKUP([.$R33]; [Extra.$W$2:.$Z$9]; 4; 0)); VLOOKUP([.R33]; [Extra.$W$2:.$AA$9]; 5; 0); 0)); 0; 1)))">
            <text:p/>
          </table:table-cell>
          <table:table-cell table:style-name="ce444" table:formula="of:=IF([.R33]=&quot;&quot;; &quot;&quot;; INDIRECT(CONCATENATE(VLOOKUP([.R33]; [Extra.$W$2:.$AG$9]; 10; 0); ROWOFFSETED(MATCH([.M33]; INDIRECT(VLOOKUP([.R33]; [Extra.$W$2:.$AI$9]; 13; 0)); 0)+2+VLOOKUP([.R33]; [Extra.$W$2:.$AJ$9]; 14; 0); WHICHROUNDN([.R33])))))">
            <text:p/>
          </table:table-cell>
          <table:table-cell table:style-name="ce220" table:formula="of:=IF([.R33]=&quot;&quot;; &quot;&quot;; INDIRECT(CONCATENATE(VLOOKUP([.R33]; [Extra.$W$2:.$AG$9]; 11; 0); ROWOFFSETED(MATCH([.M33]; INDIRECT(VLOOKUP([.R33]; [Extra.$W$2:.$AI$9]; 13; 0)); 0)+2+VLOOKUP([.R33]; [Extra.$W$2:.$AJ$9]; 14; 0); WHICHROUNDN([.R33])))))">
            <text:p/>
          </table:table-cell>
          <table:table-cell table:style-name="ce202" table:formula="of:=IF(AND(NOT([.Q33]=&quot;D&quot;); NOT([.Q33]=&quot;?&quot;); NOT([.R33]=&quot;D&quot;); NOT(ISBLANK([.Q33])); NOT(ISBLANK([.R33]))); DIFFROUND([.Q33]; [.R33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4" table:formula="of:=[.A33]+1" office:value-type="float" office:value="32" calcext:value-type="float">
            <text:p>32</text:p>
          </table:table-cell>
          <table:table-cell table:style-name="ce390" table:formula="of:=IF(COUNTIF([$ML.$A$3:.$A$130]; FIXED([.A34]; 0; 0))&gt;0; INDEX([$ML.$A$3:.$B$130]; MATCH(FIXED([.A34]; 0; 0); [$ML.$A$3:.$A$130]; 0); 2); &quot;&quot;)">
            <text:p/>
          </table:table-cell>
          <table:table-cell table:style-name="ce175" table:formula="of:=IF(COUNTIF([$ML.$A$3:.$A$130]; FIXED([.A34]; 0; 0)); INDEX([$ML.$B$3:.$C$130]; MATCH(FIXED([.A34]; 0; 0); [$M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D34]); [.$D34]=&quot;Q&quot;; [.$D34]=&quot;W&quot;; [.$D34]=&quot;L&quot;; [.$D34]=&quot;U&quot;; [.$D34]=&quot;D&quot;; [.$D34]=&quot;?&quot;); &quot;&quot;; [.$D34]-[.$A34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B34]=&quot;&quot;; &quot;&quot;; WHICHROUND(COUNTIF([$ML.$A$3:.$V$130]; [.B34]) + COUNTIF([$Finals.$A$3:.$AF$19]; [.B34])))">
            <text:p/>
          </table:table-cell>
          <table:table-cell table:style-name="ce189" table:formula="of:=IF([.G34]=&quot;&quot;; &quot;&quot;; IF([.G34]=&quot;W&quot;; 8; IF(HASLOST(VLOOKUP(FIXED([.$A34]; 0; 0);  INDIRECT(VLOOKUP([.$G34]; [Extra.$W$2:.$Z$9]; 3; 0)); 9; 0)); 0; 1)))">
            <text:p/>
          </table:table-cell>
          <table:table-cell table:style-name="ce416" table:formula="of:=IF([.G34]=&quot;&quot;; &quot;&quot;; INDIRECT(CONCATENATE(VLOOKUP([.G34]; [Extra.$W$2:.$AG$9]; 7; 0); ROWOFFSETED(MATCH([.B34]; INDIRECT(VLOOKUP([.G34]; [Extra.$W$2:.$AI$9]; 12; 0)); 0)+2; WHICHROUNDN([.G34])))))">
            <text:p/>
          </table:table-cell>
          <table:table-cell table:style-name="ce175" table:formula="of:=IF([.G34]=&quot;&quot;; &quot;&quot;; INDIRECT(CONCATENATE(VLOOKUP([.G34]; [Extra.$W$2:.$AG$9]; 8; 0); ROWOFFSETED(MATCH([.B34]; INDIRECT(VLOOKUP([.G34]; [Extra.$W$2:.$AI$9]; 12; 0)); 0)+2; WHICHROUNDN([.G34])))))">
            <text:p/>
          </table:table-cell>
          <table:table-cell table:style-name="ce203" table:formula="of:=IF(AND(NOT([.F34]=&quot;D&quot;); NOT([.F34]=&quot;?&quot;); NOT([.G34]=&quot;D&quot;); NOT(ISBLANK([.F34])); NOT(ISBLANK([.G34]))); DIFFROUND([.F34]; [.G34]); &quot;&quot;)">
            <text:p/>
          </table:table-cell>
          <table:table-cell table:style-name="ce208" table:formula="of:=[.A34]" office:value-type="float" office:value="32" calcext:value-type="float">
            <text:p>32</text:p>
          </table:table-cell>
          <table:table-cell table:style-name="ce435" table:formula="of:=IF(COUNTIF([$FL.$A$3:.$A$130]; FIXED([.A34]; 0; 0))&gt;0; INDEX([$FL.$A$3:.$B$130]; MATCH(FIXED([.A34]; 0; 0); [$FL.$A$3:.$A$130]; 0); 2); &quot;&quot;)">
            <text:p/>
          </table:table-cell>
          <table:table-cell table:style-name="ce175" table:formula="of:=IF(COUNTIF([$FL.$A$3:.$A$130]; FIXED([.A34]; 0; 0)); INDEX([$FL.$B$3:.$C$130]; MATCH(FIXED([.A34]; 0; 0); [$FL.$A$3:.$A$130]; 0); 2); &quot;&quot;)">
            <text:p/>
          </table:table-cell>
          <table:table-cell table:style-name="ce175" office:value-type="string" calcext:value-type="string">
            <text:p>?</text:p>
          </table:table-cell>
          <table:table-cell table:style-name="ce181" table:formula="of:=IF(OR(ISBLANK([.$O34]); [.$O34]=&quot;Q&quot;; [.$O34]=&quot;W&quot;; [.$O34]=&quot;L&quot;; [.$O34]=&quot;U&quot;; [.$O34]=&quot;D&quot;; [.$O34]=&quot;?&quot;); &quot;&quot;; [.$O34]-[.$A34])">
            <text:p/>
          </table:table-cell>
          <table:table-cell table:style-name="ce175" office:value-type="string" calcext:value-type="string">
            <text:p>?</text:p>
          </table:table-cell>
          <table:table-cell table:style-name="ce175" table:formula="of:=IF([.M34]=&quot;&quot;; &quot;&quot;; WHICHROUND(COUNTIF([$FL.$A$3:.$R$130]; [.M34]) + COUNTIF([$Finals.$A$20:.$AF$36]; [.M34])))">
            <text:p/>
          </table:table-cell>
          <table:table-cell table:style-name="ce189" table:formula="of:=IF([.R34]=&quot;&quot;; &quot;&quot;; IF([.R34]=&quot;W&quot;; 8; IF(HASLOST(VLOOKUP(FIXED([.$A34]; 0; 0);  INDIRECT(VLOOKUP([.$R34]; [Extra.$W$2:.$Z$9]; 4; 0)); VLOOKUP([.R34]; [Extra.$W$2:.$AA$9]; 5; 0); 0)); 0; 1)))">
            <text:p/>
          </table:table-cell>
          <table:table-cell table:style-name="ce445" table:formula="of:=IF([.R34]=&quot;&quot;; &quot;&quot;; INDIRECT(CONCATENATE(VLOOKUP([.R34]; [Extra.$W$2:.$AG$9]; 10; 0); ROWOFFSETED(MATCH([.M34]; INDIRECT(VLOOKUP([.R34]; [Extra.$W$2:.$AI$9]; 13; 0)); 0)+2+VLOOKUP([.R34]; [Extra.$W$2:.$AJ$9]; 14; 0); WHICHROUNDN([.R34])))))">
            <text:p/>
          </table:table-cell>
          <table:table-cell table:style-name="ce226" table:formula="of:=IF([.R34]=&quot;&quot;; &quot;&quot;; INDIRECT(CONCATENATE(VLOOKUP([.R34]; [Extra.$W$2:.$AG$9]; 11; 0); ROWOFFSETED(MATCH([.M34]; INDIRECT(VLOOKUP([.R34]; [Extra.$W$2:.$AI$9]; 13; 0)); 0)+2+VLOOKUP([.R34]; [Extra.$W$2:.$AJ$9]; 14; 0); WHICHROUNDN([.R34])))))">
            <text:p/>
          </table:table-cell>
          <table:table-cell table:style-name="ce203" table:formula="of:=IF(AND(NOT([.Q34]=&quot;D&quot;); NOT([.Q34]=&quot;?&quot;); NOT([.R34]=&quot;D&quot;); NOT(ISBLANK([.Q34])); NOT(ISBLANK([.R34]))); DIFFROUND([.Q34]; [.R34]); &quot;&quot;)">
            <text:p/>
          </table:table-cell>
          <table:table-cell table:style-name="ce93" office:value-type="string" calcext:value-type="string">
            <text:p>Bot</text:p>
          </table:table-cell>
        </table:table-row>
        <table:table-row table:style-name="ro1">
          <table:table-cell table:style-name="ce166"/>
          <table:table-cell table:style-name="ce172"/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91"/>
          <table:table-cell table:style-name="ce197"/>
          <table:table-cell table:style-name="ce178"/>
          <table:table-cell table:style-name="ce184"/>
          <table:table-cell table:style-name="ce210"/>
          <table:table-cell table:style-name="ce172"/>
          <table:table-cell table:style-name="ce178" table:number-columns-repeated="2"/>
          <table:table-cell table:style-name="ce184"/>
          <table:table-cell table:style-name="ce178"/>
          <table:table-cell table:style-name="ce218"/>
          <table:table-cell table:style-name="ce221"/>
          <table:table-cell table:style-name="ce197"/>
          <table:table-cell table:style-name="ce221"/>
          <table:table-cell table:style-name="ce184"/>
          <table:table-cell/>
        </table:table-row>
        <table:table-row table:style-name="ro4" table:number-rows-repeated="65500">
          <table:table-cell table:number-columns-repeated="23"/>
        </table:table-row>
        <table:table-row table:style-name="ro4">
          <table:table-cell table:number-columns-repeated="23"/>
        </table:table-row>
        <calcext:conditional-formats>
          <calcext:conditional-format calcext:target-range-address="Seeds.B3:Seeds.B3">
            <calcext:condition calcext:apply-style-name="DeadNBurried" calcext:value="formula-is([.H3]=0)" calcext:base-cell-address="Finalists.B3"/>
            <calcext:condition calcext:apply-style-name="SeededVsSeeded" calcext:value="formula-is(COUNTIF([.B$3:.B$34]; [.I3]) &gt; 0)" calcext:base-cell-address="Finalists.B3"/>
            <calcext:condition calcext:apply-style-name="AliveNWell" calcext:value="formula-is([.H3]=1)" calcext:base-cell-address="Finalists.B3"/>
          </calcext:conditional-format>
          <calcext:conditional-format calcext:target-range-address="Seeds.B4:Seeds.B34">
            <calcext:condition calcext:apply-style-name="DeadNBurried" calcext:value="formula-is([.H34]=0)" calcext:base-cell-address="Finalists.B34"/>
            <calcext:condition calcext:apply-style-name="SeededVsSeeded" calcext:value="formula-is(COUNTIF([.B$3:.B$34]; [.I34]) &gt; 0)" calcext:base-cell-address="Finalists.B34"/>
            <calcext:condition calcext:apply-style-name="AliveNWell" calcext:value="formula-is([.H34]=1)" calcext:base-cell-address="Finalists.B34"/>
          </calcext:conditional-format>
          <calcext:conditional-format calcext:target-range-address="Seeds.I3:Seeds.I34">
            <calcext:condition calcext:apply-style-name="Seeded" calcext:value="formula-is(COUNTIF([.B$3:.B$34]; [.I34]) &gt; 0)" calcext:base-cell-address="Finalists.I34"/>
          </calcext:conditional-format>
          <calcext:conditional-format calcext:target-range-address="Seeds.M3:Seeds.M34">
            <calcext:condition calcext:apply-style-name="DeadNBurried" calcext:value="formula-is([.S34]=0)" calcext:base-cell-address="Finalists.M34"/>
            <calcext:condition calcext:apply-style-name="SeededVsSeeded" calcext:value="formula-is(COUNTIF([.M$3:.M$34]; [.T34]) &gt; 0)" calcext:base-cell-address="Finalists.M34"/>
            <calcext:condition calcext:apply-style-name="AliveNWell" calcext:value="formula-is([.S34]=1)" calcext:base-cell-address="Finalists.M34"/>
          </calcext:conditional-format>
          <calcext:conditional-format calcext:target-range-address="Seeds.T3:Seeds.T34">
            <calcext:condition calcext:apply-style-name="Seeded" calcext:value="formula-is(COUNTIF([.M$3:.M$34]; [.T34]) &gt; 0)" calcext:base-cell-address="Finalists.T34"/>
          </calcext:conditional-format>
        </calcext:conditional-formats>
      </table:table>
      <table:table table:name="Stats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istBox" form:control-implementation="ooo:com.sun.star.form.component.ListBox" xml:id="control1" form:id="control1" form:dropdown="true" form:input-required="false" form:bound-column="1" form:linked-cell="Stats.A28" form:list-linkage-type="selection" form:source-cell-range="Extra.AT1:Extra.AT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ListBox" form:control-implementation="ooo:com.sun.star.form.component.ListBox" xml:id="control2" form:id="control2" form:dropdown="true" form:input-required="false" form:bound-column="1" form:linked-cell="Stats.A29" form:list-linkage-type="selection" form:source-cell-range="Extra.AT1:Extra.AT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ListBox" form:control-implementation="ooo:com.sun.star.form.component.ListBox" xml:id="control3" form:id="control3" form:dropdown="true" form:input-required="false" form:bound-column="1" form:linked-cell="Stats.A30" form:list-linkage-type="selection" form:source-cell-range="Extra.AT1:Extra.AT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table-column table:style-name="co44" table:default-cell-style-name="Default"/>
        <table:table-column table:style-name="co45" table:default-cell-style-name="ce259"/>
        <table:table-column table:style-name="co27" table:default-cell-style-name="ce259"/>
        <table:table-column table:style-name="co29" table:default-cell-style-name="ce259"/>
        <table:table-column table:style-name="co46" table:number-columns-repeated="13" table:default-cell-style-name="ce259"/>
        <table:table-column table:style-name="co47" table:default-cell-style-name="Default"/>
        <table:table-column table:style-name="co22" table:number-columns-repeated="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1" table:number-columns-repeated="4" table:default-cell-style-name="Default"/>
        <table:table-column table:style-name="co22" table:number-columns-repeated="215" table:default-cell-style-name="Default"/>
        <table:table-row table:style-name="ro1">
          <table:table-cell table:style-name="ce228"/>
          <table:table-cell table:style-name="ce186" office:value-type="string" calcext:value-type="string" table:number-columns-spanned="2" table:number-rows-spanned="1">
            <text:p>Entry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Rnd 1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Rnd 2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Rnd 3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PQF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QF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SF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F</text:p>
          </table:table-cell>
          <table:covered-table-cell table:style-name="ce186"/>
          <table:table-cell table:style-name="ce186"/>
          <table:table-cell table:style-name="ce106" table:number-columns-repeated="234"/>
        </table:table-row>
        <table:table-row table:style-name="ro1">
          <table:table-cell table:style-name="ce249"/>
          <table:table-cell table:style-name="ce253" office:value-type="string" calcext:value-type="string">
            <text:p>M</text:p>
          </table:table-cell>
          <table:table-cell table:style-name="ce253" office:value-type="string" calcext:value-type="string">
            <text:p>W</text:p>
          </table:table-cell>
          <table:table-cell table:style-name="ce186" office:value-type="string" calcext:value-type="string">
            <text:p>M</text:p>
          </table:table-cell>
          <table:table-cell table:style-name="ce186" office:value-type="string" calcext:value-type="string">
            <text:p>W</text:p>
          </table:table-cell>
          <table:table-cell table:style-name="ce253" office:value-type="string" calcext:value-type="string">
            <text:p>M</text:p>
          </table:table-cell>
          <table:table-cell table:style-name="ce253" office:value-type="string" calcext:value-type="string">
            <text:p>W</text:p>
          </table:table-cell>
          <table:table-cell table:style-name="ce253" office:value-type="string" calcext:value-type="string">
            <text:p>M</text:p>
          </table:table-cell>
          <table:table-cell table:style-name="ce253" office:value-type="string" calcext:value-type="string">
            <text:p>W</text:p>
          </table:table-cell>
          <table:table-cell table:style-name="ce253" office:value-type="string" calcext:value-type="string">
            <text:p>M</text:p>
          </table:table-cell>
          <table:table-cell table:style-name="ce253" office:value-type="string" calcext:value-type="string">
            <text:p>W</text:p>
          </table:table-cell>
          <table:table-cell table:style-name="ce253" office:value-type="string" calcext:value-type="string">
            <text:p>M</text:p>
          </table:table-cell>
          <table:table-cell table:style-name="ce253" office:value-type="string" calcext:value-type="string">
            <text:p>W</text:p>
          </table:table-cell>
          <table:table-cell table:style-name="ce253" office:value-type="string" calcext:value-type="string">
            <text:p>M</text:p>
          </table:table-cell>
          <table:table-cell table:style-name="ce253" office:value-type="string" calcext:value-type="string">
            <text:p>W</text:p>
          </table:table-cell>
          <table:table-cell table:style-name="ce253" office:value-type="string" calcext:value-type="string">
            <text:p>M</text:p>
          </table:table-cell>
          <table:table-cell table:style-name="ce253" office:value-type="string" calcext:value-type="string">
            <text:p>W</text:p>
          </table:table-cell>
          <table:table-cell table:style-name="ce167"/>
          <table:table-cell table:number-columns-repeated="234"/>
        </table:table-row>
        <table:table-row table:style-name="ro1">
          <table:table-cell table:style-name="ce250" office:value-type="string" calcext:value-type="string">
            <text:p>Index</text:p>
          </table:table-cell>
          <table:table-cell table:style-name="ce254" table:number-columns-repeated="2"/>
          <table:table-cell table:style-name="ce254" table:formula="of:=MATCH(&quot;Round 1&quot;; [$ML.$A$2:.$AZ$2]; 1)" office:value-type="float" office:value="1" calcext:value-type="float">
            <text:p>1</text:p>
          </table:table-cell>
          <table:table-cell table:style-name="ce254" table:formula="of:=MATCH(&quot;Round 1&quot;; [$FL.$A$2:.$AZ$2]; 1)" office:value-type="float" office:value="1" calcext:value-type="float">
            <text:p>1</text:p>
          </table:table-cell>
          <table:table-cell table:style-name="ce254" table:formula="of:=MATCH(&quot;Round 2&quot;; [$ML.$A$2:.$AZ$2]; 1)" office:value-type="float" office:value="11" calcext:value-type="float">
            <text:p>11</text:p>
          </table:table-cell>
          <table:table-cell table:style-name="ce254" table:formula="of:=MATCH(&quot;Round 2&quot;; [$FL.$A$2:.$AZ$2]; 1)" office:value-type="float" office:value="9" calcext:value-type="float">
            <text:p>9</text:p>
          </table:table-cell>
          <table:table-cell table:style-name="ce254" table:formula="of:=MATCH(&quot;Round 3&quot;; [$ML.$A$2:.$AZ$2]; 1)" office:value-type="float" office:value="21" calcext:value-type="float">
            <text:p>21</text:p>
          </table:table-cell>
          <table:table-cell table:style-name="ce254" table:formula="of:=MATCH(&quot;Round 3&quot;; [$FL.$A$2:.$AZ$2]; 1)" office:value-type="float" office:value="17" calcext:value-type="float">
            <text:p>17</text:p>
          </table:table-cell>
          <table:table-cell table:style-name="ce254" table:formula="of:=MATCH(&quot;^Round 4$&quot;; [$ML.$A$2:.$AZ$2]; 1)" office:value-type="float" office:value="31" calcext:value-type="float">
            <text:p>31</text:p>
          </table:table-cell>
          <table:table-cell table:style-name="ce254" table:formula="of:=MATCH(&quot;^Round 4$&quot;; [$FL.$A$2:.$AZ$2]; 1)" office:value-type="float" office:value="25" calcext:value-type="float">
            <text:p>25</text:p>
          </table:table-cell>
          <table:table-cell table:style-name="ce254" table:formula="of:=MATCH(&quot;^Quarter Final$&quot;; [$Finals.$A$2:.$AZ$2]; 1)" office:value-type="float" office:value="11" calcext:value-type="float">
            <text:p>11</text:p>
          </table:table-cell>
          <table:table-cell table:style-name="ce254" table:formula="of:=MATCH(&quot;^Quarter Final$&quot;; [$Finals.$A$2:.$AZ$2]; 1)" office:value-type="float" office:value="11" calcext:value-type="float">
            <text:p>11</text:p>
          </table:table-cell>
          <table:table-cell table:style-name="ce254" table:formula="of:=MATCH(&quot;^Semi Final$&quot;; [$Finals.$A$2:.$AZ$2]; 1)" office:value-type="float" office:value="21" calcext:value-type="float">
            <text:p>21</text:p>
          </table:table-cell>
          <table:table-cell table:style-name="ce254" table:formula="of:=MATCH(&quot;^Semi Final$&quot;; [$Finals.$A$2:.$AZ$2]; 1)" office:value-type="float" office:value="21" calcext:value-type="float">
            <text:p>21</text:p>
          </table:table-cell>
          <table:table-cell table:style-name="ce254" table:formula="of:=MATCH(&quot;^Final$&quot;; [$Finals.$A$2:.$AZ$2]; 1)" office:value-type="float" office:value="31" calcext:value-type="float">
            <text:p>31</text:p>
          </table:table-cell>
          <table:table-cell table:style-name="ce254" table:formula="of:=MATCH(&quot;^Final$&quot;; [$Finals.$A$2:.$AZ$2]; 1)" office:value-type="float" office:value="31" calcext:value-type="float">
            <text:p>31</text:p>
          </table:table-cell>
          <table:table-cell table:style-name="ce266"/>
          <table:table-cell table:number-columns-repeated="234"/>
        </table:table-row>
        <table:table-row table:style-name="ro1">
          <table:table-cell table:style-name="ce251" office:value-type="string" calcext:value-type="string">
            <text:p>Qualifiers Left</text:p>
          </table:table-cell>
          <table:table-cell table:style-name="ce476" table:formula="of:=COUNTIF([ML.A4:.A130]; &quot;Q&quot;)" office:value-type="float" office:value="0" calcext:value-type="float">
            <text:p>0</text:p>
          </table:table-cell>
          <table:table-cell table:style-name="ce481" table:formula="of:=COUNTIF([FL.A4:.A131]; &quot;Q&quot;)" office:value-type="float" office:value="0" calcext:value-type="float">
            <text:p>0</text:p>
          </table:table-cell>
          <table:table-cell table:style-name="ce476" table:formula="of:=IF([.D$9]&gt;0; COUNTIF(INDIRECT(&quot;$&quot;&amp;[.X$7]&amp;&quot;.$&quot;&amp;[.X$11]); [.$W4]); &quot;&quot;)">
            <text:p/>
          </table:table-cell>
          <table:table-cell table:style-name="ce481" table:formula="of:=IF([.E$9]&gt;0; COUNTIF(INDIRECT(&quot;$&quot;&amp;[.Y$7]&amp;&quot;.$&quot;&amp;[.Y$11]); [.$W4]); &quot;&quot;)">
            <text:p/>
          </table:table-cell>
          <table:table-cell table:style-name="ce476" table:formula="of:=IF([.F$9]&gt;0; COUNTIF(INDIRECT(&quot;$&quot;&amp;[.Z$7]&amp;&quot;.$&quot;&amp;[.Z$11]); [.$W4]); &quot;&quot;)">
            <text:p/>
          </table:table-cell>
          <table:table-cell table:style-name="ce481" table:formula="of:=IF([.G$9]&gt;0; COUNTIF(INDIRECT(&quot;$&quot;&amp;[.AA$7]&amp;&quot;.$&quot;&amp;[.AA$11]); [.$W4]); &quot;&quot;)">
            <text:p/>
          </table:table-cell>
          <table:table-cell table:style-name="ce476" table:formula="of:=IF([.H$9]&gt;0; COUNTIF(INDIRECT(&quot;$&quot;&amp;[.AB$7]&amp;&quot;.$&quot;&amp;[.AB$11]); [.$W4]); &quot;&quot;)">
            <text:p/>
          </table:table-cell>
          <table:table-cell table:style-name="ce481" table:formula="of:=IF([.I$9]&gt;0; COUNTIF(INDIRECT(&quot;$&quot;&amp;[.AC$7]&amp;&quot;.$&quot;&amp;[.AC$11]); [.$W4]); &quot;&quot;)">
            <text:p/>
          </table:table-cell>
          <table:table-cell table:style-name="ce476" table:formula="of:=IF([.J$9]&gt;0; COUNTIF(INDIRECT(&quot;$&quot;&amp;[.AD$7]&amp;&quot;.$&quot;&amp;[.AD$11]); [.$W4]); &quot;&quot;)">
            <text:p/>
          </table:table-cell>
          <table:table-cell table:style-name="ce481" table:formula="of:=IF([.K$9]&gt;0; COUNTIF(INDIRECT(&quot;$&quot;&amp;[.AE$7]&amp;&quot;.$&quot;&amp;[.AE$11]); [.$W4]); &quot;&quot;)">
            <text:p/>
          </table:table-cell>
          <table:table-cell table:style-name="ce476" table:formula="of:=IF([.L$9]&gt;0; COUNTIF(INDIRECT(&quot;$&quot;&amp;[.AF$7]&amp;&quot;.$&quot;&amp;[.AF$11]); [.$W4]); &quot;&quot;)">
            <text:p/>
          </table:table-cell>
          <table:table-cell table:style-name="ce481" table:formula="of:=IF([.M$9]&gt;0; COUNTIF(INDIRECT(&quot;$&quot;&amp;[.AG$7]&amp;&quot;.$&quot;&amp;[.AG$11]); [.$W4]); &quot;&quot;)">
            <text:p/>
          </table:table-cell>
          <table:table-cell table:style-name="ce476" table:formula="of:=IF([.N$9]&gt;0; COUNTIF(INDIRECT(&quot;$&quot;&amp;[.AH$7]&amp;&quot;.$&quot;&amp;[.AH$11]); [.$W4]); &quot;&quot;)">
            <text:p/>
          </table:table-cell>
          <table:table-cell table:style-name="ce481" table:formula="of:=IF([.O$9]&gt;0; COUNTIF(INDIRECT(&quot;$&quot;&amp;[.AI$7]&amp;&quot;.$&quot;&amp;[.AI$11]); [.$W4]); &quot;&quot;)">
            <text:p/>
          </table:table-cell>
          <table:table-cell table:style-name="ce476" table:formula="of:=IF([.P$9]&gt;0; COUNTIF(INDIRECT(&quot;$&quot;&amp;[.AJ$7]&amp;&quot;.$&quot;&amp;[.AJ$11]); [.$W4]); &quot;&quot;)">
            <text:p/>
          </table:table-cell>
          <table:table-cell table:style-name="ce481" table:formula="of:=IF([.Q$9]&gt;0; COUNTIF(INDIRECT(&quot;$&quot;&amp;[.AK$7]&amp;&quot;.$&quot;&amp;[.AK$11]); [.$W4]); &quot;&quot;)">
            <text:p/>
          </table:table-cell>
          <table:table-cell table:style-name="ce267"/>
          <table:table-cell table:number-columns-repeated="4"/>
          <table:table-cell office:value-type="string" calcext:value-type="string">
            <text:p>Q</text:p>
          </table:table-cell>
          <table:table-cell table:number-columns-repeated="229"/>
        </table:table-row>
        <table:table-row table:style-name="ro1">
          <table:table-cell table:style-name="ce250" office:value-type="string" calcext:value-type="string">
            <text:p>Wildcards Left</text:p>
          </table:table-cell>
          <table:table-cell table:style-name="ce477" table:formula="of:=COUNTIF([ML.A4:.A130]; &quot;W&quot;) + COUNTIF([ML.A4:.A130]; &quot;WC&quot;)" office:value-type="float" office:value="0" calcext:value-type="float">
            <text:p>0</text:p>
          </table:table-cell>
          <table:table-cell table:style-name="ce482" table:formula="of:=COUNTIF([FL.A4:.A130]; &quot;W&quot;) + COUNTIF([FL.A4:.A130]; &quot;WC&quot;)" office:value-type="float" office:value="0" calcext:value-type="float">
            <text:p>0</text:p>
          </table:table-cell>
          <table:table-cell table:style-name="ce477" table:formula="of:=IF([.D$9]&gt;0; COUNTIF(INDIRECT(&quot;$&quot;&amp;[.X$7]&amp;&quot;.$&quot;&amp;[.X$11]); [.$W5]); &quot;&quot;)">
            <text:p/>
          </table:table-cell>
          <table:table-cell table:style-name="ce482" table:formula="of:=IF([.E$9]&gt;0; COUNTIF(INDIRECT(&quot;$&quot;&amp;[.Y$7]&amp;&quot;.$&quot;&amp;[.Y$11]); [.$W5]); &quot;&quot;)">
            <text:p/>
          </table:table-cell>
          <table:table-cell table:style-name="ce477" table:formula="of:=IF([.F$9]&gt;0; COUNTIF(INDIRECT(&quot;$&quot;&amp;[.Z$7]&amp;&quot;.$&quot;&amp;[.Z$11]); [.$W5]); &quot;&quot;)">
            <text:p/>
          </table:table-cell>
          <table:table-cell table:style-name="ce482" table:formula="of:=IF([.G$9]&gt;0; COUNTIF(INDIRECT(&quot;$&quot;&amp;[.AA$7]&amp;&quot;.$&quot;&amp;[.AA$11]); [.$W5]); &quot;&quot;)">
            <text:p/>
          </table:table-cell>
          <table:table-cell table:style-name="ce477" table:formula="of:=IF([.H$9]&gt;0; COUNTIF(INDIRECT(&quot;$&quot;&amp;[.AB$7]&amp;&quot;.$&quot;&amp;[.AB$11]); [.$W5]); &quot;&quot;)">
            <text:p/>
          </table:table-cell>
          <table:table-cell table:style-name="ce482" table:formula="of:=IF([.I$9]&gt;0; COUNTIF(INDIRECT(&quot;$&quot;&amp;[.AC$7]&amp;&quot;.$&quot;&amp;[.AC$11]); [.$W5]); &quot;&quot;)">
            <text:p/>
          </table:table-cell>
          <table:table-cell table:style-name="ce477" table:formula="of:=IF([.J$9]&gt;0; COUNTIF(INDIRECT(&quot;$&quot;&amp;[.AD$7]&amp;&quot;.$&quot;&amp;[.AD$11]); [.$W5]); &quot;&quot;)">
            <text:p/>
          </table:table-cell>
          <table:table-cell table:style-name="ce482" table:formula="of:=IF([.K$9]&gt;0; COUNTIF(INDIRECT(&quot;$&quot;&amp;[.AE$7]&amp;&quot;.$&quot;&amp;[.AE$11]); [.$W5]); &quot;&quot;)">
            <text:p/>
          </table:table-cell>
          <table:table-cell table:style-name="ce477" table:formula="of:=IF([.L$9]&gt;0; COUNTIF(INDIRECT(&quot;$&quot;&amp;[.AF$7]&amp;&quot;.$&quot;&amp;[.AF$11]); [.$W5]); &quot;&quot;)">
            <text:p/>
          </table:table-cell>
          <table:table-cell table:style-name="ce482" table:formula="of:=IF([.M$9]&gt;0; COUNTIF(INDIRECT(&quot;$&quot;&amp;[.AG$7]&amp;&quot;.$&quot;&amp;[.AG$11]); [.$W5]); &quot;&quot;)">
            <text:p/>
          </table:table-cell>
          <table:table-cell table:style-name="ce477" table:formula="of:=IF([.N$9]&gt;0; COUNTIF(INDIRECT(&quot;$&quot;&amp;[.AH$7]&amp;&quot;.$&quot;&amp;[.AH$11]); [.$W5]); &quot;&quot;)">
            <text:p/>
          </table:table-cell>
          <table:table-cell table:style-name="ce482" table:formula="of:=IF([.O$9]&gt;0; COUNTIF(INDIRECT(&quot;$&quot;&amp;[.AI$7]&amp;&quot;.$&quot;&amp;[.AI$11]); [.$W5]); &quot;&quot;)">
            <text:p/>
          </table:table-cell>
          <table:table-cell table:style-name="ce477" table:formula="of:=IF([.P$9]&gt;0; COUNTIF(INDIRECT(&quot;$&quot;&amp;[.AJ$7]&amp;&quot;.$&quot;&amp;[.AJ$11]); [.$W5]); &quot;&quot;)">
            <text:p/>
          </table:table-cell>
          <table:table-cell table:style-name="ce482" table:formula="of:=IF([.Q$9]&gt;0; COUNTIF(INDIRECT(&quot;$&quot;&amp;[.AK$7]&amp;&quot;.$&quot;&amp;[.AK$11]); [.$W5]); &quot;&quot;)">
            <text:p/>
          </table:table-cell>
          <table:table-cell table:style-name="ce266"/>
          <table:table-cell table:number-columns-repeated="4"/>
          <table:table-cell office:value-type="string" calcext:value-type="string">
            <text:p>W</text:p>
          </table:table-cell>
          <table:table-cell table:number-columns-repeated="229"/>
        </table:table-row>
        <table:table-row table:style-name="ro1">
          <table:table-cell table:style-name="ce251" office:value-type="string" calcext:value-type="string">
            <text:p>Lucky Losers Left</text:p>
          </table:table-cell>
          <table:table-cell table:style-name="ce476" table:formula="of:=COUNTIF([ML.A4:.A130]; &quot;L&quot;) + COUNTIF([ML.A4:.A130]; &quot;LL&quot;)" office:value-type="float" office:value="0" calcext:value-type="float">
            <text:p>0</text:p>
          </table:table-cell>
          <table:table-cell table:style-name="ce481" table:formula="of:=COUNTIF([FL.A4:.A130]; &quot;L&quot;) + COUNTIF([FL.A4:.A130]; &quot;LL&quot;)" office:value-type="float" office:value="0" calcext:value-type="float">
            <text:p>0</text:p>
          </table:table-cell>
          <table:table-cell table:style-name="ce476" table:formula="of:=IF([.D$9]&gt;0; COUNTIF(INDIRECT(&quot;$&quot;&amp;[.X$7]&amp;&quot;.$&quot;&amp;[.X$11]); [.$W6]); &quot;&quot;)">
            <text:p/>
          </table:table-cell>
          <table:table-cell table:style-name="ce476" table:formula="of:=IF([.E$9]&gt;0; COUNTIF(INDIRECT(&quot;$&quot;&amp;[.Y$7]&amp;&quot;.$&quot;&amp;[.Y$11]); [.$W$6]); &quot;&quot;)">
            <text:p/>
          </table:table-cell>
          <table:table-cell table:style-name="ce476" table:formula="of:=IF([.F$9]&gt;0; COUNTIF(INDIRECT(&quot;$&quot;&amp;[.Z$7]&amp;&quot;.$&quot;&amp;[.Z$11]); [.$W$6]); &quot;&quot;)">
            <text:p/>
          </table:table-cell>
          <table:table-cell table:style-name="ce476" table:formula="of:=IF([.G$9]&gt;0; COUNTIF(INDIRECT(&quot;$&quot;&amp;[.AA$7]&amp;&quot;.$&quot;&amp;[.AA$11]); [.$W$6]); &quot;&quot;)">
            <text:p/>
          </table:table-cell>
          <table:table-cell table:style-name="ce476" table:formula="of:=IF([.H$9]&gt;0; COUNTIF(INDIRECT(&quot;$&quot;&amp;[.AB$7]&amp;&quot;.$&quot;&amp;[.AB$11]); [.$W$6]); &quot;&quot;)">
            <text:p/>
          </table:table-cell>
          <table:table-cell table:style-name="ce476" table:formula="of:=IF([.I$9]&gt;0; COUNTIF(INDIRECT(&quot;$&quot;&amp;[.AC$7]&amp;&quot;.$&quot;&amp;[.AC$11]); [.$W$6]); &quot;&quot;)">
            <text:p/>
          </table:table-cell>
          <table:table-cell table:style-name="ce476" table:formula="of:=IF([.J$9]&gt;0; COUNTIF(INDIRECT(&quot;$&quot;&amp;[.AD$7]&amp;&quot;.$&quot;&amp;[.AD$11]); [.$W$6]); &quot;&quot;)">
            <text:p/>
          </table:table-cell>
          <table:table-cell table:style-name="ce476" table:formula="of:=IF([.K$9]&gt;0; COUNTIF(INDIRECT(&quot;$&quot;&amp;[.AE$7]&amp;&quot;.$&quot;&amp;[.AE$11]); [.$W$6]); &quot;&quot;)">
            <text:p/>
          </table:table-cell>
          <table:table-cell table:style-name="ce476" table:formula="of:=IF([.L$9]&gt;0; COUNTIF(INDIRECT(&quot;$&quot;&amp;[.AF$7]&amp;&quot;.$&quot;&amp;[.AF$11]); [.$W$6]); &quot;&quot;)">
            <text:p/>
          </table:table-cell>
          <table:table-cell table:style-name="ce476" table:formula="of:=IF([.M$9]&gt;0; COUNTIF(INDIRECT(&quot;$&quot;&amp;[.AG$7]&amp;&quot;.$&quot;&amp;[.AG$11]); [.$W$6]); &quot;&quot;)">
            <text:p/>
          </table:table-cell>
          <table:table-cell table:style-name="ce476" table:formula="of:=IF([.N$9]&gt;0; COUNTIF(INDIRECT(&quot;$&quot;&amp;[.AH$7]&amp;&quot;.$&quot;&amp;[.AH$11]); [.$W$6]); &quot;&quot;)">
            <text:p/>
          </table:table-cell>
          <table:table-cell table:style-name="ce476" table:formula="of:=IF([.O$9]&gt;0; COUNTIF(INDIRECT(&quot;$&quot;&amp;[.AI$7]&amp;&quot;.$&quot;&amp;[.AI$11]); [.$W$6]); &quot;&quot;)">
            <text:p/>
          </table:table-cell>
          <table:table-cell table:style-name="ce476" table:formula="of:=IF([.P$9]&gt;0; COUNTIF(INDIRECT(&quot;$&quot;&amp;[.AJ$7]&amp;&quot;.$&quot;&amp;[.AJ$11]); [.$W$6]); &quot;&quot;)">
            <text:p/>
          </table:table-cell>
          <table:table-cell table:style-name="ce476" table:formula="of:=IF([.Q$9]&gt;0; COUNTIF(INDIRECT(&quot;$&quot;&amp;[.AK$7]&amp;&quot;.$&quot;&amp;[.AK$11]); [.$W$6]); &quot;&quot;)">
            <text:p/>
          </table:table-cell>
          <table:table-cell table:style-name="ce267"/>
          <table:table-cell table:number-columns-repeated="4"/>
          <table:table-cell office:value-type="string" calcext:value-type="string">
            <text:p>L</text:p>
          </table:table-cell>
          <table:table-cell table:number-columns-repeated="229"/>
        </table:table-row>
        <table:table-row table:style-name="ro1">
          <table:table-cell table:style-name="ce250" office:value-type="string" calcext:value-type="string">
            <text:p>Seeds Left</text:p>
          </table:table-cell>
          <table:table-cell table:style-name="ce477" table:formula="of:=[.B9]-[.B4]-[.B5]-[.B6]-[.B8]-[.B14]" office:value-type="float" office:value="0" calcext:value-type="float">
            <text:p>0</text:p>
          </table:table-cell>
          <table:table-cell table:style-name="ce482" table:formula="of:=[.C9]-[.C4]-[.C5]-[.C6]-[.C8]-[.C14]" office:value-type="float" office:value="0" calcext:value-type="float">
            <text:p>0</text:p>
          </table:table-cell>
          <table:table-cell table:style-name="ce477" table:formula="of:=IF([.D$9]&gt;0; [.D9]-[.D4]-[.D5]-[.D6]-[.D8]-[.D14]; &quot;&quot;)">
            <text:p/>
          </table:table-cell>
          <table:table-cell table:style-name="ce482" table:formula="of:=IF([.E$9]&gt;0; [.E9]-[.E4]-[.E5]-[.E6]-[.E8]-[.E14]; &quot;&quot;)">
            <text:p/>
          </table:table-cell>
          <table:table-cell table:style-name="ce477" table:formula="of:=IF([.F$9]&gt;0; [.F9]-[.F4]-[.F5]-[.F6]-[.F8]-[.F14]; &quot;&quot;)">
            <text:p/>
          </table:table-cell>
          <table:table-cell table:style-name="ce482" table:formula="of:=IF([.G$9]&gt;0; [.G9]-[.G4]-[.G5]-[.G6]-[.G8]-[.G14]; &quot;&quot;)">
            <text:p/>
          </table:table-cell>
          <table:table-cell table:style-name="ce477" table:formula="of:=IF([.H$9]&gt;0; [.H9]-[.H4]-[.H5]-[.H6]-[.H8]-[.H14]; &quot;&quot;)">
            <text:p/>
          </table:table-cell>
          <table:table-cell table:style-name="ce482" table:formula="of:=IF([.I$9]&gt;0; [.I9]-[.I4]-[.I5]-[.I6]-[.I8]-[.I14]; &quot;&quot;)">
            <text:p/>
          </table:table-cell>
          <table:table-cell table:style-name="ce477" table:formula="of:=IF([.J$9]&gt;0; [.J9]-[.J4]-[.J5]-[.J6]-[.J8]-[.J14]; &quot;&quot;)">
            <text:p/>
          </table:table-cell>
          <table:table-cell table:style-name="ce482" table:formula="of:=IF([.K$9]&gt;0; [.K9]-[.K4]-[.K5]-[.K6]-[.K8]-[.K14]; &quot;&quot;)">
            <text:p/>
          </table:table-cell>
          <table:table-cell table:style-name="ce477" table:formula="of:=IF([.L$9]&gt;0; [.L9]-[.L4]-[.L5]-[.L6]-[.L8]-[.L14]; &quot;&quot;)">
            <text:p/>
          </table:table-cell>
          <table:table-cell table:style-name="ce482" table:formula="of:=IF([.M$9]&gt;0; [.M9]-[.M4]-[.M5]-[.M6]-[.M8]-[.M14]; &quot;&quot;)">
            <text:p/>
          </table:table-cell>
          <table:table-cell table:style-name="ce477" table:formula="of:=IF([.N$9]&gt;0; [.N9]-[.N4]-[.N5]-[.N6]-[.N8]-[.N14]; &quot;&quot;)">
            <text:p/>
          </table:table-cell>
          <table:table-cell table:style-name="ce482" table:formula="of:=IF([.O$9]&gt;0; [.O9]-[.O4]-[.O5]-[.O6]-[.O8]-[.O14]; &quot;&quot;)">
            <text:p/>
          </table:table-cell>
          <table:table-cell table:style-name="ce477" table:formula="of:=IF([.P$9]&gt;0; [.P9]-[.P4]-[.P5]-[.P6]-[.P8]-[.P14]; &quot;&quot;)">
            <text:p/>
          </table:table-cell>
          <table:table-cell table:style-name="ce482" table:formula="of:=IF([.Q$9]&gt;0; [.Q9]-[.Q4]-[.Q5]-[.Q6]-[.Q8]-[.Q14]; &quot;&quot;)">
            <text:p/>
          </table:table-cell>
          <table:table-cell table:style-name="ce266"/>
          <table:table-cell table:number-columns-repeated="5"/>
          <table:table-cell office:value-type="string" calcext:value-type="string">
            <text:p>M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FL</text:p>
          </table:table-cell>
          <table:table-cell table:number-columns-repeated="8" office:value-type="string" calcext:value-type="string">
            <text:p>Finals</text:p>
          </table:table-cell>
          <table:table-cell table:number-columns-repeated="215"/>
        </table:table-row>
        <table:table-row table:style-name="ro1">
          <table:table-cell table:style-name="ce251" office:value-type="string" calcext:value-type="string">
            <text:p>Others Left</text:p>
          </table:table-cell>
          <table:table-cell table:style-name="ce476" table:formula="of:=COUNTBLANK([ML.A3:.A130])" office:value-type="float" office:value="128" calcext:value-type="float">
            <text:p>128</text:p>
          </table:table-cell>
          <table:table-cell table:style-name="ce481" table:formula="of:=COUNTBLANK([FL.A3:.A130])" office:value-type="float" office:value="128" calcext:value-type="float">
            <text:p>128</text:p>
          </table:table-cell>
          <table:table-cell table:style-name="ce476" table:formula="of:=IF([.D$9]&gt;0; COUNTIFS(INDIRECT(&quot;$&quot;&amp;[.X7]&amp;&quot;.$&quot;&amp;[.X11]); &quot;&quot;; INDIRECT(&quot;$&quot;&amp;[.X7]&amp;&quot;.$&quot;&amp;[.X13]); &quot;&lt;&gt;&quot;)-[.D12]+[.D$9]; &quot;&quot;)">
            <text:p/>
          </table:table-cell>
          <table:table-cell table:style-name="ce476" table:formula="of:=IF([.E$9]&gt;0; COUNTIFS(INDIRECT(&quot;$&quot;&amp;[.Y7]&amp;&quot;.$&quot;&amp;[.Y11]); &quot;&quot;; INDIRECT(&quot;$&quot;&amp;[.Y7]&amp;&quot;.$&quot;&amp;[.Y13]); &quot;&lt;&gt;&quot;)-[.E12]+[.E$9]; &quot;&quot;)">
            <text:p/>
          </table:table-cell>
          <table:table-cell table:style-name="ce476" table:formula="of:=IF([.F$9]&gt;0; COUNTIFS(INDIRECT(&quot;$&quot;&amp;[.Z7]&amp;&quot;.$&quot;&amp;[.Z11]); &quot;&quot;; INDIRECT(&quot;$&quot;&amp;[.Z7]&amp;&quot;.$&quot;&amp;[.Z13]); &quot;&lt;&gt;&quot;)-[.F12]+[.F$9]; &quot;&quot;)">
            <text:p/>
          </table:table-cell>
          <table:table-cell table:style-name="ce476" table:formula="of:=IF([.G$9]&gt;0; COUNTIFS(INDIRECT(&quot;$&quot;&amp;[.AA7]&amp;&quot;.$&quot;&amp;[.AA11]); &quot;&quot;; INDIRECT(&quot;$&quot;&amp;[.AA7]&amp;&quot;.$&quot;&amp;[.AA13]); &quot;&lt;&gt;&quot;)-[.G12]+[.G$9]; &quot;&quot;)">
            <text:p/>
          </table:table-cell>
          <table:table-cell table:style-name="ce476" table:formula="of:=IF([.H$9]&gt;0; COUNTIFS(INDIRECT(&quot;$&quot;&amp;[.AB7]&amp;&quot;.$&quot;&amp;[.AB11]); &quot;&quot;; INDIRECT(&quot;$&quot;&amp;[.AB7]&amp;&quot;.$&quot;&amp;[.AB13]); &quot;&lt;&gt;&quot;)-[.H12]+[.H$9]; &quot;&quot;)">
            <text:p/>
          </table:table-cell>
          <table:table-cell table:style-name="ce476" table:formula="of:=IF([.I$9]&gt;0; COUNTIFS(INDIRECT(&quot;$&quot;&amp;[.AC7]&amp;&quot;.$&quot;&amp;[.AC11]); &quot;&quot;; INDIRECT(&quot;$&quot;&amp;[.AC7]&amp;&quot;.$&quot;&amp;[.AC13]); &quot;&lt;&gt;&quot;)-[.I12]+[.I$9]; &quot;&quot;)">
            <text:p/>
          </table:table-cell>
          <table:table-cell table:style-name="ce476" table:formula="of:=IF([.J$9]&gt;0; COUNTIFS(INDIRECT(&quot;$&quot;&amp;[.AD7]&amp;&quot;.$&quot;&amp;[.AD11]); &quot;&quot;; INDIRECT(&quot;$&quot;&amp;[.AD7]&amp;&quot;.$&quot;&amp;[.AD13]); &quot;&lt;&gt;&quot;)-[.J12]+[.J$9]; &quot;&quot;)">
            <text:p/>
          </table:table-cell>
          <table:table-cell table:style-name="ce476" table:formula="of:=IF([.K$9]&gt;0; COUNTIFS(INDIRECT(&quot;$&quot;&amp;[.AE7]&amp;&quot;.$&quot;&amp;[.AE11]); &quot;&quot;; INDIRECT(&quot;$&quot;&amp;[.AE7]&amp;&quot;.$&quot;&amp;[.AE13]); &quot;&lt;&gt;&quot;)-[.K12]+[.K$9]; &quot;&quot;)">
            <text:p/>
          </table:table-cell>
          <table:table-cell table:style-name="ce476" table:formula="of:=IF([.L$9]&gt;0; COUNTIFS(INDIRECT(&quot;$&quot;&amp;[.AF7]&amp;&quot;.$&quot;&amp;[.AF11]); &quot;&quot;; INDIRECT(&quot;$&quot;&amp;[.AF7]&amp;&quot;.$&quot;&amp;[.AF13]); &quot;&lt;&gt;&quot;)-[.L12]+[.L$9]; &quot;&quot;)">
            <text:p/>
          </table:table-cell>
          <table:table-cell table:style-name="ce476" table:formula="of:=IF([.M$9]&gt;0; COUNTIFS(INDIRECT(&quot;$&quot;&amp;[.AG7]&amp;&quot;.$&quot;&amp;[.AG11]); &quot;&quot;; INDIRECT(&quot;$&quot;&amp;[.AG7]&amp;&quot;.$&quot;&amp;[.AG13]); &quot;&lt;&gt;&quot;)-[.M12]+[.M$9]; &quot;&quot;)">
            <text:p/>
          </table:table-cell>
          <table:table-cell table:style-name="ce476" table:formula="of:=IF([.N$9]&gt;0; COUNTIFS(INDIRECT(&quot;$&quot;&amp;[.AH7]&amp;&quot;.$&quot;&amp;[.AH11]); &quot;&quot;; INDIRECT(&quot;$&quot;&amp;[.AH7]&amp;&quot;.$&quot;&amp;[.AH13]); &quot;&lt;&gt;&quot;)-[.N12]+[.N$9]; &quot;&quot;)">
            <text:p/>
          </table:table-cell>
          <table:table-cell table:style-name="ce476" table:formula="of:=IF([.O$9]&gt;0; COUNTIFS(INDIRECT(&quot;$&quot;&amp;[.AI7]&amp;&quot;.$&quot;&amp;[.AI11]); &quot;&quot;; INDIRECT(&quot;$&quot;&amp;[.AI7]&amp;&quot;.$&quot;&amp;[.AI13]); &quot;&lt;&gt;&quot;)-[.O12]+[.O$9]; &quot;&quot;)">
            <text:p/>
          </table:table-cell>
          <table:table-cell table:style-name="ce476" table:formula="of:=IF([.P$9]&gt;0; COUNTIFS(INDIRECT(&quot;$&quot;&amp;[.AJ7]&amp;&quot;.$&quot;&amp;[.AJ11]); &quot;&quot;; INDIRECT(&quot;$&quot;&amp;[.AJ7]&amp;&quot;.$&quot;&amp;[.AJ13]); &quot;&lt;&gt;&quot;)-[.P12]+[.P$9]; &quot;&quot;)">
            <text:p/>
          </table:table-cell>
          <table:table-cell table:style-name="ce476" table:formula="of:=IF([.Q$9]&gt;0; COUNTIFS(INDIRECT(&quot;$&quot;&amp;[.AK7]&amp;&quot;.$&quot;&amp;[.AK11]); &quot;&quot;; INDIRECT(&quot;$&quot;&amp;[.AK7]&amp;&quot;.$&quot;&amp;[.AK13]); &quot;&lt;&gt;&quot;)-[.Q12]+[.Q$9]; &quot;&quot;)">
            <text:p/>
          </table:table-cell>
          <table:table-cell table:style-name="ce267"/>
          <table:table-cell table:number-columns-repeated="3"/>
          <table:table-cell table:style-name="ce268"/>
          <table:table-cell/>
          <table:table-cell table:formula="of:=SUBSTITUTE(ADDRESS(1; [.D$3]+10; 4); &quot;1&quot;; &quot;&quot;)" office:value-type="string" office:string-value="K" calcext:value-type="string">
            <text:p>K</text:p>
          </table:table-cell>
          <table:table-cell table:formula="of:=SUBSTITUTE(ADDRESS(1; [.E$3]+8; 4); &quot;1&quot;; &quot;&quot;)" office:value-type="string" office:string-value="I" calcext:value-type="string">
            <text:p>I</text:p>
          </table:table-cell>
          <table:table-cell table:formula="of:=SUBSTITUTE(ADDRESS(1; [.F$3]+10; 4); &quot;1&quot;; &quot;&quot;)" office:value-type="string" office:string-value="U" calcext:value-type="string">
            <text:p>U</text:p>
          </table:table-cell>
          <table:table-cell table:formula="of:=SUBSTITUTE(ADDRESS(1; [.G$3]+8; 4); &quot;1&quot;; &quot;&quot;)" office:value-type="string" office:string-value="Q" calcext:value-type="string">
            <text:p>Q</text:p>
          </table:table-cell>
          <table:table-cell table:formula="of:=SUBSTITUTE(ADDRESS(1; [.H$3]+10; 4); &quot;1&quot;; &quot;&quot;)" office:value-type="string" office:string-value="AE" calcext:value-type="string">
            <text:p>AE</text:p>
          </table:table-cell>
          <table:table-cell table:formula="of:=SUBSTITUTE(ADDRESS(1; [.I$3]+8; 4); &quot;1&quot;; &quot;&quot;)" office:value-type="string" office:string-value="Y" calcext:value-type="string">
            <text:p>Y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U</text:p>
          </table:table-cell>
          <table:table-cell table:formula="of:=SUBSTITUTE(ADDRESS(1; [.N$3]+10; 4); &quot;1&quot;; &quot;&quot;)" office:value-type="string" office:string-value="AE" calcext:value-type="string">
            <text:p>AE</text:p>
          </table:table-cell>
          <table:table-cell table:number-columns-repeated="3" office:value-type="string" calcext:value-type="string">
            <text:p>AE</text:p>
          </table:table-cell>
          <table:table-cell table:number-columns-repeated="215"/>
        </table:table-row>
        <table:table-row table:style-name="ro1">
          <table:table-cell table:style-name="ce250" office:value-type="string" calcext:value-type="string">
            <text:p>Completed Matches</text:p>
          </table:table-cell>
          <table:table-cell table:style-name="ce477" office:value-type="float" office:value="128" calcext:value-type="float">
            <text:p>128</text:p>
          </table:table-cell>
          <table:table-cell table:style-name="ce482" office:value-type="float" office:value="128" calcext:value-type="float">
            <text:p>128</text:p>
          </table:table-cell>
          <table:table-cell table:style-name="ce477" table:formula="of:=COUNTIF(INDIRECT(&quot;$ML.$&quot;&amp;SUBSTITUTE(ADDRESS(1; [.D$3]+8; 4); &quot;1&quot;; &quot;&quot;)&amp;&quot;$&quot;&amp;WHICHROW1(1; (COLUMN()-2)/2)&amp;&quot;:$&quot;&amp;SUBSTITUTE(ADDRESS(1; [.D$3]+8; 4); &quot;1&quot;; &quot;&quot;)&amp;&quot;$&quot;&amp;WHICHROW2(1; (COLUMN()-2)/2)); &quot;W&quot;)" office:value-type="float" office:value="0" calcext:value-type="float">
            <text:p>0</text:p>
          </table:table-cell>
          <table:table-cell table:style-name="ce482" table:formula="of:=COUNTIF(INDIRECT(&quot;$FL.$&quot;&amp;SUBSTITUTE(ADDRESS(1; [.E$3]+6; 4); &quot;1&quot;; &quot;&quot;)&amp;&quot;$2:$&quot;&amp;SUBSTITUTE(ADDRESS(1; [.E$3]+6; 4); &quot;1&quot;; &quot;&quot;)&amp;&quot;$&quot;&amp;WHICHROW2(0; (COLUMN()-3)/2)); &quot;W&quot;)" office:value-type="float" office:value="0" calcext:value-type="float">
            <text:p>0</text:p>
          </table:table-cell>
          <table:table-cell table:style-name="ce477" table:formula="of:=COUNTIF(INDIRECT(&quot;$ML.$&quot;&amp;SUBSTITUTE(ADDRESS(1; [.F$3]+8; 4); &quot;1&quot;; &quot;&quot;)&amp;&quot;$&quot;&amp;WHICHROW1(1; (COLUMN()-2)/2)&amp;&quot;:$&quot;&amp;SUBSTITUTE(ADDRESS(1; [.F$3]+8; 4); &quot;1&quot;; &quot;&quot;)&amp;&quot;$&quot;&amp;WHICHROW2(1; (COLUMN()-2)/2)); &quot;W&quot;)" office:value-type="float" office:value="0" calcext:value-type="float">
            <text:p>0</text:p>
          </table:table-cell>
          <table:table-cell table:style-name="ce482" table:formula="of:=COUNTIF(INDIRECT(&quot;$FL.$&quot;&amp;SUBSTITUTE(ADDRESS(1; [.G$3]+6; 4); &quot;1&quot;; &quot;&quot;)&amp;&quot;$2:$&quot;&amp;SUBSTITUTE(ADDRESS(1; [.G$3]+6; 4); &quot;1&quot;; &quot;&quot;)&amp;&quot;$&quot;&amp;WHICHROW2(0; (COLUMN()-3)/2)); &quot;W&quot;)" office:value-type="float" office:value="0" calcext:value-type="float">
            <text:p>0</text:p>
          </table:table-cell>
          <table:table-cell table:style-name="ce477" table:formula="of:=COUNTIF(INDIRECT(&quot;$ML.$&quot;&amp;SUBSTITUTE(ADDRESS(1; [.H$3]+8; 4); &quot;1&quot;; &quot;&quot;)&amp;&quot;$&quot;&amp;WHICHROW1(1; (COLUMN()-2)/2)&amp;&quot;:$&quot;&amp;SUBSTITUTE(ADDRESS(1; [.H$3]+8; 4); &quot;1&quot;; &quot;&quot;)&amp;&quot;$&quot;&amp;WHICHROW2(1; (COLUMN()-2)/2)); &quot;W&quot;)" office:value-type="float" office:value="0" calcext:value-type="float">
            <text:p>0</text:p>
          </table:table-cell>
          <table:table-cell table:style-name="ce482" table:formula="of:=COUNTIF(INDIRECT(&quot;$FL.$&quot;&amp;SUBSTITUTE(ADDRESS(1; [.I$3]+6; 4); &quot;1&quot;; &quot;&quot;)&amp;&quot;$2:$&quot;&amp;SUBSTITUTE(ADDRESS(1; [.I$3]+6; 4); &quot;1&quot;; &quot;&quot;)&amp;&quot;$&quot;&amp;WHICHROW2(0; (COLUMN()-3)/2)); &quot;W&quot;)" office:value-type="float" office:value="0" calcext:value-type="float">
            <text:p>0</text:p>
          </table:table-cell>
          <table:table-cell table:style-name="ce477" table:formula="of:=COUNTIF(INDIRECT(&quot;$ML.$&quot;&amp;SUBSTITUTE(ADDRESS(1; [.J$3]+8; 4); &quot;1&quot;; &quot;&quot;)&amp;&quot;$&quot;&amp;WHICHROW1(1; (COLUMN()-2)/2)&amp;&quot;:$&quot;&amp;SUBSTITUTE(ADDRESS(1; [.J$3]+8; 4); &quot;1&quot;; &quot;&quot;)&amp;&quot;$&quot;&amp;WHICHROW2(1; (COLUMN()-2)/2)); &quot;W&quot;)" office:value-type="float" office:value="0" calcext:value-type="float">
            <text:p>0</text:p>
          </table:table-cell>
          <table:table-cell table:style-name="ce482" table:formula="of:=COUNTIF(INDIRECT(&quot;$FL.$&quot;&amp;SUBSTITUTE(ADDRESS(1; [.K$3]+6; 4); &quot;1&quot;; &quot;&quot;)&amp;&quot;$2:$&quot;&amp;SUBSTITUTE(ADDRESS(1; [.K$3]+6; 4); &quot;1&quot;; &quot;&quot;)&amp;&quot;$&quot;&amp;WHICHROW2(0; (COLUMN()-3)/2)); &quot;W&quot;)" office:value-type="float" office:value="0" calcext:value-type="float">
            <text:p>0</text:p>
          </table:table-cell>
          <table:table-cell table:style-name="ce477" table:formula="of:=COUNTIF(INDIRECT(&quot;$Finals.$&quot;&amp;SUBSTITUTE(ADDRESS(1; [.L$3]+8; 4); &quot;1&quot;; &quot;&quot;)&amp;&quot;$3:$&quot;&amp;SUBSTITUTE(ADDRESS(1; [.L$3]+8; 4); &quot;1&quot;; &quot;&quot;)&amp;&quot;$18&quot;); &quot;W&quot;)" office:value-type="float" office:value="0" calcext:value-type="float">
            <text:p>0</text:p>
          </table:table-cell>
          <table:table-cell table:style-name="ce482" table:formula="of:=COUNTIF(INDIRECT(&quot;$Finals.$&quot;&amp;SUBSTITUTE(ADDRESS(1; [.M$3]+8; 4); &quot;1&quot;; &quot;&quot;)&amp;&quot;$21:$&quot;&amp;SUBSTITUTE(ADDRESS(1; [.M$3]+8; 4); &quot;1&quot;; &quot;&quot;)&amp;&quot;$36&quot;); &quot;W&quot;)" office:value-type="float" office:value="0" calcext:value-type="float">
            <text:p>0</text:p>
          </table:table-cell>
          <table:table-cell table:style-name="ce477" table:formula="of:=COUNTIF(INDIRECT(&quot;$Finals.$&quot;&amp;SUBSTITUTE(ADDRESS(1; [.N$3]+8; 4); &quot;1&quot;; &quot;&quot;)&amp;&quot;$3:$&quot;&amp;SUBSTITUTE(ADDRESS(1; [.N$3]+8; 4); &quot;1&quot;; &quot;&quot;)&amp;&quot;$18&quot;); &quot;W&quot;)" office:value-type="float" office:value="0" calcext:value-type="float">
            <text:p>0</text:p>
          </table:table-cell>
          <table:table-cell table:style-name="ce482" table:formula="of:=COUNTIF(INDIRECT(&quot;$Finals.$&quot;&amp;SUBSTITUTE(ADDRESS(1; [.O$3]+8; 4); &quot;1&quot;; &quot;&quot;)&amp;&quot;$21:$&quot;&amp;SUBSTITUTE(ADDRESS(1; [.O$3]+8; 4); &quot;1&quot;; &quot;&quot;)&amp;&quot;$36&quot;); &quot;W&quot;)" office:value-type="float" office:value="0" calcext:value-type="float">
            <text:p>0</text:p>
          </table:table-cell>
          <table:table-cell table:style-name="ce477" table:formula="of:=COUNTIF(INDIRECT(&quot;$Finals.$&quot;&amp;SUBSTITUTE(ADDRESS(1; [.P$3]+8; 4); &quot;1&quot;; &quot;&quot;)&amp;&quot;$3:$&quot;&amp;SUBSTITUTE(ADDRESS(1; [.P$3]+8; 4); &quot;1&quot;; &quot;&quot;)&amp;&quot;$18&quot;); &quot;W&quot;)" office:value-type="float" office:value="0" calcext:value-type="float">
            <text:p>0</text:p>
          </table:table-cell>
          <table:table-cell table:style-name="ce482" table:formula="of:=COUNTIF(INDIRECT(&quot;$Finals.$&quot;&amp;SUBSTITUTE(ADDRESS(1; [.Q$3]+8; 4); &quot;1&quot;; &quot;&quot;)&amp;&quot;$21:$&quot;&amp;SUBSTITUTE(ADDRESS(1; [.Q$3]+8; 4); &quot;1&quot;; &quot;&quot;)&amp;&quot;$36&quot;); &quot;W&quot;)" office:value-type="float" office:value="0" calcext:value-type="float">
            <text:p>0</text:p>
          </table:table-cell>
          <table:table-cell table:style-name="ce266"/>
          <table:table-cell table:number-columns-repeated="4"/>
          <table:table-cell office:value-type="string" calcext:value-type="string">
            <text:p>W</text:p>
          </table:table-cell>
          <table:table-cell table:formula="of:=WHICHROW1(1; (COLUMN([.D8])-2)/2)" office:value-type="string" office:string-value="3" calcext:value-type="string">
            <text:p>3</text:p>
          </table:table-cell>
          <table:table-cell table:formula="of:=WHICHROW1(0; (COLUMN([.E8])-3)/2)" office:value-type="string" office:string-value="3" calcext:value-type="string">
            <text:p>3</text:p>
          </table:table-cell>
          <table:table-cell table:formula="of:=WHICHROW1(1; (COLUMN([.F8])-2)/2)" office:value-type="string" office:string-value="3" calcext:value-type="string">
            <text:p>3</text:p>
          </table:table-cell>
          <table:table-cell table:formula="of:=WHICHROW1(0; (COLUMN([.G8])-3)/2)" office:value-type="string" office:string-value="3" calcext:value-type="string">
            <text:p>3</text:p>
          </table:table-cell>
          <table:table-cell table:formula="of:=WHICHROW1(1; (COLUMN([.H8])-2)/2)" office:value-type="string" office:string-value="3" calcext:value-type="string">
            <text:p>3</text:p>
          </table:table-cell>
          <table:table-cell table:formula="of:=WHICHROW1(0; (COLUMN([.I8])-3)/2)" office:value-type="string" office:string-value="3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WHICHROW1(1; (COLUMN([.L8])-2)/2)" office:value-type="string" office:string-value="3" calcext:value-type="string">
            <text:p>3</text:p>
          </table:table-cell>
          <table:table-cell table:formula="of:=WHICHROW1(0; (COLUMN([.M8])-3)/2)" office:value-type="string" office:string-value="21" calcext:value-type="string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15"/>
        </table:table-row>
        <table:table-row table:style-name="ro1">
          <table:table-cell table:style-name="ce251" office:value-type="string" calcext:value-type="string">
            <text:p>Walk Overs</text:p>
          </table:table-cell>
          <table:table-cell table:style-name="ce476" table:formula="of:=[.D10]+[.F10]+[.H10]+[.J10]+[.L10]+[.N10]+[.P10]" office:value-type="float" office:value="0" calcext:value-type="float">
            <text:p>0</text:p>
          </table:table-cell>
          <table:table-cell table:style-name="ce481" table:formula="of:=[.E10]+[.G10]+[.I10]+[.K10]+[.M10]+[.O10]+[.Q10]" office:value-type="float" office:value="0" calcext:value-type="float">
            <text:p>0</text:p>
          </table:table-cell>
          <table:table-cell table:style-name="ce476" table:formula="of:=IF([.D9]&gt;0; COUNTIF(INDIRECT(&quot;$ML.$&quot;&amp;SUBSTITUTE(ADDRESS(1; [.D$3]+8; 4); &quot;1&quot;; &quot;&quot;)&amp;&quot;$&quot;&amp;WHICHROW1(1; (COLUMN()-2)/2)&amp;&quot;:$&quot;&amp;SUBSTITUTE(ADDRESS(1; [.D$3]+8; 4); &quot;1&quot;; &quot;&quot;)&amp;&quot;$&quot;&amp;WHICHROW2(1; (COLUMN()-2)/2)); &quot;R&quot;); 0)" office:value-type="float" office:value="0" calcext:value-type="float">
            <text:p>0</text:p>
          </table:table-cell>
          <table:table-cell table:style-name="ce481" table:formula="of:=IF([.D9]&gt;0; COUNTIF(INDIRECT(&quot;$FL.$&quot;&amp;SUBSTITUTE(ADDRESS(1; [.E$3]+6; 4); &quot;1&quot;; &quot;&quot;)&amp;&quot;$&quot;&amp;WHICHROW1(0; (COLUMN()-3)/2)&amp;&quot;:$&quot;&amp;SUBSTITUTE(ADDRESS(1; [.E$3]+6; 4); &quot;1&quot;; &quot;&quot;)&amp;&quot;$&quot;&amp;WHICHROW2(0; (COLUMN()-3)/2)); &quot;R&quot;); 0)" office:value-type="float" office:value="0" calcext:value-type="float">
            <text:p>0</text:p>
          </table:table-cell>
          <table:table-cell table:style-name="ce479" table:formula="of:=IF([.F9]&gt;0; COUNTIF(INDIRECT(&quot;$ML.$&quot;&amp;SUBSTITUTE(ADDRESS(1; [.F$3]+8; 4); &quot;1&quot;; &quot;&quot;)&amp;&quot;$&quot;&amp;WHICHROW1(1; (COLUMN()-2)/2)&amp;&quot;:$&quot;&amp;SUBSTITUTE(ADDRESS(1; [.F$3]+8; 4); &quot;1&quot;; &quot;&quot;)&amp;&quot;$&quot;&amp;WHICHROW2(1; (COLUMN()-2)/2)); &quot;R&quot;); 0)" office:value-type="float" office:value="0" calcext:value-type="float">
            <text:p>0</text:p>
          </table:table-cell>
          <table:table-cell table:style-name="ce481" table:formula="of:=IF([.F9]&gt;0; COUNTIF(INDIRECT(&quot;$FL.$&quot;&amp;SUBSTITUTE(ADDRESS(1; [.G$3]+6; 4); &quot;1&quot;; &quot;&quot;)&amp;&quot;$&quot;&amp;WHICHROW1(0; (COLUMN()-3)/2)&amp;&quot;:$&quot;&amp;SUBSTITUTE(ADDRESS(1; [.G$3]+6; 4); &quot;1&quot;; &quot;&quot;)&amp;&quot;$&quot;&amp;WHICHROW2(0; (COLUMN()-3)/2)); &quot;R&quot;); 0)" office:value-type="float" office:value="0" calcext:value-type="float">
            <text:p>0</text:p>
          </table:table-cell>
          <table:table-cell table:style-name="ce476" table:formula="of:=IF([.H9]&gt;0; COUNTIF(INDIRECT(&quot;$ML.$&quot;&amp;SUBSTITUTE(ADDRESS(1; [.H$3]+8; 4); &quot;1&quot;; &quot;&quot;)&amp;&quot;$&quot;&amp;WHICHROW1(1; (COLUMN()-2)/2)&amp;&quot;:$&quot;&amp;SUBSTITUTE(ADDRESS(1; [.H$3]+8; 4); &quot;1&quot;; &quot;&quot;)&amp;&quot;$&quot;&amp;WHICHROW2(1; (COLUMN()-2)/2)); &quot;R&quot;); 0)" office:value-type="float" office:value="0" calcext:value-type="float">
            <text:p>0</text:p>
          </table:table-cell>
          <table:table-cell table:style-name="ce481" table:formula="of:=IF([.H9]&gt;0; COUNTIF(INDIRECT(&quot;$FL.$&quot;&amp;SUBSTITUTE(ADDRESS(1; [.I$3]+6; 4); &quot;1&quot;; &quot;&quot;)&amp;&quot;$&quot;&amp;WHICHROW1(0; (COLUMN()-3)/2)&amp;&quot;:$&quot;&amp;SUBSTITUTE(ADDRESS(1; [.I$3]+6; 4); &quot;1&quot;; &quot;&quot;)&amp;&quot;$&quot;&amp;WHICHROW2(0; (COLUMN()-3)/2)); &quot;R&quot;); 0)" office:value-type="float" office:value="0" calcext:value-type="float">
            <text:p>0</text:p>
          </table:table-cell>
          <table:table-cell table:style-name="ce480" table:formula="of:=IF([.J9]&gt;0; COUNTIF(INDIRECT(&quot;$ML.$&quot;&amp;SUBSTITUTE(ADDRESS(1; [.J$3]+8; 4); &quot;1&quot;; &quot;&quot;)&amp;&quot;$3:$&quot;&amp;SUBSTITUTE(ADDRESS(1; [.J$3]+8; 4); &quot;1&quot;; &quot;&quot;)&amp;&quot;$130&quot;); &quot;R&quot;); 0)" office:value-type="float" office:value="0" calcext:value-type="float">
            <text:p>0</text:p>
          </table:table-cell>
          <table:table-cell table:style-name="ce487" table:formula="of:=IF([.K9]&gt;0; COUNTIF(INDIRECT(&quot;$FL.$&quot;&amp;SUBSTITUTE(ADDRESS(1; [.K$3]+6; 4); &quot;1&quot;; &quot;&quot;)&amp;&quot;$3:$&quot;&amp;SUBSTITUTE(ADDRESS(1; [.K$3]+6; 4); &quot;1&quot;; &quot;&quot;)&amp;&quot;$130&quot;); &quot;R&quot;); 0)" office:value-type="float" office:value="0" calcext:value-type="float">
            <text:p>0</text:p>
          </table:table-cell>
          <table:table-cell table:style-name="ce476" table:formula="of:=IF([.L9]&gt;0; COUNTIF(INDIRECT(&quot;$Finals.$&quot;&amp;SUBSTITUTE(ADDRESS(1; [.L$3]+8; 4); &quot;1&quot;; &quot;&quot;)&amp;&quot;$3:$&quot;&amp;SUBSTITUTE(ADDRESS(1; [.L$3]+8; 4); &quot;1&quot;; &quot;&quot;)&amp;&quot;$18&quot;); &quot;R&quot;); 0)" office:value-type="float" office:value="0" calcext:value-type="float">
            <text:p>0</text:p>
          </table:table-cell>
          <table:table-cell table:style-name="ce481" table:formula="of:=IF([.M9]&gt;0; COUNTIF(INDIRECT(&quot;$Finals.$&quot;&amp;SUBSTITUTE(ADDRESS(1; [.M$3]+8; 4); &quot;1&quot;; &quot;&quot;)&amp;&quot;$21:$&quot;&amp;SUBSTITUTE(ADDRESS(1; [.M$3]+8; 4); &quot;1&quot;; &quot;&quot;)&amp;&quot;$36&quot;); &quot;R&quot;); 0)" office:value-type="float" office:value="0" calcext:value-type="float">
            <text:p>0</text:p>
          </table:table-cell>
          <table:table-cell table:style-name="ce476" table:formula="of:=IF([.N9]&gt;0; COUNTIF(INDIRECT(&quot;$Finals.$&quot;&amp;SUBSTITUTE(ADDRESS(1; [.N$3]+8; 4); &quot;1&quot;; &quot;&quot;)&amp;&quot;$3:$&quot;&amp;SUBSTITUTE(ADDRESS(1; [.N$3]+8; 4); &quot;1&quot;; &quot;&quot;)&amp;&quot;$18&quot;); &quot;R&quot;); 0)" office:value-type="float" office:value="0" calcext:value-type="float">
            <text:p>0</text:p>
          </table:table-cell>
          <table:table-cell table:style-name="ce481" table:formula="of:=IF([.O9]&gt;0; COUNTIF(INDIRECT(&quot;$Finals.$&quot;&amp;SUBSTITUTE(ADDRESS(1; [.O$3]+8; 4); &quot;1&quot;; &quot;&quot;)&amp;&quot;$21:$&quot;&amp;SUBSTITUTE(ADDRESS(1; [.O$3]+8; 4); &quot;1&quot;; &quot;&quot;)&amp;&quot;$36&quot;); &quot;R&quot;); 0)" office:value-type="float" office:value="0" calcext:value-type="float">
            <text:p>0</text:p>
          </table:table-cell>
          <table:table-cell table:style-name="ce476" table:formula="of:=IF([.P9]&gt;0; COUNTIF(INDIRECT(&quot;$Finals.$&quot;&amp;SUBSTITUTE(ADDRESS(1; [.P$3]+8; 4); &quot;1&quot;; &quot;&quot;)&amp;&quot;$3:$&quot;&amp;SUBSTITUTE(ADDRESS(1; [.P$3]+8; 4); &quot;1&quot;; &quot;&quot;)&amp;&quot;$18&quot;); &quot;R&quot;); 0)" office:value-type="float" office:value="0" calcext:value-type="float">
            <text:p>0</text:p>
          </table:table-cell>
          <table:table-cell table:style-name="ce481" table:formula="of:=IF([.Q9]&gt;0; COUNTIF(INDIRECT(&quot;$Finals.$&quot;&amp;SUBSTITUTE(ADDRESS(1; [.Q$3]+8; 4); &quot;1&quot;; &quot;&quot;)&amp;&quot;$21:$&quot;&amp;SUBSTITUTE(ADDRESS(1; [.Q$3]+8; 4); &quot;1&quot;; &quot;&quot;)&amp;&quot;$36&quot;); &quot;R&quot;); 0)" office:value-type="float" office:value="0" calcext:value-type="float">
            <text:p>0</text:p>
          </table:table-cell>
          <table:table-cell table:style-name="ce267"/>
          <table:table-cell table:number-columns-repeated="4"/>
          <table:table-cell office:value-type="string" calcext:value-type="string">
            <text:p>R</text:p>
          </table:table-cell>
          <table:table-cell table:formula="of:=WHICHROW2(1;  (COLUMN([.D8])-2)/2)" office:value-type="string" office:string-value="130" calcext:value-type="string">
            <text:p>130</text:p>
          </table:table-cell>
          <table:table-cell table:formula="of:=WHICHROW2(0;  (COLUMN([.E8])-3)/2)" office:value-type="string" office:string-value="130" calcext:value-type="string">
            <text:p>130</text:p>
          </table:table-cell>
          <table:table-cell table:formula="of:=WHICHROW2(1;  (COLUMN([.F8])-2)/2)" office:value-type="string" office:string-value="130" calcext:value-type="string">
            <text:p>130</text:p>
          </table:table-cell>
          <table:table-cell table:formula="of:=WHICHROW2(0;  (COLUMN([.G8])-3)/2)" office:value-type="string" office:string-value="130" calcext:value-type="string">
            <text:p>130</text:p>
          </table:table-cell>
          <table:table-cell table:formula="of:=WHICHROW2(1;  (COLUMN([.H8])-2)/2)" office:value-type="string" office:string-value="130" calcext:value-type="string">
            <text:p>130</text:p>
          </table:table-cell>
          <table:table-cell table:formula="of:=WHICHROW2(0;  (COLUMN([.I8])-3)/2)" office:value-type="string" office:string-value="130" calcext:value-type="string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WHICHROW2(1;  (COLUMN([.L8])-2)/2)" office:value-type="string" office:string-value="18" calcext:value-type="string">
            <text:p>18</text:p>
          </table:table-cell>
          <table:table-cell table:formula="of:=WHICHROW2(0;  (COLUMN([.M8])-3)/2)" office:value-type="string" office:string-value="36" calcext:value-type="string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15"/>
        </table:table-row>
        <table:table-row table:style-name="ro1">
          <table:table-cell table:style-name="ce250" office:value-type="string" calcext:value-type="string">
            <text:p>% Seeds Left</text:p>
          </table:table-cell>
          <table:table-cell table:style-name="ce477"/>
          <table:table-cell table:style-name="ce482"/>
          <table:table-cell table:style-name="ce475" table:formula="of:=IF([.D7]=&quot;&quot;; &quot;&quot;; IF(AND([.$B$7]&gt;0; [.D7]&gt;0); [.D7]/[.B7]*100))">
            <text:p/>
          </table:table-cell>
          <table:table-cell table:style-name="ce478" table:formula="of:=IF([.E7]=&quot;&quot;; &quot;&quot;; IF(AND([.$C$7]&gt;0; [.E7]&gt;0); [.E7]/[.C7]*100))">
            <text:p/>
          </table:table-cell>
          <table:table-cell table:style-name="ce475" table:formula="of:=IF([.F7]=&quot;&quot;; &quot;&quot;; IF(AND([.$B$7]&gt;0; [.F7]&gt;0); [.F7]/[.D7]*100))">
            <text:p/>
          </table:table-cell>
          <table:table-cell table:style-name="ce478" table:formula="of:=IF([.G7]=&quot;&quot;; &quot;&quot;; IF(AND([.$C$7]&gt;0; [.G7]&gt;0); [.G7]/[.E7]*100))">
            <text:p/>
          </table:table-cell>
          <table:table-cell table:style-name="ce475" table:formula="of:=IF([.H7]=&quot;&quot;; &quot;&quot;; IF(AND([.$B$7]&gt;0; [.H7]&gt;0); [.H7]/[.F7]*100))">
            <text:p/>
          </table:table-cell>
          <table:table-cell table:style-name="ce478" table:formula="of:=IF([.I7]=&quot;&quot;; &quot;&quot;; IF(AND([.$C$7]&gt;0; [.I7]&gt;0); [.I7]/[.G7]*100))">
            <text:p/>
          </table:table-cell>
          <table:table-cell table:style-name="ce475" table:formula="of:=IF([.J7]=&quot;&quot;; &quot;&quot;; IF(AND([.$B$7]&gt;0; [.J7]&gt;0); [.J7]/[.H7]*100))">
            <text:p/>
          </table:table-cell>
          <table:table-cell table:style-name="ce478" table:formula="of:=IF([.K7]=&quot;&quot;; &quot;&quot;; IF(AND([.$C$7]&gt;0; [.K7]&gt;0); [.K7]/[.I7]*100))">
            <text:p/>
          </table:table-cell>
          <table:table-cell table:style-name="ce475" table:formula="of:=IF([.L7]=&quot;&quot;; &quot;&quot;; IF(AND([.$B$7]&gt;0; [.L7]&gt;0); [.L7]/[.J7]*100))">
            <text:p/>
          </table:table-cell>
          <table:table-cell table:style-name="ce478" table:formula="of:=IF([.M7]=&quot;&quot;; &quot;&quot;; IF(AND([.$C$7]&gt;0; [.M7]&gt;0); [.M7]/[.K7]*100))">
            <text:p/>
          </table:table-cell>
          <table:table-cell table:style-name="ce475" table:formula="of:=IF([.N7]=&quot;&quot;; &quot;&quot;; IF(AND([.$B$7]&gt;0; [.N7]&gt;0); [.N7]/[.L7]*100))">
            <text:p/>
          </table:table-cell>
          <table:table-cell table:style-name="ce478" table:formula="of:=IF([.O7]=&quot;&quot;; &quot;&quot;; IF(AND([.$C$7]&gt;0; [.O7]&gt;0); [.O7]/[.M7]*100))">
            <text:p/>
          </table:table-cell>
          <table:table-cell table:style-name="ce475" table:formula="of:=IF([.P7]=&quot;&quot;; &quot;&quot;; IF(AND([.$B$7]&gt;0; [.P7]&gt;0); [.P7]/[.N7]*100))">
            <text:p/>
          </table:table-cell>
          <table:table-cell table:style-name="ce478" table:formula="of:=IF([.Q7]=&quot;&quot;; &quot;&quot;; IF(AND([.$C$7]&gt;0; [.Q7]&gt;0); [.Q7]/[.O7]*100))">
            <text:p/>
          </table:table-cell>
          <table:table-cell table:style-name="ce266"/>
          <table:table-cell table:number-columns-repeated="5"/>
          <table:table-cell table:formula="of:=[.X8] &amp; [.X9] &amp; &quot;:&quot; &amp; [.X8] &amp; [.X10]" office:value-type="string" office:string-value="K3:K130" calcext:value-type="string">
            <text:p>K3:K130</text:p>
          </table:table-cell>
          <table:table-cell table:formula="of:=[.Y8] &amp; [.Y9] &amp; &quot;:&quot; &amp; [.Y8] &amp; [.Y10]" office:value-type="string" office:string-value="I3:I130" calcext:value-type="string">
            <text:p>I3:I130</text:p>
          </table:table-cell>
          <table:table-cell table:formula="of:=[.Z8] &amp; [.Z9] &amp; &quot;:&quot; &amp; [.Z8] &amp; [.Z10]" office:value-type="string" office:string-value="U3:U130" calcext:value-type="string">
            <text:p>U3:U130</text:p>
          </table:table-cell>
          <table:table-cell table:formula="of:=[.AA8] &amp; [.AA9] &amp; &quot;:&quot; &amp; [.AA8] &amp; [.AA10]" office:value-type="string" office:string-value="Q3:Q130" calcext:value-type="string">
            <text:p>Q3:Q130</text:p>
          </table:table-cell>
          <table:table-cell table:formula="of:=[.AB8] &amp; [.AB9] &amp; &quot;:&quot; &amp; [.AB8] &amp; [.AB10]" office:value-type="string" office:string-value="AE3:AE130" calcext:value-type="string">
            <text:p>AE3:AE130</text:p>
          </table:table-cell>
          <table:table-cell table:formula="of:=[.AC8] &amp; [.AC9] &amp; &quot;:&quot; &amp; [.AC8] &amp; [.AC10]" office:value-type="string" office:string-value="Y3:Y130" calcext:value-type="string">
            <text:p>Y3:Y130</text:p>
          </table:table-cell>
          <table:table-cell table:formula="of:=[.AD8] &amp; [.AD9] &amp; &quot;:&quot; &amp; [.AD8] &amp; [.AD10]" office:value-type="string" office:string-value="K3:K18" calcext:value-type="string">
            <text:p>K3:K18</text:p>
          </table:table-cell>
          <table:table-cell table:formula="of:=[.AE8] &amp; [.AE9] &amp; &quot;:&quot; &amp; [.AE8] &amp; [.AE10]" office:value-type="string" office:string-value="K21:K36" calcext:value-type="string">
            <text:p>K21:K36</text:p>
          </table:table-cell>
          <table:table-cell table:formula="of:=[.AF8] &amp; [.AF9] &amp; &quot;:&quot; &amp; [.AF8] &amp; [.AF10]" office:value-type="string" office:string-value="U3:U18" calcext:value-type="string">
            <text:p>U3:U18</text:p>
          </table:table-cell>
          <table:table-cell table:formula="of:=[.AG8] &amp; [.AG9] &amp; &quot;:&quot; &amp; [.AG8] &amp; [.AG10]" office:value-type="string" office:string-value="U21:U36" calcext:value-type="string">
            <text:p>U21:U36</text:p>
          </table:table-cell>
          <table:table-cell table:formula="of:=[.AH8] &amp; [.AH9] &amp; &quot;:&quot; &amp; [.AH8] &amp; [.AH10]" office:value-type="string" office:string-value="AE10:AE11" calcext:value-type="string">
            <text:p>AE10:AE11</text:p>
          </table:table-cell>
          <table:table-cell table:formula="of:=[.AI8] &amp; [.AI9] &amp; &quot;:&quot; &amp; [.AI8] &amp; [.AI10]" office:value-type="string" office:string-value="AE28:AE29" calcext:value-type="string">
            <text:p>AE28:AE29</text:p>
          </table:table-cell>
          <table:table-cell table:formula="of:=[.AJ8] &amp; [.AJ9] &amp; &quot;:&quot; &amp; [.AJ8] &amp; [.AJ10]" office:value-type="string" office:string-value="AE17:AE17" calcext:value-type="string">
            <text:p>AE17:AE17</text:p>
          </table:table-cell>
          <table:table-cell table:formula="of:=[.AK8] &amp; [.AK9] &amp; &quot;:&quot; &amp; [.AK8] &amp; [.AK10]" office:value-type="string" office:string-value="AE22:AE22" calcext:value-type="string">
            <text:p>AE22:AE22</text:p>
          </table:table-cell>
          <table:table-cell table:number-columns-repeated="215"/>
        </table:table-row>
        <table:table-row table:style-name="ro1">
          <table:table-cell table:style-name="ce251" office:value-type="string" calcext:value-type="string">
            <text:p>Maximum Matches</text:p>
          </table:table-cell>
          <table:table-cell table:number-columns-repeated="2" table:style-name="ce257" office:value-type="float" office:value="128" calcext:value-type="float">
            <text:p>128</text:p>
          </table:table-cell>
          <table:table-cell table:number-columns-repeated="2" table:style-name="ce257" office:value-type="float" office:value="64" calcext:value-type="float">
            <text:p>64</text:p>
          </table:table-cell>
          <table:table-cell table:number-columns-repeated="2" table:style-name="ce257" office:value-type="float" office:value="32" calcext:value-type="float">
            <text:p>32</text:p>
          </table:table-cell>
          <table:table-cell table:number-columns-repeated="2" table:style-name="ce257" office:value-type="float" office:value="16" calcext:value-type="float">
            <text:p>16</text:p>
          </table:table-cell>
          <table:table-cell table:number-columns-repeated="2" table:style-name="ce257" office:value-type="float" office:value="8" calcext:value-type="float">
            <text:p>8</text:p>
          </table:table-cell>
          <table:table-cell table:number-columns-repeated="2" table:style-name="ce257" office:value-type="float" office:value="4" calcext:value-type="float">
            <text:p>4</text:p>
          </table:table-cell>
          <table:table-cell table:number-columns-repeated="2" table:style-name="ce257" office:value-type="float" office:value="2" calcext:value-type="float">
            <text:p>2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7"/>
          <table:table-cell table:number-columns-repeated="5"/>
          <table:table-cell table:formula="of:=SUBSTITUTE(ADDRESS(1; [.D$3]+11; 4); &quot;1&quot;; &quot;&quot;)" office:value-type="string" office:string-value="L" calcext:value-type="string">
            <text:p>L</text:p>
          </table:table-cell>
          <table:table-cell table:formula="of:=SUBSTITUTE(ADDRESS(1; [.E$3]+9; 4); &quot;1&quot;; &quot;&quot;)" office:value-type="string" office:string-value="J" calcext:value-type="string">
            <text:p>J</text:p>
          </table:table-cell>
          <table:table-cell table:formula="of:=SUBSTITUTE(ADDRESS(1; [.F$3]+11; 4); &quot;1&quot;; &quot;&quot;)" office:value-type="string" office:string-value="V" calcext:value-type="string">
            <text:p>V</text:p>
          </table:table-cell>
          <table:table-cell table:formula="of:=SUBSTITUTE(ADDRESS(1; [.G$3]+9; 4); &quot;1&quot;; &quot;&quot;)" office:value-type="string" office:string-value="R" calcext:value-type="string">
            <text:p>R</text:p>
          </table:table-cell>
          <table:table-cell table:formula="of:=SUBSTITUTE(ADDRESS(1; [.H$3]+11; 4); &quot;1&quot;; &quot;&quot;)" office:value-type="string" office:string-value="AF" calcext:value-type="string">
            <text:p>AF</text:p>
          </table:table-cell>
          <table:table-cell table:formula="of:=SUBSTITUTE(ADDRESS(1; [.I$3]+9; 4); &quot;1&quot;; &quot;&quot;)" office:value-type="string" office:string-value="Z" calcext:value-type="string">
            <text:p>Z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AF</text:p>
          </table:table-cell>
          <table:table-cell table:formula="of:=SUBSTITUTE(ADDRESS(1; [.Q$3]+9; 4); &quot;1&quot;; &quot;&quot;)" office:value-type="string" office:string-value="AN" calcext:value-type="string">
            <text:p>AN</text:p>
          </table:table-cell>
          <table:table-cell table:number-columns-repeated="215"/>
        </table:table-row>
        <table:table-row table:style-name="ro1">
          <table:table-cell table:style-name="ce250" office:value-type="string" calcext:value-type="string">
            <text:p>Lost Seeds</text:p>
          </table:table-cell>
          <table:table-cell table:style-name="ce477"/>
          <table:table-cell table:style-name="ce482"/>
          <table:table-cell table:style-name="ce477" table:formula="of:=IF([.D12]=[.D9]; [.B7]-[.D7]; &quot;&quot;)">
            <text:p/>
          </table:table-cell>
          <table:table-cell table:style-name="ce482" table:formula="of:=IF([.E12]=[.E9]; [.C7]-[.E7]; &quot;&quot;)">
            <text:p/>
          </table:table-cell>
          <table:table-cell table:style-name="ce477" table:formula="of:=IF([.F12]=[.F9]; [.D7]-[.F7]; &quot;&quot;)">
            <text:p/>
          </table:table-cell>
          <table:table-cell table:style-name="ce482" table:formula="of:=IF([.G12]=[.G9]; [.E7]-[.G7]; &quot;&quot;)">
            <text:p/>
          </table:table-cell>
          <table:table-cell table:style-name="ce477" table:formula="of:=IF([.H12]=[.H9]; [.F7]-[.H7]; &quot;&quot;)">
            <text:p/>
          </table:table-cell>
          <table:table-cell table:style-name="ce482" table:formula="of:=IF([.I12]=[.I9]; [.G7]-[.I7]; &quot;&quot;)">
            <text:p/>
          </table:table-cell>
          <table:table-cell table:style-name="ce477" table:formula="of:=IF([.J12]=[.J9]; [.H7]-[.J7]; &quot;&quot;)">
            <text:p/>
          </table:table-cell>
          <table:table-cell table:style-name="ce482" table:formula="of:=IF([.K12]=[.K9]; [.I7]-[.K7]; &quot;&quot;)">
            <text:p/>
          </table:table-cell>
          <table:table-cell table:style-name="ce477" table:formula="of:=IF([.L12]=[.L9]; [.J7]-[.L7]; &quot;&quot;)">
            <text:p/>
          </table:table-cell>
          <table:table-cell table:style-name="ce482" table:formula="of:=IF([.M12]=[.M9]; [.K7]-[.M7]; &quot;&quot;)">
            <text:p/>
          </table:table-cell>
          <table:table-cell table:style-name="ce477" table:formula="of:=IF([.N12]=[.N9]; [.L7]-[.N7]; &quot;&quot;)">
            <text:p/>
          </table:table-cell>
          <table:table-cell table:style-name="ce482" table:formula="of:=IF([.O12]=[.O9]; [.M7]-[.O7]; &quot;&quot;)">
            <text:p/>
          </table:table-cell>
          <table:table-cell table:style-name="ce477" table:formula="of:=IF([.P12]=[.P9]; [.N7]-[.P7]; &quot;&quot;)">
            <text:p/>
          </table:table-cell>
          <table:table-cell table:style-name="ce482" table:formula="of:=IF([.Q12]=[.Q9]; [.O7]-[.Q7]; &quot;&quot;)">
            <text:p/>
          </table:table-cell>
          <table:table-cell table:style-name="ce266"/>
          <table:table-cell table:number-columns-repeated="5"/>
          <table:table-cell table:formula="of:=[.X12] &amp; [.X9] &amp; &quot;:&quot; &amp; [.X12] &amp; [.X10]" office:value-type="string" office:string-value="L3:L130" calcext:value-type="string">
            <text:p>L3:L130</text:p>
          </table:table-cell>
          <table:table-cell table:formula="of:=[.Y12] &amp; [.Y9] &amp; &quot;:&quot; &amp; [.Y12] &amp; [.Y10]" office:value-type="string" office:string-value="J3:J130" calcext:value-type="string">
            <text:p>J3:J130</text:p>
          </table:table-cell>
          <table:table-cell table:formula="of:=[.Z12] &amp; [.Z9] &amp; &quot;:&quot; &amp; [.Z12] &amp; [.Z10]" office:value-type="string" office:string-value="V3:V130" calcext:value-type="string">
            <text:p>V3:V130</text:p>
          </table:table-cell>
          <table:table-cell table:formula="of:=[.AA12] &amp; [.AA9] &amp; &quot;:&quot; &amp; [.AA12] &amp; [.AA10]" office:value-type="string" office:string-value="R3:R130" calcext:value-type="string">
            <text:p>R3:R130</text:p>
          </table:table-cell>
          <table:table-cell table:formula="of:=[.AB12] &amp; [.AB9] &amp; &quot;:&quot; &amp; [.AB12] &amp; [.AB10]" office:value-type="string" office:string-value="AF3:AF130" calcext:value-type="string">
            <text:p>AF3:AF130</text:p>
          </table:table-cell>
          <table:table-cell table:formula="of:=[.AC12] &amp; [.AC9] &amp; &quot;:&quot; &amp; [.AC12] &amp; [.AC10]" office:value-type="string" office:string-value="Z3:Z130" calcext:value-type="string">
            <text:p>Z3:Z130</text:p>
          </table:table-cell>
          <table:table-cell table:formula="of:=[.AD12] &amp; [.AD9] &amp; &quot;:&quot; &amp; [.AD12] &amp; [.AD10]" office:value-type="string" office:string-value="L3:L18" calcext:value-type="string">
            <text:p>L3:L18</text:p>
          </table:table-cell>
          <table:table-cell table:formula="of:=[.AE12] &amp; [.AE9] &amp; &quot;:&quot; &amp; [.AE12] &amp; [.AE10]" office:value-type="string" office:string-value="L21:L36" calcext:value-type="string">
            <text:p>L21:L36</text:p>
          </table:table-cell>
          <table:table-cell table:formula="of:=[.AF12] &amp; [.AF9] &amp; &quot;:&quot; &amp; [.AF12] &amp; [.AF10]" office:value-type="string" office:string-value="V3:V18" calcext:value-type="string">
            <text:p>V3:V18</text:p>
          </table:table-cell>
          <table:table-cell table:formula="of:=[.AG12] &amp; [.AG9] &amp; &quot;:&quot; &amp; [.AG12] &amp; [.AG10]" office:value-type="string" office:string-value="V21:V36" calcext:value-type="string">
            <text:p>V21:V36</text:p>
          </table:table-cell>
          <table:table-cell table:formula="of:=[.AH12] &amp; [.AH9] &amp; &quot;:&quot; &amp; [.AH12] &amp; [.AH10]" office:value-type="string" office:string-value="AF10:AF11" calcext:value-type="string">
            <text:p>AF10:AF11</text:p>
          </table:table-cell>
          <table:table-cell table:formula="of:=[.AI12] &amp; [.AI9] &amp; &quot;:&quot; &amp; [.AI12] &amp; [.AI10]" office:value-type="string" office:string-value="AF28:AF29" calcext:value-type="string">
            <text:p>AF28:AF29</text:p>
          </table:table-cell>
          <table:table-cell table:formula="of:=[.AJ12] &amp; [.AJ9] &amp; &quot;:&quot; &amp; [.AJ12] &amp; [.AJ10]" office:value-type="string" office:string-value="AF17:AF17" calcext:value-type="string">
            <text:p>AF17:AF17</text:p>
          </table:table-cell>
          <table:table-cell table:formula="of:=[.AK12] &amp; [.AK9] &amp; &quot;:&quot; &amp; [.AK12] &amp; [.AK10]" office:value-type="string" office:string-value="AN22:AN22" calcext:value-type="string">
            <text:p>AN22:AN22</text:p>
          </table:table-cell>
          <table:table-cell table:number-columns-repeated="215"/>
        </table:table-row>
        <table:table-row table:style-name="ro1">
          <table:table-cell table:style-name="ce251" office:value-type="string" calcext:value-type="string">
            <text:p>PR Left</text:p>
          </table:table-cell>
          <table:table-cell table:style-name="ce476" table:formula="of:=COUNTIF([ML.A4:.A130]; &quot;PR&quot;)" office:value-type="float" office:value="0" calcext:value-type="float">
            <text:p>0</text:p>
          </table:table-cell>
          <table:table-cell table:style-name="ce481" table:formula="of:=COUNTIF([FL.A4:.A130]; &quot;PR&quot;)" office:value-type="float" office:value="0" calcext:value-type="float">
            <text:p>0</text:p>
          </table:table-cell>
          <table:table-cell table:style-name="ce476" table:formula="of:=IF([.D$9]&gt;0; COUNTIF(INDIRECT(&quot;$&quot;&amp;[.X$7]&amp;&quot;.$&quot;&amp;[.X$11]); [.$W14]); &quot;&quot;)">
            <text:p/>
          </table:table-cell>
          <table:table-cell table:style-name="ce481" table:formula="of:=IF([.E$9]&gt;0; COUNTIF(INDIRECT(&quot;$&quot;&amp;[.Y$7]&amp;&quot;.$&quot;&amp;[.Y$11]); [.$W14]); &quot;&quot;)">
            <text:p/>
          </table:table-cell>
          <table:table-cell table:style-name="ce476" table:formula="of:=IF([.F$9]&gt;0; COUNTIF(INDIRECT(&quot;$&quot;&amp;[.Z$7]&amp;&quot;.$&quot;&amp;[.Z$11]); [.$W14]); &quot;&quot;)">
            <text:p/>
          </table:table-cell>
          <table:table-cell table:style-name="ce481" table:formula="of:=IF([.G$9]&gt;0; COUNTIF(INDIRECT(&quot;$&quot;&amp;[.AA$7]&amp;&quot;.$&quot;&amp;[.AA$11]); [.$W14]); &quot;&quot;)">
            <text:p/>
          </table:table-cell>
          <table:table-cell table:style-name="ce476" table:formula="of:=IF([.H$9]&gt;0; COUNTIF(INDIRECT(&quot;$&quot;&amp;[.AB$7]&amp;&quot;.$&quot;&amp;[.AB$11]); [.$W14]); &quot;&quot;)">
            <text:p/>
          </table:table-cell>
          <table:table-cell table:style-name="ce481" table:formula="of:=IF([.I$9]&gt;0; COUNTIF(INDIRECT(&quot;$&quot;&amp;[.AC$7]&amp;&quot;.$&quot;&amp;[.AC$11]); [.$W14]); &quot;&quot;)">
            <text:p/>
          </table:table-cell>
          <table:table-cell table:style-name="ce476" table:formula="of:=IF([.J$9]&gt;0; COUNTIF(INDIRECT(&quot;$&quot;&amp;[.AD$7]&amp;&quot;.$&quot;&amp;[.AD$11]); [.$W14]); &quot;&quot;)">
            <text:p/>
          </table:table-cell>
          <table:table-cell table:style-name="ce481" table:formula="of:=IF([.K$9]&gt;0; COUNTIF(INDIRECT(&quot;$&quot;&amp;[.AE$7]&amp;&quot;.$&quot;&amp;[.AE$11]); [.$W14]); &quot;&quot;)">
            <text:p/>
          </table:table-cell>
          <table:table-cell table:style-name="ce476" table:formula="of:=IF([.L$9]&gt;0; COUNTIF(INDIRECT(&quot;$&quot;&amp;[.AF$7]&amp;&quot;.$&quot;&amp;[.AF$11]); [.$W14]); &quot;&quot;)">
            <text:p/>
          </table:table-cell>
          <table:table-cell table:style-name="ce481" table:formula="of:=IF([.M$9]&gt;0; COUNTIF(INDIRECT(&quot;$&quot;&amp;[.AG$7]&amp;&quot;.$&quot;&amp;[.AG$11]); [.$W14]); &quot;&quot;)">
            <text:p/>
          </table:table-cell>
          <table:table-cell table:style-name="ce476" table:formula="of:=IF([.N$9]&gt;0; COUNTIF(INDIRECT(&quot;$&quot;&amp;[.AH$7]&amp;&quot;.$&quot;&amp;[.AH$11]); [.$W14]); &quot;&quot;)">
            <text:p/>
          </table:table-cell>
          <table:table-cell table:style-name="ce481" table:formula="of:=IF([.O$9]&gt;0; COUNTIF(INDIRECT(&quot;$&quot;&amp;[.AI$7]&amp;&quot;.$&quot;&amp;[.AI$11]); [.$W14]); &quot;&quot;)">
            <text:p/>
          </table:table-cell>
          <table:table-cell table:style-name="ce476" table:formula="of:=IF([.P$9]&gt;0; COUNTIF(INDIRECT(&quot;$&quot;&amp;[.AJ$7]&amp;&quot;.$&quot;&amp;[.AJ$11]); [.$W14]); &quot;&quot;)">
            <text:p/>
          </table:table-cell>
          <table:table-cell table:style-name="ce481" table:formula="of:=IF([.Q$9]&gt;0; COUNTIF(INDIRECT(&quot;$&quot;&amp;[.AK$7]&amp;&quot;.$&quot;&amp;[.AK$11]); [.$W14]); &quot;&quot;)">
            <text:p/>
          </table:table-cell>
          <table:table-cell table:style-name="ce267"/>
          <table:table-cell table:number-columns-repeated="4"/>
          <table:table-cell office:value-type="string" calcext:value-type="string">
            <text:p>PR</text:p>
          </table:table-cell>
          <table:table-cell table:number-columns-repeated="229"/>
        </table:table-row>
        <table:table-row table:style-name="ro1">
          <table:table-cell table:style-name="ce250"/>
          <table:table-cell table:style-name="ce254" table:number-columns-repeated="16"/>
          <table:table-cell table:style-name="ce266"/>
          <table:table-cell table:number-columns-repeated="234"/>
        </table:table-row>
        <table:table-row table:style-name="ro1">
          <table:table-cell table:style-name="ce251"/>
          <table:table-cell table:style-name="ce257" table:number-columns-repeated="16"/>
          <table:table-cell table:style-name="ce267"/>
          <table:table-cell table:number-columns-repeated="234"/>
        </table:table-row>
        <table:table-row table:style-name="ro1">
          <table:table-cell table:style-name="ce250"/>
          <table:table-cell table:style-name="ce254" table:number-columns-repeated="16"/>
          <table:table-cell table:style-name="ce266"/>
          <table:table-cell table:number-columns-repeated="234"/>
        </table:table-row>
        <table:table-row table:style-name="ro1">
          <table:table-cell table:style-name="ce251" table:formula="of:=VLOOKUP(1; INDIRECT([Extra.$O$5]); 4; 0)" office:value-type="float" office:value="0" calcext:value-type="float">
            <text:p/>
          </table:table-cell>
          <table:table-cell table:style-name="ce476" table:formula="of:=COUNTIF([ML.$C$3:.$C$130]; [.A18])" office:value-type="float" office:value="0" calcext:value-type="float">
            <text:p>0</text:p>
          </table:table-cell>
          <table:table-cell table:style-name="ce481" table:formula="of:=COUNTIF([FL.$C$3:.$C$130]; [.A18])" office:value-type="float" office:value="0" calcext:value-type="float">
            <text:p>0</text:p>
          </table:table-cell>
          <table:table-cell table:style-name="ce476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18]); &quot;&quot;)">
            <text:p/>
          </table:table-cell>
          <table:table-cell table:style-name="ce481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8]); &quot;&quot;)">
            <text:p/>
          </table:table-cell>
          <table:table-cell table:style-name="ce476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18]); &quot;&quot;)">
            <text:p/>
          </table:table-cell>
          <table:table-cell table:style-name="ce481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8]); &quot;&quot;)">
            <text:p/>
          </table:table-cell>
          <table:table-cell table:style-name="ce476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18]); &quot;&quot;)">
            <text:p/>
          </table:table-cell>
          <table:table-cell table:style-name="ce481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8]); &quot;&quot;)">
            <text:p/>
          </table:table-cell>
          <table:table-cell table:style-name="ce476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18]); &quot;&quot;)">
            <text:p/>
          </table:table-cell>
          <table:table-cell table:style-name="ce481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8]); &quot;&quot;)">
            <text:p/>
          </table:table-cell>
          <table:table-cell table:style-name="ce476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18]); &quot;&quot;)">
            <text:p/>
          </table:table-cell>
          <table:table-cell table:style-name="ce481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8]); &quot;&quot;)">
            <text:p/>
          </table:table-cell>
          <table:table-cell table:style-name="ce476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18]); &quot;&quot;)">
            <text:p/>
          </table:table-cell>
          <table:table-cell table:style-name="ce481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8]); &quot;&quot;)">
            <text:p/>
          </table:table-cell>
          <table:table-cell table:style-name="ce476" table:formula="of:=IF([.P$9]&gt;0; SUMPRODUCT([Finals.$AG$10:.$AG$11]=[.A18]; [Finals.$AM$10:.$AM$11]=&quot;W&quot;); &quot;&quot;)">
            <text:p/>
          </table:table-cell>
          <table:table-cell table:style-name="ce481" table:formula="of:=IF([.Q$9]&gt;0; SUMPRODUCT([Finals.$AG$28:.$AG$29]=[.A18]; [Finals.$AM$28:.$AM$29]=&quot;W&quot;); &quot;&quot;)">
            <text:p/>
          </table:table-cell>
          <table:table-cell table:style-name="ce267"/>
          <table:table-cell table:number-columns-repeated="234"/>
        </table:table-row>
        <table:table-row table:style-name="ro1">
          <table:table-cell table:style-name="ce250" table:formula="of:=VLOOKUP(2; INDIRECT([Extra.$O$5]); 4; 0)" office:value-type="string" office:string-value="" calcext:value-type="error">
            <text:p>#N/A</text:p>
          </table:table-cell>
          <table:table-cell table:style-name="ce477" table:formula="of:=COUNTIF([ML.$C$3:.$C$130]; [.A19])" office:value-type="string" office:string-value="" calcext:value-type="error">
            <text:p>#N/A</text:p>
          </table:table-cell>
          <table:table-cell table:style-name="ce482" table:formula="of:=COUNTIF([FL.$C$3:.$C$130]; [.A19])" office:value-type="string" office:string-value="" calcext:value-type="error">
            <text:p>#N/A</text:p>
          </table:table-cell>
          <table:table-cell table:style-name="ce477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19]); &quot;&quot;)">
            <text:p/>
          </table:table-cell>
          <table:table-cell table:style-name="ce482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9]); &quot;&quot;)">
            <text:p/>
          </table:table-cell>
          <table:table-cell table:style-name="ce477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19]); &quot;&quot;)">
            <text:p/>
          </table:table-cell>
          <table:table-cell table:style-name="ce482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9]); &quot;&quot;)">
            <text:p/>
          </table:table-cell>
          <table:table-cell table:style-name="ce477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19]); &quot;&quot;)">
            <text:p/>
          </table:table-cell>
          <table:table-cell table:style-name="ce482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9]); &quot;&quot;)">
            <text:p/>
          </table:table-cell>
          <table:table-cell table:style-name="ce477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19]); &quot;&quot;)">
            <text:p/>
          </table:table-cell>
          <table:table-cell table:style-name="ce482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9]); &quot;&quot;)">
            <text:p/>
          </table:table-cell>
          <table:table-cell table:style-name="ce477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19]); &quot;&quot;)">
            <text:p/>
          </table:table-cell>
          <table:table-cell table:style-name="ce482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9]); &quot;&quot;)">
            <text:p/>
          </table:table-cell>
          <table:table-cell table:style-name="ce477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19]); &quot;&quot;)">
            <text:p/>
          </table:table-cell>
          <table:table-cell table:style-name="ce482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19]); &quot;&quot;)">
            <text:p/>
          </table:table-cell>
          <table:table-cell table:style-name="ce477" table:formula="of:=IF([.P$9]&gt;0; SUMPRODUCT([Finals.$AG$10:.$AG$11]=[.A19]; [Finals.$AM$10:.$AM$11]=&quot;W&quot;); &quot;&quot;)">
            <text:p/>
          </table:table-cell>
          <table:table-cell table:style-name="ce482" table:formula="of:=IF([.Q$9]&gt;0; SUMPRODUCT([Finals.$AG$28:.$AG$29]=[.A19]; [Finals.$AM$28:.$AM$29]=&quot;W&quot;); &quot;&quot;)">
            <text:p/>
          </table:table-cell>
          <table:table-cell table:style-name="ce266"/>
          <table:table-cell table:number-columns-repeated="234"/>
        </table:table-row>
        <table:table-row table:style-name="ro1">
          <table:table-cell table:style-name="ce251" table:formula="of:=VLOOKUP(3; INDIRECT([Extra.$O$5]); 4; 0)" office:value-type="string" office:string-value="" calcext:value-type="error">
            <text:p>#N/A</text:p>
          </table:table-cell>
          <table:table-cell table:style-name="ce476" table:formula="of:=COUNTIF([ML.$C$3:.$C$130]; [.A20])" office:value-type="string" office:string-value="" calcext:value-type="error">
            <text:p>#N/A</text:p>
          </table:table-cell>
          <table:table-cell table:style-name="ce481" table:formula="of:=COUNTIF([FL.$C$3:.$C$130]; [.A20])" office:value-type="string" office:string-value="" calcext:value-type="error">
            <text:p>#N/A</text:p>
          </table:table-cell>
          <table:table-cell table:style-name="ce476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0]); &quot;&quot;)">
            <text:p/>
          </table:table-cell>
          <table:table-cell table:style-name="ce481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0]); &quot;&quot;)">
            <text:p/>
          </table:table-cell>
          <table:table-cell table:style-name="ce476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0]); &quot;&quot;)">
            <text:p/>
          </table:table-cell>
          <table:table-cell table:style-name="ce481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0]); &quot;&quot;)">
            <text:p/>
          </table:table-cell>
          <table:table-cell table:style-name="ce476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0]); &quot;&quot;)">
            <text:p/>
          </table:table-cell>
          <table:table-cell table:style-name="ce481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0]); &quot;&quot;)">
            <text:p/>
          </table:table-cell>
          <table:table-cell table:style-name="ce476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0]); &quot;&quot;)">
            <text:p/>
          </table:table-cell>
          <table:table-cell table:style-name="ce481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0]); &quot;&quot;)">
            <text:p/>
          </table:table-cell>
          <table:table-cell table:style-name="ce476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0]); &quot;&quot;)">
            <text:p/>
          </table:table-cell>
          <table:table-cell table:style-name="ce481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0]); &quot;&quot;)">
            <text:p/>
          </table:table-cell>
          <table:table-cell table:style-name="ce476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0]); &quot;&quot;)">
            <text:p/>
          </table:table-cell>
          <table:table-cell table:style-name="ce481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0]); &quot;&quot;)">
            <text:p/>
          </table:table-cell>
          <table:table-cell table:style-name="ce476" table:formula="of:=IF([.P$9]&gt;0; SUMPRODUCT([Finals.$AG$10:.$AG$11]=[.A20]; [Finals.$AM$10:.$AM$11]=&quot;W&quot;); &quot;&quot;)">
            <text:p/>
          </table:table-cell>
          <table:table-cell table:style-name="ce481" table:formula="of:=IF([.Q$9]&gt;0; SUMPRODUCT([Finals.$AG$28:.$AG$29]=[.A20]; [Finals.$AM$28:.$AM$29]=&quot;W&quot;); &quot;&quot;)">
            <text:p/>
          </table:table-cell>
          <table:table-cell table:style-name="ce267"/>
          <table:table-cell table:number-columns-repeated="234"/>
        </table:table-row>
        <table:table-row table:style-name="ro1">
          <table:table-cell table:style-name="ce250" table:formula="of:=VLOOKUP(4; INDIRECT([Extra.$O$5]); 4; 0)" office:value-type="string" office:string-value="" calcext:value-type="error">
            <text:p>#N/A</text:p>
          </table:table-cell>
          <table:table-cell table:style-name="ce477" table:formula="of:=COUNTIF([ML.$C$3:.$C$130]; [.A21])" office:value-type="string" office:string-value="" calcext:value-type="error">
            <text:p>#N/A</text:p>
          </table:table-cell>
          <table:table-cell table:style-name="ce482" table:formula="of:=COUNTIF([FL.$C$3:.$C$130]; [.A21])" office:value-type="string" office:string-value="" calcext:value-type="error">
            <text:p>#N/A</text:p>
          </table:table-cell>
          <table:table-cell table:style-name="ce477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1]); &quot;&quot;)">
            <text:p/>
          </table:table-cell>
          <table:table-cell table:style-name="ce482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1]); &quot;&quot;)">
            <text:p/>
          </table:table-cell>
          <table:table-cell table:style-name="ce477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1]); &quot;&quot;)">
            <text:p/>
          </table:table-cell>
          <table:table-cell table:style-name="ce482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1]); &quot;&quot;)">
            <text:p/>
          </table:table-cell>
          <table:table-cell table:style-name="ce477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1]); &quot;&quot;)">
            <text:p/>
          </table:table-cell>
          <table:table-cell table:style-name="ce482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1]); &quot;&quot;)">
            <text:p/>
          </table:table-cell>
          <table:table-cell table:style-name="ce477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1]); &quot;&quot;)">
            <text:p/>
          </table:table-cell>
          <table:table-cell table:style-name="ce482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1]); &quot;&quot;)">
            <text:p/>
          </table:table-cell>
          <table:table-cell table:style-name="ce477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1]); &quot;&quot;)">
            <text:p/>
          </table:table-cell>
          <table:table-cell table:style-name="ce482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1]); &quot;&quot;)">
            <text:p/>
          </table:table-cell>
          <table:table-cell table:style-name="ce477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1]); &quot;&quot;)">
            <text:p/>
          </table:table-cell>
          <table:table-cell table:style-name="ce482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1]); &quot;&quot;)">
            <text:p/>
          </table:table-cell>
          <table:table-cell table:style-name="ce477" table:formula="of:=IF([.P$9]&gt;0; SUMPRODUCT([Finals.$AG$10:.$AG$11]=[.A21]; [Finals.$AM$10:.$AM$11]=&quot;W&quot;); &quot;&quot;)">
            <text:p/>
          </table:table-cell>
          <table:table-cell table:style-name="ce482" table:formula="of:=IF([.Q$9]&gt;0; SUMPRODUCT([Finals.$AG$28:.$AG$29]=[.A21]; [Finals.$AM$28:.$AM$29]=&quot;W&quot;); &quot;&quot;)">
            <text:p/>
          </table:table-cell>
          <table:table-cell table:style-name="ce266"/>
          <table:table-cell table:number-columns-repeated="234"/>
        </table:table-row>
        <table:table-row table:style-name="ro1">
          <table:table-cell table:style-name="ce251" table:formula="of:=VLOOKUP(5; INDIRECT([Extra.$O$5]); 4; 0)" office:value-type="string" office:string-value="" calcext:value-type="error">
            <text:p>#N/A</text:p>
          </table:table-cell>
          <table:table-cell table:style-name="ce476" table:formula="of:=COUNTIF([ML.$C$3:.$C$130]; [.A22])" office:value-type="string" office:string-value="" calcext:value-type="error">
            <text:p>#N/A</text:p>
          </table:table-cell>
          <table:table-cell table:style-name="ce481" table:formula="of:=COUNTIF([FL.$C$3:.$C$130]; [.A22])" office:value-type="string" office:string-value="" calcext:value-type="error">
            <text:p>#N/A</text:p>
          </table:table-cell>
          <table:table-cell table:style-name="ce476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2]); &quot;&quot;)">
            <text:p/>
          </table:table-cell>
          <table:table-cell table:style-name="ce481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2]); &quot;&quot;)">
            <text:p/>
          </table:table-cell>
          <table:table-cell table:style-name="ce476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2]); &quot;&quot;)">
            <text:p/>
          </table:table-cell>
          <table:table-cell table:style-name="ce481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2]); &quot;&quot;)">
            <text:p/>
          </table:table-cell>
          <table:table-cell table:style-name="ce476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2]); &quot;&quot;)">
            <text:p/>
          </table:table-cell>
          <table:table-cell table:style-name="ce481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2]); &quot;&quot;)">
            <text:p/>
          </table:table-cell>
          <table:table-cell table:style-name="ce476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2]); &quot;&quot;)">
            <text:p/>
          </table:table-cell>
          <table:table-cell table:style-name="ce481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2]); &quot;&quot;)">
            <text:p/>
          </table:table-cell>
          <table:table-cell table:style-name="ce476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2]); &quot;&quot;)">
            <text:p/>
          </table:table-cell>
          <table:table-cell table:style-name="ce481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2]); &quot;&quot;)">
            <text:p/>
          </table:table-cell>
          <table:table-cell table:style-name="ce476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2]); &quot;&quot;)">
            <text:p/>
          </table:table-cell>
          <table:table-cell table:style-name="ce481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2]); &quot;&quot;)">
            <text:p/>
          </table:table-cell>
          <table:table-cell table:style-name="ce476" table:formula="of:=IF([.P$9]&gt;0; SUMPRODUCT([Finals.$AG$10:.$AG$11]=[.A22]; [Finals.$AM$10:.$AM$11]=&quot;W&quot;); &quot;&quot;)">
            <text:p/>
          </table:table-cell>
          <table:table-cell table:style-name="ce481" table:formula="of:=IF([.Q$9]&gt;0; SUMPRODUCT([Finals.$AG$28:.$AG$29]=[.A22]; [Finals.$AM$28:.$AM$29]=&quot;W&quot;); &quot;&quot;)">
            <text:p/>
          </table:table-cell>
          <table:table-cell table:style-name="ce267"/>
          <table:table-cell table:number-columns-repeated="234"/>
        </table:table-row>
        <table:table-row table:style-name="ro1">
          <table:table-cell table:style-name="ce250" table:formula="of:=VLOOKUP(6; INDIRECT([Extra.$O$5]); 4; 0)" office:value-type="string" office:string-value="" calcext:value-type="error">
            <text:p>#N/A</text:p>
          </table:table-cell>
          <table:table-cell table:style-name="ce477" table:formula="of:=COUNTIF([ML.$C$3:.$C$130]; [.A23])" office:value-type="string" office:string-value="" calcext:value-type="error">
            <text:p>#N/A</text:p>
          </table:table-cell>
          <table:table-cell table:style-name="ce482" table:formula="of:=COUNTIF([FL.$C$3:.$C$130]; [.A23])" office:value-type="string" office:string-value="" calcext:value-type="error">
            <text:p>#N/A</text:p>
          </table:table-cell>
          <table:table-cell table:style-name="ce477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3]); &quot;&quot;)">
            <text:p/>
          </table:table-cell>
          <table:table-cell table:style-name="ce482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3]); &quot;&quot;)">
            <text:p/>
          </table:table-cell>
          <table:table-cell table:style-name="ce477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3]); &quot;&quot;)">
            <text:p/>
          </table:table-cell>
          <table:table-cell table:style-name="ce482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3]); &quot;&quot;)">
            <text:p/>
          </table:table-cell>
          <table:table-cell table:style-name="ce477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3]); &quot;&quot;)">
            <text:p/>
          </table:table-cell>
          <table:table-cell table:style-name="ce482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3]); &quot;&quot;)">
            <text:p/>
          </table:table-cell>
          <table:table-cell table:style-name="ce477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3]); &quot;&quot;)">
            <text:p/>
          </table:table-cell>
          <table:table-cell table:style-name="ce482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3]); &quot;&quot;)">
            <text:p/>
          </table:table-cell>
          <table:table-cell table:style-name="ce477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3]); &quot;&quot;)">
            <text:p/>
          </table:table-cell>
          <table:table-cell table:style-name="ce482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3]); &quot;&quot;)">
            <text:p/>
          </table:table-cell>
          <table:table-cell table:style-name="ce477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3]); &quot;&quot;)">
            <text:p/>
          </table:table-cell>
          <table:table-cell table:style-name="ce482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3]); &quot;&quot;)">
            <text:p/>
          </table:table-cell>
          <table:table-cell table:style-name="ce477" table:formula="of:=IF([.P$9]&gt;0; SUMPRODUCT([Finals.$AG$10:.$AG$11]=[.A23]; [Finals.$AM$10:.$AM$11]=&quot;W&quot;); &quot;&quot;)">
            <text:p/>
          </table:table-cell>
          <table:table-cell table:style-name="ce482" table:formula="of:=IF([.Q$9]&gt;0; SUMPRODUCT([Finals.$AG$28:.$AG$29]=[.A23]; [Finals.$AM$28:.$AM$29]=&quot;W&quot;); &quot;&quot;)">
            <text:p/>
          </table:table-cell>
          <table:table-cell table:style-name="ce266"/>
          <table:table-cell table:number-columns-repeated="234"/>
        </table:table-row>
        <table:table-row table:style-name="ro1">
          <table:table-cell table:style-name="ce251" table:formula="of:=VLOOKUP(7; INDIRECT([Extra.$O$5]); 4; 0)" office:value-type="string" office:string-value="" calcext:value-type="error">
            <text:p>#N/A</text:p>
          </table:table-cell>
          <table:table-cell table:style-name="ce476" table:formula="of:=COUNTIF([ML.$C$3:.$C$130]; [.A24])" office:value-type="string" office:string-value="" calcext:value-type="error">
            <text:p>#N/A</text:p>
          </table:table-cell>
          <table:table-cell table:style-name="ce481" table:formula="of:=COUNTIF([FL.$C$3:.$C$130]; [.A24])" office:value-type="string" office:string-value="" calcext:value-type="error">
            <text:p>#N/A</text:p>
          </table:table-cell>
          <table:table-cell table:style-name="ce476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4]); &quot;&quot;)">
            <text:p/>
          </table:table-cell>
          <table:table-cell table:style-name="ce481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4]); &quot;&quot;)">
            <text:p/>
          </table:table-cell>
          <table:table-cell table:style-name="ce476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4]); &quot;&quot;)">
            <text:p/>
          </table:table-cell>
          <table:table-cell table:style-name="ce481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4]); &quot;&quot;)">
            <text:p/>
          </table:table-cell>
          <table:table-cell table:style-name="ce476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4]); &quot;&quot;)">
            <text:p/>
          </table:table-cell>
          <table:table-cell table:style-name="ce481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4]); &quot;&quot;)">
            <text:p/>
          </table:table-cell>
          <table:table-cell table:style-name="ce476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4]); &quot;&quot;)">
            <text:p/>
          </table:table-cell>
          <table:table-cell table:style-name="ce481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4]); &quot;&quot;)">
            <text:p/>
          </table:table-cell>
          <table:table-cell table:style-name="ce476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4]); &quot;&quot;)">
            <text:p/>
          </table:table-cell>
          <table:table-cell table:style-name="ce481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4]); &quot;&quot;)">
            <text:p/>
          </table:table-cell>
          <table:table-cell table:style-name="ce476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4]); &quot;&quot;)">
            <text:p/>
          </table:table-cell>
          <table:table-cell table:style-name="ce481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4]); &quot;&quot;)">
            <text:p/>
          </table:table-cell>
          <table:table-cell table:style-name="ce476" table:formula="of:=IF([.P$9]&gt;0; SUMPRODUCT([Finals.$AG$10:.$AG$11]=[.A24]; [Finals.$AM$10:.$AM$11]=&quot;W&quot;); &quot;&quot;)">
            <text:p/>
          </table:table-cell>
          <table:table-cell table:style-name="ce481" table:formula="of:=IF([.Q$9]&gt;0; SUMPRODUCT([Finals.$AG$28:.$AG$29]=[.A24]; [Finals.$AM$28:.$AM$29]=&quot;W&quot;); &quot;&quot;)">
            <text:p/>
          </table:table-cell>
          <table:table-cell table:style-name="ce267"/>
          <table:table-cell table:number-columns-repeated="234"/>
        </table:table-row>
        <table:table-row table:style-name="ro1">
          <table:table-cell table:style-name="ce250" table:formula="of:=VLOOKUP(8; INDIRECT([Extra.$O$5]); 4; 0)" office:value-type="string" office:string-value="" calcext:value-type="error">
            <text:p>#N/A</text:p>
          </table:table-cell>
          <table:table-cell table:style-name="ce477" table:formula="of:=COUNTIF([ML.$C$3:.$C$130]; [.A25])" office:value-type="string" office:string-value="" calcext:value-type="error">
            <text:p>#N/A</text:p>
          </table:table-cell>
          <table:table-cell table:style-name="ce482" table:formula="of:=COUNTIF([FL.$C$3:.$C$130]; [.A25])" office:value-type="string" office:string-value="" calcext:value-type="error">
            <text:p>#N/A</text:p>
          </table:table-cell>
          <table:table-cell table:style-name="ce477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5]); &quot;&quot;)">
            <text:p/>
          </table:table-cell>
          <table:table-cell table:style-name="ce482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5]); &quot;&quot;)">
            <text:p/>
          </table:table-cell>
          <table:table-cell table:style-name="ce477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5]); &quot;&quot;)">
            <text:p/>
          </table:table-cell>
          <table:table-cell table:style-name="ce482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5]); &quot;&quot;)">
            <text:p/>
          </table:table-cell>
          <table:table-cell table:style-name="ce477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5]); &quot;&quot;)">
            <text:p/>
          </table:table-cell>
          <table:table-cell table:style-name="ce482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5]); &quot;&quot;)">
            <text:p/>
          </table:table-cell>
          <table:table-cell table:style-name="ce477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5]); &quot;&quot;)">
            <text:p/>
          </table:table-cell>
          <table:table-cell table:style-name="ce482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5]); &quot;&quot;)">
            <text:p/>
          </table:table-cell>
          <table:table-cell table:style-name="ce477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5]); &quot;&quot;)">
            <text:p/>
          </table:table-cell>
          <table:table-cell table:style-name="ce482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5]); &quot;&quot;)">
            <text:p/>
          </table:table-cell>
          <table:table-cell table:style-name="ce477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5]); &quot;&quot;)">
            <text:p/>
          </table:table-cell>
          <table:table-cell table:style-name="ce482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5]); &quot;&quot;)">
            <text:p/>
          </table:table-cell>
          <table:table-cell table:style-name="ce477" table:formula="of:=IF([.P$9]&gt;0; SUMPRODUCT([Finals.$AG$10:.$AG$11]=[.A25]; [Finals.$AM$10:.$AM$11]=&quot;W&quot;); &quot;&quot;)">
            <text:p/>
          </table:table-cell>
          <table:table-cell table:style-name="ce482" table:formula="of:=IF([.Q$9]&gt;0; SUMPRODUCT([Finals.$AG$28:.$AG$29]=[.A25]; [Finals.$AM$28:.$AM$29]=&quot;W&quot;); &quot;&quot;)">
            <text:p/>
          </table:table-cell>
          <table:table-cell table:style-name="ce266"/>
          <table:table-cell table:number-columns-repeated="234"/>
        </table:table-row>
        <table:table-row table:style-name="ro1">
          <table:table-cell table:style-name="ce251" table:formula="of:=VLOOKUP(9; INDIRECT([Extra.$O$5]); 4; 0)" office:value-type="string" office:string-value="" calcext:value-type="error">
            <text:p>#N/A</text:p>
          </table:table-cell>
          <table:table-cell table:style-name="ce476" table:formula="of:=COUNTIF([ML.$C$3:.$C$130]; [.A26])" office:value-type="string" office:string-value="" calcext:value-type="error">
            <text:p>#N/A</text:p>
          </table:table-cell>
          <table:table-cell table:style-name="ce481" table:formula="of:=COUNTIF([FL.$C$3:.$C$130]; [.A26])" office:value-type="string" office:string-value="" calcext:value-type="error">
            <text:p>#N/A</text:p>
          </table:table-cell>
          <table:table-cell table:style-name="ce476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6]); &quot;&quot;)">
            <text:p/>
          </table:table-cell>
          <table:table-cell table:style-name="ce481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6]); &quot;&quot;)">
            <text:p/>
          </table:table-cell>
          <table:table-cell table:style-name="ce476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6]); &quot;&quot;)">
            <text:p/>
          </table:table-cell>
          <table:table-cell table:style-name="ce481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6]); &quot;&quot;)">
            <text:p/>
          </table:table-cell>
          <table:table-cell table:style-name="ce476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6]); &quot;&quot;)">
            <text:p/>
          </table:table-cell>
          <table:table-cell table:style-name="ce481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6]); &quot;&quot;)">
            <text:p/>
          </table:table-cell>
          <table:table-cell table:style-name="ce476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6]); &quot;&quot;)">
            <text:p/>
          </table:table-cell>
          <table:table-cell table:style-name="ce481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6]); &quot;&quot;)">
            <text:p/>
          </table:table-cell>
          <table:table-cell table:style-name="ce476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6]); &quot;&quot;)">
            <text:p/>
          </table:table-cell>
          <table:table-cell table:style-name="ce481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6]); &quot;&quot;)">
            <text:p/>
          </table:table-cell>
          <table:table-cell table:style-name="ce476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6]); &quot;&quot;)">
            <text:p/>
          </table:table-cell>
          <table:table-cell table:style-name="ce481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6]); &quot;&quot;)">
            <text:p/>
          </table:table-cell>
          <table:table-cell table:style-name="ce476" table:formula="of:=IF([.P$9]&gt;0; SUMPRODUCT([Finals.$AG$10:.$AG$11]=[.A26]; [Finals.$AM$10:.$AM$11]=&quot;W&quot;); &quot;&quot;)">
            <text:p/>
          </table:table-cell>
          <table:table-cell table:style-name="ce481" table:formula="of:=IF([.Q$9]&gt;0; SUMPRODUCT([Finals.$AG$28:.$AG$29]=[.A26]; [Finals.$AM$28:.$AM$29]=&quot;W&quot;); &quot;&quot;)">
            <text:p/>
          </table:table-cell>
          <table:table-cell table:style-name="ce267"/>
          <table:table-cell table:number-columns-repeated="234"/>
        </table:table-row>
        <table:table-row table:style-name="ro1">
          <table:table-cell table:style-name="ce250" table:formula="of:=VLOOKUP(10; INDIRECT([Extra.$O$5]); 4; 0)" office:value-type="string" office:string-value="" calcext:value-type="error">
            <text:p>#N/A</text:p>
          </table:table-cell>
          <table:table-cell table:style-name="ce477" table:formula="of:=COUNTIF([ML.$C$3:.$C$130]; [.A27])" office:value-type="string" office:string-value="" calcext:value-type="error">
            <text:p>#N/A</text:p>
          </table:table-cell>
          <table:table-cell table:style-name="ce482" table:formula="of:=COUNTIF([FL.$C$3:.$C$130]; [.A27])" office:value-type="string" office:string-value="" calcext:value-type="error">
            <text:p>#N/A</text:p>
          </table:table-cell>
          <table:table-cell table:style-name="ce477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7]); &quot;&quot;)">
            <text:p/>
          </table:table-cell>
          <table:table-cell table:style-name="ce482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7]); &quot;&quot;)">
            <text:p/>
          </table:table-cell>
          <table:table-cell table:style-name="ce477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7]); &quot;&quot;)">
            <text:p/>
          </table:table-cell>
          <table:table-cell table:style-name="ce482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7]); &quot;&quot;)">
            <text:p/>
          </table:table-cell>
          <table:table-cell table:style-name="ce477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7]); &quot;&quot;)">
            <text:p/>
          </table:table-cell>
          <table:table-cell table:style-name="ce482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7]); &quot;&quot;)">
            <text:p/>
          </table:table-cell>
          <table:table-cell table:style-name="ce477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7]); &quot;&quot;)">
            <text:p/>
          </table:table-cell>
          <table:table-cell table:style-name="ce482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7]); &quot;&quot;)">
            <text:p/>
          </table:table-cell>
          <table:table-cell table:style-name="ce477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7]); &quot;&quot;)">
            <text:p/>
          </table:table-cell>
          <table:table-cell table:style-name="ce482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7]); &quot;&quot;)">
            <text:p/>
          </table:table-cell>
          <table:table-cell table:style-name="ce477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7]); &quot;&quot;)">
            <text:p/>
          </table:table-cell>
          <table:table-cell table:style-name="ce482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7]); &quot;&quot;)">
            <text:p/>
          </table:table-cell>
          <table:table-cell table:style-name="ce477" table:formula="of:=IF([.P$9]&gt;0; SUMPRODUCT([Finals.$AG$10:.$AG$11]=[.A27]; [Finals.$AM$10:.$AM$11]=&quot;W&quot;); &quot;&quot;)">
            <text:p/>
          </table:table-cell>
          <table:table-cell table:style-name="ce482" table:formula="of:=IF([.Q$9]&gt;0; SUMPRODUCT([Finals.$AG$28:.$AG$29]=[.A27]; [Finals.$AM$28:.$AM$29]=&quot;W&quot;); &quot;&quot;)">
            <text:p/>
          </table:table-cell>
          <table:table-cell table:style-name="ce266"/>
          <table:table-cell>
            <draw:control table:end-cell-address="Stats.U28" table:end-x="0.0091in" table:end-y="0.1587in" draw:z-index="0" draw:style-name="gr7" draw:text-style-name="P4" svg:width="0.926in" svg:height="0.1748in" svg:x="0.8677in" svg:y="0.1618in" draw:control="control1"/>
          </table:table-cell>
          <table:table-cell table:number-columns-repeated="233"/>
        </table:table-row>
        <table:table-row table:style-name="ro1">
          <table:table-cell table:style-name="ce251"/>
          <table:table-cell table:style-name="ce476" table:formula="of:=COUNTIF([ML.$C$3:.$C$130]; [.A28])" office:value-type="float" office:value="0" calcext:value-type="float">
            <text:p>0</text:p>
          </table:table-cell>
          <table:table-cell table:style-name="ce481" table:formula="of:=COUNTIF([FL.$C$3:.$C$130]; [.A28])" office:value-type="float" office:value="0" calcext:value-type="float">
            <text:p>0</text:p>
          </table:table-cell>
          <table:table-cell table:style-name="ce476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8]); &quot;&quot;)">
            <text:p/>
          </table:table-cell>
          <table:table-cell table:style-name="ce481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8]); &quot;&quot;)">
            <text:p/>
          </table:table-cell>
          <table:table-cell table:style-name="ce476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8]); &quot;&quot;)">
            <text:p/>
          </table:table-cell>
          <table:table-cell table:style-name="ce481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8]); &quot;&quot;)">
            <text:p/>
          </table:table-cell>
          <table:table-cell table:style-name="ce476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8]); &quot;&quot;)">
            <text:p/>
          </table:table-cell>
          <table:table-cell table:style-name="ce481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8]); &quot;&quot;)">
            <text:p/>
          </table:table-cell>
          <table:table-cell table:style-name="ce476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8]); &quot;&quot;)">
            <text:p/>
          </table:table-cell>
          <table:table-cell table:style-name="ce481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8]); &quot;&quot;)">
            <text:p/>
          </table:table-cell>
          <table:table-cell table:style-name="ce476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8]); &quot;&quot;)">
            <text:p/>
          </table:table-cell>
          <table:table-cell table:style-name="ce481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8]); &quot;&quot;)">
            <text:p/>
          </table:table-cell>
          <table:table-cell table:style-name="ce476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8]); &quot;&quot;)">
            <text:p/>
          </table:table-cell>
          <table:table-cell table:style-name="ce481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8]); &quot;&quot;)">
            <text:p/>
          </table:table-cell>
          <table:table-cell table:style-name="ce476" table:formula="of:=IF([.P$9]&gt;0; SUMPRODUCT([Finals.$AG$10:.$AG$11]=[.A28]; [Finals.$AM$10:.$AM$11]=&quot;W&quot;); &quot;&quot;)">
            <text:p/>
          </table:table-cell>
          <table:table-cell table:style-name="ce481" table:formula="of:=IF([.Q$9]&gt;0; SUMPRODUCT([Finals.$AG$28:.$AG$29]=[.A28]; [Finals.$AM$28:.$AM$29]=&quot;W&quot;); &quot;&quot;)">
            <text:p/>
          </table:table-cell>
          <table:table-cell table:style-name="ce267"/>
          <table:table-cell table:number-columns-repeated="234"/>
        </table:table-row>
        <table:table-row table:style-name="ro1">
          <table:table-cell table:style-name="ce250"/>
          <table:table-cell table:style-name="ce477" table:formula="of:=COUNTIF([ML.$C$3:.$C$130]; [.A29])" office:value-type="float" office:value="0" calcext:value-type="float">
            <text:p>0</text:p>
          </table:table-cell>
          <table:table-cell table:style-name="ce482" table:formula="of:=COUNTIF([FL.$C$3:.$C$130]; [.A29])" office:value-type="float" office:value="0" calcext:value-type="float">
            <text:p>0</text:p>
          </table:table-cell>
          <table:table-cell table:style-name="ce477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29]); &quot;&quot;)">
            <text:p/>
          </table:table-cell>
          <table:table-cell table:style-name="ce482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9]); &quot;&quot;)">
            <text:p/>
          </table:table-cell>
          <table:table-cell table:style-name="ce477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29]); &quot;&quot;)">
            <text:p/>
          </table:table-cell>
          <table:table-cell table:style-name="ce482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9]); &quot;&quot;)">
            <text:p/>
          </table:table-cell>
          <table:table-cell table:style-name="ce477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29]); &quot;&quot;)">
            <text:p/>
          </table:table-cell>
          <table:table-cell table:style-name="ce482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9]); &quot;&quot;)">
            <text:p/>
          </table:table-cell>
          <table:table-cell table:style-name="ce477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29]); &quot;&quot;)">
            <text:p/>
          </table:table-cell>
          <table:table-cell table:style-name="ce482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9]); &quot;&quot;)">
            <text:p/>
          </table:table-cell>
          <table:table-cell table:style-name="ce477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29]); &quot;&quot;)">
            <text:p/>
          </table:table-cell>
          <table:table-cell table:style-name="ce482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9]); &quot;&quot;)">
            <text:p/>
          </table:table-cell>
          <table:table-cell table:style-name="ce477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29]); &quot;&quot;)">
            <text:p/>
          </table:table-cell>
          <table:table-cell table:style-name="ce482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29]); &quot;&quot;)">
            <text:p/>
          </table:table-cell>
          <table:table-cell table:style-name="ce477" table:formula="of:=IF([.P$9]&gt;0; SUMPRODUCT([Finals.$AG$10:.$AG$11]=[.A29]; [Finals.$AM$10:.$AM$11]=&quot;W&quot;); &quot;&quot;)">
            <text:p/>
          </table:table-cell>
          <table:table-cell table:style-name="ce482" table:formula="of:=IF([.Q$9]&gt;0; SUMPRODUCT([Finals.$AG$28:.$AG$29]=[.A29]; [Finals.$AM$28:.$AM$29]=&quot;W&quot;); &quot;&quot;)">
            <text:p/>
          </table:table-cell>
          <table:table-cell table:style-name="ce266"/>
          <table:table-cell>
            <draw:control table:end-cell-address="Stats.U29" table:end-x="0.0213in" table:end-y="0.1717in" draw:z-index="1" draw:style-name="gr7" draw:text-style-name="P4" svg:width="0.9295in" svg:height="0.1717in" svg:x="0.8764in" svg:y="0in" draw:control="control2"/>
          </table:table-cell>
          <table:table-cell table:number-columns-repeated="233"/>
        </table:table-row>
        <table:table-row table:style-name="ro1">
          <table:table-cell table:style-name="ce251"/>
          <table:table-cell table:style-name="ce476" table:formula="of:=COUNTIF([ML.$C$3:.$C$130]; [.A30])" office:value-type="float" office:value="0" calcext:value-type="float">
            <text:p>0</text:p>
          </table:table-cell>
          <table:table-cell table:style-name="ce481" table:formula="of:=COUNTIF([FL.$C$3:.$C$130]; [.A30])" office:value-type="float" office:value="0" calcext:value-type="float">
            <text:p>0</text:p>
          </table:table-cell>
          <table:table-cell table:style-name="ce476" table:formula="of:=IF([.D$9]&gt;0; COUNTIF(INDIRECT(CONCATENATE(VLOOKUP(COLUMN()/2; [Extra.$A$2:.$K$8]; 2; 0); VLOOKUP(COLUMN()/2; [Extra.$A$2:.$K$8]; 5; 0); WHICHROW1(1; COLUMN()/2); &quot;:&quot;; VLOOKUP(COLUMN()/2; [Extra.$A$2:.$K$8]; 5; 0); WHICHROW2(1; COLUMN()/2))); [.$A30]); &quot;&quot;)">
            <text:p/>
          </table:table-cell>
          <table:table-cell table:style-name="ce481" table:formula="of:=IF([.E$9]&gt;0; COUNTIF(INDIRECT(CONCATENATE(VLOOKUP((COLUMN()-1)/2; [Extra.$A$12:.$K$18]; 2; 0); VLOOKUP((COLUMN()-1)/2; [Extra.$A$12:.$K$18]; 5; 0); WHICHROW1(0; (COLUMN()-1)/2); &quot;:&quot;; VLOOKUP((COLUMN()-1)/2; [Extra.$A$12:.$K$18]; 5; 0); WHICHROW2(0; (COLUMN()-1)/2))); [.$A30]); &quot;&quot;)">
            <text:p/>
          </table:table-cell>
          <table:table-cell table:style-name="ce476" table:formula="of:=IF([.F$9]&gt;0; COUNTIF(INDIRECT(CONCATENATE(VLOOKUP(COLUMN()/2; [Extra.$A$2:.$K$8]; 2; 0); VLOOKUP(COLUMN()/2; [Extra.$A$2:.$K$8]; 5; 0); WHICHROW1(1; COLUMN()/2); &quot;:&quot;; VLOOKUP(COLUMN()/2; [Extra.$A$2:.$K$8]; 5; 0); WHICHROW2(1; COLUMN()/2))); [.$A30]); &quot;&quot;)">
            <text:p/>
          </table:table-cell>
          <table:table-cell table:style-name="ce481" table:formula="of:=IF([.G$9]&gt;0; COUNTIF(INDIRECT(CONCATENATE(VLOOKUP((COLUMN()-1)/2; [Extra.$A$12:.$K$18]; 2; 0); VLOOKUP((COLUMN()-1)/2; [Extra.$A$12:.$K$18]; 5; 0); WHICHROW1(0; (COLUMN()-1)/2); &quot;:&quot;; VLOOKUP((COLUMN()-1)/2; [Extra.$A$12:.$K$18]; 5; 0); WHICHROW2(0; (COLUMN()-1)/2))); [.$A30]); &quot;&quot;)">
            <text:p/>
          </table:table-cell>
          <table:table-cell table:style-name="ce476" table:formula="of:=IF([.H$9]&gt;0; COUNTIF(INDIRECT(CONCATENATE(VLOOKUP(COLUMN()/2; [Extra.$A$2:.$K$8]; 2; 0); VLOOKUP(COLUMN()/2; [Extra.$A$2:.$K$8]; 5; 0); WHICHROW1(1; COLUMN()/2); &quot;:&quot;; VLOOKUP(COLUMN()/2; [Extra.$A$2:.$K$8]; 5; 0); WHICHROW2(1; COLUMN()/2))); [.$A30]); &quot;&quot;)">
            <text:p/>
          </table:table-cell>
          <table:table-cell table:style-name="ce481" table:formula="of:=IF([.I$9]&gt;0; COUNTIF(INDIRECT(CONCATENATE(VLOOKUP((COLUMN()-1)/2; [Extra.$A$12:.$K$18]; 2; 0); VLOOKUP((COLUMN()-1)/2; [Extra.$A$12:.$K$18]; 5; 0); WHICHROW1(0; (COLUMN()-1)/2); &quot;:&quot;; VLOOKUP((COLUMN()-1)/2; [Extra.$A$12:.$K$18]; 5; 0); WHICHROW2(0; (COLUMN()-1)/2))); [.$A30]); &quot;&quot;)">
            <text:p/>
          </table:table-cell>
          <table:table-cell table:style-name="ce476" table:formula="of:=IF([.J$9]&gt;0; COUNTIF(INDIRECT(CONCATENATE(VLOOKUP(COLUMN()/2; [Extra.$A$2:.$K$8]; 2; 0); VLOOKUP(COLUMN()/2; [Extra.$A$2:.$K$8]; 5; 0); WHICHROW1(1; COLUMN()/2); &quot;:&quot;; VLOOKUP(COLUMN()/2; [Extra.$A$2:.$K$8]; 5; 0); WHICHROW2(1; COLUMN()/2))); [.$A30]); &quot;&quot;)">
            <text:p/>
          </table:table-cell>
          <table:table-cell table:style-name="ce481" table:formula="of:=IF([.K$9]&gt;0; COUNTIF(INDIRECT(CONCATENATE(VLOOKUP((COLUMN()-1)/2; [Extra.$A$12:.$K$18]; 2; 0); VLOOKUP((COLUMN()-1)/2; [Extra.$A$12:.$K$18]; 5; 0); WHICHROW1(0; (COLUMN()-1)/2); &quot;:&quot;; VLOOKUP((COLUMN()-1)/2; [Extra.$A$12:.$K$18]; 5; 0); WHICHROW2(0; (COLUMN()-1)/2))); [.$A30]); &quot;&quot;)">
            <text:p/>
          </table:table-cell>
          <table:table-cell table:style-name="ce476" table:formula="of:=IF([.L$9]&gt;0; COUNTIF(INDIRECT(CONCATENATE(VLOOKUP(COLUMN()/2; [Extra.$A$2:.$K$8]; 2; 0); VLOOKUP(COLUMN()/2; [Extra.$A$2:.$K$8]; 5; 0); WHICHROW1(1; COLUMN()/2); &quot;:&quot;; VLOOKUP(COLUMN()/2; [Extra.$A$2:.$K$8]; 5; 0); WHICHROW2(1; COLUMN()/2))); [.$A30]); &quot;&quot;)">
            <text:p/>
          </table:table-cell>
          <table:table-cell table:style-name="ce481" table:formula="of:=IF([.M$9]&gt;0; COUNTIF(INDIRECT(CONCATENATE(VLOOKUP((COLUMN()-1)/2; [Extra.$A$12:.$K$18]; 2; 0); VLOOKUP((COLUMN()-1)/2; [Extra.$A$12:.$K$18]; 5; 0); WHICHROW1(0; (COLUMN()-1)/2); &quot;:&quot;; VLOOKUP((COLUMN()-1)/2; [Extra.$A$12:.$K$18]; 5; 0); WHICHROW2(0; (COLUMN()-1)/2))); [.$A30]); &quot;&quot;)">
            <text:p/>
          </table:table-cell>
          <table:table-cell table:style-name="ce476" table:formula="of:=IF([.N$9]&gt;0; COUNTIF(INDIRECT(CONCATENATE(VLOOKUP(COLUMN()/2; [Extra.$A$2:.$K$8]; 2; 0); VLOOKUP(COLUMN()/2; [Extra.$A$2:.$K$8]; 5; 0); WHICHROW1(1; COLUMN()/2); &quot;:&quot;; VLOOKUP(COLUMN()/2; [Extra.$A$2:.$K$8]; 5; 0); WHICHROW2(1; COLUMN()/2))); [.$A30]); &quot;&quot;)">
            <text:p/>
          </table:table-cell>
          <table:table-cell table:style-name="ce481" table:formula="of:=IF([.O$9]&gt;0; COUNTIF(INDIRECT(CONCATENATE(VLOOKUP((COLUMN()-1)/2; [Extra.$A$12:.$K$18]; 2; 0); VLOOKUP((COLUMN()-1)/2; [Extra.$A$12:.$K$18]; 5; 0); WHICHROW1(0; (COLUMN()-1)/2); &quot;:&quot;; VLOOKUP((COLUMN()-1)/2; [Extra.$A$12:.$K$18]; 5; 0); WHICHROW2(0; (COLUMN()-1)/2))); [.$A30]); &quot;&quot;)">
            <text:p/>
          </table:table-cell>
          <table:table-cell table:style-name="ce476" table:formula="of:=IF([.P$9]&gt;0; SUMPRODUCT([Finals.$AG$10:.$AG$11]=[.A30]; [Finals.$AM$10:.$AM$11]=&quot;W&quot;); &quot;&quot;)">
            <text:p/>
          </table:table-cell>
          <table:table-cell table:style-name="ce481" table:formula="of:=IF([.Q$9]&gt;0; SUMPRODUCT([Finals.$AG$28:.$AG$29]=[.A30]; [Finals.$AM$28:.$AM$29]=&quot;W&quot;); &quot;&quot;)">
            <text:p/>
          </table:table-cell>
          <table:table-cell table:style-name="ce267"/>
          <table:table-cell>
            <draw:control table:end-cell-address="Stats.U30" table:end-x="0.0213in" table:end-y="0.1717in" draw:z-index="2" draw:style-name="gr7" draw:text-style-name="P4" svg:width="0.9295in" svg:height="0.1717in" svg:x="0.8764in" svg:y="0in" draw:control="control3"/>
          </table:table-cell>
          <table:table-cell table:number-columns-repeated="233"/>
        </table:table-row>
        <table:table-row table:style-name="ro1">
          <table:table-cell table:style-name="ce252"/>
          <table:table-cell table:style-name="ce258" table:number-columns-repeated="16"/>
          <table:table-cell table:style-name="ce172"/>
          <table:table-cell table:number-columns-repeated="234"/>
        </table:table-row>
        <table:table-row table:style-name="ro4" table:number-rows-repeated="65504">
          <table:table-cell table:number-columns-repeated="252"/>
        </table:table-row>
        <table:table-row table:style-name="ro4">
          <table:table-cell table:number-columns-repeated="252"/>
        </table:table-row>
        <calcext:conditional-formats>
          <calcext:conditional-format calcext:target-range-address="Stats.B18:Stats.B30 Stats.D18:Stats.D30 Stats.F18:Stats.F30 Stats.H18:Stats.H30 Stats.J18:Stats.J30 Stats.L18:Stats.L30 Stats.N18:Stats.N30 Stats.P18:Stats.P30 Stats.B13:Stats.B14 Stats.D9:Stats.D11 Stats.D13:Stats.D14 Stats.F13:Stats.F14 Stats.H13:Stats.H14 Stats.J13:Stats.J14 Stats.L13:Stats.L14 Stats.N13:Stats.N14 Stats.P13:Stats.P14 Stats.F11:Stats.F11 Stats.H7:Stats.H11 Stats.J7:Stats.J11 Stats.L7:Stats.L11 Stats.N7:Stats.N11 Stats.P7:Stats.P11 Stats.F4:Stats.F5 Stats.H4:Stats.H5 Stats.J4:Stats.J5 Stats.L4:Stats.L5 Stats.N4:Stats.N5 Stats.P4:Stats.P5 Stats.F7:Stats.F9 Stats.D4:Stats.D7 Stats.K8:Stats.K8 Stats.D8:Stats.E8 Stats.G8:Stats.G8 Stats.I8:Stats.I8 Stats.M8:Stats.M8 Stats.O8:Stats.O8 Stats.Q8:Stats.Q8 Stats.E6:Stats.Q6 Stats.B4:Stats.B11">
            <calcext:condition calcext:apply-style-name="StatMComplete" calcext:value="formula-is([.B$12]=[.B$9])" calcext:base-cell-address="Stats.B4"/>
            <calcext:condition calcext:apply-style-name="StatMUncomplete" calcext:value="formula-is(NOT([.B$12]=[.B$9]))" calcext:base-cell-address="Stats.B4"/>
          </calcext:conditional-format>
          <calcext:conditional-format calcext:target-range-address="Stats.C18:Stats.C30 Stats.E18:Stats.E30 Stats.G18:Stats.G30 Stats.I18:Stats.I30 Stats.K18:Stats.K30 Stats.M18:Stats.M30 Stats.O18:Stats.O30 Stats.Q18:Stats.Q30 Stats.C13:Stats.C14 Stats.E9:Stats.E11 Stats.E13:Stats.E14 Stats.G13:Stats.G14 Stats.I13:Stats.I14 Stats.K13:Stats.K14 Stats.M13:Stats.M14 Stats.O13:Stats.O14 Stats.Q13:Stats.Q14 Stats.G9:Stats.G11 Stats.I9:Stats.I11 Stats.K9:Stats.K11 Stats.M9:Stats.M11 Stats.O9:Stats.O11 Stats.Q9:Stats.Q11 Stats.G4:Stats.G5 Stats.I4:Stats.I5 Stats.K4:Stats.K5 Stats.M4:Stats.M5 Stats.O4:Stats.O5 Stats.Q4:Stats.Q5 Stats.E7:Stats.E7 Stats.E4:Stats.E5 Stats.G7:Stats.G7 Stats.I7:Stats.I7 Stats.K7:Stats.K7 Stats.M7:Stats.M7 Stats.O7:Stats.O7 Stats.Q7:Stats.Q7 Stats.C4:Stats.C11">
            <calcext:condition calcext:apply-style-name="StatWComplete" calcext:value="formula-is([.C$12]=[.C$9])" calcext:base-cell-address="Stats.C4"/>
            <calcext:condition calcext:apply-style-name="StatWUncomplete" calcext:value="formula-is(NOT([.C$12]=[.C$9]))" calcext:base-cell-address="Stats.C4"/>
          </calcext:conditional-format>
          <calcext:conditional-format calcext:target-range-address="Stats.F10:Stats.F10">
            <calcext:condition calcext:apply-style-name="StatMComplete" calcext:value="formula-is([.F$12]=[.F$9])" calcext:base-cell-address="Stats.F10"/>
            <calcext:condition calcext:apply-style-name="StatMUncomplete" calcext:value="formula-is(NOT([.F$12]=[.F$9]))" calcext:base-cell-address="Stats.F10"/>
          </calcext:conditional-format>
        </calcext:conditional-formats>
      </table:table>
      <table:table table:name="Finalists" table:style-name="ta1" table:print="false">
        <table:table-column table:style-name="co53" table:default-cell-style-name="ce106"/>
        <table:table-column table:style-name="co1" table:default-cell-style-name="ce106"/>
        <table:table-column table:style-name="co54" table:default-cell-style-name="Default"/>
        <table:table-column table:style-name="co25" table:default-cell-style-name="ce106"/>
        <table:table-column table:style-name="co55" table:number-columns-repeated="3" table:default-cell-style-name="ce106"/>
        <table:table-column table:style-name="co56" table:default-cell-style-name="ce244"/>
        <table:table-column table:style-name="co1" table:default-cell-style-name="ce106"/>
        <table:table-column table:style-name="co54" table:default-cell-style-name="Default"/>
        <table:table-column table:style-name="co25" table:default-cell-style-name="ce106"/>
        <table:table-column table:style-name="co6" table:default-cell-style-name="ce185"/>
        <table:table-column table:style-name="co22" table:number-columns-repeated="244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244"/>
        </table:table-row>
        <table:table-row table:style-name="ro1">
          <table:table-cell table:style-name="ce228"/>
          <table:table-cell table:style-name="ce186"/>
          <table:table-cell table:style-name="ce167" office:value-type="string" calcext:value-type="string">
            <text:p>Player</text:p>
          </table:table-cell>
          <table:table-cell table:style-name="ce186"/>
          <table:table-cell table:style-name="ce186" office:value-type="string" calcext:value-type="string">
            <text:p>Rank</text:p>
          </table:table-cell>
          <table:table-cell table:style-name="ce186" table:formula="of:=[Seeds.F2]" office:value-type="string" office:string-value="2009" calcext:value-type="string">
            <text:p>2009</text:p>
          </table:table-cell>
          <table:table-cell table:style-name="ce186" table:formula="of:=[.F2]+1" office:value-type="float" office:value="2010" calcext:value-type="float">
            <text:p>2010</text:p>
          </table:table-cell>
          <table:table-cell table:style-name="ce242"/>
          <table:table-cell table:style-name="ce186"/>
          <table:table-cell table:style-name="ce167" office:value-type="string" calcext:value-type="string">
            <text:p>Opponent</text:p>
          </table:table-cell>
          <table:table-cell table:style-name="ce186"/>
          <table:table-cell table:style-name="ce217"/>
          <table:table-cell table:number-columns-repeated="244"/>
        </table:table-row>
        <table:table-row table:style-name="ro1">
          <table:table-cell table:style-name="ce229" office:value-type="float" office:value="1" calcext:value-type="float">
            <text:p>1</text:p>
          </table:table-cell>
          <table:table-cell table:style-name="ce454" table:formula="of:=[Finals.A3]">
            <text:p/>
          </table:table-cell>
          <table:table-cell table:style-name="ce491" table:formula="of:=[Finals.B3]">
            <text:p/>
          </table:table-cell>
          <table:table-cell table:style-name="ce176" table:formula="of:=[Finals.C3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B$3:.$B$34]; [.C3])&gt;0; VLOOKUP([.C3]; [Seeds.$B$3:.$K$34]; 5; 0); &quot;??&quot;)" office:value-type="string" office:string-value="?" calcext:value-type="string">
            <text:p>?</text:p>
          </table:table-cell>
          <table:table-cell table:style-name="ce176" table:formula="of:=IF(OR(ISBLANK([.C3]); [.C3]=&quot;&quot;); &quot;&quot;; WHICHROUND(COUNTIF([$ML.$A$3:.$V$130]; [.C3]) + COUNTIF([$Finals.$A$3:.$AF$19]; [.C3])))">
            <text:p/>
          </table:table-cell>
          <table:table-cell table:style-name="ce243" table:formula="of:=IF([.G3]=&quot;&quot;; &quot;&quot;; IF([.G3]=&quot;W&quot;; 8; IF(HASLOST(VLOOKUP([.$C3];  INDIRECT(VLOOKUP([.$G3]; [Extra.$W$2:.$AP$9]; 19; 0)); 8; 0)); 0; 1)))">
            <text:p/>
          </table:table-cell>
          <table:table-cell table:style-name="ce176" table:formula="of:=IF([.C3]=&quot;&quot;; &quot;&quot;; INDIRECT(ADDRESS([Extra.$AM2]; [Extra.$AN2]-1; 1;1; &quot;Finals&quot;)))">
            <text:p/>
          </table:table-cell>
          <table:table-cell table:style-name="ce500" table:formula="of:=IF([.C3]=&quot;&quot;; &quot;&quot;; INDIRECT(ADDRESS([Extra.$AM2]; [Extra.$AN2]; 1;1; &quot;Finals&quot;)))">
            <text:p/>
          </table:table-cell>
          <table:table-cell table:style-name="ce176" table:formula="of:=IF([.C3]=&quot;&quot;; &quot;&quot;; INDIRECT(ADDRESS([Extra.$AM2]; [Extra.$AN2]+1; 1;1; &quot;Finals&quot;)))">
            <text:p/>
          </table:table-cell>
          <table:table-cell table:style-name="ce202" table:formula="of:=IF(AND(NOT([.G3]=&quot;&quot;); NOT([.F3]=&quot;D&quot;); NOT([.F3]=&quot;?&quot;); NOT([.G3]=&quot;D&quot;); NOT(ISBLANK([.F3])); NOT(ISBLANK([.G3]))); DIFFROUND([.F3]; [.G3]); &quot;&quot;)">
            <text:p/>
          </table:table-cell>
          <table:table-cell table:style-name="ce248" table:number-columns-repeated="244"/>
        </table:table-row>
        <table:table-row table:style-name="ro1">
          <table:table-cell table:style-name="ce230" table:formula="of:=[.A3]+1" office:value-type="float" office:value="2" calcext:value-type="float">
            <text:p>2</text:p>
          </table:table-cell>
          <table:table-cell table:style-name="ce455" table:formula="of:=[Finals.A4]">
            <text:p/>
          </table:table-cell>
          <table:table-cell table:style-name="ce492" table:formula="of:=[Finals.B4]">
            <text:p/>
          </table:table-cell>
          <table:table-cell table:style-name="ce175" table:formula="of:=[Finals.C4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B$3:.$B$34]; [.C4])&gt;0; VLOOKUP([.C4]; [Seeds.$B$3:.$K$34]; 5; 0); &quot;??&quot;)" office:value-type="string" office:string-value="?" calcext:value-type="string">
            <text:p>?</text:p>
          </table:table-cell>
          <table:table-cell table:style-name="ce175" table:formula="of:=IF(OR(ISBLANK([.C4]); [.C4]=&quot;&quot;); &quot;&quot;; WHICHROUND(COUNTIF([$ML.$A$3:.$V$130]; [.C4]) + COUNTIF([$Finals.$A$3:.$AF$19]; [.C4])))">
            <text:p/>
          </table:table-cell>
          <table:table-cell table:style-name="ce189" table:formula="of:=IF([.G4]=&quot;&quot;; &quot;&quot;; IF([.G4]=&quot;W&quot;; 8; IF(HASLOST(VLOOKUP([.$C4];  INDIRECT(VLOOKUP([.$G4]; [Extra.$W$2:.$AP$9]; 19; 0)); 8; 0)); 0; 1)))">
            <text:p/>
          </table:table-cell>
          <table:table-cell table:style-name="ce175" table:formula="of:=IF([.C4]=&quot;&quot;; &quot;&quot;; INDIRECT(ADDRESS([Extra.$AM3]; [Extra.$AN3]-1; 1;1; &quot;Finals&quot;)))">
            <text:p/>
          </table:table-cell>
          <table:table-cell table:style-name="ce501" table:formula="of:=IF([.C4]=&quot;&quot;; &quot;&quot;; INDIRECT(ADDRESS([Extra.$AM3]; [Extra.$AN3]; 1;1; &quot;Finals&quot;)))">
            <text:p/>
          </table:table-cell>
          <table:table-cell table:style-name="ce175" table:formula="of:=IF([.C4]=&quot;&quot;; &quot;&quot;; INDIRECT(ADDRESS([Extra.$AM3]; [Extra.$AN3]+1; 1;1; &quot;Finals&quot;)))">
            <text:p/>
          </table:table-cell>
          <table:table-cell table:style-name="ce203" table:formula="of:=IF(AND(NOT([.G4]=&quot;&quot;); NOT([.F4]=&quot;D&quot;); NOT([.F4]=&quot;?&quot;); NOT([.G4]=&quot;D&quot;); NOT(ISBLANK([.F4])); NOT(ISBLANK([.G4]))); DIFFROUND([.F4]; [.G4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4]+1" office:value-type="float" office:value="3" calcext:value-type="float">
            <text:p>3</text:p>
          </table:table-cell>
          <table:table-cell table:style-name="ce454" table:formula="of:=[Finals.A5]">
            <text:p/>
          </table:table-cell>
          <table:table-cell table:style-name="ce491" table:formula="of:=[Finals.B5]">
            <text:p/>
          </table:table-cell>
          <table:table-cell table:style-name="ce176" table:formula="of:=[Finals.C5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B$3:.$B$34]; [.C5])&gt;0; VLOOKUP([.C5]; [Seeds.$B$3:.$K$34]; 5; 0); &quot;??&quot;)" office:value-type="string" office:string-value="?" calcext:value-type="string">
            <text:p>?</text:p>
          </table:table-cell>
          <table:table-cell table:style-name="ce176" table:formula="of:=IF(OR(ISBLANK([.C5]); [.C5]=&quot;&quot;); &quot;&quot;; WHICHROUND(COUNTIF([$ML.$A$3:.$V$130]; [.C5]) + COUNTIF([$Finals.$A$3:.$AF$19]; [.C5])))">
            <text:p/>
          </table:table-cell>
          <table:table-cell table:style-name="ce188" table:formula="of:=IF([.G5]=&quot;&quot;; &quot;&quot;; IF([.G5]=&quot;W&quot;; 8; IF(HASLOST(VLOOKUP([.$C5];  INDIRECT(VLOOKUP([.$G5]; [Extra.$W$2:.$AP$9]; 19; 0)); 8; 0)); 0; 1)))">
            <text:p/>
          </table:table-cell>
          <table:table-cell table:style-name="ce176" table:formula="of:=IF([.C5]=&quot;&quot;; &quot;&quot;; INDIRECT(ADDRESS([Extra.$AM4]; [Extra.$AN4]-1; 1;1; &quot;Finals&quot;)))">
            <text:p/>
          </table:table-cell>
          <table:table-cell table:style-name="ce500" table:formula="of:=IF([.C5]=&quot;&quot;; &quot;&quot;; INDIRECT(ADDRESS([Extra.$AM4]; [Extra.$AN4]; 1;1; &quot;Finals&quot;)))">
            <text:p/>
          </table:table-cell>
          <table:table-cell table:style-name="ce176" table:formula="of:=IF([.C5]=&quot;&quot;; &quot;&quot;; INDIRECT(ADDRESS([Extra.$AM4]; [Extra.$AN4]+1; 1;1; &quot;Finals&quot;)))">
            <text:p/>
          </table:table-cell>
          <table:table-cell table:style-name="ce202" table:formula="of:=IF(AND(NOT([.G5]=&quot;&quot;); NOT([.F5]=&quot;D&quot;); NOT([.F5]=&quot;?&quot;); NOT([.G5]=&quot;D&quot;); NOT(ISBLANK([.F5])); NOT(ISBLANK([.G5]))); DIFFROUND([.F5]; [.G5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5]+1" office:value-type="float" office:value="4" calcext:value-type="float">
            <text:p>4</text:p>
          </table:table-cell>
          <table:table-cell table:style-name="ce455" table:formula="of:=[Finals.A6]">
            <text:p/>
          </table:table-cell>
          <table:table-cell table:style-name="ce492" table:formula="of:=[Finals.B6]">
            <text:p/>
          </table:table-cell>
          <table:table-cell table:style-name="ce175" table:formula="of:=[Finals.C6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B$3:.$B$34]; [.C6])&gt;0; VLOOKUP([.C6]; [Seeds.$B$3:.$K$34]; 5; 0); &quot;??&quot;)" office:value-type="string" office:string-value="?" calcext:value-type="string">
            <text:p>?</text:p>
          </table:table-cell>
          <table:table-cell table:style-name="ce175" table:formula="of:=IF(OR(ISBLANK([.C6]); [.C6]=&quot;&quot;); &quot;&quot;; WHICHROUND(COUNTIF([$ML.$A$3:.$V$130]; [.C6]) + COUNTIF([$Finals.$A$3:.$AF$19]; [.C6])))">
            <text:p/>
          </table:table-cell>
          <table:table-cell table:style-name="ce189" table:formula="of:=IF([.G6]=&quot;&quot;; &quot;&quot;; IF([.G6]=&quot;W&quot;; 8; IF(HASLOST(VLOOKUP([.$C6];  INDIRECT(VLOOKUP([.$G6]; [Extra.$W$2:.$AP$9]; 19; 0)); 8; 0)); 0; 1)))">
            <text:p/>
          </table:table-cell>
          <table:table-cell table:style-name="ce175" table:formula="of:=IF([.C6]=&quot;&quot;; &quot;&quot;; INDIRECT(ADDRESS([Extra.$AM5]; [Extra.$AN5]-1; 1;1; &quot;Finals&quot;)))">
            <text:p/>
          </table:table-cell>
          <table:table-cell table:style-name="ce501" table:formula="of:=IF([.C6]=&quot;&quot;; &quot;&quot;; INDIRECT(ADDRESS([Extra.$AM5]; [Extra.$AN5]; 1;1; &quot;Finals&quot;)))">
            <text:p/>
          </table:table-cell>
          <table:table-cell table:style-name="ce175" table:formula="of:=IF([.C6]=&quot;&quot;; &quot;&quot;; INDIRECT(ADDRESS([Extra.$AM5]; [Extra.$AN5]+1; 1;1; &quot;Finals&quot;)))">
            <text:p/>
          </table:table-cell>
          <table:table-cell table:style-name="ce203" table:formula="of:=IF(AND(NOT([.G6]=&quot;&quot;); NOT([.F6]=&quot;D&quot;); NOT([.F6]=&quot;?&quot;); NOT([.G6]=&quot;D&quot;); NOT(ISBLANK([.F6])); NOT(ISBLANK([.G6]))); DIFFROUND([.F6]; [.G6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6]+1" office:value-type="float" office:value="5" calcext:value-type="float">
            <text:p>5</text:p>
          </table:table-cell>
          <table:table-cell table:style-name="ce454" table:formula="of:=[Finals.A7]">
            <text:p/>
          </table:table-cell>
          <table:table-cell table:style-name="ce491" table:formula="of:=[Finals.B7]">
            <text:p/>
          </table:table-cell>
          <table:table-cell table:style-name="ce176" table:formula="of:=[Finals.C7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B$3:.$B$34]; [.C7])&gt;0; VLOOKUP([.C7]; [Seeds.$B$3:.$K$34]; 5; 0); &quot;??&quot;)" office:value-type="string" office:string-value="?" calcext:value-type="string">
            <text:p>?</text:p>
          </table:table-cell>
          <table:table-cell table:style-name="ce176" table:formula="of:=IF(OR(ISBLANK([.C7]); [.C7]=&quot;&quot;); &quot;&quot;; WHICHROUND(COUNTIF([$ML.$A$3:.$V$130]; [.C7]) + COUNTIF([$Finals.$A$3:.$AF$19]; [.C7])))">
            <text:p/>
          </table:table-cell>
          <table:table-cell table:style-name="ce188" table:formula="of:=IF([.G7]=&quot;&quot;; &quot;&quot;; IF([.G7]=&quot;W&quot;; 8; IF(HASLOST(VLOOKUP([.$C7];  INDIRECT(VLOOKUP([.$G7]; [Extra.$W$2:.$AP$9]; 19; 0)); 8; 0)); 0; 1)))">
            <text:p/>
          </table:table-cell>
          <table:table-cell table:style-name="ce176" table:formula="of:=IF([.C7]=&quot;&quot;; &quot;&quot;; INDIRECT(ADDRESS([Extra.$AM6]; [Extra.$AN6]-1; 1;1; &quot;Finals&quot;)))">
            <text:p/>
          </table:table-cell>
          <table:table-cell table:style-name="ce500" table:formula="of:=IF([.C7]=&quot;&quot;; &quot;&quot;; INDIRECT(ADDRESS([Extra.$AM6]; [Extra.$AN6]; 1;1; &quot;Finals&quot;)))">
            <text:p/>
          </table:table-cell>
          <table:table-cell table:style-name="ce176" table:formula="of:=IF([.C7]=&quot;&quot;; &quot;&quot;; INDIRECT(ADDRESS([Extra.$AM6]; [Extra.$AN6]+1; 1;1; &quot;Finals&quot;)))">
            <text:p/>
          </table:table-cell>
          <table:table-cell table:style-name="ce202" table:formula="of:=IF(AND(NOT([.G7]=&quot;&quot;); NOT([.F7]=&quot;D&quot;); NOT([.F7]=&quot;?&quot;); NOT([.G7]=&quot;D&quot;); NOT(ISBLANK([.F7])); NOT(ISBLANK([.G7]))); DIFFROUND([.F7]; [.G7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7]+1" office:value-type="float" office:value="6" calcext:value-type="float">
            <text:p>6</text:p>
          </table:table-cell>
          <table:table-cell table:style-name="ce455" table:formula="of:=[Finals.A8]">
            <text:p/>
          </table:table-cell>
          <table:table-cell table:style-name="ce492" table:formula="of:=[Finals.B8]">
            <text:p/>
          </table:table-cell>
          <table:table-cell table:style-name="ce175" table:formula="of:=[Finals.C8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B$3:.$B$34]; [.C8])&gt;0; VLOOKUP([.C8]; [Seeds.$B$3:.$K$34]; 5; 0); &quot;??&quot;)" office:value-type="string" office:string-value="?" calcext:value-type="string">
            <text:p>?</text:p>
          </table:table-cell>
          <table:table-cell table:style-name="ce175" table:formula="of:=IF(OR(ISBLANK([.C8]); [.C8]=&quot;&quot;); &quot;&quot;; WHICHROUND(COUNTIF([$ML.$A$3:.$V$130]; [.C8]) + COUNTIF([$Finals.$A$3:.$AF$19]; [.C8])))">
            <text:p/>
          </table:table-cell>
          <table:table-cell table:style-name="ce189" table:formula="of:=IF([.G8]=&quot;&quot;; &quot;&quot;; IF([.G8]=&quot;W&quot;; 8; IF(HASLOST(VLOOKUP([.$C8];  INDIRECT(VLOOKUP([.$G8]; [Extra.$W$2:.$AP$9]; 19; 0)); 8; 0)); 0; 1)))">
            <text:p/>
          </table:table-cell>
          <table:table-cell table:style-name="ce175" table:formula="of:=IF([.C8]=&quot;&quot;; &quot;&quot;; INDIRECT(ADDRESS([Extra.$AM7]; [Extra.$AN7]-1; 1;1; &quot;Finals&quot;)))">
            <text:p/>
          </table:table-cell>
          <table:table-cell table:style-name="ce501" table:formula="of:=IF([.C8]=&quot;&quot;; &quot;&quot;; INDIRECT(ADDRESS([Extra.$AM7]; [Extra.$AN7]; 1;1; &quot;Finals&quot;)))">
            <text:p/>
          </table:table-cell>
          <table:table-cell table:style-name="ce175" table:formula="of:=IF([.C8]=&quot;&quot;; &quot;&quot;; INDIRECT(ADDRESS([Extra.$AM7]; [Extra.$AN7]+1; 1;1; &quot;Finals&quot;)))">
            <text:p/>
          </table:table-cell>
          <table:table-cell table:style-name="ce203" table:formula="of:=IF(AND(NOT([.G8]=&quot;&quot;); NOT([.F8]=&quot;D&quot;); NOT([.F8]=&quot;?&quot;); NOT([.G8]=&quot;D&quot;); NOT(ISBLANK([.F8])); NOT(ISBLANK([.G8]))); DIFFROUND([.F8]; [.G8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8]+1" office:value-type="float" office:value="7" calcext:value-type="float">
            <text:p>7</text:p>
          </table:table-cell>
          <table:table-cell table:style-name="ce454" table:formula="of:=[Finals.A9]">
            <text:p/>
          </table:table-cell>
          <table:table-cell table:style-name="ce491" table:formula="of:=[Finals.B9]">
            <text:p/>
          </table:table-cell>
          <table:table-cell table:style-name="ce176" table:formula="of:=[Finals.C9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B$3:.$B$34]; [.C9])&gt;0; VLOOKUP([.C9]; [Seeds.$B$3:.$K$34]; 5; 0); &quot;??&quot;)" office:value-type="string" office:string-value="?" calcext:value-type="string">
            <text:p>?</text:p>
          </table:table-cell>
          <table:table-cell table:style-name="ce176" table:formula="of:=IF(OR(ISBLANK([.C9]); [.C9]=&quot;&quot;); &quot;&quot;; WHICHROUND(COUNTIF([$ML.$A$3:.$V$130]; [.C9]) + COUNTIF([$Finals.$A$3:.$AF$19]; [.C9])))">
            <text:p/>
          </table:table-cell>
          <table:table-cell table:style-name="ce188" table:formula="of:=IF([.G9]=&quot;&quot;; &quot;&quot;; IF([.G9]=&quot;W&quot;; 8; IF(HASLOST(VLOOKUP([.$C9];  INDIRECT(VLOOKUP([.$G9]; [Extra.$W$2:.$AP$9]; 19; 0)); 8; 0)); 0; 1)))">
            <text:p/>
          </table:table-cell>
          <table:table-cell table:style-name="ce176" table:formula="of:=IF([.C9]=&quot;&quot;; &quot;&quot;; INDIRECT(ADDRESS([Extra.$AM8]; [Extra.$AN8]-1; 1;1; &quot;Finals&quot;)))">
            <text:p/>
          </table:table-cell>
          <table:table-cell table:style-name="ce500" table:formula="of:=IF([.C9]=&quot;&quot;; &quot;&quot;; INDIRECT(ADDRESS([Extra.$AM8]; [Extra.$AN8]; 1;1; &quot;Finals&quot;)))">
            <text:p/>
          </table:table-cell>
          <table:table-cell table:style-name="ce176" table:formula="of:=IF([.C9]=&quot;&quot;; &quot;&quot;; INDIRECT(ADDRESS([Extra.$AM8]; [Extra.$AN8]+1; 1;1; &quot;Finals&quot;)))">
            <text:p/>
          </table:table-cell>
          <table:table-cell table:style-name="ce202" table:formula="of:=IF(AND(NOT([.G9]=&quot;&quot;); NOT([.F9]=&quot;D&quot;); NOT([.F9]=&quot;?&quot;); NOT([.G9]=&quot;D&quot;); NOT(ISBLANK([.F9])); NOT(ISBLANK([.G9]))); DIFFROUND([.F9]; [.G9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9]+1" office:value-type="float" office:value="8" calcext:value-type="float">
            <text:p>8</text:p>
          </table:table-cell>
          <table:table-cell table:style-name="ce455" table:formula="of:=[Finals.A10]">
            <text:p/>
          </table:table-cell>
          <table:table-cell table:style-name="ce492" table:formula="of:=[Finals.B10]">
            <text:p/>
          </table:table-cell>
          <table:table-cell table:style-name="ce175" table:formula="of:=[Finals.C10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B$3:.$B$34]; [.C10])&gt;0; VLOOKUP([.C10]; [Seeds.$B$3:.$K$34]; 5; 0); &quot;??&quot;)" office:value-type="string" office:string-value="?" calcext:value-type="string">
            <text:p>?</text:p>
          </table:table-cell>
          <table:table-cell table:style-name="ce175" table:formula="of:=IF(OR(ISBLANK([.C10]); [.C10]=&quot;&quot;); &quot;&quot;; WHICHROUND(COUNTIF([$ML.$A$3:.$V$130]; [.C10]) + COUNTIF([$Finals.$A$3:.$AF$19]; [.C10])))">
            <text:p/>
          </table:table-cell>
          <table:table-cell table:style-name="ce189" table:formula="of:=IF([.G10]=&quot;&quot;; &quot;&quot;; IF([.G10]=&quot;W&quot;; 8; IF(HASLOST(VLOOKUP([.$C10];  INDIRECT(VLOOKUP([.$G10]; [Extra.$W$2:.$AP$9]; 19; 0)); 8; 0)); 0; 1)))">
            <text:p/>
          </table:table-cell>
          <table:table-cell table:style-name="ce175" table:formula="of:=IF([.C10]=&quot;&quot;; &quot;&quot;; INDIRECT(ADDRESS([Extra.$AM9]; [Extra.$AN9]-1; 1;1; &quot;Finals&quot;)))">
            <text:p/>
          </table:table-cell>
          <table:table-cell table:style-name="ce501" table:formula="of:=IF([.C10]=&quot;&quot;; &quot;&quot;; INDIRECT(ADDRESS([Extra.$AM9]; [Extra.$AN9]; 1;1; &quot;Finals&quot;)))">
            <text:p/>
          </table:table-cell>
          <table:table-cell table:style-name="ce175" table:formula="of:=IF([.C10]=&quot;&quot;; &quot;&quot;; INDIRECT(ADDRESS([Extra.$AM9]; [Extra.$AN9]+1; 1;1; &quot;Finals&quot;)))">
            <text:p/>
          </table:table-cell>
          <table:table-cell table:style-name="ce203" table:formula="of:=IF(AND(NOT([.G10]=&quot;&quot;); NOT([.F10]=&quot;D&quot;); NOT([.F10]=&quot;?&quot;); NOT([.G10]=&quot;D&quot;); NOT(ISBLANK([.F10])); NOT(ISBLANK([.G10]))); DIFFROUND([.F10]; [.G10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10]+1" office:value-type="float" office:value="9" calcext:value-type="float">
            <text:p>9</text:p>
          </table:table-cell>
          <table:table-cell table:style-name="ce454" table:formula="of:=[Finals.A11]">
            <text:p/>
          </table:table-cell>
          <table:table-cell table:style-name="ce491" table:formula="of:=[Finals.B11]">
            <text:p/>
          </table:table-cell>
          <table:table-cell table:style-name="ce176" table:formula="of:=[Finals.C11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B$3:.$B$34]; [.C11])&gt;0; VLOOKUP([.C11]; [Seeds.$B$3:.$K$34]; 5; 0); &quot;??&quot;)" office:value-type="string" office:string-value="?" calcext:value-type="string">
            <text:p>?</text:p>
          </table:table-cell>
          <table:table-cell table:style-name="ce176" table:formula="of:=IF(OR(ISBLANK([.C11]); [.C11]=&quot;&quot;); &quot;&quot;; WHICHROUND(COUNTIF([$ML.$A$3:.$V$130]; [.C11]) + COUNTIF([$Finals.$A$3:.$AF$19]; [.C11])))">
            <text:p/>
          </table:table-cell>
          <table:table-cell table:style-name="ce188" table:formula="of:=IF([.G11]=&quot;&quot;; &quot;&quot;; IF([.G11]=&quot;W&quot;; 8; IF(HASLOST(VLOOKUP([.$C11];  INDIRECT(VLOOKUP([.$G11]; [Extra.$W$2:.$AP$9]; 19; 0)); 8; 0)); 0; 1)))">
            <text:p/>
          </table:table-cell>
          <table:table-cell table:style-name="ce176" table:formula="of:=IF([.C11]=&quot;&quot;; &quot;&quot;; INDIRECT(ADDRESS([Extra.$AM10]; [Extra.$AN10]-1; 1;1; &quot;Finals&quot;)))">
            <text:p/>
          </table:table-cell>
          <table:table-cell table:style-name="ce500" table:formula="of:=IF([.C11]=&quot;&quot;; &quot;&quot;; INDIRECT(ADDRESS([Extra.$AM10]; [Extra.$AN10]; 1;1; &quot;Finals&quot;)))">
            <text:p/>
          </table:table-cell>
          <table:table-cell table:style-name="ce176" table:formula="of:=IF([.C11]=&quot;&quot;; &quot;&quot;; INDIRECT(ADDRESS([Extra.$AM10]; [Extra.$AN10]+1; 1;1; &quot;Finals&quot;)))">
            <text:p/>
          </table:table-cell>
          <table:table-cell table:style-name="ce202" table:formula="of:=IF(AND(NOT([.G11]=&quot;&quot;); NOT([.F11]=&quot;D&quot;); NOT([.F11]=&quot;?&quot;); NOT([.G11]=&quot;D&quot;); NOT(ISBLANK([.F11])); NOT(ISBLANK([.G11]))); DIFFROUND([.F11]; [.G11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11]+1" office:value-type="float" office:value="10" calcext:value-type="float">
            <text:p>10</text:p>
          </table:table-cell>
          <table:table-cell table:style-name="ce455" table:formula="of:=[Finals.A12]">
            <text:p/>
          </table:table-cell>
          <table:table-cell table:style-name="ce492" table:formula="of:=[Finals.B12]">
            <text:p/>
          </table:table-cell>
          <table:table-cell table:style-name="ce175" table:formula="of:=[Finals.C12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B$3:.$B$34]; [.C12])&gt;0; VLOOKUP([.C12]; [Seeds.$B$3:.$K$34]; 5; 0); &quot;??&quot;)" office:value-type="string" office:string-value="?" calcext:value-type="string">
            <text:p>?</text:p>
          </table:table-cell>
          <table:table-cell table:style-name="ce175" table:formula="of:=IF(OR(ISBLANK([.C12]); [.C12]=&quot;&quot;); &quot;&quot;; WHICHROUND(COUNTIF([$ML.$A$3:.$V$130]; [.C12]) + COUNTIF([$Finals.$A$3:.$AF$19]; [.C12])))">
            <text:p/>
          </table:table-cell>
          <table:table-cell table:style-name="ce189" table:formula="of:=IF([.G12]=&quot;&quot;; &quot;&quot;; IF([.G12]=&quot;W&quot;; 8; IF(HASLOST(VLOOKUP([.$C12];  INDIRECT(VLOOKUP([.$G12]; [Extra.$W$2:.$AP$9]; 19; 0)); 8; 0)); 0; 1)))">
            <text:p/>
          </table:table-cell>
          <table:table-cell table:style-name="ce175" table:formula="of:=IF([.C12]=&quot;&quot;; &quot;&quot;; INDIRECT(ADDRESS([Extra.$AM11]; [Extra.$AN11]-1; 1;1; &quot;Finals&quot;)))">
            <text:p/>
          </table:table-cell>
          <table:table-cell table:style-name="ce501" table:formula="of:=IF([.C12]=&quot;&quot;; &quot;&quot;; INDIRECT(ADDRESS([Extra.$AM11]; [Extra.$AN11]; 1;1; &quot;Finals&quot;)))">
            <text:p/>
          </table:table-cell>
          <table:table-cell table:style-name="ce175" table:formula="of:=IF([.C12]=&quot;&quot;; &quot;&quot;; INDIRECT(ADDRESS([Extra.$AM11]; [Extra.$AN11]+1; 1;1; &quot;Finals&quot;)))">
            <text:p/>
          </table:table-cell>
          <table:table-cell table:style-name="ce203" table:formula="of:=IF(AND(NOT([.G12]=&quot;&quot;); NOT([.F12]=&quot;D&quot;); NOT([.F12]=&quot;?&quot;); NOT([.G12]=&quot;D&quot;); NOT(ISBLANK([.F12])); NOT(ISBLANK([.G12]))); DIFFROUND([.F12]; [.G12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12]+1" office:value-type="float" office:value="11" calcext:value-type="float">
            <text:p>11</text:p>
          </table:table-cell>
          <table:table-cell table:style-name="ce454" table:formula="of:=[Finals.A13]">
            <text:p/>
          </table:table-cell>
          <table:table-cell table:style-name="ce491" table:formula="of:=[Finals.B13]">
            <text:p/>
          </table:table-cell>
          <table:table-cell table:style-name="ce176" table:formula="of:=[Finals.C13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B$3:.$B$34]; [.C13])&gt;0; VLOOKUP([.C13]; [Seeds.$B$3:.$K$34]; 5; 0); &quot;??&quot;)" office:value-type="string" office:string-value="?" calcext:value-type="string">
            <text:p>?</text:p>
          </table:table-cell>
          <table:table-cell table:style-name="ce176" table:formula="of:=IF(OR(ISBLANK([.C13]); [.C13]=&quot;&quot;); &quot;&quot;; WHICHROUND(COUNTIF([$ML.$A$3:.$V$130]; [.C13]) + COUNTIF([$Finals.$A$3:.$AF$19]; [.C13])))">
            <text:p/>
          </table:table-cell>
          <table:table-cell table:style-name="ce188" table:formula="of:=IF([.G13]=&quot;&quot;; &quot;&quot;; IF([.G13]=&quot;W&quot;; 8; IF(HASLOST(VLOOKUP([.$C13];  INDIRECT(VLOOKUP([.$G13]; [Extra.$W$2:.$AP$9]; 19; 0)); 8; 0)); 0; 1)))">
            <text:p/>
          </table:table-cell>
          <table:table-cell table:style-name="ce176" table:formula="of:=IF([.C13]=&quot;&quot;; &quot;&quot;; INDIRECT(ADDRESS([Extra.$AM12]; [Extra.$AN12]-1; 1;1; &quot;Finals&quot;)))">
            <text:p/>
          </table:table-cell>
          <table:table-cell table:style-name="ce500" table:formula="of:=IF([.C13]=&quot;&quot;; &quot;&quot;; INDIRECT(ADDRESS([Extra.$AM12]; [Extra.$AN12]; 1;1; &quot;Finals&quot;)))">
            <text:p/>
          </table:table-cell>
          <table:table-cell table:style-name="ce176" table:formula="of:=IF([.C13]=&quot;&quot;; &quot;&quot;; INDIRECT(ADDRESS([Extra.$AM12]; [Extra.$AN12]+1; 1;1; &quot;Finals&quot;)))">
            <text:p/>
          </table:table-cell>
          <table:table-cell table:style-name="ce202" table:formula="of:=IF(AND(NOT([.G13]=&quot;&quot;); NOT([.F13]=&quot;D&quot;); NOT([.F13]=&quot;?&quot;); NOT([.G13]=&quot;D&quot;); NOT(ISBLANK([.F13])); NOT(ISBLANK([.G13]))); DIFFROUND([.F13]; [.G13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13]+1" office:value-type="float" office:value="12" calcext:value-type="float">
            <text:p>12</text:p>
          </table:table-cell>
          <table:table-cell table:style-name="ce455" table:formula="of:=[Finals.A14]">
            <text:p/>
          </table:table-cell>
          <table:table-cell table:style-name="ce492" table:formula="of:=[Finals.B14]">
            <text:p/>
          </table:table-cell>
          <table:table-cell table:style-name="ce175" table:formula="of:=[Finals.C14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B$3:.$B$34]; [.C14])&gt;0; VLOOKUP([.C14]; [Seeds.$B$3:.$K$34]; 5; 0); &quot;??&quot;)" office:value-type="string" office:string-value="?" calcext:value-type="string">
            <text:p>?</text:p>
          </table:table-cell>
          <table:table-cell table:style-name="ce175" table:formula="of:=IF(OR(ISBLANK([.C14]); [.C14]=&quot;&quot;); &quot;&quot;; WHICHROUND(COUNTIF([$ML.$A$3:.$V$130]; [.C14]) + COUNTIF([$Finals.$A$3:.$AF$19]; [.C14])))">
            <text:p/>
          </table:table-cell>
          <table:table-cell table:style-name="ce189" table:formula="of:=IF([.G14]=&quot;&quot;; &quot;&quot;; IF([.G14]=&quot;W&quot;; 8; IF(HASLOST(VLOOKUP([.$C14];  INDIRECT(VLOOKUP([.$G14]; [Extra.$W$2:.$AP$9]; 19; 0)); 8; 0)); 0; 1)))">
            <text:p/>
          </table:table-cell>
          <table:table-cell table:style-name="ce175" table:formula="of:=IF([.C14]=&quot;&quot;; &quot;&quot;; INDIRECT(ADDRESS([Extra.$AM13]; [Extra.$AN13]-1; 1;1; &quot;Finals&quot;)))">
            <text:p/>
          </table:table-cell>
          <table:table-cell table:style-name="ce501" table:formula="of:=IF([.C14]=&quot;&quot;; &quot;&quot;; INDIRECT(ADDRESS([Extra.$AM13]; [Extra.$AN13]; 1;1; &quot;Finals&quot;)))">
            <text:p/>
          </table:table-cell>
          <table:table-cell table:style-name="ce175" table:formula="of:=IF([.C14]=&quot;&quot;; &quot;&quot;; INDIRECT(ADDRESS([Extra.$AM13]; [Extra.$AN13]+1; 1;1; &quot;Finals&quot;)))">
            <text:p/>
          </table:table-cell>
          <table:table-cell table:style-name="ce203" table:formula="of:=IF(AND(NOT([.G14]=&quot;&quot;); NOT([.F14]=&quot;D&quot;); NOT([.F14]=&quot;?&quot;); NOT([.G14]=&quot;D&quot;); NOT(ISBLANK([.F14])); NOT(ISBLANK([.G14]))); DIFFROUND([.F14]; [.G14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14]+1" office:value-type="float" office:value="13" calcext:value-type="float">
            <text:p>13</text:p>
          </table:table-cell>
          <table:table-cell table:style-name="ce454" table:formula="of:=[Finals.A15]">
            <text:p/>
          </table:table-cell>
          <table:table-cell table:style-name="ce491" table:formula="of:=[Finals.B15]">
            <text:p/>
          </table:table-cell>
          <table:table-cell table:style-name="ce176" table:formula="of:=[Finals.C15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B$3:.$B$34]; [.C15])&gt;0; VLOOKUP([.C15]; [Seeds.$B$3:.$K$34]; 5; 0); &quot;??&quot;)" office:value-type="string" office:string-value="?" calcext:value-type="string">
            <text:p>?</text:p>
          </table:table-cell>
          <table:table-cell table:style-name="ce176" table:formula="of:=IF(OR(ISBLANK([.C15]); [.C15]=&quot;&quot;); &quot;&quot;; WHICHROUND(COUNTIF([$ML.$A$3:.$V$130]; [.C15]) + COUNTIF([$Finals.$A$3:.$AF$19]; [.C15])))">
            <text:p/>
          </table:table-cell>
          <table:table-cell table:style-name="ce188" table:formula="of:=IF([.G15]=&quot;&quot;; &quot;&quot;; IF([.G15]=&quot;W&quot;; 8; IF(HASLOST(VLOOKUP([.$C15];  INDIRECT(VLOOKUP([.$G15]; [Extra.$W$2:.$AP$9]; 19; 0)); 8; 0)); 0; 1)))">
            <text:p/>
          </table:table-cell>
          <table:table-cell table:style-name="ce176" table:formula="of:=IF([.C15]=&quot;&quot;; &quot;&quot;; INDIRECT(ADDRESS([Extra.$AM14]; [Extra.$AN14]-1; 1;1; &quot;Finals&quot;)))">
            <text:p/>
          </table:table-cell>
          <table:table-cell table:style-name="ce500" table:formula="of:=IF([.C15]=&quot;&quot;; &quot;&quot;; INDIRECT(ADDRESS([Extra.$AM14]; [Extra.$AN14]; 1;1; &quot;Finals&quot;)))">
            <text:p/>
          </table:table-cell>
          <table:table-cell table:style-name="ce176" table:formula="of:=IF([.C15]=&quot;&quot;; &quot;&quot;; INDIRECT(ADDRESS([Extra.$AM14]; [Extra.$AN14]+1; 1;1; &quot;Finals&quot;)))">
            <text:p/>
          </table:table-cell>
          <table:table-cell table:style-name="ce202" table:formula="of:=IF(AND(NOT([.G15]=&quot;&quot;); NOT([.F15]=&quot;D&quot;); NOT([.F15]=&quot;?&quot;); NOT([.G15]=&quot;D&quot;); NOT(ISBLANK([.F15])); NOT(ISBLANK([.G15]))); DIFFROUND([.F15]; [.G15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15]+1" office:value-type="float" office:value="14" calcext:value-type="float">
            <text:p>14</text:p>
          </table:table-cell>
          <table:table-cell table:style-name="ce455" table:formula="of:=[Finals.A16]">
            <text:p/>
          </table:table-cell>
          <table:table-cell table:style-name="ce492" table:formula="of:=[Finals.B16]">
            <text:p/>
          </table:table-cell>
          <table:table-cell table:style-name="ce175" table:formula="of:=[Finals.C16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B$3:.$B$34]; [.C16])&gt;0; VLOOKUP([.C16]; [Seeds.$B$3:.$K$34]; 5; 0); &quot;??&quot;)" office:value-type="string" office:string-value="?" calcext:value-type="string">
            <text:p>?</text:p>
          </table:table-cell>
          <table:table-cell table:style-name="ce175" table:formula="of:=IF(OR(ISBLANK([.C16]); [.C16]=&quot;&quot;); &quot;&quot;; WHICHROUND(COUNTIF([$ML.$A$3:.$V$130]; [.C16]) + COUNTIF([$Finals.$A$3:.$AF$19]; [.C16])))">
            <text:p/>
          </table:table-cell>
          <table:table-cell table:style-name="ce189" table:formula="of:=IF([.G16]=&quot;&quot;; &quot;&quot;; IF([.G16]=&quot;W&quot;; 8; IF(HASLOST(VLOOKUP([.$C16];  INDIRECT(VLOOKUP([.$G16]; [Extra.$W$2:.$AP$9]; 19; 0)); 8; 0)); 0; 1)))">
            <text:p/>
          </table:table-cell>
          <table:table-cell table:style-name="ce175" table:formula="of:=IF([.C16]=&quot;&quot;; &quot;&quot;; INDIRECT(ADDRESS([Extra.$AM15]; [Extra.$AN15]-1; 1;1; &quot;Finals&quot;)))">
            <text:p/>
          </table:table-cell>
          <table:table-cell table:style-name="ce501" table:formula="of:=IF([.C16]=&quot;&quot;; &quot;&quot;; INDIRECT(ADDRESS([Extra.$AM15]; [Extra.$AN15]; 1;1; &quot;Finals&quot;)))">
            <text:p/>
          </table:table-cell>
          <table:table-cell table:style-name="ce175" table:formula="of:=IF([.C16]=&quot;&quot;; &quot;&quot;; INDIRECT(ADDRESS([Extra.$AM15]; [Extra.$AN15]+1; 1;1; &quot;Finals&quot;)))">
            <text:p/>
          </table:table-cell>
          <table:table-cell table:style-name="ce203" table:formula="of:=IF(AND(NOT([.G16]=&quot;&quot;); NOT([.F16]=&quot;D&quot;); NOT([.F16]=&quot;?&quot;); NOT([.G16]=&quot;D&quot;); NOT(ISBLANK([.F16])); NOT(ISBLANK([.G16]))); DIFFROUND([.F16]; [.G16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16]+1" office:value-type="float" office:value="15" calcext:value-type="float">
            <text:p>15</text:p>
          </table:table-cell>
          <table:table-cell table:style-name="ce454" table:formula="of:=[Finals.A17]">
            <text:p/>
          </table:table-cell>
          <table:table-cell table:style-name="ce491" table:formula="of:=[Finals.B17]">
            <text:p/>
          </table:table-cell>
          <table:table-cell table:style-name="ce176" table:formula="of:=[Finals.C17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B$3:.$B$34]; [.C17])&gt;0; VLOOKUP([.C17]; [Seeds.$B$3:.$K$34]; 5; 0); &quot;??&quot;)" office:value-type="string" office:string-value="?" calcext:value-type="string">
            <text:p>?</text:p>
          </table:table-cell>
          <table:table-cell table:style-name="ce176" table:formula="of:=IF(OR(ISBLANK([.C17]); [.C17]=&quot;&quot;); &quot;&quot;; WHICHROUND(COUNTIF([$ML.$A$3:.$V$130]; [.C17]) + COUNTIF([$Finals.$A$3:.$AF$19]; [.C17])))">
            <text:p/>
          </table:table-cell>
          <table:table-cell table:style-name="ce188" table:formula="of:=IF([.G17]=&quot;&quot;; &quot;&quot;; IF([.G17]=&quot;W&quot;; 8; IF(HASLOST(VLOOKUP([.$C17];  INDIRECT(VLOOKUP([.$G17]; [Extra.$W$2:.$AP$9]; 19; 0)); 8; 0)); 0; 1)))">
            <text:p/>
          </table:table-cell>
          <table:table-cell table:style-name="ce176" table:formula="of:=IF([.C17]=&quot;&quot;; &quot;&quot;; INDIRECT(ADDRESS([Extra.$AM16]; [Extra.$AN16]-1; 1;1; &quot;Finals&quot;)))">
            <text:p/>
          </table:table-cell>
          <table:table-cell table:style-name="ce500" table:formula="of:=IF([.C17]=&quot;&quot;; &quot;&quot;; INDIRECT(ADDRESS([Extra.$AM16]; [Extra.$AN16]; 1;1; &quot;Finals&quot;)))">
            <text:p/>
          </table:table-cell>
          <table:table-cell table:style-name="ce176" table:formula="of:=IF([.C17]=&quot;&quot;; &quot;&quot;; INDIRECT(ADDRESS([Extra.$AM16]; [Extra.$AN16]+1; 1;1; &quot;Finals&quot;)))">
            <text:p/>
          </table:table-cell>
          <table:table-cell table:style-name="ce202" table:formula="of:=IF(AND(NOT([.G17]=&quot;&quot;); NOT([.F17]=&quot;D&quot;); NOT([.F17]=&quot;?&quot;); NOT([.G17]=&quot;D&quot;); NOT(ISBLANK([.F17])); NOT(ISBLANK([.G17]))); DIFFROUND([.F17]; [.G17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17]+1" office:value-type="float" office:value="16" calcext:value-type="float">
            <text:p>16</text:p>
          </table:table-cell>
          <table:table-cell table:style-name="ce455" table:formula="of:=[Finals.A18]">
            <text:p/>
          </table:table-cell>
          <table:table-cell table:style-name="ce492" table:formula="of:=[Finals.B18]">
            <text:p/>
          </table:table-cell>
          <table:table-cell table:style-name="ce175" table:formula="of:=[Finals.C18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B$3:.$B$34]; [.C18])&gt;0; VLOOKUP([.C18]; [Seeds.$B$3:.$K$34]; 5; 0); &quot;??&quot;)" office:value-type="string" office:string-value="?" calcext:value-type="string">
            <text:p>?</text:p>
          </table:table-cell>
          <table:table-cell table:style-name="ce175" table:formula="of:=IF(OR(ISBLANK([.C18]); [.C18]=&quot;&quot;); &quot;&quot;; WHICHROUND(COUNTIF([$ML.$A$3:.$V$130]; [.C18]) + COUNTIF([$Finals.$A$3:.$AF$19]; [.C18])))">
            <text:p/>
          </table:table-cell>
          <table:table-cell table:style-name="ce189" table:formula="of:=IF([.G18]=&quot;&quot;; &quot;&quot;; IF([.G18]=&quot;W&quot;; 8; IF(HASLOST(VLOOKUP([.$C18];  INDIRECT(VLOOKUP([.$G18]; [Extra.$W$2:.$AP$9]; 19; 0)); 8; 0)); 0; 1)))">
            <text:p/>
          </table:table-cell>
          <table:table-cell table:style-name="ce175" table:formula="of:=IF([.C18]=&quot;&quot;; &quot;&quot;; INDIRECT(ADDRESS([Extra.$AM17]; [Extra.$AN17]-1; 1;1; &quot;Finals&quot;)))">
            <text:p/>
          </table:table-cell>
          <table:table-cell table:style-name="ce501" table:formula="of:=IF([.C18]=&quot;&quot;; &quot;&quot;; INDIRECT(ADDRESS([Extra.$AM17]; [Extra.$AN17]; 1;1; &quot;Finals&quot;)))">
            <text:p/>
          </table:table-cell>
          <table:table-cell table:style-name="ce175" table:formula="of:=IF([.C18]=&quot;&quot;; &quot;&quot;; INDIRECT(ADDRESS([Extra.$AM17]; [Extra.$AN17]+1; 1;1; &quot;Finals&quot;)))">
            <text:p/>
          </table:table-cell>
          <table:table-cell table:style-name="ce203" table:formula="of:=IF(AND(NOT([.G18]=&quot;&quot;); NOT([.F18]=&quot;D&quot;); NOT([.F18]=&quot;?&quot;); NOT([.G18]=&quot;D&quot;); NOT(ISBLANK([.F18])); NOT(ISBLANK([.G18]))); DIFFROUND([.F18]; [.G18]); &quot;&quot;)">
            <text:p/>
          </table:table-cell>
          <table:table-cell table:number-columns-repeated="244"/>
        </table:table-row>
        <table:table-row table:style-name="ro1">
          <table:table-cell table:style-name="ce231" office:value-type="float" office:value="1" calcext:value-type="float">
            <text:p>1</text:p>
          </table:table-cell>
          <table:table-cell table:style-name="ce456" table:formula="of:=[Finals.A21]">
            <text:p/>
          </table:table-cell>
          <table:table-cell table:style-name="ce493" table:formula="of:=[Finals.B21]">
            <text:p/>
          </table:table-cell>
          <table:table-cell table:style-name="ce177" table:formula="of:=[Finals.C21]">
            <text:p/>
          </table:table-cell>
          <table:table-cell table:style-name="ce462" office:value-type="string" calcext:value-type="string">
            <text:p>?</text:p>
          </table:table-cell>
          <table:table-cell table:style-name="ce177" table:formula="of:=IF(COUNTIF([Seeds.$M$3:.$M$34]; [.C19])&gt;0; VLOOKUP([.C19]; [Seeds.$M$3:.$V$34]; 5; 0); &quot;??&quot;)" office:value-type="string" office:string-value="?" calcext:value-type="string">
            <text:p>?</text:p>
          </table:table-cell>
          <table:table-cell table:style-name="ce177" table:formula="of:=IF(OR(ISBLANK([.C19]); [.C19]=&quot;&quot;); &quot;&quot;; WHICHROUND(COUNTIF([$FL.$A$3:.$R$130]; [.C19]) + COUNTIF([$Finals.$A$20:.$AF$36]; [.C19])))">
            <text:p/>
          </table:table-cell>
          <table:table-cell table:style-name="ce190" table:formula="of:=IF([.G19]=&quot;&quot;; &quot;&quot;; IF([.G19]=&quot;W&quot;; 8; IF(HASLOST(VLOOKUP([.$C19];  INDIRECT(VLOOKUP([.$G19]; [Extra.$W$2:.$AP$9]; 20; 0)); 8; 0)); 0; 1)))">
            <text:p/>
          </table:table-cell>
          <table:table-cell table:style-name="ce177" table:formula="of:=IF([.C19]=&quot;&quot;; &quot;&quot;; INDIRECT(ADDRESS([Extra.$AM18]; [Extra.$AN18]-1; 1;1; &quot;Finals&quot;)))">
            <text:p/>
          </table:table-cell>
          <table:table-cell table:style-name="ce502" table:formula="of:=IF([.C19]=&quot;&quot;; &quot;&quot;; INDIRECT(ADDRESS([Extra.$AM18]; [Extra.$AN18]; 1;1; &quot;Finals&quot;)))">
            <text:p/>
          </table:table-cell>
          <table:table-cell table:style-name="ce177" table:formula="of:=IF([.C19]=&quot;&quot;; &quot;&quot;; INDIRECT(ADDRESS([Extra.$AM18]; [Extra.$AN18]+1; 1;1; &quot;Finals&quot;)))">
            <text:p/>
          </table:table-cell>
          <table:table-cell table:style-name="ce204" table:formula="of:=IF(AND(NOT([.G19]=&quot;&quot;); NOT([.F19]=&quot;D&quot;); NOT([.F19]=&quot;?&quot;); NOT([.G19]=&quot;D&quot;); NOT(ISBLANK([.F19])); NOT(ISBLANK([.G19]))); DIFFROUND([.F19]; [.G19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19]+1" office:value-type="float" office:value="2" calcext:value-type="float">
            <text:p>2</text:p>
          </table:table-cell>
          <table:table-cell table:style-name="ce455" table:formula="of:=[Finals.A22]">
            <text:p/>
          </table:table-cell>
          <table:table-cell table:style-name="ce492" table:formula="of:=[Finals.B22]">
            <text:p/>
          </table:table-cell>
          <table:table-cell table:style-name="ce175" table:formula="of:=[Finals.C22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M$3:.$M$34]; [.C20])&gt;0; VLOOKUP([.C20]; [Seeds.$M$3:.$V$34]; 5; 0); &quot;??&quot;)" office:value-type="string" office:string-value="?" calcext:value-type="string">
            <text:p>?</text:p>
          </table:table-cell>
          <table:table-cell table:style-name="ce175" table:formula="of:=IF(OR(ISBLANK([.C20]); [.C20]=&quot;&quot;); &quot;&quot;; WHICHROUND(COUNTIF([$FL.$A$3:.$R$130]; [.C20]) + COUNTIF([$Finals.$A$20:.$AF$36]; [.C20])))">
            <text:p/>
          </table:table-cell>
          <table:table-cell table:style-name="ce189" table:formula="of:=IF([.G20]=&quot;&quot;; &quot;&quot;; IF([.G20]=&quot;W&quot;; 8; IF(HASLOST(VLOOKUP([.$C20];  INDIRECT(VLOOKUP([.$G20]; [Extra.$W$2:.$AP$9]; 20; 0)); 8; 0)); 0; 1)))">
            <text:p/>
          </table:table-cell>
          <table:table-cell table:style-name="ce175" table:formula="of:=IF([.C20]=&quot;&quot;; &quot;&quot;; INDIRECT(ADDRESS([Extra.$AM19]; [Extra.$AN19]-1; 1;1; &quot;Finals&quot;)))">
            <text:p/>
          </table:table-cell>
          <table:table-cell table:style-name="ce501" table:formula="of:=IF([.C20]=&quot;&quot;; &quot;&quot;; INDIRECT(ADDRESS([Extra.$AM19]; [Extra.$AN19]; 1;1; &quot;Finals&quot;)))">
            <text:p/>
          </table:table-cell>
          <table:table-cell table:style-name="ce175" table:formula="of:=IF([.C20]=&quot;&quot;; &quot;&quot;; INDIRECT(ADDRESS([Extra.$AM19]; [Extra.$AN19]+1; 1;1; &quot;Finals&quot;)))">
            <text:p/>
          </table:table-cell>
          <table:table-cell table:style-name="ce203" table:formula="of:=IF(AND(NOT([.G20]=&quot;&quot;); NOT([.F20]=&quot;D&quot;); NOT([.F20]=&quot;?&quot;); NOT([.G20]=&quot;D&quot;); NOT(ISBLANK([.F20])); NOT(ISBLANK([.G20]))); DIFFROUND([.F20]; [.G20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20]+1" office:value-type="float" office:value="3" calcext:value-type="float">
            <text:p>3</text:p>
          </table:table-cell>
          <table:table-cell table:style-name="ce454" table:formula="of:=[Finals.A23]">
            <text:p/>
          </table:table-cell>
          <table:table-cell table:style-name="ce491" table:formula="of:=[Finals.B23]">
            <text:p/>
          </table:table-cell>
          <table:table-cell table:style-name="ce176" table:formula="of:=[Finals.C23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M$3:.$M$34]; [.C21])&gt;0; VLOOKUP([.C21]; [Seeds.$M$3:.$V$34]; 5; 0); &quot;??&quot;)" office:value-type="string" office:string-value="?" calcext:value-type="string">
            <text:p>?</text:p>
          </table:table-cell>
          <table:table-cell table:style-name="ce176" table:formula="of:=IF(OR(ISBLANK([.C21]); [.C21]=&quot;&quot;); &quot;&quot;; WHICHROUND(COUNTIF([$FL.$A$3:.$R$130]; [.C21]) + COUNTIF([$Finals.$A$20:.$AF$36]; [.C21])))">
            <text:p/>
          </table:table-cell>
          <table:table-cell table:style-name="ce188" table:formula="of:=IF([.G21]=&quot;&quot;; &quot;&quot;; IF([.G21]=&quot;W&quot;; 8; IF(HASLOST(VLOOKUP([.$C21];  INDIRECT(VLOOKUP([.$G21]; [Extra.$W$2:.$AP$9]; 20; 0)); 8; 0)); 0; 1)))">
            <text:p/>
          </table:table-cell>
          <table:table-cell table:style-name="ce176" table:formula="of:=IF([.C21]=&quot;&quot;; &quot;&quot;; INDIRECT(ADDRESS([Extra.$AM20]; [Extra.$AN20]-1; 1;1; &quot;Finals&quot;)))">
            <text:p/>
          </table:table-cell>
          <table:table-cell table:style-name="ce500" table:formula="of:=IF([.C21]=&quot;&quot;; &quot;&quot;; INDIRECT(ADDRESS([Extra.$AM20]; [Extra.$AN20]; 1;1; &quot;Finals&quot;)))">
            <text:p/>
          </table:table-cell>
          <table:table-cell table:style-name="ce176" table:formula="of:=IF([.C21]=&quot;&quot;; &quot;&quot;; INDIRECT(ADDRESS([Extra.$AM20]; [Extra.$AN20]+1; 1;1; &quot;Finals&quot;)))">
            <text:p/>
          </table:table-cell>
          <table:table-cell table:style-name="ce202" table:formula="of:=IF(AND(NOT([.G21]=&quot;&quot;); NOT([.F21]=&quot;D&quot;); NOT([.F21]=&quot;?&quot;); NOT([.G21]=&quot;D&quot;); NOT(ISBLANK([.F21])); NOT(ISBLANK([.G21]))); DIFFROUND([.F21]; [.G21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21]+1" office:value-type="float" office:value="4" calcext:value-type="float">
            <text:p>4</text:p>
          </table:table-cell>
          <table:table-cell table:style-name="ce455" table:formula="of:=[Finals.A24]">
            <text:p/>
          </table:table-cell>
          <table:table-cell table:style-name="ce492" table:formula="of:=[Finals.B24]">
            <text:p/>
          </table:table-cell>
          <table:table-cell table:style-name="ce175" table:formula="of:=[Finals.C24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M$3:.$M$34]; [.C22])&gt;0; VLOOKUP([.C22]; [Seeds.$M$3:.$V$34]; 5; 0); &quot;??&quot;)" office:value-type="string" office:string-value="?" calcext:value-type="string">
            <text:p>?</text:p>
          </table:table-cell>
          <table:table-cell table:style-name="ce175" table:formula="of:=IF(OR(ISBLANK([.C22]); [.C22]=&quot;&quot;); &quot;&quot;; WHICHROUND(COUNTIF([$FL.$A$3:.$R$130]; [.C22]) + COUNTIF([$Finals.$A$20:.$AF$36]; [.C22])))">
            <text:p/>
          </table:table-cell>
          <table:table-cell table:style-name="ce189" table:formula="of:=IF([.G22]=&quot;&quot;; &quot;&quot;; IF([.G22]=&quot;W&quot;; 8; IF(HASLOST(VLOOKUP([.$C22];  INDIRECT(VLOOKUP([.$G22]; [Extra.$W$2:.$AP$9]; 20; 0)); 8; 0)); 0; 1)))">
            <text:p/>
          </table:table-cell>
          <table:table-cell table:style-name="ce175" table:formula="of:=IF([.C22]=&quot;&quot;; &quot;&quot;; INDIRECT(ADDRESS([Extra.$AM21]; [Extra.$AN21]-1; 1;1; &quot;Finals&quot;)))">
            <text:p/>
          </table:table-cell>
          <table:table-cell table:style-name="ce501" table:formula="of:=IF([.C22]=&quot;&quot;; &quot;&quot;; INDIRECT(ADDRESS([Extra.$AM21]; [Extra.$AN21]; 1;1; &quot;Finals&quot;)))">
            <text:p/>
          </table:table-cell>
          <table:table-cell table:style-name="ce175" table:formula="of:=IF([.C22]=&quot;&quot;; &quot;&quot;; INDIRECT(ADDRESS([Extra.$AM21]; [Extra.$AN21]+1; 1;1; &quot;Finals&quot;)))">
            <text:p/>
          </table:table-cell>
          <table:table-cell table:style-name="ce203" table:formula="of:=IF(AND(NOT([.G22]=&quot;&quot;); NOT([.F22]=&quot;D&quot;); NOT([.F22]=&quot;?&quot;); NOT([.G22]=&quot;D&quot;); NOT(ISBLANK([.F22])); NOT(ISBLANK([.G22]))); DIFFROUND([.F22]; [.G22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22]+1" office:value-type="float" office:value="5" calcext:value-type="float">
            <text:p>5</text:p>
          </table:table-cell>
          <table:table-cell table:style-name="ce454" table:formula="of:=[Finals.A25]">
            <text:p/>
          </table:table-cell>
          <table:table-cell table:style-name="ce491" table:formula="of:=[Finals.B25]">
            <text:p/>
          </table:table-cell>
          <table:table-cell table:style-name="ce176" table:formula="of:=[Finals.C25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M$3:.$M$34]; [.C23])&gt;0; VLOOKUP([.C23]; [Seeds.$M$3:.$V$34]; 5; 0); &quot;??&quot;)" office:value-type="string" office:string-value="?" calcext:value-type="string">
            <text:p>?</text:p>
          </table:table-cell>
          <table:table-cell table:style-name="ce176" table:formula="of:=IF(OR(ISBLANK([.C23]); [.C23]=&quot;&quot;); &quot;&quot;; WHICHROUND(COUNTIF([$FL.$A$3:.$R$130]; [.C23]) + COUNTIF([$Finals.$A$20:.$AF$36]; [.C23])))">
            <text:p/>
          </table:table-cell>
          <table:table-cell table:style-name="ce188" table:formula="of:=IF([.G23]=&quot;&quot;; &quot;&quot;; IF([.G23]=&quot;W&quot;; 8; IF(HASLOST(VLOOKUP([.$C23];  INDIRECT(VLOOKUP([.$G23]; [Extra.$W$2:.$AP$9]; 20; 0)); 8; 0)); 0; 1)))">
            <text:p/>
          </table:table-cell>
          <table:table-cell table:style-name="ce176" table:formula="of:=IF([.C23]=&quot;&quot;; &quot;&quot;; INDIRECT(ADDRESS([Extra.$AM22]; [Extra.$AN22]-1; 1;1; &quot;Finals&quot;)))">
            <text:p/>
          </table:table-cell>
          <table:table-cell table:style-name="ce500" table:formula="of:=IF([.C23]=&quot;&quot;; &quot;&quot;; INDIRECT(ADDRESS([Extra.$AM22]; [Extra.$AN22]; 1;1; &quot;Finals&quot;)))">
            <text:p/>
          </table:table-cell>
          <table:table-cell table:style-name="ce176" table:formula="of:=IF([.C23]=&quot;&quot;; &quot;&quot;; INDIRECT(ADDRESS([Extra.$AM22]; [Extra.$AN22]+1; 1;1; &quot;Finals&quot;)))">
            <text:p/>
          </table:table-cell>
          <table:table-cell table:style-name="ce202" table:formula="of:=IF(AND(NOT([.G23]=&quot;&quot;); NOT([.F23]=&quot;D&quot;); NOT([.F23]=&quot;?&quot;); NOT([.G23]=&quot;D&quot;); NOT(ISBLANK([.F23])); NOT(ISBLANK([.G23]))); DIFFROUND([.F23]; [.G23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23]+1" office:value-type="float" office:value="6" calcext:value-type="float">
            <text:p>6</text:p>
          </table:table-cell>
          <table:table-cell table:style-name="ce455" table:formula="of:=[Finals.A26]">
            <text:p/>
          </table:table-cell>
          <table:table-cell table:style-name="ce492" table:formula="of:=[Finals.B26]">
            <text:p/>
          </table:table-cell>
          <table:table-cell table:style-name="ce175" table:formula="of:=[Finals.C26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M$3:.$M$34]; [.C24])&gt;0; VLOOKUP([.C24]; [Seeds.$M$3:.$V$34]; 5; 0); &quot;??&quot;)" office:value-type="string" office:string-value="?" calcext:value-type="string">
            <text:p>?</text:p>
          </table:table-cell>
          <table:table-cell table:style-name="ce175" table:formula="of:=IF(OR(ISBLANK([.C24]); [.C24]=&quot;&quot;); &quot;&quot;; WHICHROUND(COUNTIF([$FL.$A$3:.$R$130]; [.C24]) + COUNTIF([$Finals.$A$20:.$AF$36]; [.C24])))">
            <text:p/>
          </table:table-cell>
          <table:table-cell table:style-name="ce189" table:formula="of:=IF([.G24]=&quot;&quot;; &quot;&quot;; IF([.G24]=&quot;W&quot;; 8; IF(HASLOST(VLOOKUP([.$C24];  INDIRECT(VLOOKUP([.$G24]; [Extra.$W$2:.$AP$9]; 20; 0)); 8; 0)); 0; 1)))">
            <text:p/>
          </table:table-cell>
          <table:table-cell table:style-name="ce175" table:formula="of:=IF([.C24]=&quot;&quot;; &quot;&quot;; INDIRECT(ADDRESS([Extra.$AM23]; [Extra.$AN23]-1; 1;1; &quot;Finals&quot;)))">
            <text:p/>
          </table:table-cell>
          <table:table-cell table:style-name="ce501" table:formula="of:=IF([.C24]=&quot;&quot;; &quot;&quot;; INDIRECT(ADDRESS([Extra.$AM23]; [Extra.$AN23]; 1;1; &quot;Finals&quot;)))">
            <text:p/>
          </table:table-cell>
          <table:table-cell table:style-name="ce175" table:formula="of:=IF([.C24]=&quot;&quot;; &quot;&quot;; INDIRECT(ADDRESS([Extra.$AM23]; [Extra.$AN23]+1; 1;1; &quot;Finals&quot;)))">
            <text:p/>
          </table:table-cell>
          <table:table-cell table:style-name="ce203" table:formula="of:=IF(AND(NOT([.G24]=&quot;&quot;); NOT([.F24]=&quot;D&quot;); NOT([.F24]=&quot;?&quot;); NOT([.G24]=&quot;D&quot;); NOT(ISBLANK([.F24])); NOT(ISBLANK([.G24]))); DIFFROUND([.F24]; [.G24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24]+1" office:value-type="float" office:value="7" calcext:value-type="float">
            <text:p>7</text:p>
          </table:table-cell>
          <table:table-cell table:style-name="ce454" table:formula="of:=[Finals.A27]">
            <text:p/>
          </table:table-cell>
          <table:table-cell table:style-name="ce491" table:formula="of:=[Finals.B27]">
            <text:p/>
          </table:table-cell>
          <table:table-cell table:style-name="ce176" table:formula="of:=[Finals.C27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M$3:.$M$34]; [.C25])&gt;0; VLOOKUP([.C25]; [Seeds.$M$3:.$V$34]; 5; 0); &quot;??&quot;)" office:value-type="string" office:string-value="?" calcext:value-type="string">
            <text:p>?</text:p>
          </table:table-cell>
          <table:table-cell table:style-name="ce176" table:formula="of:=IF(OR(ISBLANK([.C25]); [.C25]=&quot;&quot;); &quot;&quot;; WHICHROUND(COUNTIF([$FL.$A$3:.$R$130]; [.C25]) + COUNTIF([$Finals.$A$20:.$AF$36]; [.C25])))">
            <text:p/>
          </table:table-cell>
          <table:table-cell table:style-name="ce188" table:formula="of:=IF([.G25]=&quot;&quot;; &quot;&quot;; IF([.G25]=&quot;W&quot;; 8; IF(HASLOST(VLOOKUP([.$C25];  INDIRECT(VLOOKUP([.$G25]; [Extra.$W$2:.$AP$9]; 20; 0)); 8; 0)); 0; 1)))">
            <text:p/>
          </table:table-cell>
          <table:table-cell table:style-name="ce176" table:formula="of:=IF([.C25]=&quot;&quot;; &quot;&quot;; INDIRECT(ADDRESS([Extra.$AM24]; [Extra.$AN24]-1; 1;1; &quot;Finals&quot;)))">
            <text:p/>
          </table:table-cell>
          <table:table-cell table:style-name="ce500" table:formula="of:=IF([.C25]=&quot;&quot;; &quot;&quot;; INDIRECT(ADDRESS([Extra.$AM24]; [Extra.$AN24]; 1;1; &quot;Finals&quot;)))">
            <text:p/>
          </table:table-cell>
          <table:table-cell table:style-name="ce176" table:formula="of:=IF([.C25]=&quot;&quot;; &quot;&quot;; INDIRECT(ADDRESS([Extra.$AM24]; [Extra.$AN24]+1; 1;1; &quot;Finals&quot;)))">
            <text:p/>
          </table:table-cell>
          <table:table-cell table:style-name="ce202" table:formula="of:=IF(AND(NOT([.G25]=&quot;&quot;); NOT([.F25]=&quot;D&quot;); NOT([.F25]=&quot;?&quot;); NOT([.G25]=&quot;D&quot;); NOT(ISBLANK([.F25])); NOT(ISBLANK([.G25]))); DIFFROUND([.F25]; [.G25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25]+1" office:value-type="float" office:value="8" calcext:value-type="float">
            <text:p>8</text:p>
          </table:table-cell>
          <table:table-cell table:style-name="ce455" table:formula="of:=[Finals.A28]">
            <text:p/>
          </table:table-cell>
          <table:table-cell table:style-name="ce492" table:formula="of:=[Finals.B28]">
            <text:p/>
          </table:table-cell>
          <table:table-cell table:style-name="ce175" table:formula="of:=[Finals.C28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M$3:.$M$34]; [.C26])&gt;0; VLOOKUP([.C26]; [Seeds.$M$3:.$V$34]; 5; 0); &quot;??&quot;)" office:value-type="string" office:string-value="?" calcext:value-type="string">
            <text:p>?</text:p>
          </table:table-cell>
          <table:table-cell table:style-name="ce175" table:formula="of:=IF(OR(ISBLANK([.C26]); [.C26]=&quot;&quot;); &quot;&quot;; WHICHROUND(COUNTIF([$FL.$A$3:.$R$130]; [.C26]) + COUNTIF([$Finals.$A$20:.$AF$36]; [.C26])))">
            <text:p/>
          </table:table-cell>
          <table:table-cell table:style-name="ce189" table:formula="of:=IF([.G26]=&quot;&quot;; &quot;&quot;; IF([.G26]=&quot;W&quot;; 8; IF(HASLOST(VLOOKUP([.$C26];  INDIRECT(VLOOKUP([.$G26]; [Extra.$W$2:.$AP$9]; 20; 0)); 8; 0)); 0; 1)))">
            <text:p/>
          </table:table-cell>
          <table:table-cell table:style-name="ce175" table:formula="of:=IF([.C26]=&quot;&quot;; &quot;&quot;; INDIRECT(ADDRESS([Extra.$AM25]; [Extra.$AN25]-1; 1;1; &quot;Finals&quot;)))">
            <text:p/>
          </table:table-cell>
          <table:table-cell table:style-name="ce501" table:formula="of:=IF([.C26]=&quot;&quot;; &quot;&quot;; INDIRECT(ADDRESS([Extra.$AM25]; [Extra.$AN25]; 1;1; &quot;Finals&quot;)))">
            <text:p/>
          </table:table-cell>
          <table:table-cell table:style-name="ce175" table:formula="of:=IF([.C26]=&quot;&quot;; &quot;&quot;; INDIRECT(ADDRESS([Extra.$AM25]; [Extra.$AN25]+1; 1;1; &quot;Finals&quot;)))">
            <text:p/>
          </table:table-cell>
          <table:table-cell table:style-name="ce203" table:formula="of:=IF(AND(NOT([.G26]=&quot;&quot;); NOT([.F26]=&quot;D&quot;); NOT([.F26]=&quot;?&quot;); NOT([.G26]=&quot;D&quot;); NOT(ISBLANK([.F26])); NOT(ISBLANK([.G26]))); DIFFROUND([.F26]; [.G26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26]+1" office:value-type="float" office:value="9" calcext:value-type="float">
            <text:p>9</text:p>
          </table:table-cell>
          <table:table-cell table:style-name="ce454" table:formula="of:=[Finals.A29]">
            <text:p/>
          </table:table-cell>
          <table:table-cell table:style-name="ce491" table:formula="of:=[Finals.B29]">
            <text:p/>
          </table:table-cell>
          <table:table-cell table:style-name="ce176" table:formula="of:=[Finals.C29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M$3:.$M$34]; [.C27])&gt;0; VLOOKUP([.C27]; [Seeds.$M$3:.$V$34]; 5; 0); &quot;??&quot;)" office:value-type="string" office:string-value="?" calcext:value-type="string">
            <text:p>?</text:p>
          </table:table-cell>
          <table:table-cell table:style-name="ce176" table:formula="of:=IF(OR(ISBLANK([.C27]); [.C27]=&quot;&quot;); &quot;&quot;; WHICHROUND(COUNTIF([$FL.$A$3:.$R$130]; [.C27]) + COUNTIF([$Finals.$A$20:.$AF$36]; [.C27])))">
            <text:p/>
          </table:table-cell>
          <table:table-cell table:style-name="ce188" table:formula="of:=IF([.G27]=&quot;&quot;; &quot;&quot;; IF([.G27]=&quot;W&quot;; 8; IF(HASLOST(VLOOKUP([.$C27];  INDIRECT(VLOOKUP([.$G27]; [Extra.$W$2:.$AP$9]; 20; 0)); 8; 0)); 0; 1)))">
            <text:p/>
          </table:table-cell>
          <table:table-cell table:style-name="ce176" table:formula="of:=IF([.C27]=&quot;&quot;; &quot;&quot;; INDIRECT(ADDRESS([Extra.$AM26]; [Extra.$AN26]-1; 1;1; &quot;Finals&quot;)))">
            <text:p/>
          </table:table-cell>
          <table:table-cell table:style-name="ce500" table:formula="of:=IF([.C27]=&quot;&quot;; &quot;&quot;; INDIRECT(ADDRESS([Extra.$AM26]; [Extra.$AN26]; 1;1; &quot;Finals&quot;)))">
            <text:p/>
          </table:table-cell>
          <table:table-cell table:style-name="ce176" table:formula="of:=IF([.C27]=&quot;&quot;; &quot;&quot;; INDIRECT(ADDRESS([Extra.$AM26]; [Extra.$AN26]+1; 1;1; &quot;Finals&quot;)))">
            <text:p/>
          </table:table-cell>
          <table:table-cell table:style-name="ce202" table:formula="of:=IF(AND(NOT([.G27]=&quot;&quot;); NOT([.F27]=&quot;D&quot;); NOT([.F27]=&quot;?&quot;); NOT([.G27]=&quot;D&quot;); NOT(ISBLANK([.F27])); NOT(ISBLANK([.G27]))); DIFFROUND([.F27]; [.G27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27]+1" office:value-type="float" office:value="10" calcext:value-type="float">
            <text:p>10</text:p>
          </table:table-cell>
          <table:table-cell table:style-name="ce455" table:formula="of:=[Finals.A30]">
            <text:p/>
          </table:table-cell>
          <table:table-cell table:style-name="ce492" table:formula="of:=[Finals.B30]">
            <text:p/>
          </table:table-cell>
          <table:table-cell table:style-name="ce175" table:formula="of:=[Finals.C30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M$3:.$M$34]; [.C28])&gt;0; VLOOKUP([.C28]; [Seeds.$M$3:.$V$34]; 5; 0); &quot;??&quot;)" office:value-type="string" office:string-value="?" calcext:value-type="string">
            <text:p>?</text:p>
          </table:table-cell>
          <table:table-cell table:style-name="ce175" table:formula="of:=IF(OR(ISBLANK([.C28]); [.C28]=&quot;&quot;); &quot;&quot;; WHICHROUND(COUNTIF([$FL.$A$3:.$R$130]; [.C28]) + COUNTIF([$Finals.$A$20:.$AF$36]; [.C28])))">
            <text:p/>
          </table:table-cell>
          <table:table-cell table:style-name="ce189" table:formula="of:=IF([.G28]=&quot;&quot;; &quot;&quot;; IF([.G28]=&quot;W&quot;; 8; IF(HASLOST(VLOOKUP([.$C28];  INDIRECT(VLOOKUP([.$G28]; [Extra.$W$2:.$AP$9]; 20; 0)); 8; 0)); 0; 1)))">
            <text:p/>
          </table:table-cell>
          <table:table-cell table:style-name="ce175" table:formula="of:=IF([.C28]=&quot;&quot;; &quot;&quot;; INDIRECT(ADDRESS([Extra.$AM27]; [Extra.$AN27]-1; 1;1; &quot;Finals&quot;)))">
            <text:p/>
          </table:table-cell>
          <table:table-cell table:style-name="ce501" table:formula="of:=IF([.C28]=&quot;&quot;; &quot;&quot;; INDIRECT(ADDRESS([Extra.$AM27]; [Extra.$AN27]; 1;1; &quot;Finals&quot;)))">
            <text:p/>
          </table:table-cell>
          <table:table-cell table:style-name="ce175" table:formula="of:=IF([.C28]=&quot;&quot;; &quot;&quot;; INDIRECT(ADDRESS([Extra.$AM27]; [Extra.$AN27]+1; 1;1; &quot;Finals&quot;)))">
            <text:p/>
          </table:table-cell>
          <table:table-cell table:style-name="ce203" table:formula="of:=IF(AND(NOT([.G28]=&quot;&quot;); NOT([.F28]=&quot;D&quot;); NOT([.F28]=&quot;?&quot;); NOT([.G28]=&quot;D&quot;); NOT(ISBLANK([.F28])); NOT(ISBLANK([.G28]))); DIFFROUND([.F28]; [.G28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28]+1" office:value-type="float" office:value="11" calcext:value-type="float">
            <text:p>11</text:p>
          </table:table-cell>
          <table:table-cell table:style-name="ce454" table:formula="of:=[Finals.A31]">
            <text:p/>
          </table:table-cell>
          <table:table-cell table:style-name="ce491" table:formula="of:=[Finals.B31]">
            <text:p/>
          </table:table-cell>
          <table:table-cell table:style-name="ce176" table:formula="of:=[Finals.C31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M$3:.$M$34]; [.C29])&gt;0; VLOOKUP([.C29]; [Seeds.$M$3:.$V$34]; 5; 0); &quot;??&quot;)" office:value-type="string" office:string-value="?" calcext:value-type="string">
            <text:p>?</text:p>
          </table:table-cell>
          <table:table-cell table:style-name="ce176" table:formula="of:=IF(OR(ISBLANK([.C29]); [.C29]=&quot;&quot;); &quot;&quot;; WHICHROUND(COUNTIF([$FL.$A$3:.$R$130]; [.C29]) + COUNTIF([$Finals.$A$20:.$AF$36]; [.C29])))">
            <text:p/>
          </table:table-cell>
          <table:table-cell table:style-name="ce188" table:formula="of:=IF([.G29]=&quot;&quot;; &quot;&quot;; IF([.G29]=&quot;W&quot;; 8; IF(HASLOST(VLOOKUP([.$C29];  INDIRECT(VLOOKUP([.$G29]; [Extra.$W$2:.$AP$9]; 20; 0)); 8; 0)); 0; 1)))">
            <text:p/>
          </table:table-cell>
          <table:table-cell table:style-name="ce176" table:formula="of:=IF([.C29]=&quot;&quot;; &quot;&quot;; INDIRECT(ADDRESS([Extra.$AM28]; [Extra.$AN28]-1; 1;1; &quot;Finals&quot;)))">
            <text:p/>
          </table:table-cell>
          <table:table-cell table:style-name="ce500" table:formula="of:=IF([.C29]=&quot;&quot;; &quot;&quot;; INDIRECT(ADDRESS([Extra.$AM28]; [Extra.$AN28]; 1;1; &quot;Finals&quot;)))">
            <text:p/>
          </table:table-cell>
          <table:table-cell table:style-name="ce176" table:formula="of:=IF([.C29]=&quot;&quot;; &quot;&quot;; INDIRECT(ADDRESS([Extra.$AM28]; [Extra.$AN28]+1; 1;1; &quot;Finals&quot;)))">
            <text:p/>
          </table:table-cell>
          <table:table-cell table:style-name="ce202" table:formula="of:=IF(AND(NOT([.G29]=&quot;&quot;); NOT([.F29]=&quot;D&quot;); NOT([.F29]=&quot;?&quot;); NOT([.G29]=&quot;D&quot;); NOT(ISBLANK([.F29])); NOT(ISBLANK([.G29]))); DIFFROUND([.F29]; [.G29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29]+1" office:value-type="float" office:value="12" calcext:value-type="float">
            <text:p>12</text:p>
          </table:table-cell>
          <table:table-cell table:style-name="ce455" table:formula="of:=[Finals.A32]">
            <text:p/>
          </table:table-cell>
          <table:table-cell table:style-name="ce492" table:formula="of:=[Finals.B32]">
            <text:p/>
          </table:table-cell>
          <table:table-cell table:style-name="ce175" table:formula="of:=[Finals.C32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M$3:.$M$34]; [.C30])&gt;0; VLOOKUP([.C30]; [Seeds.$M$3:.$V$34]; 5; 0); &quot;??&quot;)" office:value-type="string" office:string-value="?" calcext:value-type="string">
            <text:p>?</text:p>
          </table:table-cell>
          <table:table-cell table:style-name="ce175" table:formula="of:=IF(OR(ISBLANK([.C30]); [.C30]=&quot;&quot;); &quot;&quot;; WHICHROUND(COUNTIF([$FL.$A$3:.$R$130]; [.C30]) + COUNTIF([$Finals.$A$20:.$AF$36]; [.C30])))">
            <text:p/>
          </table:table-cell>
          <table:table-cell table:style-name="ce189" table:formula="of:=IF([.G30]=&quot;&quot;; &quot;&quot;; IF([.G30]=&quot;W&quot;; 8; IF(HASLOST(VLOOKUP([.$C30];  INDIRECT(VLOOKUP([.$G30]; [Extra.$W$2:.$AP$9]; 20; 0)); 8; 0)); 0; 1)))">
            <text:p/>
          </table:table-cell>
          <table:table-cell table:style-name="ce175" table:formula="of:=IF([.C30]=&quot;&quot;; &quot;&quot;; INDIRECT(ADDRESS([Extra.$AM29]; [Extra.$AN29]-1; 1;1; &quot;Finals&quot;)))">
            <text:p/>
          </table:table-cell>
          <table:table-cell table:style-name="ce501" table:formula="of:=IF([.C30]=&quot;&quot;; &quot;&quot;; INDIRECT(ADDRESS([Extra.$AM29]; [Extra.$AN29]; 1;1; &quot;Finals&quot;)))">
            <text:p/>
          </table:table-cell>
          <table:table-cell table:style-name="ce175" table:formula="of:=IF([.C30]=&quot;&quot;; &quot;&quot;; INDIRECT(ADDRESS([Extra.$AM29]; [Extra.$AN29]+1; 1;1; &quot;Finals&quot;)))">
            <text:p/>
          </table:table-cell>
          <table:table-cell table:style-name="ce203" table:formula="of:=IF(AND(NOT([.G30]=&quot;&quot;); NOT([.F30]=&quot;D&quot;); NOT([.F30]=&quot;?&quot;); NOT([.G30]=&quot;D&quot;); NOT(ISBLANK([.F30])); NOT(ISBLANK([.G30]))); DIFFROUND([.F30]; [.G30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30]+1" office:value-type="float" office:value="13" calcext:value-type="float">
            <text:p>13</text:p>
          </table:table-cell>
          <table:table-cell table:style-name="ce454" table:formula="of:=[Finals.A33]">
            <text:p/>
          </table:table-cell>
          <table:table-cell table:style-name="ce491" table:formula="of:=[Finals.B33]">
            <text:p/>
          </table:table-cell>
          <table:table-cell table:style-name="ce176" table:formula="of:=[Finals.C33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M$3:.$M$34]; [.C31])&gt;0; VLOOKUP([.C31]; [Seeds.$M$3:.$V$34]; 5; 0); &quot;??&quot;)" office:value-type="string" office:string-value="?" calcext:value-type="string">
            <text:p>?</text:p>
          </table:table-cell>
          <table:table-cell table:style-name="ce176" table:formula="of:=IF(OR(ISBLANK([.C31]); [.C31]=&quot;&quot;); &quot;&quot;; WHICHROUND(COUNTIF([$FL.$A$3:.$R$130]; [.C31]) + COUNTIF([$Finals.$A$20:.$AF$36]; [.C31])))">
            <text:p/>
          </table:table-cell>
          <table:table-cell table:style-name="ce188" table:formula="of:=IF([.G31]=&quot;&quot;; &quot;&quot;; IF([.G31]=&quot;W&quot;; 8; IF(HASLOST(VLOOKUP([.$C31];  INDIRECT(VLOOKUP([.$G31]; [Extra.$W$2:.$AP$9]; 20; 0)); 8; 0)); 0; 1)))">
            <text:p/>
          </table:table-cell>
          <table:table-cell table:style-name="ce176" table:formula="of:=IF([.C31]=&quot;&quot;; &quot;&quot;; INDIRECT(ADDRESS([Extra.$AM30]; [Extra.$AN30]-1; 1;1; &quot;Finals&quot;)))">
            <text:p/>
          </table:table-cell>
          <table:table-cell table:style-name="ce500" table:formula="of:=IF([.C31]=&quot;&quot;; &quot;&quot;; INDIRECT(ADDRESS([Extra.$AM30]; [Extra.$AN30]; 1;1; &quot;Finals&quot;)))">
            <text:p/>
          </table:table-cell>
          <table:table-cell table:style-name="ce176" table:formula="of:=IF([.C31]=&quot;&quot;; &quot;&quot;; INDIRECT(ADDRESS([Extra.$AM30]; [Extra.$AN30]+1; 1;1; &quot;Finals&quot;)))">
            <text:p/>
          </table:table-cell>
          <table:table-cell table:style-name="ce202" table:formula="of:=IF(AND(NOT([.G31]=&quot;&quot;); NOT([.F31]=&quot;D&quot;); NOT([.F31]=&quot;?&quot;); NOT([.G31]=&quot;D&quot;); NOT(ISBLANK([.F31])); NOT(ISBLANK([.G31]))); DIFFROUND([.F31]; [.G31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31]+1" office:value-type="float" office:value="14" calcext:value-type="float">
            <text:p>14</text:p>
          </table:table-cell>
          <table:table-cell table:style-name="ce455" table:formula="of:=[Finals.A34]">
            <text:p/>
          </table:table-cell>
          <table:table-cell table:style-name="ce492" table:formula="of:=[Finals.B34]">
            <text:p/>
          </table:table-cell>
          <table:table-cell table:style-name="ce175" table:formula="of:=[Finals.C34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M$3:.$M$34]; [.C32])&gt;0; VLOOKUP([.C32]; [Seeds.$M$3:.$V$34]; 5; 0); &quot;??&quot;)" office:value-type="string" office:string-value="?" calcext:value-type="string">
            <text:p>?</text:p>
          </table:table-cell>
          <table:table-cell table:style-name="ce175" table:formula="of:=IF(OR(ISBLANK([.C32]); [.C32]=&quot;&quot;); &quot;&quot;; WHICHROUND(COUNTIF([$FL.$A$3:.$R$130]; [.C32]) + COUNTIF([$Finals.$A$20:.$AF$36]; [.C32])))">
            <text:p/>
          </table:table-cell>
          <table:table-cell table:style-name="ce189" table:formula="of:=IF([.G32]=&quot;&quot;; &quot;&quot;; IF([.G32]=&quot;W&quot;; 8; IF(HASLOST(VLOOKUP([.$C32];  INDIRECT(VLOOKUP([.$G32]; [Extra.$W$2:.$AP$9]; 20; 0)); 8; 0)); 0; 1)))">
            <text:p/>
          </table:table-cell>
          <table:table-cell table:style-name="ce175" table:formula="of:=IF([.C32]=&quot;&quot;; &quot;&quot;; INDIRECT(ADDRESS([Extra.$AM31]; [Extra.$AN31]-1; 1;1; &quot;Finals&quot;)))">
            <text:p/>
          </table:table-cell>
          <table:table-cell table:style-name="ce501" table:formula="of:=IF([.C32]=&quot;&quot;; &quot;&quot;; INDIRECT(ADDRESS([Extra.$AM31]; [Extra.$AN31]; 1;1; &quot;Finals&quot;)))">
            <text:p/>
          </table:table-cell>
          <table:table-cell table:style-name="ce175" table:formula="of:=IF([.C32]=&quot;&quot;; &quot;&quot;; INDIRECT(ADDRESS([Extra.$AM31]; [Extra.$AN31]+1; 1;1; &quot;Finals&quot;)))">
            <text:p/>
          </table:table-cell>
          <table:table-cell table:style-name="ce203" table:formula="of:=IF(AND(NOT([.G32]=&quot;&quot;); NOT([.F32]=&quot;D&quot;); NOT([.F32]=&quot;?&quot;); NOT([.G32]=&quot;D&quot;); NOT(ISBLANK([.F32])); NOT(ISBLANK([.G32]))); DIFFROUND([.F32]; [.G32]); &quot;&quot;)">
            <text:p/>
          </table:table-cell>
          <table:table-cell table:number-columns-repeated="244"/>
        </table:table-row>
        <table:table-row table:style-name="ro1">
          <table:table-cell table:style-name="ce229" table:formula="of:=[.A32]+1" office:value-type="float" office:value="15" calcext:value-type="float">
            <text:p>15</text:p>
          </table:table-cell>
          <table:table-cell table:style-name="ce454" table:formula="of:=[Finals.A35]">
            <text:p/>
          </table:table-cell>
          <table:table-cell table:style-name="ce491" table:formula="of:=[Finals.B35]">
            <text:p/>
          </table:table-cell>
          <table:table-cell table:style-name="ce176" table:formula="of:=[Finals.C35]">
            <text:p/>
          </table:table-cell>
          <table:table-cell table:style-name="ce460" office:value-type="string" calcext:value-type="string">
            <text:p>?</text:p>
          </table:table-cell>
          <table:table-cell table:style-name="ce176" table:formula="of:=IF(COUNTIF([Seeds.$M$3:.$M$34]; [.C33])&gt;0; VLOOKUP([.C33]; [Seeds.$M$3:.$V$34]; 5; 0); &quot;??&quot;)" office:value-type="string" office:string-value="?" calcext:value-type="string">
            <text:p>?</text:p>
          </table:table-cell>
          <table:table-cell table:style-name="ce176" table:formula="of:=IF(OR(ISBLANK([.C33]); [.C33]=&quot;&quot;); &quot;&quot;; WHICHROUND(COUNTIF([$FL.$A$3:.$R$130]; [.C33]) + COUNTIF([$Finals.$A$20:.$AF$36]; [.C33])))">
            <text:p/>
          </table:table-cell>
          <table:table-cell table:style-name="ce188" table:formula="of:=IF([.G33]=&quot;&quot;; &quot;&quot;; IF([.G33]=&quot;W&quot;; 8; IF(HASLOST(VLOOKUP([.$C33];  INDIRECT(VLOOKUP([.$G33]; [Extra.$W$2:.$AP$9]; 20; 0)); 8; 0)); 0; 1)))">
            <text:p/>
          </table:table-cell>
          <table:table-cell table:style-name="ce176" table:formula="of:=IF([.C33]=&quot;&quot;; &quot;&quot;; INDIRECT(ADDRESS([Extra.$AM32]; [Extra.$AN32]-1; 1;1; &quot;Finals&quot;)))">
            <text:p/>
          </table:table-cell>
          <table:table-cell table:style-name="ce500" table:formula="of:=IF([.C33]=&quot;&quot;; &quot;&quot;; INDIRECT(ADDRESS([Extra.$AM32]; [Extra.$AN32]; 1;1; &quot;Finals&quot;)))">
            <text:p/>
          </table:table-cell>
          <table:table-cell table:style-name="ce176" table:formula="of:=IF([.C33]=&quot;&quot;; &quot;&quot;; INDIRECT(ADDRESS([Extra.$AM32]; [Extra.$AN32]+1; 1;1; &quot;Finals&quot;)))">
            <text:p/>
          </table:table-cell>
          <table:table-cell table:style-name="ce202" table:formula="of:=IF(AND(NOT([.G33]=&quot;&quot;); NOT([.F33]=&quot;D&quot;); NOT([.F33]=&quot;?&quot;); NOT([.G33]=&quot;D&quot;); NOT(ISBLANK([.F33])); NOT(ISBLANK([.G33]))); DIFFROUND([.F33]; [.G33]); &quot;&quot;)">
            <text:p/>
          </table:table-cell>
          <table:table-cell table:number-columns-repeated="244"/>
        </table:table-row>
        <table:table-row table:style-name="ro1">
          <table:table-cell table:style-name="ce230" table:formula="of:=[.A33]+1" office:value-type="float" office:value="16" calcext:value-type="float">
            <text:p>16</text:p>
          </table:table-cell>
          <table:table-cell table:style-name="ce455" table:formula="of:=[Finals.A36]">
            <text:p/>
          </table:table-cell>
          <table:table-cell table:style-name="ce492" table:formula="of:=[Finals.B36]">
            <text:p/>
          </table:table-cell>
          <table:table-cell table:style-name="ce175" table:formula="of:=[Finals.C36]">
            <text:p/>
          </table:table-cell>
          <table:table-cell table:style-name="ce461" office:value-type="string" calcext:value-type="string">
            <text:p>?</text:p>
          </table:table-cell>
          <table:table-cell table:style-name="ce175" table:formula="of:=IF(COUNTIF([Seeds.$M$3:.$M$34]; [.C34])&gt;0; VLOOKUP([.C34]; [Seeds.$M$3:.$V$34]; 5; 0); &quot;??&quot;)" office:value-type="string" office:string-value="?" calcext:value-type="string">
            <text:p>?</text:p>
          </table:table-cell>
          <table:table-cell table:style-name="ce175" table:formula="of:=IF(OR(ISBLANK([.C34]); [.C34]=&quot;&quot;); &quot;&quot;; WHICHROUND(COUNTIF([$FL.$A$3:.$R$130]; [.C34]) + COUNTIF([$Finals.$A$20:.$AF$36]; [.C34])))">
            <text:p/>
          </table:table-cell>
          <table:table-cell table:style-name="ce189" table:formula="of:=IF([.G34]=&quot;&quot;; &quot;&quot;; IF([.G34]=&quot;W&quot;; 8; IF(HASLOST(VLOOKUP([.$C34];  INDIRECT(VLOOKUP([.$G34]; [Extra.$W$2:.$AP$9]; 20; 0)); 8; 0)); 0; 1)))">
            <text:p/>
          </table:table-cell>
          <table:table-cell table:style-name="ce175" table:formula="of:=IF([.C34]=&quot;&quot;; &quot;&quot;; INDIRECT(ADDRESS([Extra.$AM33]; [Extra.$AN33]-1; 1;1; &quot;Finals&quot;)))">
            <text:p/>
          </table:table-cell>
          <table:table-cell table:style-name="ce501" table:formula="of:=IF([.C34]=&quot;&quot;; &quot;&quot;; INDIRECT(ADDRESS([Extra.$AM33]; [Extra.$AN33]; 1;1; &quot;Finals&quot;)))">
            <text:p/>
          </table:table-cell>
          <table:table-cell table:style-name="ce175" table:formula="of:=IF([.C34]=&quot;&quot;; &quot;&quot;; INDIRECT(ADDRESS([Extra.$AM33]; [Extra.$AN33]+1; 1;1; &quot;Finals&quot;)))">
            <text:p/>
          </table:table-cell>
          <table:table-cell table:style-name="ce203" table:formula="of:=IF(AND(NOT([.G34]=&quot;&quot;); NOT([.F34]=&quot;D&quot;); NOT([.F34]=&quot;?&quot;); NOT([.G34]=&quot;D&quot;); NOT(ISBLANK([.F34])); NOT(ISBLANK([.G34]))); DIFFROUND([.F34]; [.G34]); &quot;&quot;)">
            <text:p/>
          </table:table-cell>
          <table:table-cell table:number-columns-repeated="244"/>
        </table:table-row>
        <table:table-row table:style-name="ro1">
          <table:table-cell table:style-name="ce232"/>
          <table:table-cell table:style-name="ce178"/>
          <table:table-cell table:style-name="ce172"/>
          <table:table-cell table:style-name="ce178" table:number-columns-repeated="4"/>
          <table:table-cell table:style-name="ce191"/>
          <table:table-cell table:style-name="ce178"/>
          <table:table-cell table:style-name="ce172"/>
          <table:table-cell table:style-name="ce178"/>
          <table:table-cell table:style-name="ce184"/>
          <table:table-cell table:number-columns-repeated="244"/>
        </table:table-row>
        <table:table-row table:style-name="ro4" table:number-rows-repeated="65500">
          <table:table-cell table:number-columns-repeated="256"/>
        </table:table-row>
        <table:table-row table:style-name="ro4">
          <table:table-cell table:number-columns-repeated="256"/>
        </table:table-row>
        <calcext:conditional-formats>
          <calcext:conditional-format calcext:target-range-address="Finalists.B3:Finalists.B34">
            <calcext:condition calcext:apply-style-name="ColorBlue" calcext:value="formula-is(VALUE([.E34])&gt;VALUE([.B34]))" calcext:base-cell-address="Stats.B34"/>
            <calcext:condition calcext:apply-style-name="ColorRed" calcext:value="formula-is(VALUE([.E34])&lt;VALUE([.B34]))" calcext:base-cell-address="Stats.B34"/>
          </calcext:conditional-format>
          <calcext:conditional-format calcext:target-range-address="Finalists.C3:Finalists.C34">
            <calcext:condition calcext:apply-style-name="DeadNBurried" calcext:value="formula-is([.H34]=0)" calcext:base-cell-address="Stats.C34"/>
            <calcext:condition calcext:apply-style-name="SeededVsSeeded" calcext:value="formula-is(VALUE([.B34]) &gt; 0)" calcext:base-cell-address="Stats.C34"/>
            <calcext:condition calcext:apply-style-name="Default" calcext:value="formula-is([.H34]=1)" calcext:base-cell-address="Stats.C34"/>
          </calcext:conditional-format>
          <calcext:conditional-format calcext:target-range-address="Finalists.E3:Finalists.E34">
            <calcext:condition calcext:apply-style-name="ColorBlue" calcext:value="formula-is(VALUE([.E34])&gt;VALUE([.B34]))" calcext:base-cell-address="Stats.E34"/>
            <calcext:condition calcext:apply-style-name="ColorRed" calcext:value="formula-is(VALUE([.E34])&lt;VALUE([.B34]))" calcext:base-cell-address="Stats.E34"/>
          </calcext:conditional-format>
          <calcext:conditional-format calcext:target-range-address="Finalists.J3:Finalists.J34">
            <calcext:condition calcext:apply-style-name="SeededVsSeeded" calcext:value="formula-is( AND (VALUE([.B34]) &gt; 0; VALUE([.I34]) &gt; 0))" calcext:base-cell-address="Stats.J34"/>
          </calcext:conditional-format>
        </calcext:conditional-formats>
      </table:table>
      <table:table table:name="Extra" table:style-name="ta1" table:print="false">
        <table:table-column table:style-name="co57" table:default-cell-style-name="Default"/>
        <table:table-column table:style-name="co58" table:default-cell-style-name="Default"/>
        <table:table-column table:style-name="co19" table:number-columns-repeated="2" table:default-cell-style-name="Default"/>
        <table:table-column table:style-name="co59" table:default-cell-style-name="Default"/>
        <table:table-column table:style-name="co19" table:default-cell-style-name="Default"/>
        <table:table-column table:style-name="co60" table:default-cell-style-name="Default"/>
        <table:table-column table:style-name="co26" table:default-cell-style-name="Default"/>
        <table:table-column table:style-name="co19" table:number-columns-repeated="2" table:default-cell-style-name="Default"/>
        <table:table-column table:style-name="co5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ce259"/>
        <table:table-column table:style-name="co65" table:default-cell-style-name="ce106"/>
        <table:table-column table:style-name="co66" table:default-cell-style-name="Default"/>
        <table:table-column table:style-name="co60" table:default-cell-style-name="Default"/>
        <table:table-column table:style-name="co7" table:default-cell-style-name="Default"/>
        <table:table-column table:style-name="co3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" table:default-cell-style-name="Default"/>
        <table:table-column table:style-name="co22" table:number-columns-repeated="6" table:default-cell-style-name="Default"/>
        <table:table-column table:style-name="co70" table:default-cell-style-name="Default"/>
        <table:table-column table:style-name="co69" table:default-cell-style-name="Default"/>
        <table:table-column table:style-name="co7" table:default-cell-style-name="Default"/>
        <table:table-column table:style-name="co22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8" table:default-cell-style-name="Default"/>
        <table:table-column table:style-name="co73" table:default-cell-style-name="Default"/>
        <table:table-column table:style-name="co22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</text:p>
          </table:table-cell>
          <table:table-cell/>
          <table:table-cell table:formula="of:=IF(ISNA(MATCH([.N1];[.O$6:.O$15];0));&quot;&quot;;MATCH([.N1];[.O$6:.O$15];0))" office:value-type="float" office:value="1" calcext:value-type="float">
            <text:p>1</text:p>
          </table:table-cell>
          <table:table-cell table:formula="of:=(COUNTIF([ML.$C$3:.$C$130]; [.P1])+COUNTIF([FL.$C$3:.$C$130]; [.P1]))*1000+ROW()" office:value-type="float" office:value="1" calcext:value-type="float">
            <text:p>1</text:p>
          </table:table-cell>
          <table:table-cell table:formula="of:=128-COUNTBLANK([.P1:.P128])" office:value-type="float" office:value="1" calcext:value-type="float">
            <text:p>1</text:p>
          </table:table-cell>
          <table:table-cell table:formula="of:=IF(ISNA(VLOOKUP([.T1]; [.R1:.U256]; 4; 0)); &quot;&quot;; VLOOKUP([.T1]; [.R1:.U256]; 4; 0))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ML.C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Women</text:p>
          </table:table-cell>
          <table:table-cell table:number-columns-repeated="11"/>
          <table:table-cell office:value-type="string" calcext:value-type="string">
            <text:p>Finalists</text:p>
          </table:table-cell>
          <table:table-cell table:number-columns-repeated="4"/>
          <table:table-cell table:formula="of:=IF([.AR1]=&quot;&quot;; &quot;&quot;; CODE(MID([.AR1]; 1;1))*10000+CODE(MID([.AR1]; 2; 1))*100+CODE(MID([.AR1]; 3; 1)))">
            <text:p/>
          </table:table-cell>
          <table:table-cell table:formula="of:=[.P1]" office:value-type="float" office:value="0" calcext:value-type="float">
            <text:p>0</text:p>
          </table:table-cell>
          <table:table-cell table:formula="of:=IF([.AR1]=&quot;&quot;; &quot;&quot;; SMALL([.AQ$1:.AQ$50]; ROW()))">
            <text:p/>
          </table:table-cell>
          <table:table-cell table:formula="of:=IF([.AS1]=&quot;&quot;; &quot;&quot;; VLOOKUP([.AS1]; [.AQ$1:.AR$50]; 2; 0)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WHICHSHEET(1; [.A2])" office:value-type="string" office:string-value="ML." calcext:value-type="string">
            <text:p>ML.</text:p>
          </table:table-cell>
          <table:table-cell table:formula="of:=SUBSTITUTE(ADDRESS(1; INDIRECT(&quot;Stats.&quot;&amp;SUBSTITUTE(ADDRESS(1; 2+2*[.$A2]; 4); &quot;1&quot;; &quot;&quot;)&amp;&quot;3&quot;); 4); &quot;1&quot;; &quot;&quot;)" office:value-type="string" office:string-value="A" calcext:value-type="string">
            <text:p>A</text:p>
          </table:table-cell>
          <table:table-cell table:formula="of:=SUBSTITUTE(ADDRESS(1; INDIRECT(&quot;Stats.&quot;&amp;SUBSTITUTE(ADDRESS(1; 2+2*[.$A2]; 4); &quot;1&quot;; &quot;&quot;)&amp;&quot;3&quot;)+1; 4); &quot;1&quot;; &quot;&quot;)" office:value-type="string" office:string-value="B" calcext:value-type="string">
            <text:p>B</text:p>
          </table:table-cell>
          <table:table-cell table:formula="of:=SUBSTITUTE(ADDRESS(1; INDIRECT(&quot;Stats.&quot;&amp;SUBSTITUTE(ADDRESS(1; 2+2*[.$A2]; 4); &quot;1&quot;; &quot;&quot;)&amp;&quot;3&quot;)+2; 4); &quot;1&quot;; &quot;&quot;)" office:value-type="string" office:string-value="C" calcext:value-type="string">
            <text:p>C</text:p>
          </table:table-cell>
          <table:table-cell table:formula="of:=SUBSTITUTE(ADDRESS(1; INDIRECT(&quot;Stats.&quot;&amp;SUBSTITUTE(ADDRESS(1; 2+2*[.$A2]; 4); &quot;1&quot;; &quot;&quot;)&amp;&quot;3&quot;)+3; 4); &quot;1&quot;; &quot;&quot;)" office:value-type="string" office:string-value="D" calcext:value-type="string">
            <text:p>D</text:p>
          </table:table-cell>
          <table:table-cell table:formula="of:=SUBSTITUTE(ADDRESS(1; INDIRECT(&quot;Stats.&quot;&amp;SUBSTITUTE(ADDRESS(1; 2+2*[.$A2]; 4); &quot;1&quot;; &quot;&quot;)&amp;&quot;3&quot;)+4; 4); &quot;1&quot;; &quot;&quot;)" office:value-type="string" office:string-value="E" calcext:value-type="string">
            <text:p>E</text:p>
          </table:table-cell>
          <table:table-cell table:formula="of:=SUBSTITUTE(ADDRESS(1; INDIRECT(&quot;Stats.&quot;&amp;SUBSTITUTE(ADDRESS(1; 2+2*[.$A2]; 4); &quot;1&quot;; &quot;&quot;)&amp;&quot;3&quot;)+5; 4); &quot;1&quot;; &quot;&quot;)" office:value-type="string" office:string-value="F" calcext:value-type="string">
            <text:p>F</text:p>
          </table:table-cell>
          <table:table-cell table:formula="of:=SUBSTITUTE(ADDRESS(1; INDIRECT(&quot;Stats.&quot;&amp;SUBSTITUTE(ADDRESS(1; 2+2*[.$A2]; 4); &quot;1&quot;; &quot;&quot;)&amp;&quot;3&quot;)+6; 4); &quot;1&quot;; &quot;&quot;)" office:value-type="string" office:string-value="G" calcext:value-type="string">
            <text:p>G</text:p>
          </table:table-cell>
          <table:table-cell table:formula="of:=SUBSTITUTE(ADDRESS(1; INDIRECT(&quot;Stats.&quot;&amp;SUBSTITUTE(ADDRESS(1; 2+2*[.$A2]; 4); &quot;1&quot;; &quot;&quot;)&amp;&quot;3&quot;)+7; 4); &quot;1&quot;; &quot;&quot;)" office:value-type="string" office:string-value="H" calcext:value-type="string">
            <text:p>H</text:p>
          </table:table-cell>
          <table:table-cell table:formula="of:=SUBSTITUTE(ADDRESS(1; INDIRECT(&quot;Stats.&quot;&amp;SUBSTITUTE(ADDRESS(1; 2+2*[.$A2]; 4); &quot;1&quot;; &quot;&quot;)&amp;&quot;3&quot;)+8; 4); &quot;1&quot;; &quot;&quot;)" office:value-type="string" office:string-value="I" calcext:value-type="string">
            <text:p>I</text:p>
          </table:table-cell>
          <table:table-cell/>
          <table:table-cell table:formula="of:=IF(ISNA(MATCH([.N2];[.O$6:.O$15];0));&quot;&quot;;IF(COUNTIF(INDIRECT(&quot;M1:M&quot;&amp;ROW()-1);MATCH([.N2];[.O$6:.O$15];0))&gt;0;MATCH([.N2];[.O$6:.O$15];0)+1;MATCH([.N2];[.O$6:.O$15];0)))">
            <text:p/>
          </table:table-cell>
          <table:table-cell table:formula="of:=(COUNTIF([ML.$C$3:.$C$130]; [.P2])+COUNTIF([FL.$C$3:.$C$130]; [.P2]))*1000+ROW()" office:value-type="float" office:value="256002" calcext:value-type="float">
            <text:p>256002</text:p>
          </table:table-cell>
          <table:table-cell table:formula="of:=SUBSTITUTE(ADDRESS(1; COLUMN()-1; 4); &quot;1&quot;; &quot;&quot;)" office:value-type="string" office:string-value="N" calcext:value-type="string">
            <text:p>N</text:p>
          </table:table-cell>
          <table:table-cell table:formula="of:=IF(ISNA(VLOOKUP([.T2]; [.R2:.U257]; 4; 0)); &quot;&quot;; VLOOKUP([.T2]; [.R2:.U257]; 4; 0))">
            <text:p/>
          </table:table-cell>
          <table:table-cell/>
          <table:table-cell table:formula="of:=IF(AND([.S2]=0; NOT([.U2]=0)); MAX(INDIRECT(&quot;R1:R&quot;&amp;ROW()-1))+1; &quot;&quot;)">
            <text:p/>
          </table:table-cell>
          <table:table-cell table:formula="of:=IF(COUNTIF(INDIRECT(&quot;U1:U&quot;&amp;ROW()-1); [.U2])&gt;0; 1; 0)" office:value-type="float" office:value="1" calcext:value-type="float">
            <text:p>1</text:p>
          </table:table-cell>
          <table:table-cell table:formula="of:=[.T1]+1" office:value-type="float" office:value="2" calcext:value-type="float">
            <text:p>2</text:p>
          </table:table-cell>
          <table:table-cell table:formula="of:=[ML.C4]" office:value-type="float" office:value="0" calcext:value-type="float">
            <text:p>0</text:p>
          </table:table-cell>
          <table:table-cell/>
          <table:table-cell office:value-type="string" calcext:value-type="string">
            <text:p>1<text:span text:style-name="T3">st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.A3:I130</text:p>
          </table:table-cell>
          <table:table-cell office:value-type="string" calcext:value-type="string">
            <text:p>FL.A3:G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L.A</text:p>
          </table:table-cell>
          <table:table-cell office:value-type="string" calcext:value-type="string">
            <text:p>ML.B</text:p>
          </table:table-cell>
          <table:table-cell office:value-type="string" calcext:value-type="string">
            <text:p>ML.C</text:p>
          </table:table-cell>
          <table:table-cell office:value-type="string" calcext:value-type="string">
            <text:p>FL.A</text:p>
          </table:table-cell>
          <table:table-cell office:value-type="string" calcext:value-type="string">
            <text:p>FL.B</text:p>
          </table:table-cell>
          <table:table-cell office:value-type="string" calcext:value-type="string">
            <text:p>FL.C</text:p>
          </table:table-cell>
          <table:table-cell office:value-type="string" calcext:value-type="string">
            <text:p>ML.B3:B130</text:p>
          </table:table-cell>
          <table:table-cell office:value-type="string" calcext:value-type="string">
            <text:p>FL.B3:B1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9" table:formula="of:=IF([Finalists.G3]=&quot;&quot;; &quot;&quot;; CONCATENATE(VLOOKUP([Finalists.G3]; [Extra.$W$2:.$AG$9]; 7; 0); ROWOFFSETED(MATCH([Finalists.C3]; INDIRECT(VLOOKUP([Finalists.G3]; [Extra.$W$2:.$AI$9]; 12; 0)); 0)+2; WHICHROUNDN([Finalists.G3]))))">
            <text:p/>
          </table:table-cell>
          <table:table-cell table:formula="of:=CELL(&quot;ROW&quot;; INDIRECT([.AL2]))" office:value-type="string" office:string-value="" calcext:value-type="error">
            <text:p>#REF!</text:p>
          </table:table-cell>
          <table:table-cell table:formula="of:=CELL(&quot;COL&quot;; INDIRECT([.AL2]))" office:value-type="string" office:string-value="" calcext:value-type="error">
            <text:p>#REF!</text:p>
          </table:table-cell>
          <table:table-cell office:value-type="string" calcext:value-type="string">
            <text:p>ML.B3:I130</text:p>
          </table:table-cell>
          <table:table-cell office:value-type="string" calcext:value-type="string">
            <text:p>FL.B3:G130</text:p>
          </table:table-cell>
          <table:table-cell table:formula="of:=IF([.AR2]=&quot;&quot;; &quot;&quot;; CODE(MID([.AR2]; 1;1))*10000+CODE(MID([.AR2]; 2; 1))*100+CODE(MID([.AR2]; 3; 1)))">
            <text:p/>
          </table:table-cell>
          <table:table-cell table:formula="of:=[.P2]">
            <text:p/>
          </table:table-cell>
          <table:table-cell table:formula="of:=IF([.AR2]=&quot;&quot;; &quot;&quot;; SMALL([.AQ$1:.AQ$50]; ROW()))">
            <text:p/>
          </table:table-cell>
          <table:table-cell table:formula="of:=IF([.AS2]=&quot;&quot;; &quot;&quot;; VLOOKUP([.AS2]; [.AQ$1:.AR$50]; 2; 0))">
            <text:p/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WHICHSHEET(1; [.A3])" office:value-type="string" office:string-value="ML." calcext:value-type="string">
            <text:p>ML.</text:p>
          </table:table-cell>
          <table:table-cell table:formula="of:=SUBSTITUTE(ADDRESS(1; INDIRECT(&quot;Stats.&quot;&amp;SUBSTITUTE(ADDRESS(1; 2+2*[.$A3]; 4); &quot;1&quot;; &quot;&quot;)&amp;&quot;3&quot;); 4); &quot;1&quot;; &quot;&quot;)" office:value-type="string" office:string-value="K" calcext:value-type="string">
            <text:p>K</text:p>
          </table:table-cell>
          <table:table-cell table:formula="of:=SUBSTITUTE(ADDRESS(1; INDIRECT(&quot;Stats.&quot;&amp;SUBSTITUTE(ADDRESS(1; 2+2*[.$A3]; 4); &quot;1&quot;; &quot;&quot;)&amp;&quot;3&quot;)+1; 4); &quot;1&quot;; &quot;&quot;)" office:value-type="string" office:string-value="L" calcext:value-type="string">
            <text:p>L</text:p>
          </table:table-cell>
          <table:table-cell table:formula="of:=SUBSTITUTE(ADDRESS(1; INDIRECT(&quot;Stats.&quot;&amp;SUBSTITUTE(ADDRESS(1; 2+2*[.$A3]; 4); &quot;1&quot;; &quot;&quot;)&amp;&quot;3&quot;)+2; 4); &quot;1&quot;; &quot;&quot;)" office:value-type="string" office:string-value="M" calcext:value-type="string">
            <text:p>M</text:p>
          </table:table-cell>
          <table:table-cell table:formula="of:=SUBSTITUTE(ADDRESS(1; INDIRECT(&quot;Stats.&quot;&amp;SUBSTITUTE(ADDRESS(1; 2+2*[.$A3]; 4); &quot;1&quot;; &quot;&quot;)&amp;&quot;3&quot;)+3; 4); &quot;1&quot;; &quot;&quot;)" office:value-type="string" office:string-value="N" calcext:value-type="string">
            <text:p>N</text:p>
          </table:table-cell>
          <table:table-cell table:formula="of:=SUBSTITUTE(ADDRESS(1; INDIRECT(&quot;Stats.&quot;&amp;SUBSTITUTE(ADDRESS(1; 2+2*[.$A3]; 4); &quot;1&quot;; &quot;&quot;)&amp;&quot;3&quot;)+4; 4); &quot;1&quot;; &quot;&quot;)" office:value-type="string" office:string-value="O" calcext:value-type="string">
            <text:p>O</text:p>
          </table:table-cell>
          <table:table-cell table:formula="of:=SUBSTITUTE(ADDRESS(1; INDIRECT(&quot;Stats.&quot;&amp;SUBSTITUTE(ADDRESS(1; 2+2*[.$A3]; 4); &quot;1&quot;; &quot;&quot;)&amp;&quot;3&quot;)+5; 4); &quot;1&quot;; &quot;&quot;)" office:value-type="string" office:string-value="P" calcext:value-type="string">
            <text:p>P</text:p>
          </table:table-cell>
          <table:table-cell table:formula="of:=SUBSTITUTE(ADDRESS(1; INDIRECT(&quot;Stats.&quot;&amp;SUBSTITUTE(ADDRESS(1; 2+2*[.$A3]; 4); &quot;1&quot;; &quot;&quot;)&amp;&quot;3&quot;)+6; 4); &quot;1&quot;; &quot;&quot;)" office:value-type="string" office:string-value="Q" calcext:value-type="string">
            <text:p>Q</text:p>
          </table:table-cell>
          <table:table-cell table:formula="of:=SUBSTITUTE(ADDRESS(1; INDIRECT(&quot;Stats.&quot;&amp;SUBSTITUTE(ADDRESS(1; 2+2*[.$A3]; 4); &quot;1&quot;; &quot;&quot;)&amp;&quot;3&quot;)+7; 4); &quot;1&quot;; &quot;&quot;)" office:value-type="string" office:string-value="R" calcext:value-type="string">
            <text:p>R</text:p>
          </table:table-cell>
          <table:table-cell table:formula="of:=SUBSTITUTE(ADDRESS(1; INDIRECT(&quot;Stats.&quot;&amp;SUBSTITUTE(ADDRESS(1; 2+2*[.$A3]; 4); &quot;1&quot;; &quot;&quot;)&amp;&quot;3&quot;)+8; 4); &quot;1&quot;; &quot;&quot;)" office:value-type="string" office:string-value="S" calcext:value-type="string">
            <text:p>S</text:p>
          </table:table-cell>
          <table:table-cell/>
          <table:table-cell table:formula="of:=IF(ISNA(MATCH([.N3];[.O$6:.O$15];0));&quot;&quot;;IF(COUNTIF(INDIRECT(&quot;M1:M&quot;&amp;ROW()-1);MATCH([.N3];[.O$6:.O$15];0))&gt;0;MATCH([.N3];[.O$6:.O$15];0)+1;MATCH([.N3];[.O$6:.O$15];0)))">
            <text:p/>
          </table:table-cell>
          <table:table-cell table:formula="of:=(COUNTIF([ML.$C$3:.$C$130]; [.P3])+COUNTIF([FL.$C$3:.$C$130]; [.P3]))*1000+ROW()" office:value-type="float" office:value="256003" calcext:value-type="float">
            <text:p>256003</text:p>
          </table:table-cell>
          <table:table-cell table:formula="of:=&quot;Extra.&quot;&amp;[.O2]&amp;&quot;1:&quot;&amp;[.O2]&amp;[.O1]" office:value-type="string" office:string-value="Extra.N1:N1" calcext:value-type="string">
            <text:p>Extra.N1:N1</text:p>
          </table:table-cell>
          <table:table-cell table:formula="of:=IF(ISNA(VLOOKUP([.T3]; [.R3:.U258]; 4; 0)); &quot;&quot;; VLOOKUP([.T3]; [.R3:.U258]; 4; 0))">
            <text:p/>
          </table:table-cell>
          <table:table-cell/>
          <table:table-cell table:formula="of:=IF(AND([.S3]=0; NOT([.U3]=0)); MAX(INDIRECT(&quot;R1:R&quot;&amp;ROW()-1))+1; &quot;&quot;)">
            <text:p/>
          </table:table-cell>
          <table:table-cell table:formula="of:=IF(COUNTIF(INDIRECT(&quot;U1:U&quot;&amp;ROW()-1); [.U3])&gt;0; 1; 0)" office:value-type="float" office:value="1" calcext:value-type="float">
            <text:p>1</text:p>
          </table:table-cell>
          <table:table-cell table:formula="of:=[.T2]+1" office:value-type="float" office:value="3" calcext:value-type="float">
            <text:p>3</text:p>
          </table:table-cell>
          <table:table-cell table:formula="of:=[ML.C5]" office:value-type="float" office:value="0" calcext:value-type="float">
            <text:p>0</text:p>
          </table:table-cell>
          <table:table-cell/>
          <table:table-cell office:value-type="string" calcext:value-type="string">
            <text:p>2<text:span text:style-name="T3">nd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.K3:S130</text:p>
          </table:table-cell>
          <table:table-cell office:value-type="string" calcext:value-type="string">
            <text:p>FL.I3:O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L.K</text:p>
          </table:table-cell>
          <table:table-cell office:value-type="string" calcext:value-type="string">
            <text:p>ML.L</text:p>
          </table:table-cell>
          <table:table-cell office:value-type="string" calcext:value-type="string">
            <text:p>ML.M</text:p>
          </table:table-cell>
          <table:table-cell office:value-type="string" calcext:value-type="string">
            <text:p>FL.I</text:p>
          </table:table-cell>
          <table:table-cell office:value-type="string" calcext:value-type="string">
            <text:p>FL.J</text:p>
          </table:table-cell>
          <table:table-cell office:value-type="string" calcext:value-type="string">
            <text:p>FL.K</text:p>
          </table:table-cell>
          <table:table-cell office:value-type="string" calcext:value-type="string">
            <text:p>ML.L3:L130</text:p>
          </table:table-cell>
          <table:table-cell office:value-type="string" calcext:value-type="string">
            <text:p>FL.J3:J1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Finalists.G4]=&quot;&quot;; &quot;&quot;; CONCATENATE(VLOOKUP([Finalists.G4]; [Extra.$W$2:.$AG$9]; 7; 0); ROWOFFSETED(MATCH([Finalists.C4]; INDIRECT(VLOOKUP([Finalists.G4]; [Extra.$W$2:.$AI$9]; 12; 0)); 0)+2; WHICHROUNDN([Finalists.G4]))))">
            <text:p/>
          </table:table-cell>
          <table:table-cell table:formula="of:=CELL(&quot;ROW&quot;; INDIRECT([.AL3]))" office:value-type="string" office:string-value="" calcext:value-type="error">
            <text:p>#REF!</text:p>
          </table:table-cell>
          <table:table-cell table:formula="of:=CELL(&quot;COL&quot;; INDIRECT([.AL3]))" office:value-type="string" office:string-value="" calcext:value-type="error">
            <text:p>#REF!</text:p>
          </table:table-cell>
          <table:table-cell office:value-type="string" calcext:value-type="string">
            <text:p>ML.L3:S130</text:p>
          </table:table-cell>
          <table:table-cell office:value-type="string" calcext:value-type="string">
            <text:p>FL.J3:O130</text:p>
          </table:table-cell>
          <table:table-cell table:formula="of:=IF([.AR3]=&quot;&quot;; &quot;&quot;; CODE(MID([.AR3]; 1;1))*10000+CODE(MID([.AR3]; 2; 1))*100+CODE(MID([.AR3]; 3; 1)))">
            <text:p/>
          </table:table-cell>
          <table:table-cell table:formula="of:=[.P3]">
            <text:p/>
          </table:table-cell>
          <table:table-cell table:formula="of:=IF([.AR3]=&quot;&quot;; &quot;&quot;; SMALL([.AQ$1:.AQ$50]; ROW()))">
            <text:p/>
          </table:table-cell>
          <table:table-cell table:formula="of:=IF([.AS3]=&quot;&quot;; &quot;&quot;; VLOOKUP([.AS3]; [.AQ$1:.AR$50]; 2; 0))">
            <text:p/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WHICHSHEET(1; [.A4])" office:value-type="string" office:string-value="ML." calcext:value-type="string">
            <text:p>ML.</text:p>
          </table:table-cell>
          <table:table-cell table:formula="of:=SUBSTITUTE(ADDRESS(1; INDIRECT(&quot;Stats.&quot;&amp;SUBSTITUTE(ADDRESS(1; 2+2*[.$A4]; 4); &quot;1&quot;; &quot;&quot;)&amp;&quot;3&quot;); 4); &quot;1&quot;; &quot;&quot;)" office:value-type="string" office:string-value="U" calcext:value-type="string">
            <text:p>U</text:p>
          </table:table-cell>
          <table:table-cell table:formula="of:=SUBSTITUTE(ADDRESS(1; INDIRECT(&quot;Stats.&quot;&amp;SUBSTITUTE(ADDRESS(1; 2+2*[.$A4]; 4); &quot;1&quot;; &quot;&quot;)&amp;&quot;3&quot;)+1; 4); &quot;1&quot;; &quot;&quot;)" office:value-type="string" office:string-value="V" calcext:value-type="string">
            <text:p>V</text:p>
          </table:table-cell>
          <table:table-cell table:formula="of:=SUBSTITUTE(ADDRESS(1; INDIRECT(&quot;Stats.&quot;&amp;SUBSTITUTE(ADDRESS(1; 2+2*[.$A4]; 4); &quot;1&quot;; &quot;&quot;)&amp;&quot;3&quot;)+2; 4); &quot;1&quot;; &quot;&quot;)" office:value-type="string" office:string-value="W" calcext:value-type="string">
            <text:p>W</text:p>
          </table:table-cell>
          <table:table-cell table:formula="of:=SUBSTITUTE(ADDRESS(1; INDIRECT(&quot;Stats.&quot;&amp;SUBSTITUTE(ADDRESS(1; 2+2*[.$A4]; 4); &quot;1&quot;; &quot;&quot;)&amp;&quot;3&quot;)+3; 4); &quot;1&quot;; &quot;&quot;)" office:value-type="string" office:string-value="X" calcext:value-type="string">
            <text:p>X</text:p>
          </table:table-cell>
          <table:table-cell table:formula="of:=SUBSTITUTE(ADDRESS(1; INDIRECT(&quot;Stats.&quot;&amp;SUBSTITUTE(ADDRESS(1; 2+2*[.$A4]; 4); &quot;1&quot;; &quot;&quot;)&amp;&quot;3&quot;)+4; 4); &quot;1&quot;; &quot;&quot;)" office:value-type="string" office:string-value="Y" calcext:value-type="string">
            <text:p>Y</text:p>
          </table:table-cell>
          <table:table-cell table:formula="of:=SUBSTITUTE(ADDRESS(1; INDIRECT(&quot;Stats.&quot;&amp;SUBSTITUTE(ADDRESS(1; 2+2*[.$A4]; 4); &quot;1&quot;; &quot;&quot;)&amp;&quot;3&quot;)+5; 4); &quot;1&quot;; &quot;&quot;)" office:value-type="string" office:string-value="Z" calcext:value-type="string">
            <text:p>Z</text:p>
          </table:table-cell>
          <table:table-cell table:formula="of:=SUBSTITUTE(ADDRESS(1; INDIRECT(&quot;Stats.&quot;&amp;SUBSTITUTE(ADDRESS(1; 2+2*[.$A4]; 4); &quot;1&quot;; &quot;&quot;)&amp;&quot;3&quot;)+6; 4); &quot;1&quot;; &quot;&quot;)" office:value-type="string" office:string-value="AA" calcext:value-type="string">
            <text:p>AA</text:p>
          </table:table-cell>
          <table:table-cell table:formula="of:=SUBSTITUTE(ADDRESS(1; INDIRECT(&quot;Stats.&quot;&amp;SUBSTITUTE(ADDRESS(1; 2+2*[.$A4]; 4); &quot;1&quot;; &quot;&quot;)&amp;&quot;3&quot;)+7; 4); &quot;1&quot;; &quot;&quot;)" office:value-type="string" office:string-value="AB" calcext:value-type="string">
            <text:p>AB</text:p>
          </table:table-cell>
          <table:table-cell table:formula="of:=SUBSTITUTE(ADDRESS(1; INDIRECT(&quot;Stats.&quot;&amp;SUBSTITUTE(ADDRESS(1; 2+2*[.$A4]; 4); &quot;1&quot;; &quot;&quot;)&amp;&quot;3&quot;)+8; 4); &quot;1&quot;; &quot;&quot;)" office:value-type="string" office:string-value="AC" calcext:value-type="string">
            <text:p>AC</text:p>
          </table:table-cell>
          <table:table-cell/>
          <table:table-cell table:formula="of:=IF(ISNA(MATCH([.N4];[.O$6:.O$15];0));&quot;&quot;;IF(COUNTIF(INDIRECT(&quot;M1:M&quot;&amp;ROW()-1);MATCH([.N4];[.O$6:.O$15];0))&gt;0;MATCH([.N4];[.O$6:.O$15];0)+1;MATCH([.N4];[.O$6:.O$15];0)))">
            <text:p/>
          </table:table-cell>
          <table:table-cell table:formula="of:=(COUNTIF([ML.$C$3:.$C$130]; [.P4])+COUNTIF([FL.$C$3:.$C$130]; [.P4]))*1000+ROW()" office:value-type="float" office:value="256004" calcext:value-type="float">
            <text:p>256004</text:p>
          </table:table-cell>
          <table:table-cell table:formula="of:=SUBSTITUTE(ADDRESS(1; COLUMN()+1; 4); &quot;1&quot;; &quot;&quot;)" office:value-type="string" office:string-value="P" calcext:value-type="string">
            <text:p>P</text:p>
          </table:table-cell>
          <table:table-cell table:formula="of:=IF(ISNA(VLOOKUP([.T4]; [.R4:.U259]; 4; 0)); &quot;&quot;; VLOOKUP([.T4]; [.R4:.U259]; 4; 0))">
            <text:p/>
          </table:table-cell>
          <table:table-cell/>
          <table:table-cell table:formula="of:=IF(AND([.S4]=0; NOT([.U4]=0)); MAX(INDIRECT(&quot;R1:R&quot;&amp;ROW()-1))+1; &quot;&quot;)">
            <text:p/>
          </table:table-cell>
          <table:table-cell table:formula="of:=IF(COUNTIF(INDIRECT(&quot;U1:U&quot;&amp;ROW()-1); [.U4])&gt;0; 1; 0)" office:value-type="float" office:value="1" calcext:value-type="float">
            <text:p>1</text:p>
          </table:table-cell>
          <table:table-cell table:formula="of:=[.T3]+1" office:value-type="float" office:value="4" calcext:value-type="float">
            <text:p>4</text:p>
          </table:table-cell>
          <table:table-cell table:formula="of:=[ML.C6]" office:value-type="float" office:value="0" calcext:value-type="float">
            <text:p>0</text:p>
          </table:table-cell>
          <table:table-cell/>
          <table:table-cell office:value-type="string" calcext:value-type="string">
            <text:p>3<text:span text:style-name="T3">rd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.U3:AC130</text:p>
          </table:table-cell>
          <table:table-cell office:value-type="string" calcext:value-type="string">
            <text:p>FL.Q3:W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L.U</text:p>
          </table:table-cell>
          <table:table-cell office:value-type="string" calcext:value-type="string">
            <text:p>ML.V</text:p>
          </table:table-cell>
          <table:table-cell office:value-type="string" calcext:value-type="string">
            <text:p>ML.W</text:p>
          </table:table-cell>
          <table:table-cell office:value-type="string" calcext:value-type="string">
            <text:p>FL.Q</text:p>
          </table:table-cell>
          <table:table-cell office:value-type="string" calcext:value-type="string">
            <text:p>FL.R</text:p>
          </table:table-cell>
          <table:table-cell office:value-type="string" calcext:value-type="string">
            <text:p>FL.S</text:p>
          </table:table-cell>
          <table:table-cell office:value-type="string" calcext:value-type="string">
            <text:p>ML.V3:V130</text:p>
          </table:table-cell>
          <table:table-cell office:value-type="string" calcext:value-type="string">
            <text:p>FL.R3:R1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Finalists.G5]=&quot;&quot;; &quot;&quot;; CONCATENATE(VLOOKUP([Finalists.G5]; [Extra.$W$2:.$AG$9]; 7; 0); ROWOFFSETED(MATCH([Finalists.C5]; INDIRECT(VLOOKUP([Finalists.G5]; [Extra.$W$2:.$AI$9]; 12; 0)); 0)+2; WHICHROUNDN([Finalists.G5]))))">
            <text:p/>
          </table:table-cell>
          <table:table-cell table:formula="of:=CELL(&quot;ROW&quot;; INDIRECT([.AL4]))" office:value-type="string" office:string-value="" calcext:value-type="error">
            <text:p>#REF!</text:p>
          </table:table-cell>
          <table:table-cell table:formula="of:=CELL(&quot;COL&quot;; INDIRECT([.AL4]))" office:value-type="string" office:string-value="" calcext:value-type="error">
            <text:p>#REF!</text:p>
          </table:table-cell>
          <table:table-cell office:value-type="string" calcext:value-type="string">
            <text:p>ML.V3:AC130</text:p>
          </table:table-cell>
          <table:table-cell office:value-type="string" calcext:value-type="string">
            <text:p>FL.R3:W130</text:p>
          </table:table-cell>
          <table:table-cell table:formula="of:=IF([.AR4]=&quot;&quot;; &quot;&quot;; CODE(MID([.AR4]; 1;1))*10000+CODE(MID([.AR4]; 2; 1))*100+CODE(MID([.AR4]; 3; 1)))">
            <text:p/>
          </table:table-cell>
          <table:table-cell table:formula="of:=[.P4]">
            <text:p/>
          </table:table-cell>
          <table:table-cell table:formula="of:=IF([.AR4]=&quot;&quot;; &quot;&quot;; SMALL([.AQ$1:.AQ$50]; ROW()))">
            <text:p/>
          </table:table-cell>
          <table:table-cell table:formula="of:=IF([.AS4]=&quot;&quot;; &quot;&quot;; VLOOKUP([.AS4]; [.AQ$1:.AR$50]; 2; 0))">
            <text:p/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WHICHSHEET(1; [.A5])" office:value-type="string" office:string-value="ML." calcext:value-type="string">
            <text:p>ML.</text:p>
          </table:table-cell>
          <table:table-cell table:formula="of:=SUBSTITUTE(ADDRESS(1; INDIRECT(&quot;Stats.&quot;&amp;SUBSTITUTE(ADDRESS(1; 2+2*[.$A5]; 4); &quot;1&quot;; &quot;&quot;)&amp;&quot;3&quot;); 4); &quot;1&quot;; &quot;&quot;)" office:value-type="string" office:string-value="AE" calcext:value-type="string">
            <text:p>AE</text:p>
          </table:table-cell>
          <table:table-cell table:formula="of:=SUBSTITUTE(ADDRESS(1; INDIRECT(&quot;Stats.&quot;&amp;SUBSTITUTE(ADDRESS(1; 2+2*[.$A5]; 4); &quot;1&quot;; &quot;&quot;)&amp;&quot;3&quot;)+1; 4); &quot;1&quot;; &quot;&quot;)" office:value-type="string" office:string-value="AF" calcext:value-type="string">
            <text:p>AF</text:p>
          </table:table-cell>
          <table:table-cell table:formula="of:=SUBSTITUTE(ADDRESS(1; INDIRECT(&quot;Stats.&quot;&amp;SUBSTITUTE(ADDRESS(1; 2+2*[.$A5]; 4); &quot;1&quot;; &quot;&quot;)&amp;&quot;3&quot;)+2; 4); &quot;1&quot;; &quot;&quot;)" office:value-type="string" office:string-value="AG" calcext:value-type="string">
            <text:p>AG</text:p>
          </table:table-cell>
          <table:table-cell table:formula="of:=SUBSTITUTE(ADDRESS(1; INDIRECT(&quot;Stats.&quot;&amp;SUBSTITUTE(ADDRESS(1; 2+2*[.$A5]; 4); &quot;1&quot;; &quot;&quot;)&amp;&quot;3&quot;)+3; 4); &quot;1&quot;; &quot;&quot;)" office:value-type="string" office:string-value="AH" calcext:value-type="string">
            <text:p>AH</text:p>
          </table:table-cell>
          <table:table-cell table:formula="of:=SUBSTITUTE(ADDRESS(1; INDIRECT(&quot;Stats.&quot;&amp;SUBSTITUTE(ADDRESS(1; 2+2*[.$A5]; 4); &quot;1&quot;; &quot;&quot;)&amp;&quot;3&quot;)+4; 4); &quot;1&quot;; &quot;&quot;)" office:value-type="string" office:string-value="AI" calcext:value-type="string">
            <text:p>AI</text:p>
          </table:table-cell>
          <table:table-cell table:formula="of:=SUBSTITUTE(ADDRESS(1; INDIRECT(&quot;Stats.&quot;&amp;SUBSTITUTE(ADDRESS(1; 2+2*[.$A5]; 4); &quot;1&quot;; &quot;&quot;)&amp;&quot;3&quot;)+5; 4); &quot;1&quot;; &quot;&quot;)" office:value-type="string" office:string-value="AJ" calcext:value-type="string">
            <text:p>AJ</text:p>
          </table:table-cell>
          <table:table-cell table:formula="of:=SUBSTITUTE(ADDRESS(1; INDIRECT(&quot;Stats.&quot;&amp;SUBSTITUTE(ADDRESS(1; 2+2*[.$A5]; 4); &quot;1&quot;; &quot;&quot;)&amp;&quot;3&quot;)+6; 4); &quot;1&quot;; &quot;&quot;)" office:value-type="string" office:string-value="AK" calcext:value-type="string">
            <text:p>AK</text:p>
          </table:table-cell>
          <table:table-cell table:formula="of:=SUBSTITUTE(ADDRESS(1; INDIRECT(&quot;Stats.&quot;&amp;SUBSTITUTE(ADDRESS(1; 2+2*[.$A5]; 4); &quot;1&quot;; &quot;&quot;)&amp;&quot;3&quot;)+7; 4); &quot;1&quot;; &quot;&quot;)" office:value-type="string" office:string-value="AL" calcext:value-type="string">
            <text:p>AL</text:p>
          </table:table-cell>
          <table:table-cell table:formula="of:=SUBSTITUTE(ADDRESS(1; INDIRECT(&quot;Stats.&quot;&amp;SUBSTITUTE(ADDRESS(1; 2+2*[.$A5]; 4); &quot;1&quot;; &quot;&quot;)&amp;&quot;3&quot;)+8; 4); &quot;1&quot;; &quot;&quot;)" office:value-type="string" office:string-value="AM" calcext:value-type="string">
            <text:p>AM</text:p>
          </table:table-cell>
          <table:table-cell/>
          <table:table-cell table:formula="of:=IF(ISNA(MATCH([.N5];[.O$6:.O$15];0));&quot;&quot;;IF(COUNTIF(INDIRECT(&quot;M1:M&quot;&amp;ROW()-1);MATCH([.N5];[.O$6:.O$15];0))&gt;0;MATCH([.N5];[.O$6:.O$15];0)+1;MATCH([.N5];[.O$6:.O$15];0)))">
            <text:p/>
          </table:table-cell>
          <table:table-cell table:formula="of:=(COUNTIF([ML.$C$3:.$C$130]; [.P5])+COUNTIF([FL.$C$3:.$C$130]; [.P5]))*1000+ROW()" office:value-type="float" office:value="256005" calcext:value-type="float">
            <text:p>256005</text:p>
          </table:table-cell>
          <table:table-cell table:formula="of:=&quot;Extra.&quot;&amp;[.O16]&amp;&quot;1:&quot;&amp;[.O4]&amp;[.O1]" office:value-type="string" office:string-value="Extra.M1:P1" calcext:value-type="string">
            <text:p>Extra.M1:P1</text:p>
          </table:table-cell>
          <table:table-cell table:formula="of:=IF(ISNA(VLOOKUP([.T5]; [.R5:.U260]; 4; 0)); &quot;&quot;; VLOOKUP([.T5]; [.R5:.U260]; 4; 0))">
            <text:p/>
          </table:table-cell>
          <table:table-cell/>
          <table:table-cell table:formula="of:=IF(AND([.S5]=0; NOT([.U5]=0)); MAX(INDIRECT(&quot;R1:R&quot;&amp;ROW()-1))+1; &quot;&quot;)">
            <text:p/>
          </table:table-cell>
          <table:table-cell table:formula="of:=IF(COUNTIF(INDIRECT(&quot;U1:U&quot;&amp;ROW()-1); [.U5])&gt;0; 1; 0)" office:value-type="float" office:value="1" calcext:value-type="float">
            <text:p>1</text:p>
          </table:table-cell>
          <table:table-cell table:formula="of:=[.T4]+1" office:value-type="float" office:value="5" calcext:value-type="float">
            <text:p>5</text:p>
          </table:table-cell>
          <table:table-cell table:formula="of:=[ML.C7]" office:value-type="float" office:value="0" calcext:value-type="float">
            <text:p>0</text:p>
          </table:table-cell>
          <table:table-cell/>
          <table:table-cell office:value-type="string" calcext:value-type="string">
            <text:p>4<text:span text:style-name="T3">th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s.A3:I18</text:p>
          </table:table-cell>
          <table:table-cell office:value-type="string" calcext:value-type="string">
            <text:p>Finals.A21:I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s.A</text:p>
          </table:table-cell>
          <table:table-cell office:value-type="string" calcext:value-type="string">
            <text:p>Finals.B</text:p>
          </table:table-cell>
          <table:table-cell office:value-type="string" calcext:value-type="string">
            <text:p>Finals.C</text:p>
          </table:table-cell>
          <table:table-cell office:value-type="string" calcext:value-type="string">
            <text:p>Finals.A</text:p>
          </table:table-cell>
          <table:table-cell office:value-type="string" calcext:value-type="string">
            <text:p>Finals.B</text:p>
          </table:table-cell>
          <table:table-cell office:value-type="string" calcext:value-type="string">
            <text:p>Finals.C</text:p>
          </table:table-cell>
          <table:table-cell office:value-type="string" calcext:value-type="string">
            <text:p>Finals.B3:B18</text:p>
          </table:table-cell>
          <table:table-cell office:value-type="string" calcext:value-type="string">
            <text:p>Finals.B21:B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Finalists.G6]=&quot;&quot;; &quot;&quot;; CONCATENATE(VLOOKUP([Finalists.G6]; [Extra.$W$2:.$AG$9]; 7; 0); ROWOFFSETED(MATCH([Finalists.C6]; INDIRECT(VLOOKUP([Finalists.G6]; [Extra.$W$2:.$AI$9]; 12; 0)); 0)+2; WHICHROUNDN([Finalists.G6]))))">
            <text:p/>
          </table:table-cell>
          <table:table-cell table:formula="of:=CELL(&quot;ROW&quot;; INDIRECT([.AL5]))" office:value-type="string" office:string-value="" calcext:value-type="error">
            <text:p>#REF!</text:p>
          </table:table-cell>
          <table:table-cell table:formula="of:=CELL(&quot;COL&quot;; INDIRECT([.AL5]))" office:value-type="string" office:string-value="" calcext:value-type="error">
            <text:p>#REF!</text:p>
          </table:table-cell>
          <table:table-cell office:value-type="string" calcext:value-type="string">
            <text:p>Finals.B3:I18</text:p>
          </table:table-cell>
          <table:table-cell office:value-type="string" calcext:value-type="string">
            <text:p>Finals.B21:I36</text:p>
          </table:table-cell>
          <table:table-cell table:formula="of:=IF([.AR5]=&quot;&quot;; &quot;&quot;; CODE(MID([.AR5]; 1;1))*10000+CODE(MID([.AR5]; 2; 1))*100+CODE(MID([.AR5]; 3; 1)))">
            <text:p/>
          </table:table-cell>
          <table:table-cell table:formula="of:=[.P5]">
            <text:p/>
          </table:table-cell>
          <table:table-cell table:formula="of:=IF([.AR5]=&quot;&quot;; &quot;&quot;; SMALL([.AQ$1:.AQ$50]; ROW()))">
            <text:p/>
          </table:table-cell>
          <table:table-cell table:formula="of:=IF([.AS5]=&quot;&quot;; &quot;&quot;; VLOOKUP([.AS5]; [.AQ$1:.AR$50]; 2; 0))">
            <text:p/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WHICHSHEET(1; [.A6])" office:value-type="string" office:string-value="Finals." calcext:value-type="string">
            <text:p>Finals.</text:p>
          </table:table-cell>
          <table:table-cell table:formula="of:=SUBSTITUTE(ADDRESS(1; INDIRECT(&quot;Stats.&quot;&amp;SUBSTITUTE(ADDRESS(1; 2+2*[.$A6]; 4); &quot;1&quot;; &quot;&quot;)&amp;&quot;3&quot;); 4); &quot;1&quot;; &quot;&quot;)" office:value-type="string" office:string-value="K" calcext:value-type="string">
            <text:p>K</text:p>
          </table:table-cell>
          <table:table-cell table:formula="of:=SUBSTITUTE(ADDRESS(1; INDIRECT(&quot;Stats.&quot;&amp;SUBSTITUTE(ADDRESS(1; 2+2*[.$A6]; 4); &quot;1&quot;; &quot;&quot;)&amp;&quot;3&quot;)+1; 4); &quot;1&quot;; &quot;&quot;)" office:value-type="string" office:string-value="L" calcext:value-type="string">
            <text:p>L</text:p>
          </table:table-cell>
          <table:table-cell table:formula="of:=SUBSTITUTE(ADDRESS(1; INDIRECT(&quot;Stats.&quot;&amp;SUBSTITUTE(ADDRESS(1; 2+2*[.$A6]; 4); &quot;1&quot;; &quot;&quot;)&amp;&quot;3&quot;)+2; 4); &quot;1&quot;; &quot;&quot;)" office:value-type="string" office:string-value="M" calcext:value-type="string">
            <text:p>M</text:p>
          </table:table-cell>
          <table:table-cell table:formula="of:=SUBSTITUTE(ADDRESS(1; INDIRECT(&quot;Stats.&quot;&amp;SUBSTITUTE(ADDRESS(1; 2+2*[.$A6]; 4); &quot;1&quot;; &quot;&quot;)&amp;&quot;3&quot;)+3; 4); &quot;1&quot;; &quot;&quot;)" office:value-type="string" office:string-value="N" calcext:value-type="string">
            <text:p>N</text:p>
          </table:table-cell>
          <table:table-cell table:formula="of:=SUBSTITUTE(ADDRESS(1; INDIRECT(&quot;Stats.&quot;&amp;SUBSTITUTE(ADDRESS(1; 2+2*[.$A6]; 4); &quot;1&quot;; &quot;&quot;)&amp;&quot;3&quot;)+4; 4); &quot;1&quot;; &quot;&quot;)" office:value-type="string" office:string-value="O" calcext:value-type="string">
            <text:p>O</text:p>
          </table:table-cell>
          <table:table-cell table:formula="of:=SUBSTITUTE(ADDRESS(1; INDIRECT(&quot;Stats.&quot;&amp;SUBSTITUTE(ADDRESS(1; 2+2*[.$A6]; 4); &quot;1&quot;; &quot;&quot;)&amp;&quot;3&quot;)+5; 4); &quot;1&quot;; &quot;&quot;)" office:value-type="string" office:string-value="P" calcext:value-type="string">
            <text:p>P</text:p>
          </table:table-cell>
          <table:table-cell table:formula="of:=SUBSTITUTE(ADDRESS(1; INDIRECT(&quot;Stats.&quot;&amp;SUBSTITUTE(ADDRESS(1; 2+2*[.$A6]; 4); &quot;1&quot;; &quot;&quot;)&amp;&quot;3&quot;)+6; 4); &quot;1&quot;; &quot;&quot;)" office:value-type="string" office:string-value="Q" calcext:value-type="string">
            <text:p>Q</text:p>
          </table:table-cell>
          <table:table-cell table:formula="of:=SUBSTITUTE(ADDRESS(1; INDIRECT(&quot;Stats.&quot;&amp;SUBSTITUTE(ADDRESS(1; 2+2*[.$A6]; 4); &quot;1&quot;; &quot;&quot;)&amp;&quot;3&quot;)+7; 4); &quot;1&quot;; &quot;&quot;)" office:value-type="string" office:string-value="R" calcext:value-type="string">
            <text:p>R</text:p>
          </table:table-cell>
          <table:table-cell table:formula="of:=SUBSTITUTE(ADDRESS(1; INDIRECT(&quot;Stats.&quot;&amp;SUBSTITUTE(ADDRESS(1; 2+2*[.$A6]; 4); &quot;1&quot;; &quot;&quot;)&amp;&quot;3&quot;)+8; 4); &quot;1&quot;; &quot;&quot;)" office:value-type="string" office:string-value="S" calcext:value-type="string">
            <text:p>S</text:p>
          </table:table-cell>
          <table:table-cell/>
          <table:table-cell table:formula="of:=IF(ISNA(MATCH([.N6];[.O$6:.O$15];0));&quot;&quot;;IF(COUNTIF(INDIRECT(&quot;M1:M&quot;&amp;ROW()-1);MATCH([.N6];[.O$6:.O$15];0))&gt;0;MATCH([.N6];[.O$6:.O$15];0)+1;MATCH([.N6];[.O$6:.O$15];0)))">
            <text:p/>
          </table:table-cell>
          <table:table-cell table:formula="of:=(COUNTIF([ML.$C$3:.$C$130]; [.P6])+COUNTIF([FL.$C$3:.$C$130]; [.P6]))*1000+ROW()" office:value-type="float" office:value="256006" calcext:value-type="float">
            <text:p>256006</text:p>
          </table:table-cell>
          <table:table-cell table:formula="of:=LARGE(INDIRECT([Extra.$O$3]); 1)" office:value-type="float" office:value="1" calcext:value-type="float">
            <text:p>1</text:p>
          </table:table-cell>
          <table:table-cell table:formula="of:=IF(ISNA(VLOOKUP([.T6]; [.R6:.U261]; 4; 0)); &quot;&quot;; VLOOKUP([.T6]; [.R6:.U261]; 4; 0))">
            <text:p/>
          </table:table-cell>
          <table:table-cell/>
          <table:table-cell table:formula="of:=IF(AND([.S6]=0; NOT([.U6]=0)); MAX(INDIRECT(&quot;R1:R&quot;&amp;ROW()-1))+1; &quot;&quot;)">
            <text:p/>
          </table:table-cell>
          <table:table-cell table:formula="of:=IF(COUNTIF(INDIRECT(&quot;U1:U&quot;&amp;ROW()-1); [.U6])&gt;0; 1; 0)" office:value-type="float" office:value="1" calcext:value-type="float">
            <text:p>1</text:p>
          </table:table-cell>
          <table:table-cell table:formula="of:=[.T5]+1" office:value-type="float" office:value="6" calcext:value-type="float">
            <text:p>6</text:p>
          </table:table-cell>
          <table:table-cell table:formula="of:=[ML.C8]" office:value-type="float" office:value="0" calcext:value-type="float">
            <text:p>0</text:p>
          </table:table-cell>
          <table:table-cell/>
          <table:table-cell office:value-type="string" calcext:value-type="string">
            <text:p>Q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s.K3:S18</text:p>
          </table:table-cell>
          <table:table-cell office:value-type="string" calcext:value-type="string">
            <text:p>Finals.K21:S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s.K</text:p>
          </table:table-cell>
          <table:table-cell office:value-type="string" calcext:value-type="string">
            <text:p>Finals.L</text:p>
          </table:table-cell>
          <table:table-cell office:value-type="string" calcext:value-type="string">
            <text:p>Finals.M</text:p>
          </table:table-cell>
          <table:table-cell office:value-type="string" calcext:value-type="string">
            <text:p>Finals.K</text:p>
          </table:table-cell>
          <table:table-cell office:value-type="string" calcext:value-type="string">
            <text:p>Finals.L</text:p>
          </table:table-cell>
          <table:table-cell office:value-type="string" calcext:value-type="string">
            <text:p>Finals.M</text:p>
          </table:table-cell>
          <table:table-cell office:value-type="string" calcext:value-type="string">
            <text:p>Finals.L3:L18</text:p>
          </table:table-cell>
          <table:table-cell office:value-type="string" calcext:value-type="string">
            <text:p>Finals.L21:L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Finalists.G7]=&quot;&quot;; &quot;&quot;; CONCATENATE(VLOOKUP([Finalists.G7]; [Extra.$W$2:.$AG$9]; 7; 0); ROWOFFSETED(MATCH([Finalists.C7]; INDIRECT(VLOOKUP([Finalists.G7]; [Extra.$W$2:.$AI$9]; 12; 0)); 0)+2; WHICHROUNDN([Finalists.G7]))))">
            <text:p/>
          </table:table-cell>
          <table:table-cell table:formula="of:=CELL(&quot;ROW&quot;; INDIRECT([.AL6]))" office:value-type="string" office:string-value="" calcext:value-type="error">
            <text:p>#REF!</text:p>
          </table:table-cell>
          <table:table-cell table:formula="of:=CELL(&quot;COL&quot;; INDIRECT([.AL6]))" office:value-type="string" office:string-value="" calcext:value-type="error">
            <text:p>#REF!</text:p>
          </table:table-cell>
          <table:table-cell office:value-type="string" calcext:value-type="string">
            <text:p>Finals.L3:S18</text:p>
          </table:table-cell>
          <table:table-cell office:value-type="string" calcext:value-type="string">
            <text:p>Finals.L21:S36</text:p>
          </table:table-cell>
          <table:table-cell table:formula="of:=IF([.AR6]=&quot;&quot;; &quot;&quot;; CODE(MID([.AR6]; 1;1))*10000+CODE(MID([.AR6]; 2; 1))*100+CODE(MID([.AR6]; 3; 1)))">
            <text:p/>
          </table:table-cell>
          <table:table-cell table:formula="of:=[.P6]">
            <text:p/>
          </table:table-cell>
          <table:table-cell table:formula="of:=IF([.AR6]=&quot;&quot;; &quot;&quot;; SMALL([.AQ$1:.AQ$50]; ROW()))">
            <text:p/>
          </table:table-cell>
          <table:table-cell table:formula="of:=IF([.AS6]=&quot;&quot;; &quot;&quot;; VLOOKUP([.AS6]; [.AQ$1:.AR$50]; 2; 0))">
            <text:p/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WHICHSHEET(1; [.A7])" office:value-type="string" office:string-value="Finals." calcext:value-type="string">
            <text:p>Finals.</text:p>
          </table:table-cell>
          <table:table-cell table:formula="of:=SUBSTITUTE(ADDRESS(1; INDIRECT(&quot;Stats.&quot;&amp;SUBSTITUTE(ADDRESS(1; 2+2*[.$A7]; 4); &quot;1&quot;; &quot;&quot;)&amp;&quot;3&quot;); 4); &quot;1&quot;; &quot;&quot;)" office:value-type="string" office:string-value="U" calcext:value-type="string">
            <text:p>U</text:p>
          </table:table-cell>
          <table:table-cell table:formula="of:=SUBSTITUTE(ADDRESS(1; INDIRECT(&quot;Stats.&quot;&amp;SUBSTITUTE(ADDRESS(1; 2+2*[.$A7]; 4); &quot;1&quot;; &quot;&quot;)&amp;&quot;3&quot;)+1; 4); &quot;1&quot;; &quot;&quot;)" office:value-type="string" office:string-value="V" calcext:value-type="string">
            <text:p>V</text:p>
          </table:table-cell>
          <table:table-cell table:formula="of:=SUBSTITUTE(ADDRESS(1; INDIRECT(&quot;Stats.&quot;&amp;SUBSTITUTE(ADDRESS(1; 2+2*[.$A7]; 4); &quot;1&quot;; &quot;&quot;)&amp;&quot;3&quot;)+2; 4); &quot;1&quot;; &quot;&quot;)" office:value-type="string" office:string-value="W" calcext:value-type="string">
            <text:p>W</text:p>
          </table:table-cell>
          <table:table-cell table:formula="of:=SUBSTITUTE(ADDRESS(1; INDIRECT(&quot;Stats.&quot;&amp;SUBSTITUTE(ADDRESS(1; 2+2*[.$A7]; 4); &quot;1&quot;; &quot;&quot;)&amp;&quot;3&quot;)+3; 4); &quot;1&quot;; &quot;&quot;)" office:value-type="string" office:string-value="X" calcext:value-type="string">
            <text:p>X</text:p>
          </table:table-cell>
          <table:table-cell table:formula="of:=SUBSTITUTE(ADDRESS(1; INDIRECT(&quot;Stats.&quot;&amp;SUBSTITUTE(ADDRESS(1; 2+2*[.$A7]; 4); &quot;1&quot;; &quot;&quot;)&amp;&quot;3&quot;)+4; 4); &quot;1&quot;; &quot;&quot;)" office:value-type="string" office:string-value="Y" calcext:value-type="string">
            <text:p>Y</text:p>
          </table:table-cell>
          <table:table-cell table:formula="of:=SUBSTITUTE(ADDRESS(1; INDIRECT(&quot;Stats.&quot;&amp;SUBSTITUTE(ADDRESS(1; 2+2*[.$A7]; 4); &quot;1&quot;; &quot;&quot;)&amp;&quot;3&quot;)+5; 4); &quot;1&quot;; &quot;&quot;)" office:value-type="string" office:string-value="Z" calcext:value-type="string">
            <text:p>Z</text:p>
          </table:table-cell>
          <table:table-cell table:formula="of:=SUBSTITUTE(ADDRESS(1; INDIRECT(&quot;Stats.&quot;&amp;SUBSTITUTE(ADDRESS(1; 2+2*[.$A7]; 4); &quot;1&quot;; &quot;&quot;)&amp;&quot;3&quot;)+6; 4); &quot;1&quot;; &quot;&quot;)" office:value-type="string" office:string-value="AA" calcext:value-type="string">
            <text:p>AA</text:p>
          </table:table-cell>
          <table:table-cell table:formula="of:=SUBSTITUTE(ADDRESS(1; INDIRECT(&quot;Stats.&quot;&amp;SUBSTITUTE(ADDRESS(1; 2+2*[.$A7]; 4); &quot;1&quot;; &quot;&quot;)&amp;&quot;3&quot;)+7; 4); &quot;1&quot;; &quot;&quot;)" office:value-type="string" office:string-value="AB" calcext:value-type="string">
            <text:p>AB</text:p>
          </table:table-cell>
          <table:table-cell table:formula="of:=SUBSTITUTE(ADDRESS(1; INDIRECT(&quot;Stats.&quot;&amp;SUBSTITUTE(ADDRESS(1; 2+2*[.$A7]; 4); &quot;1&quot;; &quot;&quot;)&amp;&quot;3&quot;)+8; 4); &quot;1&quot;; &quot;&quot;)" office:value-type="string" office:string-value="AC" calcext:value-type="string">
            <text:p>AC</text:p>
          </table:table-cell>
          <table:table-cell/>
          <table:table-cell table:formula="of:=IF(ISNA(MATCH([.N7];[.O$6:.O$15];0));&quot;&quot;;IF(COUNTIF(INDIRECT(&quot;M1:M&quot;&amp;ROW()-1);MATCH([.N7];[.O$6:.O$15];0))&gt;0;MATCH([.N7];[.O$6:.O$15];0)+1;MATCH([.N7];[.O$6:.O$15];0)))">
            <text:p/>
          </table:table-cell>
          <table:table-cell table:formula="of:=(COUNTIF([ML.$C$3:.$C$130]; [.P7])+COUNTIF([FL.$C$3:.$C$130]; [.P7]))*1000+ROW()" office:value-type="float" office:value="256007" calcext:value-type="float">
            <text:p>256007</text:p>
          </table:table-cell>
          <table:table-cell table:formula="of:=LARGE(INDIRECT([Extra.$O$3]); 2)" office:value-type="string" office:string-value="" calcext:value-type="error">
            <text:p>#VALUE!</text:p>
          </table:table-cell>
          <table:table-cell table:formula="of:=IF(ISNA(VLOOKUP([.T7]; [.R7:.U262]; 4; 0)); &quot;&quot;; VLOOKUP([.T7]; [.R7:.U262]; 4; 0))">
            <text:p/>
          </table:table-cell>
          <table:table-cell/>
          <table:table-cell table:formula="of:=IF(AND([.S7]=0; NOT([.U7]=0)); MAX(INDIRECT(&quot;R1:R&quot;&amp;ROW()-1))+1; &quot;&quot;)">
            <text:p/>
          </table:table-cell>
          <table:table-cell table:formula="of:=IF(COUNTIF(INDIRECT(&quot;U1:U&quot;&amp;ROW()-1); [.U7])&gt;0; 1; 0)" office:value-type="float" office:value="1" calcext:value-type="float">
            <text:p>1</text:p>
          </table:table-cell>
          <table:table-cell table:formula="of:=[.T6]+1" office:value-type="float" office:value="7" calcext:value-type="float">
            <text:p>7</text:p>
          </table:table-cell>
          <table:table-cell table:formula="of:=[ML.C9]" office:value-type="float" office:value="0" calcext:value-type="float">
            <text:p>0</text:p>
          </table:table-cell>
          <table:table-cell/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als.U3:AC18</text:p>
          </table:table-cell>
          <table:table-cell office:value-type="string" calcext:value-type="string">
            <text:p>Finals.U21:AC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s.U</text:p>
          </table:table-cell>
          <table:table-cell office:value-type="string" calcext:value-type="string">
            <text:p>Finals.V</text:p>
          </table:table-cell>
          <table:table-cell office:value-type="string" calcext:value-type="string">
            <text:p>Finals.W</text:p>
          </table:table-cell>
          <table:table-cell office:value-type="string" calcext:value-type="string">
            <text:p>Finals.U</text:p>
          </table:table-cell>
          <table:table-cell office:value-type="string" calcext:value-type="string">
            <text:p>Finals.V</text:p>
          </table:table-cell>
          <table:table-cell office:value-type="string" calcext:value-type="string">
            <text:p>Finals.W</text:p>
          </table:table-cell>
          <table:table-cell office:value-type="string" calcext:value-type="string">
            <text:p>Finals.V3:V18</text:p>
          </table:table-cell>
          <table:table-cell office:value-type="string" calcext:value-type="string">
            <text:p>Finals.V21:V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Finalists.G8]=&quot;&quot;; &quot;&quot;; CONCATENATE(VLOOKUP([Finalists.G8]; [Extra.$W$2:.$AG$9]; 7; 0); ROWOFFSETED(MATCH([Finalists.C8]; INDIRECT(VLOOKUP([Finalists.G8]; [Extra.$W$2:.$AI$9]; 12; 0)); 0)+2; WHICHROUNDN([Finalists.G8]))))">
            <text:p/>
          </table:table-cell>
          <table:table-cell table:formula="of:=CELL(&quot;ROW&quot;; INDIRECT([.AL7]))" office:value-type="string" office:string-value="" calcext:value-type="error">
            <text:p>#REF!</text:p>
          </table:table-cell>
          <table:table-cell table:formula="of:=CELL(&quot;COL&quot;; INDIRECT([.AL7]))" office:value-type="string" office:string-value="" calcext:value-type="error">
            <text:p>#REF!</text:p>
          </table:table-cell>
          <table:table-cell office:value-type="string" calcext:value-type="string">
            <text:p>Finals.V3:AC18</text:p>
          </table:table-cell>
          <table:table-cell office:value-type="string" calcext:value-type="string">
            <text:p>Finals.V21:AC36</text:p>
          </table:table-cell>
          <table:table-cell table:formula="of:=IF([.AR7]=&quot;&quot;; &quot;&quot;; CODE(MID([.AR7]; 1;1))*10000+CODE(MID([.AR7]; 2; 1))*100+CODE(MID([.AR7]; 3; 1)))">
            <text:p/>
          </table:table-cell>
          <table:table-cell table:formula="of:=[.P7]">
            <text:p/>
          </table:table-cell>
          <table:table-cell table:formula="of:=IF([.AR7]=&quot;&quot;; &quot;&quot;; SMALL([.AQ$1:.AQ$50]; ROW()))">
            <text:p/>
          </table:table-cell>
          <table:table-cell table:formula="of:=IF([.AS7]=&quot;&quot;; &quot;&quot;; VLOOKUP([.AS7]; [.AQ$1:.AR$50]; 2; 0))">
            <text:p/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WHICHSHEET(1; [.A8])" office:value-type="string" office:string-value="Finals." calcext:value-type="string">
            <text:p>Finals.</text:p>
          </table:table-cell>
          <table:table-cell table:formula="of:=SUBSTITUTE(ADDRESS(1; INDIRECT(&quot;Stats.&quot;&amp;SUBSTITUTE(ADDRESS(1; 2+2*[.$A8]; 4); &quot;1&quot;; &quot;&quot;)&amp;&quot;3&quot;); 4); &quot;1&quot;; &quot;&quot;)" office:value-type="string" office:string-value="AE" calcext:value-type="string">
            <text:p>AE</text:p>
          </table:table-cell>
          <table:table-cell table:formula="of:=SUBSTITUTE(ADDRESS(1; INDIRECT(&quot;Stats.&quot;&amp;SUBSTITUTE(ADDRESS(1; 2+2*[.$A8]; 4); &quot;1&quot;; &quot;&quot;)&amp;&quot;3&quot;)+1; 4); &quot;1&quot;; &quot;&quot;)" office:value-type="string" office:string-value="AF" calcext:value-type="string">
            <text:p>AF</text:p>
          </table:table-cell>
          <table:table-cell table:formula="of:=SUBSTITUTE(ADDRESS(1; INDIRECT(&quot;Stats.&quot;&amp;SUBSTITUTE(ADDRESS(1; 2+2*[.$A8]; 4); &quot;1&quot;; &quot;&quot;)&amp;&quot;3&quot;)+2; 4); &quot;1&quot;; &quot;&quot;)" office:value-type="string" office:string-value="AG" calcext:value-type="string">
            <text:p>AG</text:p>
          </table:table-cell>
          <table:table-cell table:formula="of:=SUBSTITUTE(ADDRESS(1; INDIRECT(&quot;Stats.&quot;&amp;SUBSTITUTE(ADDRESS(1; 2+2*[.$A8]; 4); &quot;1&quot;; &quot;&quot;)&amp;&quot;3&quot;)+3; 4); &quot;1&quot;; &quot;&quot;)" office:value-type="string" office:string-value="AH" calcext:value-type="string">
            <text:p>AH</text:p>
          </table:table-cell>
          <table:table-cell table:formula="of:=SUBSTITUTE(ADDRESS(1; INDIRECT(&quot;Stats.&quot;&amp;SUBSTITUTE(ADDRESS(1; 2+2*[.$A8]; 4); &quot;1&quot;; &quot;&quot;)&amp;&quot;3&quot;)+4; 4); &quot;1&quot;; &quot;&quot;)" office:value-type="string" office:string-value="AI" calcext:value-type="string">
            <text:p>AI</text:p>
          </table:table-cell>
          <table:table-cell table:formula="of:=SUBSTITUTE(ADDRESS(1; INDIRECT(&quot;Stats.&quot;&amp;SUBSTITUTE(ADDRESS(1; 2+2*[.$A8]; 4); &quot;1&quot;; &quot;&quot;)&amp;&quot;3&quot;)+5; 4); &quot;1&quot;; &quot;&quot;)" office:value-type="string" office:string-value="AJ" calcext:value-type="string">
            <text:p>AJ</text:p>
          </table:table-cell>
          <table:table-cell table:formula="of:=SUBSTITUTE(ADDRESS(1; INDIRECT(&quot;Stats.&quot;&amp;SUBSTITUTE(ADDRESS(1; 2+2*[.$A8]; 4); &quot;1&quot;; &quot;&quot;)&amp;&quot;3&quot;)+6; 4); &quot;1&quot;; &quot;&quot;)" office:value-type="string" office:string-value="AK" calcext:value-type="string">
            <text:p>AK</text:p>
          </table:table-cell>
          <table:table-cell table:formula="of:=SUBSTITUTE(ADDRESS(1; INDIRECT(&quot;Stats.&quot;&amp;SUBSTITUTE(ADDRESS(1; 2+2*[.$A8]; 4); &quot;1&quot;; &quot;&quot;)&amp;&quot;3&quot;)+7; 4); &quot;1&quot;; &quot;&quot;)" office:value-type="string" office:string-value="AL" calcext:value-type="string">
            <text:p>AL</text:p>
          </table:table-cell>
          <table:table-cell table:formula="of:=SUBSTITUTE(ADDRESS(1; INDIRECT(&quot;Stats.&quot;&amp;SUBSTITUTE(ADDRESS(1; 2+2*[.$A8]; 4); &quot;1&quot;; &quot;&quot;)&amp;&quot;3&quot;)+8; 4); &quot;1&quot;; &quot;&quot;)" office:value-type="string" office:string-value="AM" calcext:value-type="string">
            <text:p>AM</text:p>
          </table:table-cell>
          <table:table-cell/>
          <table:table-cell table:formula="of:=IF(ISNA(MATCH([.N8];[.O$6:.O$15];0));&quot;&quot;;IF(COUNTIF(INDIRECT(&quot;M1:M&quot;&amp;ROW()-1);MATCH([.N8];[.O$6:.O$15];0))&gt;0;MATCH([.N8];[.O$6:.O$15];0)+1;MATCH([.N8];[.O$6:.O$15];0)))">
            <text:p/>
          </table:table-cell>
          <table:table-cell table:formula="of:=(COUNTIF([ML.$C$3:.$C$130]; [.P8])+COUNTIF([FL.$C$3:.$C$130]; [.P8]))*1000+ROW()" office:value-type="float" office:value="256008" calcext:value-type="float">
            <text:p>256008</text:p>
          </table:table-cell>
          <table:table-cell table:formula="of:=LARGE(INDIRECT([Extra.$O$3]); 3)" office:value-type="string" office:string-value="" calcext:value-type="error">
            <text:p>#VALUE!</text:p>
          </table:table-cell>
          <table:table-cell table:formula="of:=IF(ISNA(VLOOKUP([.T8]; [.R8:.U263]; 4; 0)); &quot;&quot;; VLOOKUP([.T8]; [.R8:.U263]; 4; 0))">
            <text:p/>
          </table:table-cell>
          <table:table-cell/>
          <table:table-cell table:formula="of:=IF(AND([.S8]=0; NOT([.U8]=0)); MAX(INDIRECT(&quot;R1:R&quot;&amp;ROW()-1))+1; &quot;&quot;)">
            <text:p/>
          </table:table-cell>
          <table:table-cell table:formula="of:=IF(COUNTIF(INDIRECT(&quot;U1:U&quot;&amp;ROW()-1); [.U8])&gt;0; 1; 0)" office:value-type="float" office:value="1" calcext:value-type="float">
            <text:p>1</text:p>
          </table:table-cell>
          <table:table-cell table:formula="of:=[.T7]+1" office:value-type="float" office:value="8" calcext:value-type="float">
            <text:p>8</text:p>
          </table:table-cell>
          <table:table-cell table:formula="of:=[ML.C10]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als.AE3:AM18</text:p>
          </table:table-cell>
          <table:table-cell office:value-type="string" calcext:value-type="string">
            <text:p>Finals.AE21:AM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s.AE</text:p>
          </table:table-cell>
          <table:table-cell office:value-type="string" calcext:value-type="string">
            <text:p>Finals.AF</text:p>
          </table:table-cell>
          <table:table-cell office:value-type="string" calcext:value-type="string">
            <text:p>Finals.AG</text:p>
          </table:table-cell>
          <table:table-cell office:value-type="string" calcext:value-type="string">
            <text:p>Finals.AE</text:p>
          </table:table-cell>
          <table:table-cell office:value-type="string" calcext:value-type="string">
            <text:p>Finals.AF</text:p>
          </table:table-cell>
          <table:table-cell office:value-type="string" calcext:value-type="string">
            <text:p>Finals.AG</text:p>
          </table:table-cell>
          <table:table-cell office:value-type="string" calcext:value-type="string">
            <text:p>Finals.AF3:AF18</text:p>
          </table:table-cell>
          <table:table-cell office:value-type="string" calcext:value-type="string">
            <text:p>Finals.AF21:AF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Finalists.G9]=&quot;&quot;; &quot;&quot;; CONCATENATE(VLOOKUP([Finalists.G9]; [Extra.$W$2:.$AG$9]; 7; 0); ROWOFFSETED(MATCH([Finalists.C9]; INDIRECT(VLOOKUP([Finalists.G9]; [Extra.$W$2:.$AI$9]; 12; 0)); 0)+2; WHICHROUNDN([Finalists.G9]))))">
            <text:p/>
          </table:table-cell>
          <table:table-cell table:formula="of:=CELL(&quot;ROW&quot;; INDIRECT([.AL8]))" office:value-type="string" office:string-value="" calcext:value-type="error">
            <text:p>#REF!</text:p>
          </table:table-cell>
          <table:table-cell table:formula="of:=CELL(&quot;COL&quot;; INDIRECT([.AL8]))" office:value-type="string" office:string-value="" calcext:value-type="error">
            <text:p>#REF!</text:p>
          </table:table-cell>
          <table:table-cell office:value-type="string" calcext:value-type="string">
            <text:p>Finals.AF3:AM18</text:p>
          </table:table-cell>
          <table:table-cell office:value-type="string" calcext:value-type="string">
            <text:p>Finals.AF21:AM36</text:p>
          </table:table-cell>
          <table:table-cell table:formula="of:=IF([.AR8]=&quot;&quot;; &quot;&quot;; CODE(MID([.AR8]; 1;1))*10000+CODE(MID([.AR8]; 2; 1))*100+CODE(MID([.AR8]; 3; 1)))">
            <text:p/>
          </table:table-cell>
          <table:table-cell table:formula="of:=[.P8]">
            <text:p/>
          </table:table-cell>
          <table:table-cell table:formula="of:=IF([.AR8]=&quot;&quot;; &quot;&quot;; SMALL([.AQ$1:.AQ$50]; ROW()))">
            <text:p/>
          </table:table-cell>
          <table:table-cell table:formula="of:=IF([.AS8]=&quot;&quot;; &quot;&quot;; VLOOKUP([.AS8]; [.AQ$1:.AR$50]; 2; 0))">
            <text:p/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WHICHSHEET(1; [.A9])" office:value-type="string" office:string-value="Finals." calcext:value-type="string">
            <text:p>Finals.</text:p>
          </table:table-cell>
          <table:table-cell table:number-columns-repeated="10"/>
          <table:table-cell table:formula="of:=IF(ISNA(MATCH([.N9];[.O$6:.O$15];0));&quot;&quot;;IF(COUNTIF(INDIRECT(&quot;M1:M&quot;&amp;ROW()-1);MATCH([.N9];[.O$6:.O$15];0))&gt;0;MATCH([.N9];[.O$6:.O$15];0)+1;MATCH([.N9];[.O$6:.O$15];0)))">
            <text:p/>
          </table:table-cell>
          <table:table-cell table:formula="of:=(COUNTIF([ML.$C$3:.$C$130]; [.P9])+COUNTIF([FL.$C$3:.$C$130]; [.P9]))*1000+ROW()" office:value-type="float" office:value="256009" calcext:value-type="float">
            <text:p>256009</text:p>
          </table:table-cell>
          <table:table-cell table:formula="of:=LARGE(INDIRECT([Extra.$O$3]); 4)" office:value-type="string" office:string-value="" calcext:value-type="error">
            <text:p>#VALUE!</text:p>
          </table:table-cell>
          <table:table-cell table:formula="of:=IF(ISNA(VLOOKUP([.T9]; [.R9:.U264]; 4; 0)); &quot;&quot;; VLOOKUP([.T9]; [.R9:.U264]; 4; 0))">
            <text:p/>
          </table:table-cell>
          <table:table-cell/>
          <table:table-cell table:formula="of:=IF(AND([.S9]=0; NOT([.U9]=0)); MAX(INDIRECT(&quot;R1:R&quot;&amp;ROW()-1))+1; &quot;&quot;)">
            <text:p/>
          </table:table-cell>
          <table:table-cell table:formula="of:=IF(COUNTIF(INDIRECT(&quot;U1:U&quot;&amp;ROW()-1); [.U9])&gt;0; 1; 0)" office:value-type="float" office:value="1" calcext:value-type="float">
            <text:p>1</text:p>
          </table:table-cell>
          <table:table-cell table:formula="of:=[.T8]+1" office:value-type="float" office:value="9" calcext:value-type="float">
            <text:p>9</text:p>
          </table:table-cell>
          <table:table-cell table:formula="of:=[ML.C11]" office:value-type="float" office:value="0" calcext:value-type="float">
            <text:p>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als.AE3:AM18</text:p>
          </table:table-cell>
          <table:table-cell office:value-type="string" calcext:value-type="string">
            <text:p>Finals.AE21:AM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s.AE</text:p>
          </table:table-cell>
          <table:table-cell office:value-type="string" calcext:value-type="string">
            <text:p>Finals.AF</text:p>
          </table:table-cell>
          <table:table-cell office:value-type="string" calcext:value-type="string">
            <text:p>Finals.AG</text:p>
          </table:table-cell>
          <table:table-cell office:value-type="string" calcext:value-type="string">
            <text:p>Finals.AE</text:p>
          </table:table-cell>
          <table:table-cell office:value-type="string" calcext:value-type="string">
            <text:p>Finals.AF</text:p>
          </table:table-cell>
          <table:table-cell office:value-type="string" calcext:value-type="string">
            <text:p>Finals.AG</text:p>
          </table:table-cell>
          <table:table-cell office:value-type="string" calcext:value-type="string">
            <text:p>Finals.AF3:AF11</text:p>
          </table:table-cell>
          <table:table-cell office:value-type="string" calcext:value-type="string">
            <text:p>Finals.AF28:AF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Finalists.G10]=&quot;&quot;; &quot;&quot;; CONCATENATE(VLOOKUP([Finalists.G10]; [Extra.$W$2:.$AG$9]; 7; 0); ROWOFFSETED(MATCH([Finalists.C10]; INDIRECT(VLOOKUP([Finalists.G10]; [Extra.$W$2:.$AI$9]; 12; 0)); 0)+2; WHICHROUNDN([Finalists.G10]))))">
            <text:p/>
          </table:table-cell>
          <table:table-cell table:formula="of:=CELL(&quot;ROW&quot;; INDIRECT([.AL9]))" office:value-type="string" office:string-value="" calcext:value-type="error">
            <text:p>#REF!</text:p>
          </table:table-cell>
          <table:table-cell table:formula="of:=CELL(&quot;COL&quot;; INDIRECT([.AL9]))" office:value-type="string" office:string-value="" calcext:value-type="error">
            <text:p>#REF!</text:p>
          </table:table-cell>
          <table:table-cell office:value-type="string" calcext:value-type="string">
            <text:p>Finals.AF3:AM18</text:p>
          </table:table-cell>
          <table:table-cell office:value-type="string" calcext:value-type="string">
            <text:p>Finals.AF21:AM36</text:p>
          </table:table-cell>
          <table:table-cell table:formula="of:=IF([.AR9]=&quot;&quot;; &quot;&quot;; CODE(MID([.AR9]; 1;1))*10000+CODE(MID([.AR9]; 2; 1))*100+CODE(MID([.AR9]; 3; 1)))">
            <text:p/>
          </table:table-cell>
          <table:table-cell table:formula="of:=[.P9]">
            <text:p/>
          </table:table-cell>
          <table:table-cell table:formula="of:=IF([.AR9]=&quot;&quot;; &quot;&quot;; SMALL([.AQ$1:.AQ$50]; ROW()))">
            <text:p/>
          </table:table-cell>
          <table:table-cell table:formula="of:=IF([.AS9]=&quot;&quot;; &quot;&quot;; VLOOKUP([.AS9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10];[.O$6:.O$15];0));&quot;&quot;;IF(COUNTIF(INDIRECT(&quot;M1:M&quot;&amp;ROW()-1);MATCH([.N10];[.O$6:.O$15];0))&gt;0;MATCH([.N10];[.O$6:.O$15];0)+1;MATCH([.N10];[.O$6:.O$15];0)))">
            <text:p/>
          </table:table-cell>
          <table:table-cell table:formula="of:=(COUNTIF([ML.$C$3:.$C$130]; [.P10])+COUNTIF([FL.$C$3:.$C$130]; [.P10]))*1000+ROW()" office:value-type="float" office:value="256010" calcext:value-type="float">
            <text:p>256010</text:p>
          </table:table-cell>
          <table:table-cell table:formula="of:=LARGE(INDIRECT([Extra.$O$3]); 5)" office:value-type="string" office:string-value="" calcext:value-type="error">
            <text:p>#VALUE!</text:p>
          </table:table-cell>
          <table:table-cell table:formula="of:=IF(ISNA(VLOOKUP([.T10]; [.R10:.U265]; 4; 0)); &quot;&quot;; VLOOKUP([.T10]; [.R10:.U265]; 4; 0))">
            <text:p/>
          </table:table-cell>
          <table:table-cell/>
          <table:table-cell table:formula="of:=IF(AND([.S10]=0; NOT([.U10]=0)); MAX(INDIRECT(&quot;R1:R&quot;&amp;ROW()-1))+1; &quot;&quot;)">
            <text:p/>
          </table:table-cell>
          <table:table-cell table:formula="of:=IF(COUNTIF(INDIRECT(&quot;U1:U&quot;&amp;ROW()-1); [.U10])&gt;0; 1; 0)" office:value-type="float" office:value="1" calcext:value-type="float">
            <text:p>1</text:p>
          </table:table-cell>
          <table:table-cell table:formula="of:=[.T9]+1" office:value-type="float" office:value="10" calcext:value-type="float">
            <text:p>10</text:p>
          </table:table-cell>
          <table:table-cell table:formula="of:=[ML.C12]" office:value-type="float" office:value="0" calcext:value-type="float">
            <text:p>0</text:p>
          </table:table-cell>
          <table:table-cell table:number-columns-repeated="16"/>
          <table:table-cell table:formula="of:=IF([Finalists.G11]=&quot;&quot;; &quot;&quot;; CONCATENATE(VLOOKUP([Finalists.G11]; [Extra.$W$2:.$AG$9]; 7; 0); ROWOFFSETED(MATCH([Finalists.C11]; INDIRECT(VLOOKUP([Finalists.G11]; [Extra.$W$2:.$AI$9]; 12; 0)); 0)+2; WHICHROUNDN([Finalists.G11]))))">
            <text:p/>
          </table:table-cell>
          <table:table-cell table:formula="of:=CELL(&quot;ROW&quot;; INDIRECT([.AL10]))" office:value-type="string" office:string-value="" calcext:value-type="error">
            <text:p>#REF!</text:p>
          </table:table-cell>
          <table:table-cell table:formula="of:=CELL(&quot;COL&quot;; INDIRECT([.AL10]))" office:value-type="string" office:string-value="" calcext:value-type="error">
            <text:p>#REF!</text:p>
          </table:table-cell>
          <table:table-cell table:number-columns-repeated="2"/>
          <table:table-cell table:formula="of:=IF([.AR10]=&quot;&quot;; &quot;&quot;; CODE(MID([.AR10]; 1;1))*10000+CODE(MID([.AR10]; 2; 1))*100+CODE(MID([.AR10]; 3; 1)))">
            <text:p/>
          </table:table-cell>
          <table:table-cell table:formula="of:=[.P10]">
            <text:p/>
          </table:table-cell>
          <table:table-cell table:formula="of:=IF([.AR10]=&quot;&quot;; &quot;&quot;; SMALL([.AQ$1:.AQ$50]; ROW()))">
            <text:p/>
          </table:table-cell>
          <table:table-cell table:formula="of:=IF([.AS10]=&quot;&quot;; &quot;&quot;; VLOOKUP([.AS10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11];[.O$6:.O$15];0));&quot;&quot;;IF(COUNTIF(INDIRECT(&quot;M1:M&quot;&amp;ROW()-1);MATCH([.N11];[.O$6:.O$15];0))&gt;0;MATCH([.N11];[.O$6:.O$15];0)+1;MATCH([.N11];[.O$6:.O$15];0)))">
            <text:p/>
          </table:table-cell>
          <table:table-cell table:formula="of:=(COUNTIF([ML.$C$3:.$C$130]; [.P11])+COUNTIF([FL.$C$3:.$C$130]; [.P11]))*1000+ROW()" office:value-type="float" office:value="256011" calcext:value-type="float">
            <text:p>256011</text:p>
          </table:table-cell>
          <table:table-cell table:formula="of:=LARGE(INDIRECT([Extra.$O$3]); 6)" office:value-type="string" office:string-value="" calcext:value-type="error">
            <text:p>#VALUE!</text:p>
          </table:table-cell>
          <table:table-cell table:formula="of:=IF(ISNA(VLOOKUP([.T11]; [.R11:.U266]; 4; 0)); &quot;&quot;; VLOOKUP([.T11]; [.R11:.U266]; 4; 0))">
            <text:p/>
          </table:table-cell>
          <table:table-cell/>
          <table:table-cell table:formula="of:=IF(AND([.S11]=0; NOT([.U11]=0)); MAX(INDIRECT(&quot;R1:R&quot;&amp;ROW()-1))+1; &quot;&quot;)">
            <text:p/>
          </table:table-cell>
          <table:table-cell table:formula="of:=IF(COUNTIF(INDIRECT(&quot;U1:U&quot;&amp;ROW()-1); [.U11])&gt;0; 1; 0)" office:value-type="float" office:value="1" calcext:value-type="float">
            <text:p>1</text:p>
          </table:table-cell>
          <table:table-cell table:formula="of:=[.T10]+1" office:value-type="float" office:value="11" calcext:value-type="float">
            <text:p>11</text:p>
          </table:table-cell>
          <table:table-cell table:formula="of:=[ML.C1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CONCATENATE(WHICHSHEET(1; X2); SUBSTITUTE(ADDRESS(1; INDIRECT("Stats."&amp;SUBSTITUTE(ADDRESS(1; 2+2*X2; 4); "1"; "")&amp;"3")+1; 4); "1"; ""); WHICHROW1(1; X2); ":"; SUBSTITUTE(ADDRESS(1; INDIRECT("Stats."&amp;SUBSTITUTE(ADDRESS(1; 2+2*X2; 4); "1"; "")&amp;"3")+8; 4); "1"; ""); WHICHROW2(1; X2))</text:p>
          </table:table-cell>
          <table:table-cell office:value-type="string" calcext:value-type="string">
            <text:p>=CONCATENATE(WHICHSHEET(0; X2); SUBSTITUTE(ADDRESS(1; INDIRECT("Stats."&amp;SUBSTITUTE(ADDRESS(1; 3+2*X2; 4); "1"; "")&amp;"3")+1; 4); "1"; ""); WHICHROW1(0; X2); ":"; SUBSTITUTE(ADDRESS(1; INDIRECT("Stats."&amp;SUBSTITUTE(ADDRESS(1; 3+2*X2; 4); "1"; "")&amp;"3")+6; 4); "1"; ""); WHICHROW2(0; X2))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IF([Finalists.G12]=&quot;&quot;; &quot;&quot;; CONCATENATE(VLOOKUP([Finalists.G12]; [Extra.$W$2:.$AG$9]; 7; 0); ROWOFFSETED(MATCH([Finalists.C12]; INDIRECT(VLOOKUP([Finalists.G12]; [Extra.$W$2:.$AI$9]; 12; 0)); 0)+2; WHICHROUNDN([Finalists.G12]))))">
            <text:p/>
          </table:table-cell>
          <table:table-cell table:formula="of:=CELL(&quot;ROW&quot;; INDIRECT([.AL11]))" office:value-type="string" office:string-value="" calcext:value-type="error">
            <text:p>#REF!</text:p>
          </table:table-cell>
          <table:table-cell table:formula="of:=CELL(&quot;COL&quot;; INDIRECT([.AL11]))" office:value-type="string" office:string-value="" calcext:value-type="error">
            <text:p>#REF!</text:p>
          </table:table-cell>
          <table:table-cell table:number-columns-repeated="2"/>
          <table:table-cell table:formula="of:=IF([.AR11]=&quot;&quot;; &quot;&quot;; CODE(MID([.AR11]; 1;1))*10000+CODE(MID([.AR11]; 2; 1))*100+CODE(MID([.AR11]; 3; 1)))">
            <text:p/>
          </table:table-cell>
          <table:table-cell table:formula="of:=[.P11]">
            <text:p/>
          </table:table-cell>
          <table:table-cell table:formula="of:=IF([.AR11]=&quot;&quot;; &quot;&quot;; SMALL([.AQ$1:.AQ$50]; ROW()))">
            <text:p/>
          </table:table-cell>
          <table:table-cell table:formula="of:=IF([.AS11]=&quot;&quot;; &quot;&quot;; VLOOKUP([.AS11]; [.AQ$1:.AR$50]; 2; 0)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WHICHSHEET(0; [.A2])" office:value-type="string" office:string-value="FL." calcext:value-type="string">
            <text:p>FL.</text:p>
          </table:table-cell>
          <table:table-cell table:formula="of:=SUBSTITUTE(ADDRESS(1; INDIRECT(&quot;Stats.&quot;&amp;SUBSTITUTE(ADDRESS(1; 3+2*[.$A12]; 4); &quot;1&quot;; &quot;&quot;)&amp;&quot;3&quot;); 4); &quot;1&quot;; &quot;&quot;)" office:value-type="string" office:string-value="A" calcext:value-type="string">
            <text:p>A</text:p>
          </table:table-cell>
          <table:table-cell table:formula="of:=SUBSTITUTE(ADDRESS(1; INDIRECT(&quot;Stats.&quot;&amp;SUBSTITUTE(ADDRESS(1; 3+2*[.$A12]; 4); &quot;1&quot;; &quot;&quot;)&amp;&quot;3&quot;)+1; 4); &quot;1&quot;; &quot;&quot;)" office:value-type="string" office:string-value="B" calcext:value-type="string">
            <text:p>B</text:p>
          </table:table-cell>
          <table:table-cell table:formula="of:=SUBSTITUTE(ADDRESS(1; INDIRECT(&quot;Stats.&quot;&amp;SUBSTITUTE(ADDRESS(1; 3+2*[.$A12]; 4); &quot;1&quot;; &quot;&quot;)&amp;&quot;3&quot;)+2; 4); &quot;1&quot;; &quot;&quot;)" office:value-type="string" office:string-value="C" calcext:value-type="string">
            <text:p>C</text:p>
          </table:table-cell>
          <table:table-cell table:formula="of:=SUBSTITUTE(ADDRESS(1; INDIRECT(&quot;Stats.&quot;&amp;SUBSTITUTE(ADDRESS(1; 3+2*[.$A12]; 4); &quot;1&quot;; &quot;&quot;)&amp;&quot;3&quot;)+3; 4); &quot;1&quot;; &quot;&quot;)" office:value-type="string" office:string-value="D" calcext:value-type="string">
            <text:p>D</text:p>
          </table:table-cell>
          <table:table-cell table:formula="of:=SUBSTITUTE(ADDRESS(1; INDIRECT(&quot;Stats.&quot;&amp;SUBSTITUTE(ADDRESS(1; 3+2*[.$A12]; 4); &quot;1&quot;; &quot;&quot;)&amp;&quot;3&quot;)+4; 4); &quot;1&quot;; &quot;&quot;)" office:value-type="string" office:string-value="E" calcext:value-type="string">
            <text:p>E</text:p>
          </table:table-cell>
          <table:table-cell table:formula="of:=SUBSTITUTE(ADDRESS(1; INDIRECT(&quot;Stats.&quot;&amp;SUBSTITUTE(ADDRESS(1; 3+2*[.$A12]; 4); &quot;1&quot;; &quot;&quot;)&amp;&quot;3&quot;)+5; 4); &quot;1&quot;; &quot;&quot;)" office:value-type="string" office:string-value="F" calcext:value-type="string">
            <text:p>F</text:p>
          </table:table-cell>
          <table:table-cell table:number-columns-repeated="2"/>
          <table:table-cell table:formula="of:=SUBSTITUTE(ADDRESS(1; INDIRECT(&quot;Stats.&quot;&amp;SUBSTITUTE(ADDRESS(1; 3+2*[.$A12]; 4); &quot;1&quot;; &quot;&quot;)&amp;&quot;3&quot;)+6; 4); &quot;1&quot;; &quot;&quot;)" office:value-type="string" office:string-value="G" calcext:value-type="string">
            <text:p>G</text:p>
          </table:table-cell>
          <table:table-cell/>
          <table:table-cell table:formula="of:=IF(ISNA(MATCH([.N12];[.O$6:.O$15];0));&quot;&quot;;IF(COUNTIF(INDIRECT(&quot;M1:M&quot;&amp;ROW()-1);MATCH([.N12];[.O$6:.O$15];0))&gt;0;MATCH([.N12];[.O$6:.O$15];0)+1;MATCH([.N12];[.O$6:.O$15];0)))">
            <text:p/>
          </table:table-cell>
          <table:table-cell table:formula="of:=(COUNTIF([ML.$C$3:.$C$130]; [.P12])+COUNTIF([FL.$C$3:.$C$130]; [.P12]))*1000+ROW()" office:value-type="float" office:value="256012" calcext:value-type="float">
            <text:p>256012</text:p>
          </table:table-cell>
          <table:table-cell table:formula="of:=LARGE(INDIRECT([Extra.$O$3]); 7)" office:value-type="string" office:string-value="" calcext:value-type="error">
            <text:p>#VALUE!</text:p>
          </table:table-cell>
          <table:table-cell table:formula="of:=IF(ISNA(VLOOKUP([.T12]; [.R12:.U267]; 4; 0)); &quot;&quot;; VLOOKUP([.T12]; [.R12:.U267]; 4; 0))">
            <text:p/>
          </table:table-cell>
          <table:table-cell/>
          <table:table-cell table:formula="of:=IF(AND([.S12]=0; NOT([.U12]=0)); MAX(INDIRECT(&quot;R1:R&quot;&amp;ROW()-1))+1; &quot;&quot;)">
            <text:p/>
          </table:table-cell>
          <table:table-cell table:formula="of:=IF(COUNTIF(INDIRECT(&quot;U1:U&quot;&amp;ROW()-1); [.U12])&gt;0; 1; 0)" office:value-type="float" office:value="1" calcext:value-type="float">
            <text:p>1</text:p>
          </table:table-cell>
          <table:table-cell table:formula="of:=[.T11]+1" office:value-type="float" office:value="12" calcext:value-type="float">
            <text:p>12</text:p>
          </table:table-cell>
          <table:table-cell table:formula="of:=[ML.C14]" office:value-type="float" office:value="0" calcext:value-type="float">
            <text:p>0</text:p>
          </table:table-cell>
          <table:table-cell table:number-columns-repeated="16"/>
          <table:table-cell table:formula="of:=IF([Finalists.G13]=&quot;&quot;; &quot;&quot;; CONCATENATE(VLOOKUP([Finalists.G13]; [Extra.$W$2:.$AG$9]; 7; 0); ROWOFFSETED(MATCH([Finalists.C13]; INDIRECT(VLOOKUP([Finalists.G13]; [Extra.$W$2:.$AI$9]; 12; 0)); 0)+2; WHICHROUNDN([Finalists.G13]))))">
            <text:p/>
          </table:table-cell>
          <table:table-cell table:formula="of:=CELL(&quot;ROW&quot;; INDIRECT([.AL12]))" office:value-type="string" office:string-value="" calcext:value-type="error">
            <text:p>#REF!</text:p>
          </table:table-cell>
          <table:table-cell table:formula="of:=CELL(&quot;COL&quot;; INDIRECT([.AL12]))" office:value-type="string" office:string-value="" calcext:value-type="error">
            <text:p>#REF!</text:p>
          </table:table-cell>
          <table:table-cell table:number-columns-repeated="2"/>
          <table:table-cell table:formula="of:=IF([.AR12]=&quot;&quot;; &quot;&quot;; CODE(MID([.AR12]; 1;1))*10000+CODE(MID([.AR12]; 2; 1))*100+CODE(MID([.AR12]; 3; 1)))">
            <text:p/>
          </table:table-cell>
          <table:table-cell table:formula="of:=[.P12]">
            <text:p/>
          </table:table-cell>
          <table:table-cell table:formula="of:=IF([.AR12]=&quot;&quot;; &quot;&quot;; SMALL([.AQ$1:.AQ$50]; ROW()))">
            <text:p/>
          </table:table-cell>
          <table:table-cell table:formula="of:=IF([.AS12]=&quot;&quot;; &quot;&quot;; VLOOKUP([.AS12]; [.AQ$1:.AR$50]; 2; 0))">
            <text:p/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WHICHSHEET(0; [.A3])" office:value-type="string" office:string-value="FL." calcext:value-type="string">
            <text:p>FL.</text:p>
          </table:table-cell>
          <table:table-cell table:formula="of:=SUBSTITUTE(ADDRESS(1; INDIRECT(&quot;Stats.&quot;&amp;SUBSTITUTE(ADDRESS(1; 3+2*[.$A13]; 4); &quot;1&quot;; &quot;&quot;)&amp;&quot;3&quot;); 4); &quot;1&quot;; &quot;&quot;)" office:value-type="string" office:string-value="I" calcext:value-type="string">
            <text:p>I</text:p>
          </table:table-cell>
          <table:table-cell table:formula="of:=SUBSTITUTE(ADDRESS(1; INDIRECT(&quot;Stats.&quot;&amp;SUBSTITUTE(ADDRESS(1; 3+2*[.$A13]; 4); &quot;1&quot;; &quot;&quot;)&amp;&quot;3&quot;)+1; 4); &quot;1&quot;; &quot;&quot;)" office:value-type="string" office:string-value="J" calcext:value-type="string">
            <text:p>J</text:p>
          </table:table-cell>
          <table:table-cell table:formula="of:=SUBSTITUTE(ADDRESS(1; INDIRECT(&quot;Stats.&quot;&amp;SUBSTITUTE(ADDRESS(1; 3+2*[.$A13]; 4); &quot;1&quot;; &quot;&quot;)&amp;&quot;3&quot;)+2; 4); &quot;1&quot;; &quot;&quot;)" office:value-type="string" office:string-value="K" calcext:value-type="string">
            <text:p>K</text:p>
          </table:table-cell>
          <table:table-cell table:formula="of:=SUBSTITUTE(ADDRESS(1; INDIRECT(&quot;Stats.&quot;&amp;SUBSTITUTE(ADDRESS(1; 3+2*[.$A13]; 4); &quot;1&quot;; &quot;&quot;)&amp;&quot;3&quot;)+3; 4); &quot;1&quot;; &quot;&quot;)" office:value-type="string" office:string-value="L" calcext:value-type="string">
            <text:p>L</text:p>
          </table:table-cell>
          <table:table-cell table:formula="of:=SUBSTITUTE(ADDRESS(1; INDIRECT(&quot;Stats.&quot;&amp;SUBSTITUTE(ADDRESS(1; 3+2*[.$A13]; 4); &quot;1&quot;; &quot;&quot;)&amp;&quot;3&quot;)+4; 4); &quot;1&quot;; &quot;&quot;)" office:value-type="string" office:string-value="M" calcext:value-type="string">
            <text:p>M</text:p>
          </table:table-cell>
          <table:table-cell table:formula="of:=SUBSTITUTE(ADDRESS(1; INDIRECT(&quot;Stats.&quot;&amp;SUBSTITUTE(ADDRESS(1; 3+2*[.$A13]; 4); &quot;1&quot;; &quot;&quot;)&amp;&quot;3&quot;)+5; 4); &quot;1&quot;; &quot;&quot;)" office:value-type="string" office:string-value="N" calcext:value-type="string">
            <text:p>N</text:p>
          </table:table-cell>
          <table:table-cell table:number-columns-repeated="2"/>
          <table:table-cell table:formula="of:=SUBSTITUTE(ADDRESS(1; INDIRECT(&quot;Stats.&quot;&amp;SUBSTITUTE(ADDRESS(1; 3+2*[.$A13]; 4); &quot;1&quot;; &quot;&quot;)&amp;&quot;3&quot;)+6; 4); &quot;1&quot;; &quot;&quot;)" office:value-type="string" office:string-value="O" calcext:value-type="string">
            <text:p>O</text:p>
          </table:table-cell>
          <table:table-cell/>
          <table:table-cell table:formula="of:=IF(ISNA(MATCH([.N13];[.O$6:.O$15];0));&quot;&quot;;IF(COUNTIF(INDIRECT(&quot;M1:M&quot;&amp;ROW()-1);MATCH([.N13];[.O$6:.O$15];0))&gt;0;MATCH([.N13];[.O$6:.O$15];0)+1;MATCH([.N13];[.O$6:.O$15];0)))">
            <text:p/>
          </table:table-cell>
          <table:table-cell table:formula="of:=(COUNTIF([ML.$C$3:.$C$130]; [.P13])+COUNTIF([FL.$C$3:.$C$130]; [.P13]))*1000+ROW()" office:value-type="float" office:value="256013" calcext:value-type="float">
            <text:p>256013</text:p>
          </table:table-cell>
          <table:table-cell table:formula="of:=LARGE(INDIRECT([Extra.$O$3]); 8)" office:value-type="string" office:string-value="" calcext:value-type="error">
            <text:p>#VALUE!</text:p>
          </table:table-cell>
          <table:table-cell table:formula="of:=IF(ISNA(VLOOKUP([.T13]; [.R13:.U268]; 4; 0)); &quot;&quot;; VLOOKUP([.T13]; [.R13:.U268]; 4; 0))">
            <text:p/>
          </table:table-cell>
          <table:table-cell/>
          <table:table-cell table:formula="of:=IF(AND([.S13]=0; NOT([.U13]=0)); MAX(INDIRECT(&quot;R1:R&quot;&amp;ROW()-1))+1; &quot;&quot;)">
            <text:p/>
          </table:table-cell>
          <table:table-cell table:formula="of:=IF(COUNTIF(INDIRECT(&quot;U1:U&quot;&amp;ROW()-1); [.U13])&gt;0; 1; 0)" office:value-type="float" office:value="1" calcext:value-type="float">
            <text:p>1</text:p>
          </table:table-cell>
          <table:table-cell table:formula="of:=[.T12]+1" office:value-type="float" office:value="13" calcext:value-type="float">
            <text:p>13</text:p>
          </table:table-cell>
          <table:table-cell table:formula="of:=[ML.C15]" office:value-type="float" office:value="0" calcext:value-type="float">
            <text:p>0</text:p>
          </table:table-cell>
          <table:table-cell table:number-columns-repeated="16"/>
          <table:table-cell table:formula="of:=IF([Finalists.G14]=&quot;&quot;; &quot;&quot;; CONCATENATE(VLOOKUP([Finalists.G14]; [Extra.$W$2:.$AG$9]; 7; 0); ROWOFFSETED(MATCH([Finalists.C14]; INDIRECT(VLOOKUP([Finalists.G14]; [Extra.$W$2:.$AI$9]; 12; 0)); 0)+2; WHICHROUNDN([Finalists.G14]))))">
            <text:p/>
          </table:table-cell>
          <table:table-cell table:formula="of:=CELL(&quot;ROW&quot;; INDIRECT([.AL13]))" office:value-type="string" office:string-value="" calcext:value-type="error">
            <text:p>#REF!</text:p>
          </table:table-cell>
          <table:table-cell table:formula="of:=CELL(&quot;COL&quot;; INDIRECT([.AL13]))" office:value-type="string" office:string-value="" calcext:value-type="error">
            <text:p>#REF!</text:p>
          </table:table-cell>
          <table:table-cell table:number-columns-repeated="2"/>
          <table:table-cell table:formula="of:=IF([.AR13]=&quot;&quot;; &quot;&quot;; CODE(MID([.AR13]; 1;1))*10000+CODE(MID([.AR13]; 2; 1))*100+CODE(MID([.AR13]; 3; 1)))">
            <text:p/>
          </table:table-cell>
          <table:table-cell table:formula="of:=[.P13]">
            <text:p/>
          </table:table-cell>
          <table:table-cell table:formula="of:=IF([.AR13]=&quot;&quot;; &quot;&quot;; SMALL([.AQ$1:.AQ$50]; ROW()))">
            <text:p/>
          </table:table-cell>
          <table:table-cell table:formula="of:=IF([.AS13]=&quot;&quot;; &quot;&quot;; VLOOKUP([.AS13]; [.AQ$1:.AR$50]; 2; 0))">
            <text:p/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WHICHSHEET(0; [.A4])" office:value-type="string" office:string-value="FL." calcext:value-type="string">
            <text:p>FL.</text:p>
          </table:table-cell>
          <table:table-cell table:formula="of:=SUBSTITUTE(ADDRESS(1; INDIRECT(&quot;Stats.&quot;&amp;SUBSTITUTE(ADDRESS(1; 3+2*[.$A14]; 4); &quot;1&quot;; &quot;&quot;)&amp;&quot;3&quot;); 4); &quot;1&quot;; &quot;&quot;)" office:value-type="string" office:string-value="Q" calcext:value-type="string">
            <text:p>Q</text:p>
          </table:table-cell>
          <table:table-cell table:formula="of:=SUBSTITUTE(ADDRESS(1; INDIRECT(&quot;Stats.&quot;&amp;SUBSTITUTE(ADDRESS(1; 3+2*[.$A14]; 4); &quot;1&quot;; &quot;&quot;)&amp;&quot;3&quot;)+1; 4); &quot;1&quot;; &quot;&quot;)" office:value-type="string" office:string-value="R" calcext:value-type="string">
            <text:p>R</text:p>
          </table:table-cell>
          <table:table-cell table:formula="of:=SUBSTITUTE(ADDRESS(1; INDIRECT(&quot;Stats.&quot;&amp;SUBSTITUTE(ADDRESS(1; 3+2*[.$A14]; 4); &quot;1&quot;; &quot;&quot;)&amp;&quot;3&quot;)+2; 4); &quot;1&quot;; &quot;&quot;)" office:value-type="string" office:string-value="S" calcext:value-type="string">
            <text:p>S</text:p>
          </table:table-cell>
          <table:table-cell table:formula="of:=SUBSTITUTE(ADDRESS(1; INDIRECT(&quot;Stats.&quot;&amp;SUBSTITUTE(ADDRESS(1; 3+2*[.$A14]; 4); &quot;1&quot;; &quot;&quot;)&amp;&quot;3&quot;)+3; 4); &quot;1&quot;; &quot;&quot;)" office:value-type="string" office:string-value="T" calcext:value-type="string">
            <text:p>T</text:p>
          </table:table-cell>
          <table:table-cell table:formula="of:=SUBSTITUTE(ADDRESS(1; INDIRECT(&quot;Stats.&quot;&amp;SUBSTITUTE(ADDRESS(1; 3+2*[.$A14]; 4); &quot;1&quot;; &quot;&quot;)&amp;&quot;3&quot;)+4; 4); &quot;1&quot;; &quot;&quot;)" office:value-type="string" office:string-value="U" calcext:value-type="string">
            <text:p>U</text:p>
          </table:table-cell>
          <table:table-cell table:formula="of:=SUBSTITUTE(ADDRESS(1; INDIRECT(&quot;Stats.&quot;&amp;SUBSTITUTE(ADDRESS(1; 3+2*[.$A14]; 4); &quot;1&quot;; &quot;&quot;)&amp;&quot;3&quot;)+5; 4); &quot;1&quot;; &quot;&quot;)" office:value-type="string" office:string-value="V" calcext:value-type="string">
            <text:p>V</text:p>
          </table:table-cell>
          <table:table-cell table:number-columns-repeated="2"/>
          <table:table-cell table:formula="of:=SUBSTITUTE(ADDRESS(1; INDIRECT(&quot;Stats.&quot;&amp;SUBSTITUTE(ADDRESS(1; 3+2*[.$A14]; 4); &quot;1&quot;; &quot;&quot;)&amp;&quot;3&quot;)+6; 4); &quot;1&quot;; &quot;&quot;)" office:value-type="string" office:string-value="W" calcext:value-type="string">
            <text:p>W</text:p>
          </table:table-cell>
          <table:table-cell/>
          <table:table-cell table:formula="of:=IF(ISNA(MATCH([.N14];[.O$6:.O$15];0));&quot;&quot;;IF(COUNTIF(INDIRECT(&quot;M1:M&quot;&amp;ROW()-1);MATCH([.N14];[.O$6:.O$15];0))&gt;0;MATCH([.N14];[.O$6:.O$15];0)+1;MATCH([.N14];[.O$6:.O$15];0)))">
            <text:p/>
          </table:table-cell>
          <table:table-cell table:formula="of:=(COUNTIF([ML.$C$3:.$C$130]; [.P14])+COUNTIF([FL.$C$3:.$C$130]; [.P14]))*1000+ROW()" office:value-type="float" office:value="256014" calcext:value-type="float">
            <text:p>256014</text:p>
          </table:table-cell>
          <table:table-cell table:formula="of:=LARGE(INDIRECT([Extra.$O$3]); 9)" office:value-type="string" office:string-value="" calcext:value-type="error">
            <text:p>#VALUE!</text:p>
          </table:table-cell>
          <table:table-cell table:formula="of:=IF(ISNA(VLOOKUP([.T14]; [.R14:.U269]; 4; 0)); &quot;&quot;; VLOOKUP([.T14]; [.R14:.U269]; 4; 0))">
            <text:p/>
          </table:table-cell>
          <table:table-cell/>
          <table:table-cell table:formula="of:=IF(AND([.S14]=0; NOT([.U14]=0)); MAX(INDIRECT(&quot;R1:R&quot;&amp;ROW()-1))+1; &quot;&quot;)">
            <text:p/>
          </table:table-cell>
          <table:table-cell table:formula="of:=IF(COUNTIF(INDIRECT(&quot;U1:U&quot;&amp;ROW()-1); [.U14])&gt;0; 1; 0)" office:value-type="float" office:value="1" calcext:value-type="float">
            <text:p>1</text:p>
          </table:table-cell>
          <table:table-cell table:formula="of:=[.T13]+1" office:value-type="float" office:value="14" calcext:value-type="float">
            <text:p>14</text:p>
          </table:table-cell>
          <table:table-cell table:formula="of:=[ML.C16]" office:value-type="float" office:value="0" calcext:value-type="float">
            <text:p>0</text:p>
          </table:table-cell>
          <table:table-cell table:number-columns-repeated="16"/>
          <table:table-cell table:formula="of:=IF([Finalists.G15]=&quot;&quot;; &quot;&quot;; CONCATENATE(VLOOKUP([Finalists.G15]; [Extra.$W$2:.$AG$9]; 7; 0); ROWOFFSETED(MATCH([Finalists.C15]; INDIRECT(VLOOKUP([Finalists.G15]; [Extra.$W$2:.$AI$9]; 12; 0)); 0)+2; WHICHROUNDN([Finalists.G15]))))">
            <text:p/>
          </table:table-cell>
          <table:table-cell table:formula="of:=CELL(&quot;ROW&quot;; INDIRECT([.AL14]))" office:value-type="string" office:string-value="" calcext:value-type="error">
            <text:p>#REF!</text:p>
          </table:table-cell>
          <table:table-cell table:formula="of:=CELL(&quot;COL&quot;; INDIRECT([.AL14]))" office:value-type="string" office:string-value="" calcext:value-type="error">
            <text:p>#REF!</text:p>
          </table:table-cell>
          <table:table-cell table:number-columns-repeated="2"/>
          <table:table-cell table:formula="of:=IF([.AR14]=&quot;&quot;; &quot;&quot;; CODE(MID([.AR14]; 1;1))*10000+CODE(MID([.AR14]; 2; 1))*100+CODE(MID([.AR14]; 3; 1)))">
            <text:p/>
          </table:table-cell>
          <table:table-cell table:formula="of:=[.P14]">
            <text:p/>
          </table:table-cell>
          <table:table-cell table:formula="of:=IF([.AR14]=&quot;&quot;; &quot;&quot;; SMALL([.AQ$1:.AQ$50]; ROW()))">
            <text:p/>
          </table:table-cell>
          <table:table-cell table:formula="of:=IF([.AS14]=&quot;&quot;; &quot;&quot;; VLOOKUP([.AS14]; [.AQ$1:.AR$50]; 2; 0))">
            <text:p/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formula="of:=WHICHSHEET(0; [.A5])" office:value-type="string" office:string-value="FL." calcext:value-type="string">
            <text:p>FL.</text:p>
          </table:table-cell>
          <table:table-cell table:formula="of:=SUBSTITUTE(ADDRESS(1; INDIRECT(&quot;Stats.&quot;&amp;SUBSTITUTE(ADDRESS(1; 3+2*[.$A15]; 4); &quot;1&quot;; &quot;&quot;)&amp;&quot;3&quot;); 4); &quot;1&quot;; &quot;&quot;)" office:value-type="string" office:string-value="Y" calcext:value-type="string">
            <text:p>Y</text:p>
          </table:table-cell>
          <table:table-cell table:formula="of:=SUBSTITUTE(ADDRESS(1; INDIRECT(&quot;Stats.&quot;&amp;SUBSTITUTE(ADDRESS(1; 3+2*[.$A15]; 4); &quot;1&quot;; &quot;&quot;)&amp;&quot;3&quot;)+1; 4); &quot;1&quot;; &quot;&quot;)" office:value-type="string" office:string-value="Z" calcext:value-type="string">
            <text:p>Z</text:p>
          </table:table-cell>
          <table:table-cell table:formula="of:=SUBSTITUTE(ADDRESS(1; INDIRECT(&quot;Stats.&quot;&amp;SUBSTITUTE(ADDRESS(1; 3+2*[.$A15]; 4); &quot;1&quot;; &quot;&quot;)&amp;&quot;3&quot;)+2; 4); &quot;1&quot;; &quot;&quot;)" office:value-type="string" office:string-value="AA" calcext:value-type="string">
            <text:p>AA</text:p>
          </table:table-cell>
          <table:table-cell table:formula="of:=SUBSTITUTE(ADDRESS(1; INDIRECT(&quot;Stats.&quot;&amp;SUBSTITUTE(ADDRESS(1; 3+2*[.$A15]; 4); &quot;1&quot;; &quot;&quot;)&amp;&quot;3&quot;)+3; 4); &quot;1&quot;; &quot;&quot;)" office:value-type="string" office:string-value="AB" calcext:value-type="string">
            <text:p>AB</text:p>
          </table:table-cell>
          <table:table-cell table:formula="of:=SUBSTITUTE(ADDRESS(1; INDIRECT(&quot;Stats.&quot;&amp;SUBSTITUTE(ADDRESS(1; 3+2*[.$A15]; 4); &quot;1&quot;; &quot;&quot;)&amp;&quot;3&quot;)+4; 4); &quot;1&quot;; &quot;&quot;)" office:value-type="string" office:string-value="AC" calcext:value-type="string">
            <text:p>AC</text:p>
          </table:table-cell>
          <table:table-cell table:formula="of:=SUBSTITUTE(ADDRESS(1; INDIRECT(&quot;Stats.&quot;&amp;SUBSTITUTE(ADDRESS(1; 3+2*[.$A15]; 4); &quot;1&quot;; &quot;&quot;)&amp;&quot;3&quot;)+5; 4); &quot;1&quot;; &quot;&quot;)" office:value-type="string" office:string-value="AD" calcext:value-type="string">
            <text:p>AD</text:p>
          </table:table-cell>
          <table:table-cell table:number-columns-repeated="2"/>
          <table:table-cell table:formula="of:=SUBSTITUTE(ADDRESS(1; INDIRECT(&quot;Stats.&quot;&amp;SUBSTITUTE(ADDRESS(1; 3+2*[.$A15]; 4); &quot;1&quot;; &quot;&quot;)&amp;&quot;3&quot;)+8; 4); &quot;1&quot;; &quot;&quot;)" office:value-type="string" office:string-value="AG" calcext:value-type="string">
            <text:p>AG</text:p>
          </table:table-cell>
          <table:table-cell/>
          <table:table-cell table:formula="of:=IF(ISNA(MATCH([.N15];[.O$6:.O$15];0));&quot;&quot;;IF(COUNTIF(INDIRECT(&quot;M1:M&quot;&amp;ROW()-1);MATCH([.N15];[.O$6:.O$15];0))&gt;0;MATCH([.N15];[.O$6:.O$15];0)+1;MATCH([.N15];[.O$6:.O$15];0)))">
            <text:p/>
          </table:table-cell>
          <table:table-cell table:formula="of:=(COUNTIF([ML.$C$3:.$C$130]; [.P15])+COUNTIF([FL.$C$3:.$C$130]; [.P15]))*1000+ROW()" office:value-type="float" office:value="256015" calcext:value-type="float">
            <text:p>256015</text:p>
          </table:table-cell>
          <table:table-cell table:formula="of:=LARGE(INDIRECT([Extra.$O$3]); 10)" office:value-type="string" office:string-value="" calcext:value-type="error">
            <text:p>#VALUE!</text:p>
          </table:table-cell>
          <table:table-cell table:formula="of:=IF(ISNA(VLOOKUP([.T15]; [.R15:.U270]; 4; 0)); &quot;&quot;; VLOOKUP([.T15]; [.R15:.U270]; 4; 0))">
            <text:p/>
          </table:table-cell>
          <table:table-cell/>
          <table:table-cell table:formula="of:=IF(AND([.S15]=0; NOT([.U15]=0)); MAX(INDIRECT(&quot;R1:R&quot;&amp;ROW()-1))+1; &quot;&quot;)">
            <text:p/>
          </table:table-cell>
          <table:table-cell table:formula="of:=IF(COUNTIF(INDIRECT(&quot;U1:U&quot;&amp;ROW()-1); [.U15])&gt;0; 1; 0)" office:value-type="float" office:value="1" calcext:value-type="float">
            <text:p>1</text:p>
          </table:table-cell>
          <table:table-cell table:formula="of:=[.T14]+1" office:value-type="float" office:value="15" calcext:value-type="float">
            <text:p>15</text:p>
          </table:table-cell>
          <table:table-cell table:formula="of:=[ML.C17]" office:value-type="float" office:value="0" calcext:value-type="float">
            <text:p>0</text:p>
          </table:table-cell>
          <table:table-cell table:number-columns-repeated="16"/>
          <table:table-cell table:formula="of:=IF([Finalists.G16]=&quot;&quot;; &quot;&quot;; CONCATENATE(VLOOKUP([Finalists.G16]; [Extra.$W$2:.$AG$9]; 7; 0); ROWOFFSETED(MATCH([Finalists.C16]; INDIRECT(VLOOKUP([Finalists.G16]; [Extra.$W$2:.$AI$9]; 12; 0)); 0)+2; WHICHROUNDN([Finalists.G16]))))">
            <text:p/>
          </table:table-cell>
          <table:table-cell table:formula="of:=CELL(&quot;ROW&quot;; INDIRECT([.AL15]))" office:value-type="string" office:string-value="" calcext:value-type="error">
            <text:p>#REF!</text:p>
          </table:table-cell>
          <table:table-cell table:formula="of:=CELL(&quot;COL&quot;; INDIRECT([.AL15]))" office:value-type="string" office:string-value="" calcext:value-type="error">
            <text:p>#REF!</text:p>
          </table:table-cell>
          <table:table-cell table:number-columns-repeated="2"/>
          <table:table-cell table:formula="of:=IF([.AR15]=&quot;&quot;; &quot;&quot;; CODE(MID([.AR15]; 1;1))*10000+CODE(MID([.AR15]; 2; 1))*100+CODE(MID([.AR15]; 3; 1)))">
            <text:p/>
          </table:table-cell>
          <table:table-cell table:formula="of:=[.P15]">
            <text:p/>
          </table:table-cell>
          <table:table-cell table:formula="of:=IF([.AR15]=&quot;&quot;; &quot;&quot;; SMALL([.AQ$1:.AQ$50]; ROW()))">
            <text:p/>
          </table:table-cell>
          <table:table-cell table:formula="of:=IF([.AS15]=&quot;&quot;; &quot;&quot;; VLOOKUP([.AS15]; [.AQ$1:.AR$50]; 2; 0))">
            <text:p/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table:formula="of:=WHICHSHEET(0; [.A6])" office:value-type="string" office:string-value="Finals." calcext:value-type="string">
            <text:p>Finals.</text:p>
          </table:table-cell>
          <table:table-cell table:formula="of:=SUBSTITUTE(ADDRESS(1; INDIRECT(&quot;Stats.&quot;&amp;SUBSTITUTE(ADDRESS(1; 3+2*[.$A16]; 4); &quot;1&quot;; &quot;&quot;)&amp;&quot;3&quot;); 4); &quot;1&quot;; &quot;&quot;)" office:value-type="string" office:string-value="K" calcext:value-type="string">
            <text:p>K</text:p>
          </table:table-cell>
          <table:table-cell table:formula="of:=SUBSTITUTE(ADDRESS(1; INDIRECT(&quot;Stats.&quot;&amp;SUBSTITUTE(ADDRESS(1; 3+2*[.$A16]; 4); &quot;1&quot;; &quot;&quot;)&amp;&quot;3&quot;)+1; 4); &quot;1&quot;; &quot;&quot;)" office:value-type="string" office:string-value="L" calcext:value-type="string">
            <text:p>L</text:p>
          </table:table-cell>
          <table:table-cell table:formula="of:=SUBSTITUTE(ADDRESS(1; INDIRECT(&quot;Stats.&quot;&amp;SUBSTITUTE(ADDRESS(1; 3+2*[.$A16]; 4); &quot;1&quot;; &quot;&quot;)&amp;&quot;3&quot;)+2; 4); &quot;1&quot;; &quot;&quot;)" office:value-type="string" office:string-value="M" calcext:value-type="string">
            <text:p>M</text:p>
          </table:table-cell>
          <table:table-cell table:formula="of:=SUBSTITUTE(ADDRESS(1; INDIRECT(&quot;Stats.&quot;&amp;SUBSTITUTE(ADDRESS(1; 3+2*[.$A16]; 4); &quot;1&quot;; &quot;&quot;)&amp;&quot;3&quot;)+3; 4); &quot;1&quot;; &quot;&quot;)" office:value-type="string" office:string-value="N" calcext:value-type="string">
            <text:p>N</text:p>
          </table:table-cell>
          <table:table-cell table:formula="of:=SUBSTITUTE(ADDRESS(1; INDIRECT(&quot;Stats.&quot;&amp;SUBSTITUTE(ADDRESS(1; 3+2*[.$A16]; 4); &quot;1&quot;; &quot;&quot;)&amp;&quot;3&quot;)+4; 4); &quot;1&quot;; &quot;&quot;)" office:value-type="string" office:string-value="O" calcext:value-type="string">
            <text:p>O</text:p>
          </table:table-cell>
          <table:table-cell table:formula="of:=SUBSTITUTE(ADDRESS(1; INDIRECT(&quot;Stats.&quot;&amp;SUBSTITUTE(ADDRESS(1; 3+2*[.$A16]; 4); &quot;1&quot;; &quot;&quot;)&amp;&quot;3&quot;)+5; 4); &quot;1&quot;; &quot;&quot;)" office:value-type="string" office:string-value="P" calcext:value-type="string">
            <text:p>P</text:p>
          </table:table-cell>
          <table:table-cell table:number-columns-repeated="2"/>
          <table:table-cell table:formula="of:=SUBSTITUTE(ADDRESS(1; INDIRECT(&quot;Stats.&quot;&amp;SUBSTITUTE(ADDRESS(1; 3+2*[.$A16]; 4); &quot;1&quot;; &quot;&quot;)&amp;&quot;3&quot;)+8; 4); &quot;1&quot;; &quot;&quot;)" office:value-type="string" office:string-value="S" calcext:value-type="string">
            <text:p>S</text:p>
          </table:table-cell>
          <table:table-cell/>
          <table:table-cell table:formula="of:=IF(ISNA(MATCH([.N16];[.O$6:.O$15];0));&quot;&quot;;IF(COUNTIF(INDIRECT(&quot;M1:M&quot;&amp;ROW()-1);MATCH([.N16];[.O$6:.O$15];0))&gt;0;MATCH([.N16];[.O$6:.O$15];0)+1;MATCH([.N16];[.O$6:.O$15];0)))">
            <text:p/>
          </table:table-cell>
          <table:table-cell table:formula="of:=(COUNTIF([ML.$C$3:.$C$130]; [.P16])+COUNTIF([FL.$C$3:.$C$130]; [.P16]))*1000+ROW()" office:value-type="float" office:value="256016" calcext:value-type="float">
            <text:p>256016</text:p>
          </table:table-cell>
          <table:table-cell table:formula="of:=SUBSTITUTE(ADDRESS(1; COLUMN()-2; 4); &quot;1&quot;; &quot;&quot;)" office:value-type="string" office:string-value="M" calcext:value-type="string">
            <text:p>M</text:p>
          </table:table-cell>
          <table:table-cell table:formula="of:=IF(ISNA(VLOOKUP([.T16]; [.R16:.U271]; 4; 0)); &quot;&quot;; VLOOKUP([.T16]; [.R16:.U271]; 4; 0))">
            <text:p/>
          </table:table-cell>
          <table:table-cell/>
          <table:table-cell table:formula="of:=IF(AND([.S16]=0; NOT([.U16]=0)); MAX(INDIRECT(&quot;R1:R&quot;&amp;ROW()-1))+1; &quot;&quot;)">
            <text:p/>
          </table:table-cell>
          <table:table-cell table:formula="of:=IF(COUNTIF(INDIRECT(&quot;U1:U&quot;&amp;ROW()-1); [.U16])&gt;0; 1; 0)" office:value-type="float" office:value="1" calcext:value-type="float">
            <text:p>1</text:p>
          </table:table-cell>
          <table:table-cell table:formula="of:=[.T15]+1" office:value-type="float" office:value="16" calcext:value-type="float">
            <text:p>16</text:p>
          </table:table-cell>
          <table:table-cell table:formula="of:=[ML.C18]" office:value-type="float" office:value="0" calcext:value-type="float">
            <text:p>0</text:p>
          </table:table-cell>
          <table:table-cell table:number-columns-repeated="16"/>
          <table:table-cell table:formula="of:=IF([Finalists.G17]=&quot;&quot;; &quot;&quot;; CONCATENATE(VLOOKUP([Finalists.G17]; [Extra.$W$2:.$AG$9]; 7; 0); ROWOFFSETED(MATCH([Finalists.C17]; INDIRECT(VLOOKUP([Finalists.G17]; [Extra.$W$2:.$AI$9]; 12; 0)); 0)+2; WHICHROUNDN([Finalists.G17]))))">
            <text:p/>
          </table:table-cell>
          <table:table-cell table:formula="of:=CELL(&quot;ROW&quot;; INDIRECT([.AL16]))" office:value-type="string" office:string-value="" calcext:value-type="error">
            <text:p>#REF!</text:p>
          </table:table-cell>
          <table:table-cell table:formula="of:=CELL(&quot;COL&quot;; INDIRECT([.AL16]))" office:value-type="string" office:string-value="" calcext:value-type="error">
            <text:p>#REF!</text:p>
          </table:table-cell>
          <table:table-cell table:number-columns-repeated="2"/>
          <table:table-cell table:formula="of:=IF([.AR16]=&quot;&quot;; &quot;&quot;; CODE(MID([.AR16]; 1;1))*10000+CODE(MID([.AR16]; 2; 1))*100+CODE(MID([.AR16]; 3; 1)))">
            <text:p/>
          </table:table-cell>
          <table:table-cell table:formula="of:=[.P16]">
            <text:p/>
          </table:table-cell>
          <table:table-cell table:formula="of:=IF([.AR16]=&quot;&quot;; &quot;&quot;; SMALL([.AQ$1:.AQ$50]; ROW()))">
            <text:p/>
          </table:table-cell>
          <table:table-cell table:formula="of:=IF([.AS16]=&quot;&quot;; &quot;&quot;; VLOOKUP([.AS16]; [.AQ$1:.AR$50]; 2; 0))">
            <text:p/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table:formula="of:=WHICHSHEET(0; [.A7])" office:value-type="string" office:string-value="Finals." calcext:value-type="string">
            <text:p>Finals.</text:p>
          </table:table-cell>
          <table:table-cell table:formula="of:=SUBSTITUTE(ADDRESS(1; INDIRECT(&quot;Stats.&quot;&amp;SUBSTITUTE(ADDRESS(1; 3+2*[.$A17]; 4); &quot;1&quot;; &quot;&quot;)&amp;&quot;3&quot;); 4); &quot;1&quot;; &quot;&quot;)" office:value-type="string" office:string-value="U" calcext:value-type="string">
            <text:p>U</text:p>
          </table:table-cell>
          <table:table-cell table:formula="of:=SUBSTITUTE(ADDRESS(1; INDIRECT(&quot;Stats.&quot;&amp;SUBSTITUTE(ADDRESS(1; 3+2*[.$A17]; 4); &quot;1&quot;; &quot;&quot;)&amp;&quot;3&quot;)+1; 4); &quot;1&quot;; &quot;&quot;)" office:value-type="string" office:string-value="V" calcext:value-type="string">
            <text:p>V</text:p>
          </table:table-cell>
          <table:table-cell table:formula="of:=SUBSTITUTE(ADDRESS(1; INDIRECT(&quot;Stats.&quot;&amp;SUBSTITUTE(ADDRESS(1; 3+2*[.$A17]; 4); &quot;1&quot;; &quot;&quot;)&amp;&quot;3&quot;)+2; 4); &quot;1&quot;; &quot;&quot;)" office:value-type="string" office:string-value="W" calcext:value-type="string">
            <text:p>W</text:p>
          </table:table-cell>
          <table:table-cell table:formula="of:=SUBSTITUTE(ADDRESS(1; INDIRECT(&quot;Stats.&quot;&amp;SUBSTITUTE(ADDRESS(1; 3+2*[.$A17]; 4); &quot;1&quot;; &quot;&quot;)&amp;&quot;3&quot;)+3; 4); &quot;1&quot;; &quot;&quot;)" office:value-type="string" office:string-value="X" calcext:value-type="string">
            <text:p>X</text:p>
          </table:table-cell>
          <table:table-cell table:formula="of:=SUBSTITUTE(ADDRESS(1; INDIRECT(&quot;Stats.&quot;&amp;SUBSTITUTE(ADDRESS(1; 3+2*[.$A17]; 4); &quot;1&quot;; &quot;&quot;)&amp;&quot;3&quot;)+4; 4); &quot;1&quot;; &quot;&quot;)" office:value-type="string" office:string-value="Y" calcext:value-type="string">
            <text:p>Y</text:p>
          </table:table-cell>
          <table:table-cell table:formula="of:=SUBSTITUTE(ADDRESS(1; INDIRECT(&quot;Stats.&quot;&amp;SUBSTITUTE(ADDRESS(1; 3+2*[.$A17]; 4); &quot;1&quot;; &quot;&quot;)&amp;&quot;3&quot;)+5; 4); &quot;1&quot;; &quot;&quot;)" office:value-type="string" office:string-value="Z" calcext:value-type="string">
            <text:p>Z</text:p>
          </table:table-cell>
          <table:table-cell table:number-columns-repeated="2"/>
          <table:table-cell table:formula="of:=SUBSTITUTE(ADDRESS(1; INDIRECT(&quot;Stats.&quot;&amp;SUBSTITUTE(ADDRESS(1; 3+2*[.$A17]; 4); &quot;1&quot;; &quot;&quot;)&amp;&quot;3&quot;)+8; 4); &quot;1&quot;; &quot;&quot;)" office:value-type="string" office:string-value="AC" calcext:value-type="string">
            <text:p>AC</text:p>
          </table:table-cell>
          <table:table-cell/>
          <table:table-cell table:formula="of:=IF(ISNA(MATCH([.N17];[.O$6:.O$15];0));&quot;&quot;;IF(COUNTIF(INDIRECT(&quot;M1:M&quot;&amp;ROW()-1);MATCH([.N17];[.O$6:.O$15];0))&gt;0;MATCH([.N17];[.O$6:.O$15];0)+1;MATCH([.N17];[.O$6:.O$15];0)))">
            <text:p/>
          </table:table-cell>
          <table:table-cell table:formula="of:=(COUNTIF([ML.$C$3:.$C$130]; [.P17])+COUNTIF([FL.$C$3:.$C$130]; [.P17]))*1000+ROW()" office:value-type="float" office:value="256017" calcext:value-type="float">
            <text:p>256017</text:p>
          </table:table-cell>
          <table:table-cell/>
          <table:table-cell table:formula="of:=IF(ISNA(VLOOKUP([.T17]; [.R17:.U272]; 4; 0)); &quot;&quot;; VLOOKUP([.T17]; [.R17:.U272]; 4; 0))">
            <text:p/>
          </table:table-cell>
          <table:table-cell/>
          <table:table-cell table:formula="of:=IF(AND([.S17]=0; NOT([.U17]=0)); MAX(INDIRECT(&quot;R1:R&quot;&amp;ROW()-1))+1; &quot;&quot;)">
            <text:p/>
          </table:table-cell>
          <table:table-cell table:formula="of:=IF(COUNTIF(INDIRECT(&quot;U1:U&quot;&amp;ROW()-1); [.U17])&gt;0; 1; 0)" office:value-type="float" office:value="1" calcext:value-type="float">
            <text:p>1</text:p>
          </table:table-cell>
          <table:table-cell table:formula="of:=[.T16]+1" office:value-type="float" office:value="17" calcext:value-type="float">
            <text:p>17</text:p>
          </table:table-cell>
          <table:table-cell table:formula="of:=[ML.C19]" office:value-type="float" office:value="0" calcext:value-type="float">
            <text:p>0</text:p>
          </table:table-cell>
          <table:table-cell table:number-columns-repeated="16"/>
          <table:table-cell table:formula="of:=IF([Finalists.G18]=&quot;&quot;; &quot;&quot;; CONCATENATE(VLOOKUP([Finalists.G18]; [Extra.$W$2:.$AG$9]; 7; 0); ROWOFFSETED(MATCH([Finalists.C18]; INDIRECT(VLOOKUP([Finalists.G18]; [Extra.$W$2:.$AI$9]; 12; 0)); 0)+2; WHICHROUNDN([Finalists.G18]))))">
            <text:p/>
          </table:table-cell>
          <table:table-cell table:formula="of:=CELL(&quot;ROW&quot;; INDIRECT([.AL17]))" office:value-type="string" office:string-value="" calcext:value-type="error">
            <text:p>#REF!</text:p>
          </table:table-cell>
          <table:table-cell table:formula="of:=CELL(&quot;COL&quot;; INDIRECT([.AL17]))" office:value-type="string" office:string-value="" calcext:value-type="error">
            <text:p>#REF!</text:p>
          </table:table-cell>
          <table:table-cell table:number-columns-repeated="2"/>
          <table:table-cell table:formula="of:=IF([.AR17]=&quot;&quot;; &quot;&quot;; CODE(MID([.AR17]; 1;1))*10000+CODE(MID([.AR17]; 2; 1))*100+CODE(MID([.AR17]; 3; 1)))">
            <text:p/>
          </table:table-cell>
          <table:table-cell table:formula="of:=[.P17]">
            <text:p/>
          </table:table-cell>
          <table:table-cell table:formula="of:=IF([.AR17]=&quot;&quot;; &quot;&quot;; SMALL([.AQ$1:.AQ$50]; ROW()))">
            <text:p/>
          </table:table-cell>
          <table:table-cell table:formula="of:=IF([.AS17]=&quot;&quot;; &quot;&quot;; VLOOKUP([.AS17]; [.AQ$1:.AR$50]; 2; 0))">
            <text:p/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table:formula="of:=WHICHSHEET(0; [.A8])" office:value-type="string" office:string-value="Finals." calcext:value-type="string">
            <text:p>Finals.</text:p>
          </table:table-cell>
          <table:table-cell table:formula="of:=SUBSTITUTE(ADDRESS(1; INDIRECT(&quot;Stats.&quot;&amp;SUBSTITUTE(ADDRESS(1; 3+2*[.$A18]; 4); &quot;1&quot;; &quot;&quot;)&amp;&quot;3&quot;); 4); &quot;1&quot;; &quot;&quot;)" office:value-type="string" office:string-value="AE" calcext:value-type="string">
            <text:p>AE</text:p>
          </table:table-cell>
          <table:table-cell table:formula="of:=SUBSTITUTE(ADDRESS(1; INDIRECT(&quot;Stats.&quot;&amp;SUBSTITUTE(ADDRESS(1; 3+2*[.$A18]; 4); &quot;1&quot;; &quot;&quot;)&amp;&quot;3&quot;)+1; 4); &quot;1&quot;; &quot;&quot;)" office:value-type="string" office:string-value="AF" calcext:value-type="string">
            <text:p>AF</text:p>
          </table:table-cell>
          <table:table-cell table:formula="of:=SUBSTITUTE(ADDRESS(1; INDIRECT(&quot;Stats.&quot;&amp;SUBSTITUTE(ADDRESS(1; 3+2*[.$A18]; 4); &quot;1&quot;; &quot;&quot;)&amp;&quot;3&quot;)+2; 4); &quot;1&quot;; &quot;&quot;)" office:value-type="string" office:string-value="AG" calcext:value-type="string">
            <text:p>AG</text:p>
          </table:table-cell>
          <table:table-cell table:formula="of:=SUBSTITUTE(ADDRESS(1; INDIRECT(&quot;Stats.&quot;&amp;SUBSTITUTE(ADDRESS(1; 3+2*[.$A18]; 4); &quot;1&quot;; &quot;&quot;)&amp;&quot;3&quot;)+3; 4); &quot;1&quot;; &quot;&quot;)" office:value-type="string" office:string-value="AH" calcext:value-type="string">
            <text:p>AH</text:p>
          </table:table-cell>
          <table:table-cell table:formula="of:=SUBSTITUTE(ADDRESS(1; INDIRECT(&quot;Stats.&quot;&amp;SUBSTITUTE(ADDRESS(1; 3+2*[.$A18]; 4); &quot;1&quot;; &quot;&quot;)&amp;&quot;3&quot;)+4; 4); &quot;1&quot;; &quot;&quot;)" office:value-type="string" office:string-value="AI" calcext:value-type="string">
            <text:p>AI</text:p>
          </table:table-cell>
          <table:table-cell table:formula="of:=SUBSTITUTE(ADDRESS(1; INDIRECT(&quot;Stats.&quot;&amp;SUBSTITUTE(ADDRESS(1; 3+2*[.$A18]; 4); &quot;1&quot;; &quot;&quot;)&amp;&quot;3&quot;)+5; 4); &quot;1&quot;; &quot;&quot;)" office:value-type="string" office:string-value="AJ" calcext:value-type="string">
            <text:p>AJ</text:p>
          </table:table-cell>
          <table:table-cell table:number-columns-repeated="2"/>
          <table:table-cell table:formula="of:=SUBSTITUTE(ADDRESS(1; INDIRECT(&quot;Stats.&quot;&amp;SUBSTITUTE(ADDRESS(1; 3+2*[.$A18]; 4); &quot;1&quot;; &quot;&quot;)&amp;&quot;3&quot;)+8; 4); &quot;1&quot;; &quot;&quot;)" office:value-type="string" office:string-value="AM" calcext:value-type="string">
            <text:p>AM</text:p>
          </table:table-cell>
          <table:table-cell/>
          <table:table-cell table:formula="of:=IF(ISNA(MATCH([.N18];[.O$6:.O$15];0));&quot;&quot;;IF(COUNTIF(INDIRECT(&quot;M1:M&quot;&amp;ROW()-1);MATCH([.N18];[.O$6:.O$15];0))&gt;0;MATCH([.N18];[.O$6:.O$15];0)+1;MATCH([.N18];[.O$6:.O$15];0)))">
            <text:p/>
          </table:table-cell>
          <table:table-cell table:formula="of:=(COUNTIF([ML.$C$3:.$C$130]; [.P18])+COUNTIF([FL.$C$3:.$C$130]; [.P18]))*1000+ROW()" office:value-type="float" office:value="256018" calcext:value-type="float">
            <text:p>256018</text:p>
          </table:table-cell>
          <table:table-cell/>
          <table:table-cell table:formula="of:=IF(ISNA(VLOOKUP([.T18]; [.R18:.U273]; 4; 0)); &quot;&quot;; VLOOKUP([.T18]; [.R18:.U273]; 4; 0))">
            <text:p/>
          </table:table-cell>
          <table:table-cell/>
          <table:table-cell table:formula="of:=IF(AND([.S18]=0; NOT([.U18]=0)); MAX(INDIRECT(&quot;R1:R&quot;&amp;ROW()-1))+1; &quot;&quot;)">
            <text:p/>
          </table:table-cell>
          <table:table-cell table:formula="of:=IF(COUNTIF(INDIRECT(&quot;U1:U&quot;&amp;ROW()-1); [.U18])&gt;0; 1; 0)" office:value-type="float" office:value="1" calcext:value-type="float">
            <text:p>1</text:p>
          </table:table-cell>
          <table:table-cell table:formula="of:=[.T17]+1" office:value-type="float" office:value="18" calcext:value-type="float">
            <text:p>18</text:p>
          </table:table-cell>
          <table:table-cell table:formula="of:=[ML.C20]" office:value-type="float" office:value="0" calcext:value-type="float">
            <text:p>0</text:p>
          </table:table-cell>
          <table:table-cell table:number-columns-repeated="16"/>
          <table:table-cell table:formula="of:=IF([Finalists.G19]=&quot;&quot;; &quot;&quot;; CONCATENATE(VLOOKUP([Finalists.G19]; [Extra.$W$2:.$AG$9]; 10; 0); ROWOFFSETED(MATCH([Finalists.C19]; INDIRECT(VLOOKUP([Finalists.G19]; [Extra.$W$2:.$AI$9]; 13; 0)); 0)+2+VLOOKUP([Finalists.G19]; [Extra.$W$2:.$AJ$9]; 14; 0); WHICHROUNDN([Finalists.G19]))))">
            <text:p/>
          </table:table-cell>
          <table:table-cell table:formula="of:=CELL(&quot;ROW&quot;; INDIRECT([.AL18]))" office:value-type="string" office:string-value="" calcext:value-type="error">
            <text:p>#REF!</text:p>
          </table:table-cell>
          <table:table-cell table:formula="of:=CELL(&quot;COL&quot;; INDIRECT([.AL18]))" office:value-type="string" office:string-value="" calcext:value-type="error">
            <text:p>#REF!</text:p>
          </table:table-cell>
          <table:table-cell table:number-columns-repeated="2"/>
          <table:table-cell table:formula="of:=IF([.AR18]=&quot;&quot;; &quot;&quot;; CODE(MID([.AR18]; 1;1))*10000+CODE(MID([.AR18]; 2; 1))*100+CODE(MID([.AR18]; 3; 1)))">
            <text:p/>
          </table:table-cell>
          <table:table-cell table:formula="of:=[.P18]">
            <text:p/>
          </table:table-cell>
          <table:table-cell table:formula="of:=IF([.AR18]=&quot;&quot;; &quot;&quot;; SMALL([.AQ$1:.AQ$50]; ROW()))">
            <text:p/>
          </table:table-cell>
          <table:table-cell table:formula="of:=IF([.AS18]=&quot;&quot;; &quot;&quot;; VLOOKUP([.AS18]; [.AQ$1:.AR$50]; 2; 0))">
            <text:p/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table:formula="of:=WHICHSHEET(0; [.A9])" office:value-type="string" office:string-value="Finals." calcext:value-type="string">
            <text:p>Finals.</text:p>
          </table:table-cell>
          <table:table-cell table:number-columns-repeated="10"/>
          <table:table-cell table:formula="of:=IF(ISNA(MATCH([.N19];[.O$6:.O$15];0));&quot;&quot;;IF(COUNTIF(INDIRECT(&quot;M1:M&quot;&amp;ROW()-1);MATCH([.N19];[.O$6:.O$15];0))&gt;0;MATCH([.N19];[.O$6:.O$15];0)+1;MATCH([.N19];[.O$6:.O$15];0)))">
            <text:p/>
          </table:table-cell>
          <table:table-cell table:formula="of:=(COUNTIF([ML.$C$3:.$C$130]; [.P19])+COUNTIF([FL.$C$3:.$C$130]; [.P19]))*1000+ROW()" office:value-type="float" office:value="256019" calcext:value-type="float">
            <text:p>256019</text:p>
          </table:table-cell>
          <table:table-cell/>
          <table:table-cell table:formula="of:=IF(ISNA(VLOOKUP([.T19]; [.R19:.U274]; 4; 0)); &quot;&quot;; VLOOKUP([.T19]; [.R19:.U274]; 4; 0))">
            <text:p/>
          </table:table-cell>
          <table:table-cell/>
          <table:table-cell table:formula="of:=IF(AND([.S19]=0; NOT([.U19]=0)); MAX(INDIRECT(&quot;R1:R&quot;&amp;ROW()-1))+1; &quot;&quot;)">
            <text:p/>
          </table:table-cell>
          <table:table-cell table:formula="of:=IF(COUNTIF(INDIRECT(&quot;U1:U&quot;&amp;ROW()-1); [.U19])&gt;0; 1; 0)" office:value-type="float" office:value="1" calcext:value-type="float">
            <text:p>1</text:p>
          </table:table-cell>
          <table:table-cell table:formula="of:=[.T18]+1" office:value-type="float" office:value="19" calcext:value-type="float">
            <text:p>19</text:p>
          </table:table-cell>
          <table:table-cell table:formula="of:=[ML.C21]" office:value-type="float" office:value="0" calcext:value-type="float">
            <text:p>0</text:p>
          </table:table-cell>
          <table:table-cell table:number-columns-repeated="16"/>
          <table:table-cell table:formula="of:=IF([Finalists.G20]=&quot;&quot;; &quot;&quot;; CONCATENATE(VLOOKUP([Finalists.G20]; [Extra.$W$2:.$AG$9]; 10; 0); ROWOFFSETED(MATCH([Finalists.C20]; INDIRECT(VLOOKUP([Finalists.G20]; [Extra.$W$2:.$AI$9]; 13; 0)); 0)+2+VLOOKUP([Finalists.G20]; [Extra.$W$2:.$AJ$9]; 14; 0); WHICHROUNDN([Finalists.G20]))))">
            <text:p/>
          </table:table-cell>
          <table:table-cell table:formula="of:=CELL(&quot;ROW&quot;; INDIRECT([.AL19]))" office:value-type="string" office:string-value="" calcext:value-type="error">
            <text:p>#REF!</text:p>
          </table:table-cell>
          <table:table-cell table:formula="of:=CELL(&quot;COL&quot;; INDIRECT([.AL19]))" office:value-type="string" office:string-value="" calcext:value-type="error">
            <text:p>#REF!</text:p>
          </table:table-cell>
          <table:table-cell table:number-columns-repeated="2"/>
          <table:table-cell table:formula="of:=IF([.AR19]=&quot;&quot;; &quot;&quot;; CODE(MID([.AR19]; 1;1))*10000+CODE(MID([.AR19]; 2; 1))*100+CODE(MID([.AR19]; 3; 1)))">
            <text:p/>
          </table:table-cell>
          <table:table-cell table:formula="of:=[.P19]">
            <text:p/>
          </table:table-cell>
          <table:table-cell table:formula="of:=IF([.AR19]=&quot;&quot;; &quot;&quot;; SMALL([.AQ$1:.AQ$50]; ROW()))">
            <text:p/>
          </table:table-cell>
          <table:table-cell table:formula="of:=IF([.AS19]=&quot;&quot;; &quot;&quot;; VLOOKUP([.AS19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0];[.O$6:.O$15];0));&quot;&quot;;IF(COUNTIF(INDIRECT(&quot;M1:M&quot;&amp;ROW()-1);MATCH([.N20];[.O$6:.O$15];0))&gt;0;MATCH([.N20];[.O$6:.O$15];0)+1;MATCH([.N20];[.O$6:.O$15];0)))">
            <text:p/>
          </table:table-cell>
          <table:table-cell table:formula="of:=(COUNTIF([ML.$C$3:.$C$130]; [.P20])+COUNTIF([FL.$C$3:.$C$130]; [.P20]))*1000+ROW()" office:value-type="float" office:value="256020" calcext:value-type="float">
            <text:p>256020</text:p>
          </table:table-cell>
          <table:table-cell/>
          <table:table-cell table:formula="of:=IF(ISNA(VLOOKUP([.T20]; [.R20:.U275]; 4; 0)); &quot;&quot;; VLOOKUP([.T20]; [.R20:.U275]; 4; 0))">
            <text:p/>
          </table:table-cell>
          <table:table-cell/>
          <table:table-cell table:formula="of:=IF(AND([.S20]=0; NOT([.U20]=0)); MAX(INDIRECT(&quot;R1:R&quot;&amp;ROW()-1))+1; &quot;&quot;)">
            <text:p/>
          </table:table-cell>
          <table:table-cell table:formula="of:=IF(COUNTIF(INDIRECT(&quot;U1:U&quot;&amp;ROW()-1); [.U20])&gt;0; 1; 0)" office:value-type="float" office:value="1" calcext:value-type="float">
            <text:p>1</text:p>
          </table:table-cell>
          <table:table-cell table:formula="of:=[.T19]+1" office:value-type="float" office:value="20" calcext:value-type="float">
            <text:p>20</text:p>
          </table:table-cell>
          <table:table-cell table:formula="of:=[ML.C22]" office:value-type="float" office:value="0" calcext:value-type="float">
            <text:p>0</text:p>
          </table:table-cell>
          <table:table-cell table:number-columns-repeated="16"/>
          <table:table-cell table:formula="of:=IF([Finalists.G21]=&quot;&quot;; &quot;&quot;; CONCATENATE(VLOOKUP([Finalists.G21]; [Extra.$W$2:.$AG$9]; 10; 0); ROWOFFSETED(MATCH([Finalists.C21]; INDIRECT(VLOOKUP([Finalists.G21]; [Extra.$W$2:.$AI$9]; 13; 0)); 0)+2+VLOOKUP([Finalists.G21]; [Extra.$W$2:.$AJ$9]; 14; 0); WHICHROUNDN([Finalists.G21]))))">
            <text:p/>
          </table:table-cell>
          <table:table-cell table:formula="of:=CELL(&quot;ROW&quot;; INDIRECT([.AL20]))" office:value-type="string" office:string-value="" calcext:value-type="error">
            <text:p>#REF!</text:p>
          </table:table-cell>
          <table:table-cell table:formula="of:=CELL(&quot;COL&quot;; INDIRECT([.AL20]))" office:value-type="string" office:string-value="" calcext:value-type="error">
            <text:p>#REF!</text:p>
          </table:table-cell>
          <table:table-cell table:number-columns-repeated="2"/>
          <table:table-cell table:formula="of:=IF([.AR20]=&quot;&quot;; &quot;&quot;; CODE(MID([.AR20]; 1;1))*10000+CODE(MID([.AR20]; 2; 1))*100+CODE(MID([.AR20]; 3; 1)))">
            <text:p/>
          </table:table-cell>
          <table:table-cell table:formula="of:=[.P20]">
            <text:p/>
          </table:table-cell>
          <table:table-cell table:formula="of:=IF([.AR20]=&quot;&quot;; &quot;&quot;; SMALL([.AQ$1:.AQ$50]; ROW()))">
            <text:p/>
          </table:table-cell>
          <table:table-cell table:formula="of:=IF([.AS20]=&quot;&quot;; &quot;&quot;; VLOOKUP([.AS20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1];[.O$6:.O$15];0));&quot;&quot;;IF(COUNTIF(INDIRECT(&quot;M1:M&quot;&amp;ROW()-1);MATCH([.N21];[.O$6:.O$15];0))&gt;0;MATCH([.N21];[.O$6:.O$15];0)+1;MATCH([.N21];[.O$6:.O$15];0)))">
            <text:p/>
          </table:table-cell>
          <table:table-cell table:formula="of:=(COUNTIF([ML.$C$3:.$C$130]; [.P21])+COUNTIF([FL.$C$3:.$C$130]; [.P21]))*1000+ROW()" office:value-type="float" office:value="256021" calcext:value-type="float">
            <text:p>256021</text:p>
          </table:table-cell>
          <table:table-cell/>
          <table:table-cell table:formula="of:=IF(ISNA(VLOOKUP([.T21]; [.R21:.U276]; 4; 0)); &quot;&quot;; VLOOKUP([.T21]; [.R21:.U276]; 4; 0))">
            <text:p/>
          </table:table-cell>
          <table:table-cell/>
          <table:table-cell table:formula="of:=IF(AND([.S21]=0; NOT([.U21]=0)); MAX(INDIRECT(&quot;R1:R&quot;&amp;ROW()-1))+1; &quot;&quot;)">
            <text:p/>
          </table:table-cell>
          <table:table-cell table:formula="of:=IF(COUNTIF(INDIRECT(&quot;U1:U&quot;&amp;ROW()-1); [.U21])&gt;0; 1; 0)" office:value-type="float" office:value="1" calcext:value-type="float">
            <text:p>1</text:p>
          </table:table-cell>
          <table:table-cell table:formula="of:=[.T20]+1" office:value-type="float" office:value="21" calcext:value-type="float">
            <text:p>21</text:p>
          </table:table-cell>
          <table:table-cell table:formula="of:=[ML.C23]" office:value-type="float" office:value="0" calcext:value-type="float">
            <text:p>0</text:p>
          </table:table-cell>
          <table:table-cell table:number-columns-repeated="16"/>
          <table:table-cell table:formula="of:=IF([Finalists.G22]=&quot;&quot;; &quot;&quot;; CONCATENATE(VLOOKUP([Finalists.G22]; [Extra.$W$2:.$AG$9]; 10; 0); ROWOFFSETED(MATCH([Finalists.C22]; INDIRECT(VLOOKUP([Finalists.G22]; [Extra.$W$2:.$AI$9]; 13; 0)); 0)+2+VLOOKUP([Finalists.G22]; [Extra.$W$2:.$AJ$9]; 14; 0); WHICHROUNDN([Finalists.G22]))))">
            <text:p/>
          </table:table-cell>
          <table:table-cell table:formula="of:=CELL(&quot;ROW&quot;; INDIRECT([.AL21]))" office:value-type="string" office:string-value="" calcext:value-type="error">
            <text:p>#REF!</text:p>
          </table:table-cell>
          <table:table-cell table:formula="of:=CELL(&quot;COL&quot;; INDIRECT([.AL21]))" office:value-type="string" office:string-value="" calcext:value-type="error">
            <text:p>#REF!</text:p>
          </table:table-cell>
          <table:table-cell table:number-columns-repeated="2"/>
          <table:table-cell table:formula="of:=IF([.AR21]=&quot;&quot;; &quot;&quot;; CODE(MID([.AR21]; 1;1))*10000+CODE(MID([.AR21]; 2; 1))*100+CODE(MID([.AR21]; 3; 1)))">
            <text:p/>
          </table:table-cell>
          <table:table-cell table:formula="of:=[.P21]">
            <text:p/>
          </table:table-cell>
          <table:table-cell table:formula="of:=IF([.AR21]=&quot;&quot;; &quot;&quot;; SMALL([.AQ$1:.AQ$50]; ROW()))">
            <text:p/>
          </table:table-cell>
          <table:table-cell table:formula="of:=IF([.AS21]=&quot;&quot;; &quot;&quot;; VLOOKUP([.AS21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2];[.O$6:.O$15];0));&quot;&quot;;IF(COUNTIF(INDIRECT(&quot;M1:M&quot;&amp;ROW()-1);MATCH([.N22];[.O$6:.O$15];0))&gt;0;MATCH([.N22];[.O$6:.O$15];0)+1;MATCH([.N22];[.O$6:.O$15];0)))">
            <text:p/>
          </table:table-cell>
          <table:table-cell table:formula="of:=(COUNTIF([ML.$C$3:.$C$130]; [.P22])+COUNTIF([FL.$C$3:.$C$130]; [.P22]))*1000+ROW()" office:value-type="float" office:value="256022" calcext:value-type="float">
            <text:p>256022</text:p>
          </table:table-cell>
          <table:table-cell/>
          <table:table-cell table:formula="of:=IF(ISNA(VLOOKUP([.T22]; [.R22:.U277]; 4; 0)); &quot;&quot;; VLOOKUP([.T22]; [.R22:.U277]; 4; 0))">
            <text:p/>
          </table:table-cell>
          <table:table-cell/>
          <table:table-cell table:formula="of:=IF(AND([.S22]=0; NOT([.U22]=0)); MAX(INDIRECT(&quot;R1:R&quot;&amp;ROW()-1))+1; &quot;&quot;)">
            <text:p/>
          </table:table-cell>
          <table:table-cell table:formula="of:=IF(COUNTIF(INDIRECT(&quot;U1:U&quot;&amp;ROW()-1); [.U22])&gt;0; 1; 0)" office:value-type="float" office:value="1" calcext:value-type="float">
            <text:p>1</text:p>
          </table:table-cell>
          <table:table-cell table:formula="of:=[.T21]+1" office:value-type="float" office:value="22" calcext:value-type="float">
            <text:p>22</text:p>
          </table:table-cell>
          <table:table-cell table:formula="of:=[ML.C24]" office:value-type="float" office:value="0" calcext:value-type="float">
            <text:p>0</text:p>
          </table:table-cell>
          <table:table-cell table:number-columns-repeated="16"/>
          <table:table-cell table:formula="of:=IF([Finalists.G23]=&quot;&quot;; &quot;&quot;; CONCATENATE(VLOOKUP([Finalists.G23]; [Extra.$W$2:.$AG$9]; 10; 0); ROWOFFSETED(MATCH([Finalists.C23]; INDIRECT(VLOOKUP([Finalists.G23]; [Extra.$W$2:.$AI$9]; 13; 0)); 0)+2+VLOOKUP([Finalists.G23]; [Extra.$W$2:.$AJ$9]; 14; 0); WHICHROUNDN([Finalists.G23]))))">
            <text:p/>
          </table:table-cell>
          <table:table-cell table:formula="of:=CELL(&quot;ROW&quot;; INDIRECT([.AL22]))" office:value-type="string" office:string-value="" calcext:value-type="error">
            <text:p>#REF!</text:p>
          </table:table-cell>
          <table:table-cell table:formula="of:=CELL(&quot;COL&quot;; INDIRECT([.AL22]))" office:value-type="string" office:string-value="" calcext:value-type="error">
            <text:p>#REF!</text:p>
          </table:table-cell>
          <table:table-cell table:number-columns-repeated="2"/>
          <table:table-cell table:formula="of:=IF([.AR22]=&quot;&quot;; &quot;&quot;; CODE(MID([.AR22]; 1;1))*10000+CODE(MID([.AR22]; 2; 1))*100+CODE(MID([.AR22]; 3; 1)))">
            <text:p/>
          </table:table-cell>
          <table:table-cell table:formula="of:=[.P22]">
            <text:p/>
          </table:table-cell>
          <table:table-cell table:formula="of:=IF([.AR22]=&quot;&quot;; &quot;&quot;; SMALL([.AQ$1:.AQ$50]; ROW()))">
            <text:p/>
          </table:table-cell>
          <table:table-cell table:formula="of:=IF([.AS22]=&quot;&quot;; &quot;&quot;; VLOOKUP([.AS22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3];[.O$6:.O$15];0));&quot;&quot;;IF(COUNTIF(INDIRECT(&quot;M1:M&quot;&amp;ROW()-1);MATCH([.N23];[.O$6:.O$15];0))&gt;0;MATCH([.N23];[.O$6:.O$15];0)+1;MATCH([.N23];[.O$6:.O$15];0)))">
            <text:p/>
          </table:table-cell>
          <table:table-cell table:formula="of:=(COUNTIF([ML.$C$3:.$C$130]; [.P23])+COUNTIF([FL.$C$3:.$C$130]; [.P23]))*1000+ROW()" office:value-type="float" office:value="256023" calcext:value-type="float">
            <text:p>256023</text:p>
          </table:table-cell>
          <table:table-cell/>
          <table:table-cell table:formula="of:=IF(ISNA(VLOOKUP([.T23]; [.R23:.U278]; 4; 0)); &quot;&quot;; VLOOKUP([.T23]; [.R23:.U278]; 4; 0))">
            <text:p/>
          </table:table-cell>
          <table:table-cell/>
          <table:table-cell table:formula="of:=IF(AND([.S23]=0; NOT([.U23]=0)); MAX(INDIRECT(&quot;R1:R&quot;&amp;ROW()-1))+1; &quot;&quot;)">
            <text:p/>
          </table:table-cell>
          <table:table-cell table:formula="of:=IF(COUNTIF(INDIRECT(&quot;U1:U&quot;&amp;ROW()-1); [.U23])&gt;0; 1; 0)" office:value-type="float" office:value="1" calcext:value-type="float">
            <text:p>1</text:p>
          </table:table-cell>
          <table:table-cell table:formula="of:=[.T22]+1" office:value-type="float" office:value="23" calcext:value-type="float">
            <text:p>23</text:p>
          </table:table-cell>
          <table:table-cell table:formula="of:=[ML.C25]" office:value-type="float" office:value="0" calcext:value-type="float">
            <text:p>0</text:p>
          </table:table-cell>
          <table:table-cell table:number-columns-repeated="16"/>
          <table:table-cell table:formula="of:=IF([Finalists.G24]=&quot;&quot;; &quot;&quot;; CONCATENATE(VLOOKUP([Finalists.G24]; [Extra.$W$2:.$AG$9]; 10; 0); ROWOFFSETED(MATCH([Finalists.C24]; INDIRECT(VLOOKUP([Finalists.G24]; [Extra.$W$2:.$AI$9]; 13; 0)); 0)+2+VLOOKUP([Finalists.G24]; [Extra.$W$2:.$AJ$9]; 14; 0); WHICHROUNDN([Finalists.G24]))))">
            <text:p/>
          </table:table-cell>
          <table:table-cell table:formula="of:=CELL(&quot;ROW&quot;; INDIRECT([.AL23]))" office:value-type="string" office:string-value="" calcext:value-type="error">
            <text:p>#REF!</text:p>
          </table:table-cell>
          <table:table-cell table:formula="of:=CELL(&quot;COL&quot;; INDIRECT([.AL23]))" office:value-type="string" office:string-value="" calcext:value-type="error">
            <text:p>#REF!</text:p>
          </table:table-cell>
          <table:table-cell table:number-columns-repeated="2"/>
          <table:table-cell table:formula="of:=IF([.AR23]=&quot;&quot;; &quot;&quot;; CODE(MID([.AR23]; 1;1))*10000+CODE(MID([.AR23]; 2; 1))*100+CODE(MID([.AR23]; 3; 1)))">
            <text:p/>
          </table:table-cell>
          <table:table-cell table:formula="of:=[.P23]">
            <text:p/>
          </table:table-cell>
          <table:table-cell table:formula="of:=IF([.AR23]=&quot;&quot;; &quot;&quot;; SMALL([.AQ$1:.AQ$50]; ROW()))">
            <text:p/>
          </table:table-cell>
          <table:table-cell table:formula="of:=IF([.AS23]=&quot;&quot;; &quot;&quot;; VLOOKUP([.AS23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4];[.O$6:.O$15];0));&quot;&quot;;IF(COUNTIF(INDIRECT(&quot;M1:M&quot;&amp;ROW()-1);MATCH([.N24];[.O$6:.O$15];0))&gt;0;MATCH([.N24];[.O$6:.O$15];0)+1;MATCH([.N24];[.O$6:.O$15];0)))">
            <text:p/>
          </table:table-cell>
          <table:table-cell table:formula="of:=(COUNTIF([ML.$C$3:.$C$130]; [.P24])+COUNTIF([FL.$C$3:.$C$130]; [.P24]))*1000+ROW()" office:value-type="float" office:value="256024" calcext:value-type="float">
            <text:p>256024</text:p>
          </table:table-cell>
          <table:table-cell/>
          <table:table-cell table:formula="of:=IF(ISNA(VLOOKUP([.T24]; [.R24:.U279]; 4; 0)); &quot;&quot;; VLOOKUP([.T24]; [.R24:.U279]; 4; 0))">
            <text:p/>
          </table:table-cell>
          <table:table-cell/>
          <table:table-cell table:formula="of:=IF(AND([.S24]=0; NOT([.U24]=0)); MAX(INDIRECT(&quot;R1:R&quot;&amp;ROW()-1))+1; &quot;&quot;)">
            <text:p/>
          </table:table-cell>
          <table:table-cell table:formula="of:=IF(COUNTIF(INDIRECT(&quot;U1:U&quot;&amp;ROW()-1); [.U24])&gt;0; 1; 0)" office:value-type="float" office:value="1" calcext:value-type="float">
            <text:p>1</text:p>
          </table:table-cell>
          <table:table-cell table:formula="of:=[.T23]+1" office:value-type="float" office:value="24" calcext:value-type="float">
            <text:p>24</text:p>
          </table:table-cell>
          <table:table-cell table:formula="of:=[ML.C26]" office:value-type="float" office:value="0" calcext:value-type="float">
            <text:p>0</text:p>
          </table:table-cell>
          <table:table-cell table:number-columns-repeated="16"/>
          <table:table-cell table:formula="of:=IF([Finalists.G25]=&quot;&quot;; &quot;&quot;; CONCATENATE(VLOOKUP([Finalists.G25]; [Extra.$W$2:.$AG$9]; 10; 0); ROWOFFSETED(MATCH([Finalists.C25]; INDIRECT(VLOOKUP([Finalists.G25]; [Extra.$W$2:.$AI$9]; 13; 0)); 0)+2+VLOOKUP([Finalists.G25]; [Extra.$W$2:.$AJ$9]; 14; 0); WHICHROUNDN([Finalists.G25]))))">
            <text:p/>
          </table:table-cell>
          <table:table-cell table:formula="of:=CELL(&quot;ROW&quot;; INDIRECT([.AL24]))" office:value-type="string" office:string-value="" calcext:value-type="error">
            <text:p>#REF!</text:p>
          </table:table-cell>
          <table:table-cell table:formula="of:=CELL(&quot;COL&quot;; INDIRECT([.AL24]))" office:value-type="string" office:string-value="" calcext:value-type="error">
            <text:p>#REF!</text:p>
          </table:table-cell>
          <table:table-cell table:number-columns-repeated="2"/>
          <table:table-cell table:formula="of:=IF([.AR24]=&quot;&quot;; &quot;&quot;; CODE(MID([.AR24]; 1;1))*10000+CODE(MID([.AR24]; 2; 1))*100+CODE(MID([.AR24]; 3; 1)))">
            <text:p/>
          </table:table-cell>
          <table:table-cell table:formula="of:=[.P24]">
            <text:p/>
          </table:table-cell>
          <table:table-cell table:formula="of:=IF([.AR24]=&quot;&quot;; &quot;&quot;; SMALL([.AQ$1:.AQ$50]; ROW()))">
            <text:p/>
          </table:table-cell>
          <table:table-cell table:formula="of:=IF([.AS24]=&quot;&quot;; &quot;&quot;; VLOOKUP([.AS24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5];[.O$6:.O$15];0));&quot;&quot;;IF(COUNTIF(INDIRECT(&quot;M1:M&quot;&amp;ROW()-1);MATCH([.N25];[.O$6:.O$15];0))&gt;0;MATCH([.N25];[.O$6:.O$15];0)+1;MATCH([.N25];[.O$6:.O$15];0)))">
            <text:p/>
          </table:table-cell>
          <table:table-cell table:formula="of:=(COUNTIF([ML.$C$3:.$C$130]; [.P25])+COUNTIF([FL.$C$3:.$C$130]; [.P25]))*1000+ROW()" office:value-type="float" office:value="256025" calcext:value-type="float">
            <text:p>256025</text:p>
          </table:table-cell>
          <table:table-cell/>
          <table:table-cell table:formula="of:=IF(ISNA(VLOOKUP([.T25]; [.R25:.U280]; 4; 0)); &quot;&quot;; VLOOKUP([.T25]; [.R25:.U280]; 4; 0))">
            <text:p/>
          </table:table-cell>
          <table:table-cell/>
          <table:table-cell table:formula="of:=IF(AND([.S25]=0; NOT([.U25]=0)); MAX(INDIRECT(&quot;R1:R&quot;&amp;ROW()-1))+1; &quot;&quot;)">
            <text:p/>
          </table:table-cell>
          <table:table-cell table:formula="of:=IF(COUNTIF(INDIRECT(&quot;U1:U&quot;&amp;ROW()-1); [.U25])&gt;0; 1; 0)" office:value-type="float" office:value="1" calcext:value-type="float">
            <text:p>1</text:p>
          </table:table-cell>
          <table:table-cell table:formula="of:=[.T24]+1" office:value-type="float" office:value="25" calcext:value-type="float">
            <text:p>25</text:p>
          </table:table-cell>
          <table:table-cell table:formula="of:=[ML.C27]" office:value-type="float" office:value="0" calcext:value-type="float">
            <text:p>0</text:p>
          </table:table-cell>
          <table:table-cell table:number-columns-repeated="16"/>
          <table:table-cell table:formula="of:=IF([Finalists.G26]=&quot;&quot;; &quot;&quot;; CONCATENATE(VLOOKUP([Finalists.G26]; [Extra.$W$2:.$AG$9]; 10; 0); ROWOFFSETED(MATCH([Finalists.C26]; INDIRECT(VLOOKUP([Finalists.G26]; [Extra.$W$2:.$AI$9]; 13; 0)); 0)+2+VLOOKUP([Finalists.G26]; [Extra.$W$2:.$AJ$9]; 14; 0); WHICHROUNDN([Finalists.G26]))))">
            <text:p/>
          </table:table-cell>
          <table:table-cell table:formula="of:=CELL(&quot;ROW&quot;; INDIRECT([.AL25]))" office:value-type="string" office:string-value="" calcext:value-type="error">
            <text:p>#REF!</text:p>
          </table:table-cell>
          <table:table-cell table:formula="of:=CELL(&quot;COL&quot;; INDIRECT([.AL25]))" office:value-type="string" office:string-value="" calcext:value-type="error">
            <text:p>#REF!</text:p>
          </table:table-cell>
          <table:table-cell table:number-columns-repeated="2"/>
          <table:table-cell table:formula="of:=IF([.AR25]=&quot;&quot;; &quot;&quot;; CODE(MID([.AR25]; 1;1))*10000+CODE(MID([.AR25]; 2; 1))*100+CODE(MID([.AR25]; 3; 1)))">
            <text:p/>
          </table:table-cell>
          <table:table-cell table:formula="of:=[.P25]">
            <text:p/>
          </table:table-cell>
          <table:table-cell table:formula="of:=IF([.AR25]=&quot;&quot;; &quot;&quot;; SMALL([.AQ$1:.AQ$50]; ROW()))">
            <text:p/>
          </table:table-cell>
          <table:table-cell table:formula="of:=IF([.AS25]=&quot;&quot;; &quot;&quot;; VLOOKUP([.AS25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6];[.O$6:.O$15];0));&quot;&quot;;IF(COUNTIF(INDIRECT(&quot;M1:M&quot;&amp;ROW()-1);MATCH([.N26];[.O$6:.O$15];0))&gt;0;MATCH([.N26];[.O$6:.O$15];0)+1;MATCH([.N26];[.O$6:.O$15];0)))">
            <text:p/>
          </table:table-cell>
          <table:table-cell table:formula="of:=(COUNTIF([ML.$C$3:.$C$130]; [.P26])+COUNTIF([FL.$C$3:.$C$130]; [.P26]))*1000+ROW()" office:value-type="float" office:value="256026" calcext:value-type="float">
            <text:p>256026</text:p>
          </table:table-cell>
          <table:table-cell/>
          <table:table-cell table:formula="of:=IF(ISNA(VLOOKUP([.T26]; [.R26:.U281]; 4; 0)); &quot;&quot;; VLOOKUP([.T26]; [.R26:.U281]; 4; 0))">
            <text:p/>
          </table:table-cell>
          <table:table-cell/>
          <table:table-cell table:formula="of:=IF(AND([.S26]=0; NOT([.U26]=0)); MAX(INDIRECT(&quot;R1:R&quot;&amp;ROW()-1))+1; &quot;&quot;)">
            <text:p/>
          </table:table-cell>
          <table:table-cell table:formula="of:=IF(COUNTIF(INDIRECT(&quot;U1:U&quot;&amp;ROW()-1); [.U26])&gt;0; 1; 0)" office:value-type="float" office:value="1" calcext:value-type="float">
            <text:p>1</text:p>
          </table:table-cell>
          <table:table-cell table:formula="of:=[.T25]+1" office:value-type="float" office:value="26" calcext:value-type="float">
            <text:p>26</text:p>
          </table:table-cell>
          <table:table-cell table:formula="of:=[ML.C28]" office:value-type="float" office:value="0" calcext:value-type="float">
            <text:p>0</text:p>
          </table:table-cell>
          <table:table-cell table:number-columns-repeated="16"/>
          <table:table-cell table:formula="of:=IF([Finalists.G27]=&quot;&quot;; &quot;&quot;; CONCATENATE(VLOOKUP([Finalists.G27]; [Extra.$W$2:.$AG$9]; 10; 0); ROWOFFSETED(MATCH([Finalists.C27]; INDIRECT(VLOOKUP([Finalists.G27]; [Extra.$W$2:.$AI$9]; 13; 0)); 0)+2+VLOOKUP([Finalists.G27]; [Extra.$W$2:.$AJ$9]; 14; 0); WHICHROUNDN([Finalists.G27]))))">
            <text:p/>
          </table:table-cell>
          <table:table-cell table:formula="of:=CELL(&quot;ROW&quot;; INDIRECT([.AL26]))" office:value-type="string" office:string-value="" calcext:value-type="error">
            <text:p>#REF!</text:p>
          </table:table-cell>
          <table:table-cell table:formula="of:=CELL(&quot;COL&quot;; INDIRECT([.AL26]))" office:value-type="string" office:string-value="" calcext:value-type="error">
            <text:p>#REF!</text:p>
          </table:table-cell>
          <table:table-cell table:number-columns-repeated="2"/>
          <table:table-cell table:formula="of:=IF([.AR26]=&quot;&quot;; &quot;&quot;; CODE(MID([.AR26]; 1;1))*10000+CODE(MID([.AR26]; 2; 1))*100+CODE(MID([.AR26]; 3; 1)))">
            <text:p/>
          </table:table-cell>
          <table:table-cell table:formula="of:=[.P26]">
            <text:p/>
          </table:table-cell>
          <table:table-cell table:formula="of:=IF([.AR26]=&quot;&quot;; &quot;&quot;; SMALL([.AQ$1:.AQ$50]; ROW()))">
            <text:p/>
          </table:table-cell>
          <table:table-cell table:formula="of:=IF([.AS26]=&quot;&quot;; &quot;&quot;; VLOOKUP([.AS26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7];[.O$6:.O$15];0));&quot;&quot;;IF(COUNTIF(INDIRECT(&quot;M1:M&quot;&amp;ROW()-1);MATCH([.N27];[.O$6:.O$15];0))&gt;0;MATCH([.N27];[.O$6:.O$15];0)+1;MATCH([.N27];[.O$6:.O$15];0)))">
            <text:p/>
          </table:table-cell>
          <table:table-cell table:formula="of:=(COUNTIF([ML.$C$3:.$C$130]; [.P27])+COUNTIF([FL.$C$3:.$C$130]; [.P27]))*1000+ROW()" office:value-type="float" office:value="256027" calcext:value-type="float">
            <text:p>256027</text:p>
          </table:table-cell>
          <table:table-cell/>
          <table:table-cell table:formula="of:=IF(ISNA(VLOOKUP([.T27]; [.R27:.U282]; 4; 0)); &quot;&quot;; VLOOKUP([.T27]; [.R27:.U282]; 4; 0))">
            <text:p/>
          </table:table-cell>
          <table:table-cell/>
          <table:table-cell table:formula="of:=IF(AND([.S27]=0; NOT([.U27]=0)); MAX(INDIRECT(&quot;R1:R&quot;&amp;ROW()-1))+1; &quot;&quot;)">
            <text:p/>
          </table:table-cell>
          <table:table-cell table:formula="of:=IF(COUNTIF(INDIRECT(&quot;U1:U&quot;&amp;ROW()-1); [.U27])&gt;0; 1; 0)" office:value-type="float" office:value="1" calcext:value-type="float">
            <text:p>1</text:p>
          </table:table-cell>
          <table:table-cell table:formula="of:=[.T26]+1" office:value-type="float" office:value="27" calcext:value-type="float">
            <text:p>27</text:p>
          </table:table-cell>
          <table:table-cell table:formula="of:=[ML.C29]" office:value-type="float" office:value="0" calcext:value-type="float">
            <text:p>0</text:p>
          </table:table-cell>
          <table:table-cell table:number-columns-repeated="16"/>
          <table:table-cell table:formula="of:=IF([Finalists.G28]=&quot;&quot;; &quot;&quot;; CONCATENATE(VLOOKUP([Finalists.G28]; [Extra.$W$2:.$AG$9]; 10; 0); ROWOFFSETED(MATCH([Finalists.C28]; INDIRECT(VLOOKUP([Finalists.G28]; [Extra.$W$2:.$AI$9]; 13; 0)); 0)+2+VLOOKUP([Finalists.G28]; [Extra.$W$2:.$AJ$9]; 14; 0); WHICHROUNDN([Finalists.G28]))))">
            <text:p/>
          </table:table-cell>
          <table:table-cell table:formula="of:=CELL(&quot;ROW&quot;; INDIRECT([.AL27]))" office:value-type="string" office:string-value="" calcext:value-type="error">
            <text:p>#REF!</text:p>
          </table:table-cell>
          <table:table-cell table:formula="of:=CELL(&quot;COL&quot;; INDIRECT([.AL27]))" office:value-type="string" office:string-value="" calcext:value-type="error">
            <text:p>#REF!</text:p>
          </table:table-cell>
          <table:table-cell table:number-columns-repeated="2"/>
          <table:table-cell table:formula="of:=IF([.AR27]=&quot;&quot;; &quot;&quot;; CODE(MID([.AR27]; 1;1))*10000+CODE(MID([.AR27]; 2; 1))*100+CODE(MID([.AR27]; 3; 1)))">
            <text:p/>
          </table:table-cell>
          <table:table-cell table:formula="of:=[.P27]">
            <text:p/>
          </table:table-cell>
          <table:table-cell table:formula="of:=IF([.AR27]=&quot;&quot;; &quot;&quot;; SMALL([.AQ$1:.AQ$50]; ROW()))">
            <text:p/>
          </table:table-cell>
          <table:table-cell table:formula="of:=IF([.AS27]=&quot;&quot;; &quot;&quot;; VLOOKUP([.AS27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8];[.O$6:.O$15];0));&quot;&quot;;IF(COUNTIF(INDIRECT(&quot;M1:M&quot;&amp;ROW()-1);MATCH([.N28];[.O$6:.O$15];0))&gt;0;MATCH([.N28];[.O$6:.O$15];0)+1;MATCH([.N28];[.O$6:.O$15];0)))">
            <text:p/>
          </table:table-cell>
          <table:table-cell table:formula="of:=(COUNTIF([ML.$C$3:.$C$130]; [.P28])+COUNTIF([FL.$C$3:.$C$130]; [.P28]))*1000+ROW()" office:value-type="float" office:value="256028" calcext:value-type="float">
            <text:p>256028</text:p>
          </table:table-cell>
          <table:table-cell/>
          <table:table-cell table:formula="of:=IF(ISNA(VLOOKUP([.T28]; [.R28:.U283]; 4; 0)); &quot;&quot;; VLOOKUP([.T28]; [.R28:.U283]; 4; 0))">
            <text:p/>
          </table:table-cell>
          <table:table-cell/>
          <table:table-cell table:formula="of:=IF(AND([.S28]=0; NOT([.U28]=0)); MAX(INDIRECT(&quot;R1:R&quot;&amp;ROW()-1))+1; &quot;&quot;)">
            <text:p/>
          </table:table-cell>
          <table:table-cell table:formula="of:=IF(COUNTIF(INDIRECT(&quot;U1:U&quot;&amp;ROW()-1); [.U28])&gt;0; 1; 0)" office:value-type="float" office:value="1" calcext:value-type="float">
            <text:p>1</text:p>
          </table:table-cell>
          <table:table-cell table:formula="of:=[.T27]+1" office:value-type="float" office:value="28" calcext:value-type="float">
            <text:p>28</text:p>
          </table:table-cell>
          <table:table-cell table:formula="of:=[ML.C30]" office:value-type="float" office:value="0" calcext:value-type="float">
            <text:p>0</text:p>
          </table:table-cell>
          <table:table-cell table:number-columns-repeated="16"/>
          <table:table-cell table:formula="of:=IF([Finalists.G29]=&quot;&quot;; &quot;&quot;; CONCATENATE(VLOOKUP([Finalists.G29]; [Extra.$W$2:.$AG$9]; 10; 0); ROWOFFSETED(MATCH([Finalists.C29]; INDIRECT(VLOOKUP([Finalists.G29]; [Extra.$W$2:.$AI$9]; 13; 0)); 0)+2+VLOOKUP([Finalists.G29]; [Extra.$W$2:.$AJ$9]; 14; 0); WHICHROUNDN([Finalists.G29]))))">
            <text:p/>
          </table:table-cell>
          <table:table-cell table:formula="of:=CELL(&quot;ROW&quot;; INDIRECT([.AL28]))" office:value-type="string" office:string-value="" calcext:value-type="error">
            <text:p>#REF!</text:p>
          </table:table-cell>
          <table:table-cell table:formula="of:=CELL(&quot;COL&quot;; INDIRECT([.AL28]))" office:value-type="string" office:string-value="" calcext:value-type="error">
            <text:p>#REF!</text:p>
          </table:table-cell>
          <table:table-cell table:number-columns-repeated="2"/>
          <table:table-cell table:formula="of:=IF([.AR28]=&quot;&quot;; &quot;&quot;; CODE(MID([.AR28]; 1;1))*10000+CODE(MID([.AR28]; 2; 1))*100+CODE(MID([.AR28]; 3; 1)))">
            <text:p/>
          </table:table-cell>
          <table:table-cell table:formula="of:=[.P28]">
            <text:p/>
          </table:table-cell>
          <table:table-cell table:formula="of:=IF([.AR28]=&quot;&quot;; &quot;&quot;; SMALL([.AQ$1:.AQ$50]; ROW()))">
            <text:p/>
          </table:table-cell>
          <table:table-cell table:formula="of:=IF([.AS28]=&quot;&quot;; &quot;&quot;; VLOOKUP([.AS28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29];[.O$6:.O$15];0));&quot;&quot;;IF(COUNTIF(INDIRECT(&quot;M1:M&quot;&amp;ROW()-1);MATCH([.N29];[.O$6:.O$15];0))&gt;0;MATCH([.N29];[.O$6:.O$15];0)+1;MATCH([.N29];[.O$6:.O$15];0)))">
            <text:p/>
          </table:table-cell>
          <table:table-cell table:formula="of:=(COUNTIF([ML.$C$3:.$C$130]; [.P29])+COUNTIF([FL.$C$3:.$C$130]; [.P29]))*1000+ROW()" office:value-type="float" office:value="256029" calcext:value-type="float">
            <text:p>256029</text:p>
          </table:table-cell>
          <table:table-cell/>
          <table:table-cell table:formula="of:=IF(ISNA(VLOOKUP([.T29]; [.R29:.U284]; 4; 0)); &quot;&quot;; VLOOKUP([.T29]; [.R29:.U284]; 4; 0))">
            <text:p/>
          </table:table-cell>
          <table:table-cell/>
          <table:table-cell table:formula="of:=IF(AND([.S29]=0; NOT([.U29]=0)); MAX(INDIRECT(&quot;R1:R&quot;&amp;ROW()-1))+1; &quot;&quot;)">
            <text:p/>
          </table:table-cell>
          <table:table-cell table:formula="of:=IF(COUNTIF(INDIRECT(&quot;U1:U&quot;&amp;ROW()-1); [.U29])&gt;0; 1; 0)" office:value-type="float" office:value="1" calcext:value-type="float">
            <text:p>1</text:p>
          </table:table-cell>
          <table:table-cell table:formula="of:=[.T28]+1" office:value-type="float" office:value="29" calcext:value-type="float">
            <text:p>29</text:p>
          </table:table-cell>
          <table:table-cell table:formula="of:=[ML.C31]" office:value-type="float" office:value="0" calcext:value-type="float">
            <text:p>0</text:p>
          </table:table-cell>
          <table:table-cell table:number-columns-repeated="16"/>
          <table:table-cell table:formula="of:=IF([Finalists.G30]=&quot;&quot;; &quot;&quot;; CONCATENATE(VLOOKUP([Finalists.G30]; [Extra.$W$2:.$AG$9]; 10; 0); ROWOFFSETED(MATCH([Finalists.C30]; INDIRECT(VLOOKUP([Finalists.G30]; [Extra.$W$2:.$AI$9]; 13; 0)); 0)+2+VLOOKUP([Finalists.G30]; [Extra.$W$2:.$AJ$9]; 14; 0); WHICHROUNDN([Finalists.G30]))))">
            <text:p/>
          </table:table-cell>
          <table:table-cell table:formula="of:=CELL(&quot;ROW&quot;; INDIRECT([.AL29]))" office:value-type="string" office:string-value="" calcext:value-type="error">
            <text:p>#REF!</text:p>
          </table:table-cell>
          <table:table-cell table:formula="of:=CELL(&quot;COL&quot;; INDIRECT([.AL29]))" office:value-type="string" office:string-value="" calcext:value-type="error">
            <text:p>#REF!</text:p>
          </table:table-cell>
          <table:table-cell table:number-columns-repeated="2"/>
          <table:table-cell table:formula="of:=IF([.AR29]=&quot;&quot;; &quot;&quot;; CODE(MID([.AR29]; 1;1))*10000+CODE(MID([.AR29]; 2; 1))*100+CODE(MID([.AR29]; 3; 1)))">
            <text:p/>
          </table:table-cell>
          <table:table-cell table:formula="of:=[.P29]">
            <text:p/>
          </table:table-cell>
          <table:table-cell table:formula="of:=IF([.AR29]=&quot;&quot;; &quot;&quot;; SMALL([.AQ$1:.AQ$50]; ROW()))">
            <text:p/>
          </table:table-cell>
          <table:table-cell table:formula="of:=IF([.AS29]=&quot;&quot;; &quot;&quot;; VLOOKUP([.AS29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0];[.O$6:.O$15];0));&quot;&quot;;IF(COUNTIF(INDIRECT(&quot;M1:M&quot;&amp;ROW()-1);MATCH([.N30];[.O$6:.O$15];0))&gt;0;MATCH([.N30];[.O$6:.O$15];0)+1;MATCH([.N30];[.O$6:.O$15];0)))">
            <text:p/>
          </table:table-cell>
          <table:table-cell table:formula="of:=(COUNTIF([ML.$C$3:.$C$130]; [.P30])+COUNTIF([FL.$C$3:.$C$130]; [.P30]))*1000+ROW()" office:value-type="float" office:value="256030" calcext:value-type="float">
            <text:p>256030</text:p>
          </table:table-cell>
          <table:table-cell/>
          <table:table-cell table:formula="of:=IF(ISNA(VLOOKUP([.T30]; [.R30:.U285]; 4; 0)); &quot;&quot;; VLOOKUP([.T30]; [.R30:.U285]; 4; 0))">
            <text:p/>
          </table:table-cell>
          <table:table-cell/>
          <table:table-cell table:formula="of:=IF(AND([.S30]=0; NOT([.U30]=0)); MAX(INDIRECT(&quot;R1:R&quot;&amp;ROW()-1))+1; &quot;&quot;)">
            <text:p/>
          </table:table-cell>
          <table:table-cell table:formula="of:=IF(COUNTIF(INDIRECT(&quot;U1:U&quot;&amp;ROW()-1); [.U30])&gt;0; 1; 0)" office:value-type="float" office:value="1" calcext:value-type="float">
            <text:p>1</text:p>
          </table:table-cell>
          <table:table-cell table:formula="of:=[.T29]+1" office:value-type="float" office:value="30" calcext:value-type="float">
            <text:p>30</text:p>
          </table:table-cell>
          <table:table-cell table:formula="of:=[ML.C32]" office:value-type="float" office:value="0" calcext:value-type="float">
            <text:p>0</text:p>
          </table:table-cell>
          <table:table-cell table:number-columns-repeated="16"/>
          <table:table-cell table:formula="of:=IF([Finalists.G31]=&quot;&quot;; &quot;&quot;; CONCATENATE(VLOOKUP([Finalists.G31]; [Extra.$W$2:.$AG$9]; 10; 0); ROWOFFSETED(MATCH([Finalists.C31]; INDIRECT(VLOOKUP([Finalists.G31]; [Extra.$W$2:.$AI$9]; 13; 0)); 0)+2+VLOOKUP([Finalists.G31]; [Extra.$W$2:.$AJ$9]; 14; 0); WHICHROUNDN([Finalists.G31]))))">
            <text:p/>
          </table:table-cell>
          <table:table-cell table:formula="of:=CELL(&quot;ROW&quot;; INDIRECT([.AL30]))" office:value-type="string" office:string-value="" calcext:value-type="error">
            <text:p>#REF!</text:p>
          </table:table-cell>
          <table:table-cell table:formula="of:=CELL(&quot;COL&quot;; INDIRECT([.AL30]))" office:value-type="string" office:string-value="" calcext:value-type="error">
            <text:p>#REF!</text:p>
          </table:table-cell>
          <table:table-cell table:formula="of:=MATCH([Finalists.C31]; INDIRECT(VLOOKUP([Finalists.G31]; [Extra.$W$2:.$AI$9]; 13; 0)); 0)" office:value-type="string" office:string-value="" calcext:value-type="error">
            <text:p>#N/A</text:p>
          </table:table-cell>
          <table:table-cell/>
          <table:table-cell table:formula="of:=IF([.AR30]=&quot;&quot;; &quot;&quot;; CODE(MID([.AR30]; 1;1))*10000+CODE(MID([.AR30]; 2; 1))*100+CODE(MID([.AR30]; 3; 1)))">
            <text:p/>
          </table:table-cell>
          <table:table-cell table:formula="of:=[.P30]">
            <text:p/>
          </table:table-cell>
          <table:table-cell table:formula="of:=IF([.AR30]=&quot;&quot;; &quot;&quot;; SMALL([.AQ$1:.AQ$50]; ROW()))">
            <text:p/>
          </table:table-cell>
          <table:table-cell table:formula="of:=IF([.AS30]=&quot;&quot;; &quot;&quot;; VLOOKUP([.AS30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1];[.O$6:.O$15];0));&quot;&quot;;IF(COUNTIF(INDIRECT(&quot;M1:M&quot;&amp;ROW()-1);MATCH([.N31];[.O$6:.O$15];0))&gt;0;MATCH([.N31];[.O$6:.O$15];0)+1;MATCH([.N31];[.O$6:.O$15];0)))">
            <text:p/>
          </table:table-cell>
          <table:table-cell table:formula="of:=(COUNTIF([ML.$C$3:.$C$130]; [.P31])+COUNTIF([FL.$C$3:.$C$130]; [.P31]))*1000+ROW()" office:value-type="float" office:value="256031" calcext:value-type="float">
            <text:p>256031</text:p>
          </table:table-cell>
          <table:table-cell/>
          <table:table-cell table:formula="of:=IF(ISNA(VLOOKUP([.T31]; [.R31:.U286]; 4; 0)); &quot;&quot;; VLOOKUP([.T31]; [.R31:.U286]; 4; 0))">
            <text:p/>
          </table:table-cell>
          <table:table-cell/>
          <table:table-cell table:formula="of:=IF(AND([.S31]=0; NOT([.U31]=0)); MAX(INDIRECT(&quot;R1:R&quot;&amp;ROW()-1))+1; &quot;&quot;)">
            <text:p/>
          </table:table-cell>
          <table:table-cell table:formula="of:=IF(COUNTIF(INDIRECT(&quot;U1:U&quot;&amp;ROW()-1); [.U31])&gt;0; 1; 0)" office:value-type="float" office:value="1" calcext:value-type="float">
            <text:p>1</text:p>
          </table:table-cell>
          <table:table-cell table:formula="of:=[.T30]+1" office:value-type="float" office:value="31" calcext:value-type="float">
            <text:p>31</text:p>
          </table:table-cell>
          <table:table-cell table:formula="of:=[ML.C33]" office:value-type="float" office:value="0" calcext:value-type="float">
            <text:p>0</text:p>
          </table:table-cell>
          <table:table-cell table:number-columns-repeated="16"/>
          <table:table-cell table:formula="of:=IF([Finalists.G32]=&quot;&quot;; &quot;&quot;; CONCATENATE(VLOOKUP([Finalists.G32]; [Extra.$W$2:.$AG$9]; 10; 0); ROWOFFSETED(MATCH([Finalists.C32]; INDIRECT(VLOOKUP([Finalists.G32]; [Extra.$W$2:.$AI$9]; 13; 0)); 0)+2+VLOOKUP([Finalists.G32]; [Extra.$W$2:.$AJ$9]; 14; 0); WHICHROUNDN([Finalists.G32]))))">
            <text:p/>
          </table:table-cell>
          <table:table-cell table:formula="of:=CELL(&quot;ROW&quot;; INDIRECT([.AL31]))" office:value-type="string" office:string-value="" calcext:value-type="error">
            <text:p>#REF!</text:p>
          </table:table-cell>
          <table:table-cell table:formula="of:=CELL(&quot;COL&quot;; INDIRECT([.AL31]))" office:value-type="string" office:string-value="" calcext:value-type="error">
            <text:p>#REF!</text:p>
          </table:table-cell>
          <table:table-cell table:number-columns-repeated="2"/>
          <table:table-cell table:formula="of:=IF([.AR31]=&quot;&quot;; &quot;&quot;; CODE(MID([.AR31]; 1;1))*10000+CODE(MID([.AR31]; 2; 1))*100+CODE(MID([.AR31]; 3; 1)))">
            <text:p/>
          </table:table-cell>
          <table:table-cell table:formula="of:=[.P31]">
            <text:p/>
          </table:table-cell>
          <table:table-cell table:formula="of:=IF([.AR31]=&quot;&quot;; &quot;&quot;; SMALL([.AQ$1:.AQ$50]; ROW()))">
            <text:p/>
          </table:table-cell>
          <table:table-cell table:formula="of:=IF([.AS31]=&quot;&quot;; &quot;&quot;; VLOOKUP([.AS31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2];[.O$6:.O$15];0));&quot;&quot;;IF(COUNTIF(INDIRECT(&quot;M1:M&quot;&amp;ROW()-1);MATCH([.N32];[.O$6:.O$15];0))&gt;0;MATCH([.N32];[.O$6:.O$15];0)+1;MATCH([.N32];[.O$6:.O$15];0)))">
            <text:p/>
          </table:table-cell>
          <table:table-cell table:formula="of:=(COUNTIF([ML.$C$3:.$C$130]; [.P32])+COUNTIF([FL.$C$3:.$C$130]; [.P32]))*1000+ROW()" office:value-type="float" office:value="256032" calcext:value-type="float">
            <text:p>256032</text:p>
          </table:table-cell>
          <table:table-cell/>
          <table:table-cell table:formula="of:=IF(ISNA(VLOOKUP([.T32]; [.R32:.U287]; 4; 0)); &quot;&quot;; VLOOKUP([.T32]; [.R32:.U287]; 4; 0))">
            <text:p/>
          </table:table-cell>
          <table:table-cell/>
          <table:table-cell table:formula="of:=IF(AND([.S32]=0; NOT([.U32]=0)); MAX(INDIRECT(&quot;R1:R&quot;&amp;ROW()-1))+1; &quot;&quot;)">
            <text:p/>
          </table:table-cell>
          <table:table-cell table:formula="of:=IF(COUNTIF(INDIRECT(&quot;U1:U&quot;&amp;ROW()-1); [.U32])&gt;0; 1; 0)" office:value-type="float" office:value="1" calcext:value-type="float">
            <text:p>1</text:p>
          </table:table-cell>
          <table:table-cell table:formula="of:=[.T31]+1" office:value-type="float" office:value="32" calcext:value-type="float">
            <text:p>32</text:p>
          </table:table-cell>
          <table:table-cell table:formula="of:=[ML.C34]" office:value-type="float" office:value="0" calcext:value-type="float">
            <text:p>0</text:p>
          </table:table-cell>
          <table:table-cell table:number-columns-repeated="16"/>
          <table:table-cell table:formula="of:=IF([Finalists.G33]=&quot;&quot;; &quot;&quot;; CONCATENATE(VLOOKUP([Finalists.G33]; [Extra.$W$2:.$AG$9]; 10; 0); ROWOFFSETED(MATCH([Finalists.C33]; INDIRECT(VLOOKUP([Finalists.G33]; [Extra.$W$2:.$AI$9]; 13; 0)); 0)+2+VLOOKUP([Finalists.G33]; [Extra.$W$2:.$AJ$9]; 14; 0); WHICHROUNDN([Finalists.G33]))))">
            <text:p/>
          </table:table-cell>
          <table:table-cell table:formula="of:=CELL(&quot;ROW&quot;; INDIRECT([.AL32]))" office:value-type="string" office:string-value="" calcext:value-type="error">
            <text:p>#REF!</text:p>
          </table:table-cell>
          <table:table-cell table:formula="of:=CELL(&quot;COL&quot;; INDIRECT([.AL32]))" office:value-type="string" office:string-value="" calcext:value-type="error">
            <text:p>#REF!</text:p>
          </table:table-cell>
          <table:table-cell table:number-columns-repeated="2"/>
          <table:table-cell table:formula="of:=IF([.AR32]=&quot;&quot;; &quot;&quot;; CODE(MID([.AR32]; 1;1))*10000+CODE(MID([.AR32]; 2; 1))*100+CODE(MID([.AR32]; 3; 1)))">
            <text:p/>
          </table:table-cell>
          <table:table-cell table:formula="of:=[.P32]">
            <text:p/>
          </table:table-cell>
          <table:table-cell table:formula="of:=IF([.AR32]=&quot;&quot;; &quot;&quot;; SMALL([.AQ$1:.AQ$50]; ROW()))">
            <text:p/>
          </table:table-cell>
          <table:table-cell table:formula="of:=IF([.AS32]=&quot;&quot;; &quot;&quot;; VLOOKUP([.AS32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3];[.O$6:.O$15];0));&quot;&quot;;IF(COUNTIF(INDIRECT(&quot;M1:M&quot;&amp;ROW()-1);MATCH([.N33];[.O$6:.O$15];0))&gt;0;MATCH([.N33];[.O$6:.O$15];0)+1;MATCH([.N33];[.O$6:.O$15];0)))">
            <text:p/>
          </table:table-cell>
          <table:table-cell table:formula="of:=(COUNTIF([ML.$C$3:.$C$130]; [.P33])+COUNTIF([FL.$C$3:.$C$130]; [.P33]))*1000+ROW()" office:value-type="float" office:value="256033" calcext:value-type="float">
            <text:p>256033</text:p>
          </table:table-cell>
          <table:table-cell/>
          <table:table-cell table:formula="of:=IF(ISNA(VLOOKUP([.T33]; [.R33:.U288]; 4; 0)); &quot;&quot;; VLOOKUP([.T33]; [.R33:.U288]; 4; 0))">
            <text:p/>
          </table:table-cell>
          <table:table-cell/>
          <table:table-cell table:formula="of:=IF(AND([.S33]=0; NOT([.U33]=0)); MAX(INDIRECT(&quot;R1:R&quot;&amp;ROW()-1))+1; &quot;&quot;)">
            <text:p/>
          </table:table-cell>
          <table:table-cell table:formula="of:=IF(COUNTIF(INDIRECT(&quot;U1:U&quot;&amp;ROW()-1); [.U33])&gt;0; 1; 0)" office:value-type="float" office:value="1" calcext:value-type="float">
            <text:p>1</text:p>
          </table:table-cell>
          <table:table-cell table:formula="of:=[.T32]+1" office:value-type="float" office:value="33" calcext:value-type="float">
            <text:p>33</text:p>
          </table:table-cell>
          <table:table-cell table:formula="of:=[ML.C35]" office:value-type="float" office:value="0" calcext:value-type="float">
            <text:p>0</text:p>
          </table:table-cell>
          <table:table-cell table:number-columns-repeated="16"/>
          <table:table-cell table:formula="of:=IF([Finalists.G34]=&quot;&quot;; &quot;&quot;; CONCATENATE(VLOOKUP([Finalists.G34]; [Extra.$W$2:.$AG$9]; 10; 0); ROWOFFSETED(MATCH([Finalists.C34]; INDIRECT(VLOOKUP([Finalists.G34]; [Extra.$W$2:.$AI$9]; 13; 0)); 0)+2+VLOOKUP([Finalists.G34]; [Extra.$W$2:.$AJ$9]; 14; 0); WHICHROUNDN([Finalists.G34]))))">
            <text:p/>
          </table:table-cell>
          <table:table-cell table:formula="of:=CELL(&quot;ROW&quot;; INDIRECT([.AL33]))" office:value-type="string" office:string-value="" calcext:value-type="error">
            <text:p>#REF!</text:p>
          </table:table-cell>
          <table:table-cell table:formula="of:=CELL(&quot;COL&quot;; INDIRECT([.AL33]))" office:value-type="string" office:string-value="" calcext:value-type="error">
            <text:p>#REF!</text:p>
          </table:table-cell>
          <table:table-cell table:number-columns-repeated="2"/>
          <table:table-cell table:formula="of:=IF([.AR33]=&quot;&quot;; &quot;&quot;; CODE(MID([.AR33]; 1;1))*10000+CODE(MID([.AR33]; 2; 1))*100+CODE(MID([.AR33]; 3; 1)))">
            <text:p/>
          </table:table-cell>
          <table:table-cell table:formula="of:=[.P33]">
            <text:p/>
          </table:table-cell>
          <table:table-cell table:formula="of:=IF([.AR33]=&quot;&quot;; &quot;&quot;; SMALL([.AQ$1:.AQ$50]; ROW()))">
            <text:p/>
          </table:table-cell>
          <table:table-cell table:formula="of:=IF([.AS33]=&quot;&quot;; &quot;&quot;; VLOOKUP([.AS33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4];[.O$6:.O$15];0));&quot;&quot;;IF(COUNTIF(INDIRECT(&quot;M1:M&quot;&amp;ROW()-1);MATCH([.N34];[.O$6:.O$15];0))&gt;0;MATCH([.N34];[.O$6:.O$15];0)+1;MATCH([.N34];[.O$6:.O$15];0)))">
            <text:p/>
          </table:table-cell>
          <table:table-cell table:formula="of:=(COUNTIF([ML.$C$3:.$C$130]; [.P34])+COUNTIF([FL.$C$3:.$C$130]; [.P34]))*1000+ROW()" office:value-type="float" office:value="256034" calcext:value-type="float">
            <text:p>256034</text:p>
          </table:table-cell>
          <table:table-cell/>
          <table:table-cell table:formula="of:=IF(ISNA(VLOOKUP([.T34]; [.R34:.U289]; 4; 0)); &quot;&quot;; VLOOKUP([.T34]; [.R34:.U289]; 4; 0))">
            <text:p/>
          </table:table-cell>
          <table:table-cell/>
          <table:table-cell table:formula="of:=IF(AND([.S34]=0; NOT([.U34]=0)); MAX(INDIRECT(&quot;R1:R&quot;&amp;ROW()-1))+1; &quot;&quot;)">
            <text:p/>
          </table:table-cell>
          <table:table-cell table:formula="of:=IF(COUNTIF(INDIRECT(&quot;U1:U&quot;&amp;ROW()-1); [.U34])&gt;0; 1; 0)" office:value-type="float" office:value="1" calcext:value-type="float">
            <text:p>1</text:p>
          </table:table-cell>
          <table:table-cell table:formula="of:=[.T33]+1" office:value-type="float" office:value="34" calcext:value-type="float">
            <text:p>34</text:p>
          </table:table-cell>
          <table:table-cell table:formula="of:=[ML.C36]" office:value-type="float" office:value="0" calcext:value-type="float">
            <text:p>0</text:p>
          </table:table-cell>
          <table:table-cell table:number-columns-repeated="21"/>
          <table:table-cell table:formula="of:=IF([.AR34]=&quot;&quot;; &quot;&quot;; CODE(MID([.AR34]; 1;1))*10000+CODE(MID([.AR34]; 2; 1))*100+CODE(MID([.AR34]; 3; 1)))">
            <text:p/>
          </table:table-cell>
          <table:table-cell table:formula="of:=[.P34]">
            <text:p/>
          </table:table-cell>
          <table:table-cell table:formula="of:=IF([.AR34]=&quot;&quot;; &quot;&quot;; SMALL([.AQ$1:.AQ$50]; ROW()))">
            <text:p/>
          </table:table-cell>
          <table:table-cell table:formula="of:=IF([.AS34]=&quot;&quot;; &quot;&quot;; VLOOKUP([.AS34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5];[.O$6:.O$15];0));&quot;&quot;;IF(COUNTIF(INDIRECT(&quot;M1:M&quot;&amp;ROW()-1);MATCH([.N35];[.O$6:.O$15];0))&gt;0;MATCH([.N35];[.O$6:.O$15];0)+1;MATCH([.N35];[.O$6:.O$15];0)))">
            <text:p/>
          </table:table-cell>
          <table:table-cell table:formula="of:=(COUNTIF([ML.$C$3:.$C$130]; [.P35])+COUNTIF([FL.$C$3:.$C$130]; [.P35]))*1000+ROW()" office:value-type="float" office:value="256035" calcext:value-type="float">
            <text:p>256035</text:p>
          </table:table-cell>
          <table:table-cell/>
          <table:table-cell table:formula="of:=IF(ISNA(VLOOKUP([.T35]; [.R35:.U290]; 4; 0)); &quot;&quot;; VLOOKUP([.T35]; [.R35:.U290]; 4; 0))">
            <text:p/>
          </table:table-cell>
          <table:table-cell/>
          <table:table-cell table:formula="of:=IF(AND([.S35]=0; NOT([.U35]=0)); MAX(INDIRECT(&quot;R1:R&quot;&amp;ROW()-1))+1; &quot;&quot;)">
            <text:p/>
          </table:table-cell>
          <table:table-cell table:formula="of:=IF(COUNTIF(INDIRECT(&quot;U1:U&quot;&amp;ROW()-1); [.U35])&gt;0; 1; 0)" office:value-type="float" office:value="1" calcext:value-type="float">
            <text:p>1</text:p>
          </table:table-cell>
          <table:table-cell table:formula="of:=[.T34]+1" office:value-type="float" office:value="35" calcext:value-type="float">
            <text:p>35</text:p>
          </table:table-cell>
          <table:table-cell table:formula="of:=[ML.C37]" office:value-type="float" office:value="0" calcext:value-type="float">
            <text:p>0</text:p>
          </table:table-cell>
          <table:table-cell table:number-columns-repeated="21"/>
          <table:table-cell table:formula="of:=IF([.AR35]=&quot;&quot;; &quot;&quot;; CODE(MID([.AR35]; 1;1))*10000+CODE(MID([.AR35]; 2; 1))*100+CODE(MID([.AR35]; 3; 1)))">
            <text:p/>
          </table:table-cell>
          <table:table-cell table:formula="of:=[.P35]">
            <text:p/>
          </table:table-cell>
          <table:table-cell table:formula="of:=IF([.AR35]=&quot;&quot;; &quot;&quot;; SMALL([.AQ$1:.AQ$50]; ROW()))">
            <text:p/>
          </table:table-cell>
          <table:table-cell table:formula="of:=IF([.AS35]=&quot;&quot;; &quot;&quot;; VLOOKUP([.AS35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6];[.O$6:.O$15];0));&quot;&quot;;IF(COUNTIF(INDIRECT(&quot;M1:M&quot;&amp;ROW()-1);MATCH([.N36];[.O$6:.O$15];0))&gt;0;MATCH([.N36];[.O$6:.O$15];0)+1;MATCH([.N36];[.O$6:.O$15];0)))">
            <text:p/>
          </table:table-cell>
          <table:table-cell table:formula="of:=(COUNTIF([ML.$C$3:.$C$130]; [.P36])+COUNTIF([FL.$C$3:.$C$130]; [.P36]))*1000+ROW()" office:value-type="float" office:value="256036" calcext:value-type="float">
            <text:p>256036</text:p>
          </table:table-cell>
          <table:table-cell/>
          <table:table-cell table:formula="of:=IF(ISNA(VLOOKUP([.T36]; [.R36:.U291]; 4; 0)); &quot;&quot;; VLOOKUP([.T36]; [.R36:.U291]; 4; 0))">
            <text:p/>
          </table:table-cell>
          <table:table-cell/>
          <table:table-cell table:formula="of:=IF(AND([.S36]=0; NOT([.U36]=0)); MAX(INDIRECT(&quot;R1:R&quot;&amp;ROW()-1))+1; &quot;&quot;)">
            <text:p/>
          </table:table-cell>
          <table:table-cell table:formula="of:=IF(COUNTIF(INDIRECT(&quot;U1:U&quot;&amp;ROW()-1); [.U36])&gt;0; 1; 0)" office:value-type="float" office:value="1" calcext:value-type="float">
            <text:p>1</text:p>
          </table:table-cell>
          <table:table-cell table:formula="of:=[.T35]+1" office:value-type="float" office:value="36" calcext:value-type="float">
            <text:p>36</text:p>
          </table:table-cell>
          <table:table-cell table:formula="of:=[ML.C38]" office:value-type="float" office:value="0" calcext:value-type="float">
            <text:p>0</text:p>
          </table:table-cell>
          <table:table-cell table:number-columns-repeated="21"/>
          <table:table-cell table:formula="of:=IF([.AR36]=&quot;&quot;; &quot;&quot;; CODE(MID([.AR36]; 1;1))*10000+CODE(MID([.AR36]; 2; 1))*100+CODE(MID([.AR36]; 3; 1)))">
            <text:p/>
          </table:table-cell>
          <table:table-cell table:formula="of:=[.P36]">
            <text:p/>
          </table:table-cell>
          <table:table-cell table:formula="of:=IF([.AR36]=&quot;&quot;; &quot;&quot;; SMALL([.AQ$1:.AQ$50]; ROW()))">
            <text:p/>
          </table:table-cell>
          <table:table-cell table:formula="of:=IF([.AS36]=&quot;&quot;; &quot;&quot;; VLOOKUP([.AS36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7];[.O$6:.O$15];0));&quot;&quot;;IF(COUNTIF(INDIRECT(&quot;M1:M&quot;&amp;ROW()-1);MATCH([.N37];[.O$6:.O$15];0))&gt;0;MATCH([.N37];[.O$6:.O$15];0)+1;MATCH([.N37];[.O$6:.O$15];0)))">
            <text:p/>
          </table:table-cell>
          <table:table-cell table:formula="of:=(COUNTIF([ML.$C$3:.$C$130]; [.P37])+COUNTIF([FL.$C$3:.$C$130]; [.P37]))*1000+ROW()" office:value-type="float" office:value="256037" calcext:value-type="float">
            <text:p>256037</text:p>
          </table:table-cell>
          <table:table-cell/>
          <table:table-cell table:formula="of:=IF(ISNA(VLOOKUP([.T37]; [.R37:.U292]; 4; 0)); &quot;&quot;; VLOOKUP([.T37]; [.R37:.U292]; 4; 0))">
            <text:p/>
          </table:table-cell>
          <table:table-cell/>
          <table:table-cell table:formula="of:=IF(AND([.S37]=0; NOT([.U37]=0)); MAX(INDIRECT(&quot;R1:R&quot;&amp;ROW()-1))+1; &quot;&quot;)">
            <text:p/>
          </table:table-cell>
          <table:table-cell table:formula="of:=IF(COUNTIF(INDIRECT(&quot;U1:U&quot;&amp;ROW()-1); [.U37])&gt;0; 1; 0)" office:value-type="float" office:value="1" calcext:value-type="float">
            <text:p>1</text:p>
          </table:table-cell>
          <table:table-cell table:formula="of:=[.T36]+1" office:value-type="float" office:value="37" calcext:value-type="float">
            <text:p>37</text:p>
          </table:table-cell>
          <table:table-cell table:formula="of:=[ML.C39]" office:value-type="float" office:value="0" calcext:value-type="float">
            <text:p>0</text:p>
          </table:table-cell>
          <table:table-cell table:number-columns-repeated="21"/>
          <table:table-cell table:formula="of:=IF([.AR37]=&quot;&quot;; &quot;&quot;; CODE(MID([.AR37]; 1;1))*10000+CODE(MID([.AR37]; 2; 1))*100+CODE(MID([.AR37]; 3; 1)))">
            <text:p/>
          </table:table-cell>
          <table:table-cell table:formula="of:=[.P37]">
            <text:p/>
          </table:table-cell>
          <table:table-cell table:formula="of:=IF([.AR37]=&quot;&quot;; &quot;&quot;; SMALL([.AQ$1:.AQ$50]; ROW()))">
            <text:p/>
          </table:table-cell>
          <table:table-cell table:formula="of:=IF([.AS37]=&quot;&quot;; &quot;&quot;; VLOOKUP([.AS37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8];[.O$6:.O$15];0));&quot;&quot;;IF(COUNTIF(INDIRECT(&quot;M1:M&quot;&amp;ROW()-1);MATCH([.N38];[.O$6:.O$15];0))&gt;0;MATCH([.N38];[.O$6:.O$15];0)+1;MATCH([.N38];[.O$6:.O$15];0)))">
            <text:p/>
          </table:table-cell>
          <table:table-cell table:formula="of:=(COUNTIF([ML.$C$3:.$C$130]; [.P38])+COUNTIF([FL.$C$3:.$C$130]; [.P38]))*1000+ROW()" office:value-type="float" office:value="256038" calcext:value-type="float">
            <text:p>256038</text:p>
          </table:table-cell>
          <table:table-cell/>
          <table:table-cell table:formula="of:=IF(ISNA(VLOOKUP([.T38]; [.R38:.U293]; 4; 0)); &quot;&quot;; VLOOKUP([.T38]; [.R38:.U293]; 4; 0))">
            <text:p/>
          </table:table-cell>
          <table:table-cell/>
          <table:table-cell table:formula="of:=IF(AND([.S38]=0; NOT([.U38]=0)); MAX(INDIRECT(&quot;R1:R&quot;&amp;ROW()-1))+1; &quot;&quot;)">
            <text:p/>
          </table:table-cell>
          <table:table-cell table:formula="of:=IF(COUNTIF(INDIRECT(&quot;U1:U&quot;&amp;ROW()-1); [.U38])&gt;0; 1; 0)" office:value-type="float" office:value="1" calcext:value-type="float">
            <text:p>1</text:p>
          </table:table-cell>
          <table:table-cell table:formula="of:=[.T37]+1" office:value-type="float" office:value="38" calcext:value-type="float">
            <text:p>38</text:p>
          </table:table-cell>
          <table:table-cell table:formula="of:=[ML.C40]" office:value-type="float" office:value="0" calcext:value-type="float">
            <text:p>0</text:p>
          </table:table-cell>
          <table:table-cell table:number-columns-repeated="21"/>
          <table:table-cell table:formula="of:=IF([.AR38]=&quot;&quot;; &quot;&quot;; CODE(MID([.AR38]; 1;1))*10000+CODE(MID([.AR38]; 2; 1))*100+CODE(MID([.AR38]; 3; 1)))">
            <text:p/>
          </table:table-cell>
          <table:table-cell table:formula="of:=[.P38]">
            <text:p/>
          </table:table-cell>
          <table:table-cell table:formula="of:=IF([.AR38]=&quot;&quot;; &quot;&quot;; SMALL([.AQ$1:.AQ$50]; ROW()))">
            <text:p/>
          </table:table-cell>
          <table:table-cell table:formula="of:=IF([.AS38]=&quot;&quot;; &quot;&quot;; VLOOKUP([.AS38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39];[.O$6:.O$15];0));&quot;&quot;;IF(COUNTIF(INDIRECT(&quot;M1:M&quot;&amp;ROW()-1);MATCH([.N39];[.O$6:.O$15];0))&gt;0;MATCH([.N39];[.O$6:.O$15];0)+1;MATCH([.N39];[.O$6:.O$15];0)))">
            <text:p/>
          </table:table-cell>
          <table:table-cell table:formula="of:=(COUNTIF([ML.$C$3:.$C$130]; [.P39])+COUNTIF([FL.$C$3:.$C$130]; [.P39]))*1000+ROW()" office:value-type="float" office:value="256039" calcext:value-type="float">
            <text:p>256039</text:p>
          </table:table-cell>
          <table:table-cell/>
          <table:table-cell table:formula="of:=IF(ISNA(VLOOKUP([.T39]; [.R39:.U294]; 4; 0)); &quot;&quot;; VLOOKUP([.T39]; [.R39:.U294]; 4; 0))">
            <text:p/>
          </table:table-cell>
          <table:table-cell/>
          <table:table-cell table:formula="of:=IF(AND([.S39]=0; NOT([.U39]=0)); MAX(INDIRECT(&quot;R1:R&quot;&amp;ROW()-1))+1; &quot;&quot;)">
            <text:p/>
          </table:table-cell>
          <table:table-cell table:formula="of:=IF(COUNTIF(INDIRECT(&quot;U1:U&quot;&amp;ROW()-1); [.U39])&gt;0; 1; 0)" office:value-type="float" office:value="1" calcext:value-type="float">
            <text:p>1</text:p>
          </table:table-cell>
          <table:table-cell table:formula="of:=[.T38]+1" office:value-type="float" office:value="39" calcext:value-type="float">
            <text:p>39</text:p>
          </table:table-cell>
          <table:table-cell table:formula="of:=[ML.C41]" office:value-type="float" office:value="0" calcext:value-type="float">
            <text:p>0</text:p>
          </table:table-cell>
          <table:table-cell table:number-columns-repeated="21"/>
          <table:table-cell table:formula="of:=IF([.AR39]=&quot;&quot;; &quot;&quot;; CODE(MID([.AR39]; 1;1))*10000+CODE(MID([.AR39]; 2; 1))*100+CODE(MID([.AR39]; 3; 1)))">
            <text:p/>
          </table:table-cell>
          <table:table-cell table:formula="of:=[.P39]">
            <text:p/>
          </table:table-cell>
          <table:table-cell table:formula="of:=IF([.AR39]=&quot;&quot;; &quot;&quot;; SMALL([.AQ$1:.AQ$50]; ROW()))">
            <text:p/>
          </table:table-cell>
          <table:table-cell table:formula="of:=IF([.AS39]=&quot;&quot;; &quot;&quot;; VLOOKUP([.AS39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0];[.O$6:.O$15];0));&quot;&quot;;IF(COUNTIF(INDIRECT(&quot;M1:M&quot;&amp;ROW()-1);MATCH([.N40];[.O$6:.O$15];0))&gt;0;MATCH([.N40];[.O$6:.O$15];0)+1;MATCH([.N40];[.O$6:.O$15];0)))">
            <text:p/>
          </table:table-cell>
          <table:table-cell table:formula="of:=(COUNTIF([ML.$C$3:.$C$130]; [.P40])+COUNTIF([FL.$C$3:.$C$130]; [.P40]))*1000+ROW()" office:value-type="float" office:value="256040" calcext:value-type="float">
            <text:p>256040</text:p>
          </table:table-cell>
          <table:table-cell/>
          <table:table-cell table:formula="of:=IF(ISNA(VLOOKUP([.T40]; [.R40:.U295]; 4; 0)); &quot;&quot;; VLOOKUP([.T40]; [.R40:.U295]; 4; 0))">
            <text:p/>
          </table:table-cell>
          <table:table-cell/>
          <table:table-cell table:formula="of:=IF(AND([.S40]=0; NOT([.U40]=0)); MAX(INDIRECT(&quot;R1:R&quot;&amp;ROW()-1))+1; &quot;&quot;)">
            <text:p/>
          </table:table-cell>
          <table:table-cell table:formula="of:=IF(COUNTIF(INDIRECT(&quot;U1:U&quot;&amp;ROW()-1); [.U40])&gt;0; 1; 0)" office:value-type="float" office:value="1" calcext:value-type="float">
            <text:p>1</text:p>
          </table:table-cell>
          <table:table-cell table:formula="of:=[.T39]+1" office:value-type="float" office:value="40" calcext:value-type="float">
            <text:p>40</text:p>
          </table:table-cell>
          <table:table-cell table:formula="of:=[ML.C42]" office:value-type="float" office:value="0" calcext:value-type="float">
            <text:p>0</text:p>
          </table:table-cell>
          <table:table-cell table:number-columns-repeated="21"/>
          <table:table-cell table:formula="of:=IF([.AR40]=&quot;&quot;; &quot;&quot;; CODE(MID([.AR40]; 1;1))*10000+CODE(MID([.AR40]; 2; 1))*100+CODE(MID([.AR40]; 3; 1)))">
            <text:p/>
          </table:table-cell>
          <table:table-cell table:formula="of:=[.P40]">
            <text:p/>
          </table:table-cell>
          <table:table-cell table:formula="of:=IF([.AR40]=&quot;&quot;; &quot;&quot;; SMALL([.AQ$1:.AQ$50]; ROW()))">
            <text:p/>
          </table:table-cell>
          <table:table-cell table:formula="of:=IF([.AS40]=&quot;&quot;; &quot;&quot;; VLOOKUP([.AS40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1];[.O$6:.O$15];0));&quot;&quot;;IF(COUNTIF(INDIRECT(&quot;M1:M&quot;&amp;ROW()-1);MATCH([.N41];[.O$6:.O$15];0))&gt;0;MATCH([.N41];[.O$6:.O$15];0)+1;MATCH([.N41];[.O$6:.O$15];0)))">
            <text:p/>
          </table:table-cell>
          <table:table-cell table:formula="of:=(COUNTIF([ML.$C$3:.$C$130]; [.P41])+COUNTIF([FL.$C$3:.$C$130]; [.P41]))*1000+ROW()" office:value-type="float" office:value="256041" calcext:value-type="float">
            <text:p>256041</text:p>
          </table:table-cell>
          <table:table-cell/>
          <table:table-cell table:formula="of:=IF(ISNA(VLOOKUP([.T41]; [.R41:.U296]; 4; 0)); &quot;&quot;; VLOOKUP([.T41]; [.R41:.U296]; 4; 0))">
            <text:p/>
          </table:table-cell>
          <table:table-cell/>
          <table:table-cell table:formula="of:=IF(AND([.S41]=0; NOT([.U41]=0)); MAX(INDIRECT(&quot;R1:R&quot;&amp;ROW()-1))+1; &quot;&quot;)">
            <text:p/>
          </table:table-cell>
          <table:table-cell table:formula="of:=IF(COUNTIF(INDIRECT(&quot;U1:U&quot;&amp;ROW()-1); [.U41])&gt;0; 1; 0)" office:value-type="float" office:value="1" calcext:value-type="float">
            <text:p>1</text:p>
          </table:table-cell>
          <table:table-cell table:formula="of:=[.T40]+1" office:value-type="float" office:value="41" calcext:value-type="float">
            <text:p>41</text:p>
          </table:table-cell>
          <table:table-cell table:formula="of:=[ML.C43]" office:value-type="float" office:value="0" calcext:value-type="float">
            <text:p>0</text:p>
          </table:table-cell>
          <table:table-cell table:number-columns-repeated="21"/>
          <table:table-cell table:formula="of:=IF([.AR41]=&quot;&quot;; &quot;&quot;; CODE(MID([.AR41]; 1;1))*10000+CODE(MID([.AR41]; 2; 1))*100+CODE(MID([.AR41]; 3; 1)))">
            <text:p/>
          </table:table-cell>
          <table:table-cell table:formula="of:=[.P41]">
            <text:p/>
          </table:table-cell>
          <table:table-cell table:formula="of:=IF([.AR41]=&quot;&quot;; &quot;&quot;; SMALL([.AQ$1:.AQ$50]; ROW()))">
            <text:p/>
          </table:table-cell>
          <table:table-cell table:formula="of:=IF([.AS41]=&quot;&quot;; &quot;&quot;; VLOOKUP([.AS41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2];[.O$6:.O$15];0));&quot;&quot;;IF(COUNTIF(INDIRECT(&quot;M1:M&quot;&amp;ROW()-1);MATCH([.N42];[.O$6:.O$15];0))&gt;0;MATCH([.N42];[.O$6:.O$15];0)+1;MATCH([.N42];[.O$6:.O$15];0)))">
            <text:p/>
          </table:table-cell>
          <table:table-cell table:formula="of:=(COUNTIF([ML.$C$3:.$C$130]; [.P42])+COUNTIF([FL.$C$3:.$C$130]; [.P42]))*1000+ROW()" office:value-type="float" office:value="256042" calcext:value-type="float">
            <text:p>256042</text:p>
          </table:table-cell>
          <table:table-cell/>
          <table:table-cell table:formula="of:=IF(ISNA(VLOOKUP([.T42]; [.R42:.U297]; 4; 0)); &quot;&quot;; VLOOKUP([.T42]; [.R42:.U297]; 4; 0))">
            <text:p/>
          </table:table-cell>
          <table:table-cell/>
          <table:table-cell table:formula="of:=IF(AND([.S42]=0; NOT([.U42]=0)); MAX(INDIRECT(&quot;R1:R&quot;&amp;ROW()-1))+1; &quot;&quot;)">
            <text:p/>
          </table:table-cell>
          <table:table-cell table:formula="of:=IF(COUNTIF(INDIRECT(&quot;U1:U&quot;&amp;ROW()-1); [.U42])&gt;0; 1; 0)" office:value-type="float" office:value="1" calcext:value-type="float">
            <text:p>1</text:p>
          </table:table-cell>
          <table:table-cell table:formula="of:=[.T41]+1" office:value-type="float" office:value="42" calcext:value-type="float">
            <text:p>42</text:p>
          </table:table-cell>
          <table:table-cell table:formula="of:=[ML.C44]" office:value-type="float" office:value="0" calcext:value-type="float">
            <text:p>0</text:p>
          </table:table-cell>
          <table:table-cell table:number-columns-repeated="21"/>
          <table:table-cell table:formula="of:=IF([.AR42]=&quot;&quot;; &quot;&quot;; CODE(MID([.AR42]; 1;1))*10000+CODE(MID([.AR42]; 2; 1))*100+CODE(MID([.AR42]; 3; 1)))">
            <text:p/>
          </table:table-cell>
          <table:table-cell table:formula="of:=[.P42]">
            <text:p/>
          </table:table-cell>
          <table:table-cell table:formula="of:=IF([.AR42]=&quot;&quot;; &quot;&quot;; SMALL([.AQ$1:.AQ$50]; ROW()))">
            <text:p/>
          </table:table-cell>
          <table:table-cell table:formula="of:=IF([.AS42]=&quot;&quot;; &quot;&quot;; VLOOKUP([.AS42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3];[.O$6:.O$15];0));&quot;&quot;;IF(COUNTIF(INDIRECT(&quot;M1:M&quot;&amp;ROW()-1);MATCH([.N43];[.O$6:.O$15];0))&gt;0;MATCH([.N43];[.O$6:.O$15];0)+1;MATCH([.N43];[.O$6:.O$15];0)))">
            <text:p/>
          </table:table-cell>
          <table:table-cell table:formula="of:=(COUNTIF([ML.$C$3:.$C$130]; [.P43])+COUNTIF([FL.$C$3:.$C$130]; [.P43]))*1000+ROW()" office:value-type="float" office:value="256043" calcext:value-type="float">
            <text:p>256043</text:p>
          </table:table-cell>
          <table:table-cell/>
          <table:table-cell table:formula="of:=IF(ISNA(VLOOKUP([.T43]; [.R43:.U298]; 4; 0)); &quot;&quot;; VLOOKUP([.T43]; [.R43:.U298]; 4; 0))">
            <text:p/>
          </table:table-cell>
          <table:table-cell/>
          <table:table-cell table:formula="of:=IF(AND([.S43]=0; NOT([.U43]=0)); MAX(INDIRECT(&quot;R1:R&quot;&amp;ROW()-1))+1; &quot;&quot;)">
            <text:p/>
          </table:table-cell>
          <table:table-cell table:formula="of:=IF(COUNTIF(INDIRECT(&quot;U1:U&quot;&amp;ROW()-1); [.U43])&gt;0; 1; 0)" office:value-type="float" office:value="1" calcext:value-type="float">
            <text:p>1</text:p>
          </table:table-cell>
          <table:table-cell table:formula="of:=[.T42]+1" office:value-type="float" office:value="43" calcext:value-type="float">
            <text:p>43</text:p>
          </table:table-cell>
          <table:table-cell table:formula="of:=[ML.C45]" office:value-type="float" office:value="0" calcext:value-type="float">
            <text:p>0</text:p>
          </table:table-cell>
          <table:table-cell table:number-columns-repeated="21"/>
          <table:table-cell table:formula="of:=IF([.AR43]=&quot;&quot;; &quot;&quot;; CODE(MID([.AR43]; 1;1))*10000+CODE(MID([.AR43]; 2; 1))*100+CODE(MID([.AR43]; 3; 1)))">
            <text:p/>
          </table:table-cell>
          <table:table-cell table:formula="of:=[.P43]">
            <text:p/>
          </table:table-cell>
          <table:table-cell table:formula="of:=IF([.AR43]=&quot;&quot;; &quot;&quot;; SMALL([.AQ$1:.AQ$50]; ROW()))">
            <text:p/>
          </table:table-cell>
          <table:table-cell table:formula="of:=IF([.AS43]=&quot;&quot;; &quot;&quot;; VLOOKUP([.AS43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4];[.O$6:.O$15];0));&quot;&quot;;IF(COUNTIF(INDIRECT(&quot;M1:M&quot;&amp;ROW()-1);MATCH([.N44];[.O$6:.O$15];0))&gt;0;MATCH([.N44];[.O$6:.O$15];0)+1;MATCH([.N44];[.O$6:.O$15];0)))">
            <text:p/>
          </table:table-cell>
          <table:table-cell table:formula="of:=(COUNTIF([ML.$C$3:.$C$130]; [.P44])+COUNTIF([FL.$C$3:.$C$130]; [.P44]))*1000+ROW()" office:value-type="float" office:value="256044" calcext:value-type="float">
            <text:p>256044</text:p>
          </table:table-cell>
          <table:table-cell/>
          <table:table-cell table:formula="of:=IF(ISNA(VLOOKUP([.T44]; [.R44:.U299]; 4; 0)); &quot;&quot;; VLOOKUP([.T44]; [.R44:.U299]; 4; 0))">
            <text:p/>
          </table:table-cell>
          <table:table-cell/>
          <table:table-cell table:formula="of:=IF(AND([.S44]=0; NOT([.U44]=0)); MAX(INDIRECT(&quot;R1:R&quot;&amp;ROW()-1))+1; &quot;&quot;)">
            <text:p/>
          </table:table-cell>
          <table:table-cell table:formula="of:=IF(COUNTIF(INDIRECT(&quot;U1:U&quot;&amp;ROW()-1); [.U44])&gt;0; 1; 0)" office:value-type="float" office:value="1" calcext:value-type="float">
            <text:p>1</text:p>
          </table:table-cell>
          <table:table-cell table:formula="of:=[.T43]+1" office:value-type="float" office:value="44" calcext:value-type="float">
            <text:p>44</text:p>
          </table:table-cell>
          <table:table-cell table:formula="of:=[ML.C46]" office:value-type="float" office:value="0" calcext:value-type="float">
            <text:p>0</text:p>
          </table:table-cell>
          <table:table-cell table:number-columns-repeated="21"/>
          <table:table-cell table:formula="of:=IF([.AR44]=&quot;&quot;; &quot;&quot;; CODE(MID([.AR44]; 1;1))*10000+CODE(MID([.AR44]; 2; 1))*100+CODE(MID([.AR44]; 3; 1)))">
            <text:p/>
          </table:table-cell>
          <table:table-cell table:formula="of:=[.P44]">
            <text:p/>
          </table:table-cell>
          <table:table-cell table:formula="of:=IF([.AR44]=&quot;&quot;; &quot;&quot;; SMALL([.AQ$1:.AQ$50]; ROW()))">
            <text:p/>
          </table:table-cell>
          <table:table-cell table:formula="of:=IF([.AS44]=&quot;&quot;; &quot;&quot;; VLOOKUP([.AS44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5];[.O$6:.O$15];0));&quot;&quot;;IF(COUNTIF(INDIRECT(&quot;M1:M&quot;&amp;ROW()-1);MATCH([.N45];[.O$6:.O$15];0))&gt;0;MATCH([.N45];[.O$6:.O$15];0)+1;MATCH([.N45];[.O$6:.O$15];0)))">
            <text:p/>
          </table:table-cell>
          <table:table-cell table:formula="of:=(COUNTIF([ML.$C$3:.$C$130]; [.P45])+COUNTIF([FL.$C$3:.$C$130]; [.P45]))*1000+ROW()" office:value-type="float" office:value="256045" calcext:value-type="float">
            <text:p>256045</text:p>
          </table:table-cell>
          <table:table-cell/>
          <table:table-cell table:formula="of:=IF(ISNA(VLOOKUP([.T45]; [.R45:.U300]; 4; 0)); &quot;&quot;; VLOOKUP([.T45]; [.R45:.U300]; 4; 0))">
            <text:p/>
          </table:table-cell>
          <table:table-cell/>
          <table:table-cell table:formula="of:=IF(AND([.S45]=0; NOT([.U45]=0)); MAX(INDIRECT(&quot;R1:R&quot;&amp;ROW()-1))+1; &quot;&quot;)">
            <text:p/>
          </table:table-cell>
          <table:table-cell table:formula="of:=IF(COUNTIF(INDIRECT(&quot;U1:U&quot;&amp;ROW()-1); [.U45])&gt;0; 1; 0)" office:value-type="float" office:value="1" calcext:value-type="float">
            <text:p>1</text:p>
          </table:table-cell>
          <table:table-cell table:formula="of:=[.T44]+1" office:value-type="float" office:value="45" calcext:value-type="float">
            <text:p>45</text:p>
          </table:table-cell>
          <table:table-cell table:formula="of:=[ML.C47]" office:value-type="float" office:value="0" calcext:value-type="float">
            <text:p>0</text:p>
          </table:table-cell>
          <table:table-cell table:number-columns-repeated="21"/>
          <table:table-cell table:formula="of:=IF([.AR45]=&quot;&quot;; &quot;&quot;; CODE(MID([.AR45]; 1;1))*10000+CODE(MID([.AR45]; 2; 1))*100+CODE(MID([.AR45]; 3; 1)))">
            <text:p/>
          </table:table-cell>
          <table:table-cell table:formula="of:=[.P45]">
            <text:p/>
          </table:table-cell>
          <table:table-cell table:formula="of:=IF([.AR45]=&quot;&quot;; &quot;&quot;; SMALL([.AQ$1:.AQ$50]; ROW()))">
            <text:p/>
          </table:table-cell>
          <table:table-cell table:formula="of:=IF([.AS45]=&quot;&quot;; &quot;&quot;; VLOOKUP([.AS45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6];[.O$6:.O$15];0));&quot;&quot;;IF(COUNTIF(INDIRECT(&quot;M1:M&quot;&amp;ROW()-1);MATCH([.N46];[.O$6:.O$15];0))&gt;0;MATCH([.N46];[.O$6:.O$15];0)+1;MATCH([.N46];[.O$6:.O$15];0)))">
            <text:p/>
          </table:table-cell>
          <table:table-cell table:formula="of:=(COUNTIF([ML.$C$3:.$C$130]; [.P46])+COUNTIF([FL.$C$3:.$C$130]; [.P46]))*1000+ROW()" office:value-type="float" office:value="256046" calcext:value-type="float">
            <text:p>256046</text:p>
          </table:table-cell>
          <table:table-cell/>
          <table:table-cell table:formula="of:=IF(ISNA(VLOOKUP([.T46]; [.R46:.U301]; 4; 0)); &quot;&quot;; VLOOKUP([.T46]; [.R46:.U301]; 4; 0))">
            <text:p/>
          </table:table-cell>
          <table:table-cell/>
          <table:table-cell table:formula="of:=IF(AND([.S46]=0; NOT([.U46]=0)); MAX(INDIRECT(&quot;R1:R&quot;&amp;ROW()-1))+1; &quot;&quot;)">
            <text:p/>
          </table:table-cell>
          <table:table-cell table:formula="of:=IF(COUNTIF(INDIRECT(&quot;U1:U&quot;&amp;ROW()-1); [.U46])&gt;0; 1; 0)" office:value-type="float" office:value="1" calcext:value-type="float">
            <text:p>1</text:p>
          </table:table-cell>
          <table:table-cell table:formula="of:=[.T45]+1" office:value-type="float" office:value="46" calcext:value-type="float">
            <text:p>46</text:p>
          </table:table-cell>
          <table:table-cell table:formula="of:=[ML.C48]" office:value-type="float" office:value="0" calcext:value-type="float">
            <text:p>0</text:p>
          </table:table-cell>
          <table:table-cell table:number-columns-repeated="21"/>
          <table:table-cell table:formula="of:=IF([.AR46]=&quot;&quot;; &quot;&quot;; CODE(MID([.AR46]; 1;1))*10000+CODE(MID([.AR46]; 2; 1))*100+CODE(MID([.AR46]; 3; 1)))">
            <text:p/>
          </table:table-cell>
          <table:table-cell table:formula="of:=[.P46]">
            <text:p/>
          </table:table-cell>
          <table:table-cell table:formula="of:=IF([.AR46]=&quot;&quot;; &quot;&quot;; SMALL([.AQ$1:.AQ$50]; ROW()))">
            <text:p/>
          </table:table-cell>
          <table:table-cell table:formula="of:=IF([.AS46]=&quot;&quot;; &quot;&quot;; VLOOKUP([.AS46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7];[.O$6:.O$15];0));&quot;&quot;;IF(COUNTIF(INDIRECT(&quot;M1:M&quot;&amp;ROW()-1);MATCH([.N47];[.O$6:.O$15];0))&gt;0;MATCH([.N47];[.O$6:.O$15];0)+1;MATCH([.N47];[.O$6:.O$15];0)))">
            <text:p/>
          </table:table-cell>
          <table:table-cell table:formula="of:=(COUNTIF([ML.$C$3:.$C$130]; [.P47])+COUNTIF([FL.$C$3:.$C$130]; [.P47]))*1000+ROW()" office:value-type="float" office:value="256047" calcext:value-type="float">
            <text:p>256047</text:p>
          </table:table-cell>
          <table:table-cell/>
          <table:table-cell table:formula="of:=IF(ISNA(VLOOKUP([.T47]; [.R47:.U302]; 4; 0)); &quot;&quot;; VLOOKUP([.T47]; [.R47:.U302]; 4; 0))">
            <text:p/>
          </table:table-cell>
          <table:table-cell/>
          <table:table-cell table:formula="of:=IF(AND([.S47]=0; NOT([.U47]=0)); MAX(INDIRECT(&quot;R1:R&quot;&amp;ROW()-1))+1; &quot;&quot;)">
            <text:p/>
          </table:table-cell>
          <table:table-cell table:formula="of:=IF(COUNTIF(INDIRECT(&quot;U1:U&quot;&amp;ROW()-1); [.U47])&gt;0; 1; 0)" office:value-type="float" office:value="1" calcext:value-type="float">
            <text:p>1</text:p>
          </table:table-cell>
          <table:table-cell table:formula="of:=[.T46]+1" office:value-type="float" office:value="47" calcext:value-type="float">
            <text:p>47</text:p>
          </table:table-cell>
          <table:table-cell table:formula="of:=[ML.C49]" office:value-type="float" office:value="0" calcext:value-type="float">
            <text:p>0</text:p>
          </table:table-cell>
          <table:table-cell table:number-columns-repeated="21"/>
          <table:table-cell table:formula="of:=IF([.AR47]=&quot;&quot;; &quot;&quot;; CODE(MID([.AR47]; 1;1))*10000+CODE(MID([.AR47]; 2; 1))*100+CODE(MID([.AR47]; 3; 1)))">
            <text:p/>
          </table:table-cell>
          <table:table-cell table:formula="of:=[.P47]">
            <text:p/>
          </table:table-cell>
          <table:table-cell table:formula="of:=IF([.AR47]=&quot;&quot;; &quot;&quot;; SMALL([.AQ$1:.AQ$50]; ROW()))">
            <text:p/>
          </table:table-cell>
          <table:table-cell table:formula="of:=IF([.AS47]=&quot;&quot;; &quot;&quot;; VLOOKUP([.AS47]; [.AQ$1:.AR$50]; 2; 0))">
            <text:p/>
          </table:table-cell>
        </table:table-row>
        <table:table-row table:style-name="ro1">
          <table:table-cell table:number-columns-repeated="12"/>
          <table:table-cell table:formula="of:=IF(ISNA(MATCH([.N48];[.O$6:.O$15];0));&quot;&quot;;IF(COUNTIF(INDIRECT(&quot;M1:M&quot;&amp;ROW()-1);MATCH([.N48];[.O$6:.O$15];0))&gt;0;MATCH([.N48];[.O$6:.O$15];0)+1;MATCH([.N48];[.O$6:.O$15];0)))">
            <text:p/>
          </table:table-cell>
          <table:table-cell table:formula="of:=(COUNTIF([ML.$C$3:.$C$130]; [.P48])+COUNTIF([FL.$C$3:.$C$130]; [.P48]))*1000+ROW()" office:value-type="float" office:value="256048" calcext:value-type="float">
            <text:p>256048</text:p>
          </table:table-cell>
          <table:table-cell/>
          <table:table-cell table:formula="of:=IF(ISNA(VLOOKUP([.T48]; [.R48:.U303]; 4; 0)); &quot;&quot;; VLOOKUP([.T48]; [.R48:.U303]; 4; 0))">
            <text:p/>
          </table:table-cell>
          <table:table-cell/>
          <table:table-cell table:formula="of:=IF(AND([.S48]=0; NOT([.U48]=0)); MAX(INDIRECT(&quot;R1:R&quot;&amp;ROW()-1))+1; &quot;&quot;)">
            <text:p/>
          </table:table-cell>
          <table:table-cell table:formula="of:=IF(COUNTIF(INDIRECT(&quot;U1:U&quot;&amp;ROW()-1); [.U48])&gt;0; 1; 0)" office:value-type="float" office:value="1" calcext:value-type="float">
            <text:p>1</text:p>
          </table:table-cell>
          <table:table-cell table:formula="of:=[.T47]+1" office:value-type="float" office:value="48" calcext:value-type="float">
            <text:p>48</text:p>
          </table:table-cell>
          <table:table-cell table:formula="of:=[ML.C50]" office:value-type="float" office:value="0" calcext:value-type="float">
            <text:p>0</text:p>
          </table:table-cell>
          <table:table-cell table:number-columns-repeated="21"/>
          <table:table-cell table:formula="of:=IF([.AR48]=&quot;&quot;; &quot;&quot;; CODE(MID([.AR48]; 1;1))*10000+CODE(MID([.AR48]; 2; 1))*100+CODE(MID([.AR48]; 3; 1)))">
            <text:p/>
          </table:table-cell>
          <table:table-cell table:formula="of:=[.P48]">
            <text:p/>
          </table:table-cell>
          <table:table-cell table:formula="of:=IF([.AR48]=&quot;&quot;; &quot;&quot;; SMALL([.AQ$1:.AQ$50]; ROW()))">
            <text:p/>
          </table:table-cell>
          <table:table-cell table:formula="of:=IF([.AS48]=&quot;&quot;; &quot;&quot;; VLOOKUP([.AS48]; [.AQ$1:.AR$50]; 2; 0))">
            <text:p/>
          </table:table-cell>
        </table:table-row>
        <table:table-row table:style-name="ro1">
          <table:table-cell table:number-columns-repeated="13"/>
          <table:table-cell table:formula="of:=(COUNTIF([ML.$C$3:.$C$130]; [.P49])+COUNTIF([FL.$C$3:.$C$130]; [.P49]))*1000+ROW()" office:value-type="float" office:value="256049" calcext:value-type="float">
            <text:p>256049</text:p>
          </table:table-cell>
          <table:table-cell/>
          <table:table-cell table:formula="of:=IF(ISNA(VLOOKUP([.T49]; [.R49:.U304]; 4; 0)); &quot;&quot;; VLOOKUP([.T49]; [.R49:.U304]; 4; 0))">
            <text:p/>
          </table:table-cell>
          <table:table-cell/>
          <table:table-cell table:formula="of:=IF(AND([.S49]=0; NOT([.U49]=0)); MAX(INDIRECT(&quot;R1:R&quot;&amp;ROW()-1))+1; &quot;&quot;)">
            <text:p/>
          </table:table-cell>
          <table:table-cell table:formula="of:=IF(COUNTIF(INDIRECT(&quot;U1:U&quot;&amp;ROW()-1); [.U49])&gt;0; 1; 0)" office:value-type="float" office:value="1" calcext:value-type="float">
            <text:p>1</text:p>
          </table:table-cell>
          <table:table-cell table:formula="of:=[.T48]+1" office:value-type="float" office:value="49" calcext:value-type="float">
            <text:p>49</text:p>
          </table:table-cell>
          <table:table-cell table:formula="of:=[ML.C51]" office:value-type="float" office:value="0" calcext:value-type="float">
            <text:p>0</text:p>
          </table:table-cell>
          <table:table-cell table:number-columns-repeated="21"/>
          <table:table-cell table:formula="of:=IF([.AR49]=&quot;&quot;; &quot;&quot;; CODE(MID([.AR49]; 1;1))*10000+CODE(MID([.AR49]; 2; 1))*100+CODE(MID([.AR49]; 3; 1)))">
            <text:p/>
          </table:table-cell>
          <table:table-cell table:formula="of:=[.P49]">
            <text:p/>
          </table:table-cell>
          <table:table-cell table:formula="of:=IF([.AR49]=&quot;&quot;; &quot;&quot;; SMALL([.AQ$1:.AQ$50]; ROW()))">
            <text:p/>
          </table:table-cell>
          <table:table-cell table:formula="of:=IF([.AS49]=&quot;&quot;; &quot;&quot;; VLOOKUP([.AS49]; [.AQ$1:.AR$50]; 2; 0))">
            <text:p/>
          </table:table-cell>
        </table:table-row>
        <table:table-row table:style-name="ro1">
          <table:table-cell table:number-columns-repeated="13"/>
          <table:table-cell table:formula="of:=(COUNTIF([ML.$C$3:.$C$130]; [.P50])+COUNTIF([FL.$C$3:.$C$130]; [.P50]))*1000+ROW()" office:value-type="float" office:value="256050" calcext:value-type="float">
            <text:p>256050</text:p>
          </table:table-cell>
          <table:table-cell/>
          <table:table-cell table:formula="of:=IF(ISNA(VLOOKUP([.T50]; [.R50:.U305]; 4; 0)); &quot;&quot;; VLOOKUP([.T50]; [.R50:.U305]; 4; 0))">
            <text:p/>
          </table:table-cell>
          <table:table-cell/>
          <table:table-cell table:formula="of:=IF(AND([.S50]=0; NOT([.U50]=0)); MAX(INDIRECT(&quot;R1:R&quot;&amp;ROW()-1))+1; &quot;&quot;)">
            <text:p/>
          </table:table-cell>
          <table:table-cell table:formula="of:=IF(COUNTIF(INDIRECT(&quot;U1:U&quot;&amp;ROW()-1); [.U50])&gt;0; 1; 0)" office:value-type="float" office:value="1" calcext:value-type="float">
            <text:p>1</text:p>
          </table:table-cell>
          <table:table-cell table:formula="of:=[.T49]+1" office:value-type="float" office:value="50" calcext:value-type="float">
            <text:p>50</text:p>
          </table:table-cell>
          <table:table-cell table:formula="of:=[ML.C52]" office:value-type="float" office:value="0" calcext:value-type="float">
            <text:p>0</text:p>
          </table:table-cell>
          <table:table-cell table:number-columns-repeated="21"/>
          <table:table-cell table:formula="of:=IF([.AR50]=&quot;&quot;; &quot;&quot;; CODE(MID([.AR50]; 1;1))*10000+CODE(MID([.AR50]; 2; 1))*100+CODE(MID([.AR50]; 3; 1)))">
            <text:p/>
          </table:table-cell>
          <table:table-cell table:formula="of:=[.P50]">
            <text:p/>
          </table:table-cell>
          <table:table-cell table:formula="of:=IF([.AR50]=&quot;&quot;; &quot;&quot;; SMALL([.AQ$1:.AQ$50]; ROW()))">
            <text:p/>
          </table:table-cell>
          <table:table-cell table:formula="of:=IF([.AS50]=&quot;&quot;; &quot;&quot;; VLOOKUP([.AS50]; [.AQ$1:.AR$50]; 2; 0))">
            <text:p/>
          </table:table-cell>
        </table:table-row>
        <table:table-row table:style-name="ro1">
          <table:table-cell table:number-columns-repeated="15"/>
          <table:table-cell table:formula="of:=IF(ISNA(VLOOKUP([.T51]; [.R51:.U306]; 4; 0)); &quot;&quot;; VLOOKUP([.T51]; [.R51:.U306]; 4; 0))">
            <text:p/>
          </table:table-cell>
          <table:table-cell/>
          <table:table-cell table:formula="of:=IF(AND([.S51]=0; NOT([.U51]=0)); MAX(INDIRECT(&quot;R1:R&quot;&amp;ROW()-1))+1; &quot;&quot;)">
            <text:p/>
          </table:table-cell>
          <table:table-cell table:formula="of:=IF(COUNTIF(INDIRECT(&quot;U1:U&quot;&amp;ROW()-1); [.U51])&gt;0; 1; 0)" office:value-type="float" office:value="1" calcext:value-type="float">
            <text:p>1</text:p>
          </table:table-cell>
          <table:table-cell table:formula="of:=[.T50]+1" office:value-type="float" office:value="51" calcext:value-type="float">
            <text:p>51</text:p>
          </table:table-cell>
          <table:table-cell table:formula="of:=[ML.C5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52]; [.R52:.U307]; 4; 0)); &quot;&quot;; VLOOKUP([.T52]; [.R52:.U307]; 4; 0))">
            <text:p/>
          </table:table-cell>
          <table:table-cell/>
          <table:table-cell table:formula="of:=IF(AND([.S52]=0; NOT([.U52]=0)); MAX(INDIRECT(&quot;R1:R&quot;&amp;ROW()-1))+1; &quot;&quot;)">
            <text:p/>
          </table:table-cell>
          <table:table-cell table:formula="of:=IF(COUNTIF(INDIRECT(&quot;U1:U&quot;&amp;ROW()-1); [.U52])&gt;0; 1; 0)" office:value-type="float" office:value="1" calcext:value-type="float">
            <text:p>1</text:p>
          </table:table-cell>
          <table:table-cell table:formula="of:=[.T51]+1" office:value-type="float" office:value="52" calcext:value-type="float">
            <text:p>52</text:p>
          </table:table-cell>
          <table:table-cell table:formula="of:=[ML.C5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53]; [.R53:.U308]; 4; 0)); &quot;&quot;; VLOOKUP([.T53]; [.R53:.U308]; 4; 0))">
            <text:p/>
          </table:table-cell>
          <table:table-cell/>
          <table:table-cell table:formula="of:=IF(AND([.S53]=0; NOT([.U53]=0)); MAX(INDIRECT(&quot;R1:R&quot;&amp;ROW()-1))+1; &quot;&quot;)">
            <text:p/>
          </table:table-cell>
          <table:table-cell table:formula="of:=IF(COUNTIF(INDIRECT(&quot;U1:U&quot;&amp;ROW()-1); [.U53])&gt;0; 1; 0)" office:value-type="float" office:value="1" calcext:value-type="float">
            <text:p>1</text:p>
          </table:table-cell>
          <table:table-cell table:formula="of:=[.T52]+1" office:value-type="float" office:value="53" calcext:value-type="float">
            <text:p>53</text:p>
          </table:table-cell>
          <table:table-cell table:formula="of:=[ML.C5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54]; [.R54:.U309]; 4; 0)); &quot;&quot;; VLOOKUP([.T54]; [.R54:.U309]; 4; 0))">
            <text:p/>
          </table:table-cell>
          <table:table-cell/>
          <table:table-cell table:formula="of:=IF(AND([.S54]=0; NOT([.U54]=0)); MAX(INDIRECT(&quot;R1:R&quot;&amp;ROW()-1))+1; &quot;&quot;)">
            <text:p/>
          </table:table-cell>
          <table:table-cell table:formula="of:=IF(COUNTIF(INDIRECT(&quot;U1:U&quot;&amp;ROW()-1); [.U54])&gt;0; 1; 0)" office:value-type="float" office:value="1" calcext:value-type="float">
            <text:p>1</text:p>
          </table:table-cell>
          <table:table-cell table:formula="of:=[.T53]+1" office:value-type="float" office:value="54" calcext:value-type="float">
            <text:p>54</text:p>
          </table:table-cell>
          <table:table-cell table:formula="of:=[ML.C5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55]; [.R55:.U310]; 4; 0)); &quot;&quot;; VLOOKUP([.T55]; [.R55:.U310]; 4; 0))">
            <text:p/>
          </table:table-cell>
          <table:table-cell/>
          <table:table-cell table:formula="of:=IF(AND([.S55]=0; NOT([.U55]=0)); MAX(INDIRECT(&quot;R1:R&quot;&amp;ROW()-1))+1; &quot;&quot;)">
            <text:p/>
          </table:table-cell>
          <table:table-cell table:formula="of:=IF(COUNTIF(INDIRECT(&quot;U1:U&quot;&amp;ROW()-1); [.U55])&gt;0; 1; 0)" office:value-type="float" office:value="1" calcext:value-type="float">
            <text:p>1</text:p>
          </table:table-cell>
          <table:table-cell table:formula="of:=[.T54]+1" office:value-type="float" office:value="55" calcext:value-type="float">
            <text:p>55</text:p>
          </table:table-cell>
          <table:table-cell table:formula="of:=[ML.C5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56]; [.R56:.U311]; 4; 0)); &quot;&quot;; VLOOKUP([.T56]; [.R56:.U311]; 4; 0))">
            <text:p/>
          </table:table-cell>
          <table:table-cell/>
          <table:table-cell table:formula="of:=IF(AND([.S56]=0; NOT([.U56]=0)); MAX(INDIRECT(&quot;R1:R&quot;&amp;ROW()-1))+1; &quot;&quot;)">
            <text:p/>
          </table:table-cell>
          <table:table-cell table:formula="of:=IF(COUNTIF(INDIRECT(&quot;U1:U&quot;&amp;ROW()-1); [.U56])&gt;0; 1; 0)" office:value-type="float" office:value="1" calcext:value-type="float">
            <text:p>1</text:p>
          </table:table-cell>
          <table:table-cell table:formula="of:=[.T55]+1" office:value-type="float" office:value="56" calcext:value-type="float">
            <text:p>56</text:p>
          </table:table-cell>
          <table:table-cell table:formula="of:=[ML.C5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57]; [.R57:.U312]; 4; 0)); &quot;&quot;; VLOOKUP([.T57]; [.R57:.U312]; 4; 0))">
            <text:p/>
          </table:table-cell>
          <table:table-cell/>
          <table:table-cell table:formula="of:=IF(AND([.S57]=0; NOT([.U57]=0)); MAX(INDIRECT(&quot;R1:R&quot;&amp;ROW()-1))+1; &quot;&quot;)">
            <text:p/>
          </table:table-cell>
          <table:table-cell table:formula="of:=IF(COUNTIF(INDIRECT(&quot;U1:U&quot;&amp;ROW()-1); [.U57])&gt;0; 1; 0)" office:value-type="float" office:value="1" calcext:value-type="float">
            <text:p>1</text:p>
          </table:table-cell>
          <table:table-cell table:formula="of:=[.T56]+1" office:value-type="float" office:value="57" calcext:value-type="float">
            <text:p>57</text:p>
          </table:table-cell>
          <table:table-cell table:formula="of:=[ML.C5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58]; [.R58:.U313]; 4; 0)); &quot;&quot;; VLOOKUP([.T58]; [.R58:.U313]; 4; 0))">
            <text:p/>
          </table:table-cell>
          <table:table-cell/>
          <table:table-cell table:formula="of:=IF(AND([.S58]=0; NOT([.U58]=0)); MAX(INDIRECT(&quot;R1:R&quot;&amp;ROW()-1))+1; &quot;&quot;)">
            <text:p/>
          </table:table-cell>
          <table:table-cell table:formula="of:=IF(COUNTIF(INDIRECT(&quot;U1:U&quot;&amp;ROW()-1); [.U58])&gt;0; 1; 0)" office:value-type="float" office:value="1" calcext:value-type="float">
            <text:p>1</text:p>
          </table:table-cell>
          <table:table-cell table:formula="of:=[.T57]+1" office:value-type="float" office:value="58" calcext:value-type="float">
            <text:p>58</text:p>
          </table:table-cell>
          <table:table-cell table:formula="of:=[ML.C6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59]; [.R59:.U314]; 4; 0)); &quot;&quot;; VLOOKUP([.T59]; [.R59:.U314]; 4; 0))">
            <text:p/>
          </table:table-cell>
          <table:table-cell/>
          <table:table-cell table:formula="of:=IF(AND([.S59]=0; NOT([.U59]=0)); MAX(INDIRECT(&quot;R1:R&quot;&amp;ROW()-1))+1; &quot;&quot;)">
            <text:p/>
          </table:table-cell>
          <table:table-cell table:formula="of:=IF(COUNTIF(INDIRECT(&quot;U1:U&quot;&amp;ROW()-1); [.U59])&gt;0; 1; 0)" office:value-type="float" office:value="1" calcext:value-type="float">
            <text:p>1</text:p>
          </table:table-cell>
          <table:table-cell table:formula="of:=[.T58]+1" office:value-type="float" office:value="59" calcext:value-type="float">
            <text:p>59</text:p>
          </table:table-cell>
          <table:table-cell table:formula="of:=[ML.C6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0]; [.R60:.U315]; 4; 0)); &quot;&quot;; VLOOKUP([.T60]; [.R60:.U315]; 4; 0))">
            <text:p/>
          </table:table-cell>
          <table:table-cell/>
          <table:table-cell table:formula="of:=IF(AND([.S60]=0; NOT([.U60]=0)); MAX(INDIRECT(&quot;R1:R&quot;&amp;ROW()-1))+1; &quot;&quot;)">
            <text:p/>
          </table:table-cell>
          <table:table-cell table:formula="of:=IF(COUNTIF(INDIRECT(&quot;U1:U&quot;&amp;ROW()-1); [.U60])&gt;0; 1; 0)" office:value-type="float" office:value="1" calcext:value-type="float">
            <text:p>1</text:p>
          </table:table-cell>
          <table:table-cell table:formula="of:=[.T59]+1" office:value-type="float" office:value="60" calcext:value-type="float">
            <text:p>60</text:p>
          </table:table-cell>
          <table:table-cell table:formula="of:=[ML.C6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1]; [.R61:.U316]; 4; 0)); &quot;&quot;; VLOOKUP([.T61]; [.R61:.U316]; 4; 0))">
            <text:p/>
          </table:table-cell>
          <table:table-cell/>
          <table:table-cell table:formula="of:=IF(AND([.S61]=0; NOT([.U61]=0)); MAX(INDIRECT(&quot;R1:R&quot;&amp;ROW()-1))+1; &quot;&quot;)">
            <text:p/>
          </table:table-cell>
          <table:table-cell table:formula="of:=IF(COUNTIF(INDIRECT(&quot;U1:U&quot;&amp;ROW()-1); [.U61])&gt;0; 1; 0)" office:value-type="float" office:value="1" calcext:value-type="float">
            <text:p>1</text:p>
          </table:table-cell>
          <table:table-cell table:formula="of:=[.T60]+1" office:value-type="float" office:value="61" calcext:value-type="float">
            <text:p>61</text:p>
          </table:table-cell>
          <table:table-cell table:formula="of:=[ML.C6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2]; [.R62:.U317]; 4; 0)); &quot;&quot;; VLOOKUP([.T62]; [.R62:.U317]; 4; 0))">
            <text:p/>
          </table:table-cell>
          <table:table-cell/>
          <table:table-cell table:formula="of:=IF(AND([.S62]=0; NOT([.U62]=0)); MAX(INDIRECT(&quot;R1:R&quot;&amp;ROW()-1))+1; &quot;&quot;)">
            <text:p/>
          </table:table-cell>
          <table:table-cell table:formula="of:=IF(COUNTIF(INDIRECT(&quot;U1:U&quot;&amp;ROW()-1); [.U62])&gt;0; 1; 0)" office:value-type="float" office:value="1" calcext:value-type="float">
            <text:p>1</text:p>
          </table:table-cell>
          <table:table-cell table:formula="of:=[.T61]+1" office:value-type="float" office:value="62" calcext:value-type="float">
            <text:p>62</text:p>
          </table:table-cell>
          <table:table-cell table:formula="of:=[ML.C6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3]; [.R63:.U318]; 4; 0)); &quot;&quot;; VLOOKUP([.T63]; [.R63:.U318]; 4; 0))">
            <text:p/>
          </table:table-cell>
          <table:table-cell/>
          <table:table-cell table:formula="of:=IF(AND([.S63]=0; NOT([.U63]=0)); MAX(INDIRECT(&quot;R1:R&quot;&amp;ROW()-1))+1; &quot;&quot;)">
            <text:p/>
          </table:table-cell>
          <table:table-cell table:formula="of:=IF(COUNTIF(INDIRECT(&quot;U1:U&quot;&amp;ROW()-1); [.U63])&gt;0; 1; 0)" office:value-type="float" office:value="1" calcext:value-type="float">
            <text:p>1</text:p>
          </table:table-cell>
          <table:table-cell table:formula="of:=[.T62]+1" office:value-type="float" office:value="63" calcext:value-type="float">
            <text:p>63</text:p>
          </table:table-cell>
          <table:table-cell table:formula="of:=[ML.C6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4]; [.R64:.U319]; 4; 0)); &quot;&quot;; VLOOKUP([.T64]; [.R64:.U319]; 4; 0))">
            <text:p/>
          </table:table-cell>
          <table:table-cell/>
          <table:table-cell table:formula="of:=IF(AND([.S64]=0; NOT([.U64]=0)); MAX(INDIRECT(&quot;R1:R&quot;&amp;ROW()-1))+1; &quot;&quot;)">
            <text:p/>
          </table:table-cell>
          <table:table-cell table:formula="of:=IF(COUNTIF(INDIRECT(&quot;U1:U&quot;&amp;ROW()-1); [.U64])&gt;0; 1; 0)" office:value-type="float" office:value="1" calcext:value-type="float">
            <text:p>1</text:p>
          </table:table-cell>
          <table:table-cell table:formula="of:=[.T63]+1" office:value-type="float" office:value="64" calcext:value-type="float">
            <text:p>64</text:p>
          </table:table-cell>
          <table:table-cell table:formula="of:=[ML.C6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5]; [.R65:.U320]; 4; 0)); &quot;&quot;; VLOOKUP([.T65]; [.R65:.U320]; 4; 0))">
            <text:p/>
          </table:table-cell>
          <table:table-cell/>
          <table:table-cell table:formula="of:=IF(AND([.S65]=0; NOT([.U65]=0)); MAX(INDIRECT(&quot;R1:R&quot;&amp;ROW()-1))+1; &quot;&quot;)">
            <text:p/>
          </table:table-cell>
          <table:table-cell table:formula="of:=IF(COUNTIF(INDIRECT(&quot;U1:U&quot;&amp;ROW()-1); [.U65])&gt;0; 1; 0)" office:value-type="float" office:value="1" calcext:value-type="float">
            <text:p>1</text:p>
          </table:table-cell>
          <table:table-cell table:formula="of:=[.T64]+1" office:value-type="float" office:value="65" calcext:value-type="float">
            <text:p>65</text:p>
          </table:table-cell>
          <table:table-cell table:formula="of:=[ML.C6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6]; [.R66:.U321]; 4; 0)); &quot;&quot;; VLOOKUP([.T66]; [.R66:.U321]; 4; 0))">
            <text:p/>
          </table:table-cell>
          <table:table-cell/>
          <table:table-cell table:formula="of:=IF(AND([.S66]=0; NOT([.U66]=0)); MAX(INDIRECT(&quot;R1:R&quot;&amp;ROW()-1))+1; &quot;&quot;)">
            <text:p/>
          </table:table-cell>
          <table:table-cell table:formula="of:=IF(COUNTIF(INDIRECT(&quot;U1:U&quot;&amp;ROW()-1); [.U66])&gt;0; 1; 0)" office:value-type="float" office:value="1" calcext:value-type="float">
            <text:p>1</text:p>
          </table:table-cell>
          <table:table-cell table:formula="of:=[.T65]+1" office:value-type="float" office:value="66" calcext:value-type="float">
            <text:p>66</text:p>
          </table:table-cell>
          <table:table-cell table:formula="of:=[ML.C6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7]; [.R67:.U322]; 4; 0)); &quot;&quot;; VLOOKUP([.T67]; [.R67:.U322]; 4; 0))">
            <text:p/>
          </table:table-cell>
          <table:table-cell/>
          <table:table-cell table:formula="of:=IF(AND([.S67]=0; NOT([.U67]=0)); MAX(INDIRECT(&quot;R1:R&quot;&amp;ROW()-1))+1; &quot;&quot;)">
            <text:p/>
          </table:table-cell>
          <table:table-cell table:formula="of:=IF(COUNTIF(INDIRECT(&quot;U1:U&quot;&amp;ROW()-1); [.U67])&gt;0; 1; 0)" office:value-type="float" office:value="1" calcext:value-type="float">
            <text:p>1</text:p>
          </table:table-cell>
          <table:table-cell table:formula="of:=[.T66]+1" office:value-type="float" office:value="67" calcext:value-type="float">
            <text:p>67</text:p>
          </table:table-cell>
          <table:table-cell table:formula="of:=[ML.C6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8]; [.R68:.U323]; 4; 0)); &quot;&quot;; VLOOKUP([.T68]; [.R68:.U323]; 4; 0))">
            <text:p/>
          </table:table-cell>
          <table:table-cell/>
          <table:table-cell table:formula="of:=IF(AND([.S68]=0; NOT([.U68]=0)); MAX(INDIRECT(&quot;R1:R&quot;&amp;ROW()-1))+1; &quot;&quot;)">
            <text:p/>
          </table:table-cell>
          <table:table-cell table:formula="of:=IF(COUNTIF(INDIRECT(&quot;U1:U&quot;&amp;ROW()-1); [.U68])&gt;0; 1; 0)" office:value-type="float" office:value="1" calcext:value-type="float">
            <text:p>1</text:p>
          </table:table-cell>
          <table:table-cell table:formula="of:=[.T67]+1" office:value-type="float" office:value="68" calcext:value-type="float">
            <text:p>68</text:p>
          </table:table-cell>
          <table:table-cell table:formula="of:=[ML.C7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69]; [.R69:.U324]; 4; 0)); &quot;&quot;; VLOOKUP([.T69]; [.R69:.U324]; 4; 0))">
            <text:p/>
          </table:table-cell>
          <table:table-cell/>
          <table:table-cell table:formula="of:=IF(AND([.S69]=0; NOT([.U69]=0)); MAX(INDIRECT(&quot;R1:R&quot;&amp;ROW()-1))+1; &quot;&quot;)">
            <text:p/>
          </table:table-cell>
          <table:table-cell table:formula="of:=IF(COUNTIF(INDIRECT(&quot;U1:U&quot;&amp;ROW()-1); [.U69])&gt;0; 1; 0)" office:value-type="float" office:value="1" calcext:value-type="float">
            <text:p>1</text:p>
          </table:table-cell>
          <table:table-cell table:formula="of:=[.T68]+1" office:value-type="float" office:value="69" calcext:value-type="float">
            <text:p>69</text:p>
          </table:table-cell>
          <table:table-cell table:formula="of:=[ML.C7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0]; [.R70:.U325]; 4; 0)); &quot;&quot;; VLOOKUP([.T70]; [.R70:.U325]; 4; 0))">
            <text:p/>
          </table:table-cell>
          <table:table-cell/>
          <table:table-cell table:formula="of:=IF(AND([.S70]=0; NOT([.U70]=0)); MAX(INDIRECT(&quot;R1:R&quot;&amp;ROW()-1))+1; &quot;&quot;)">
            <text:p/>
          </table:table-cell>
          <table:table-cell table:formula="of:=IF(COUNTIF(INDIRECT(&quot;U1:U&quot;&amp;ROW()-1); [.U70])&gt;0; 1; 0)" office:value-type="float" office:value="1" calcext:value-type="float">
            <text:p>1</text:p>
          </table:table-cell>
          <table:table-cell table:formula="of:=[.T69]+1" office:value-type="float" office:value="70" calcext:value-type="float">
            <text:p>70</text:p>
          </table:table-cell>
          <table:table-cell table:formula="of:=[ML.C7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1]; [.R71:.U326]; 4; 0)); &quot;&quot;; VLOOKUP([.T71]; [.R71:.U326]; 4; 0))">
            <text:p/>
          </table:table-cell>
          <table:table-cell/>
          <table:table-cell table:formula="of:=IF(AND([.S71]=0; NOT([.U71]=0)); MAX(INDIRECT(&quot;R1:R&quot;&amp;ROW()-1))+1; &quot;&quot;)">
            <text:p/>
          </table:table-cell>
          <table:table-cell table:formula="of:=IF(COUNTIF(INDIRECT(&quot;U1:U&quot;&amp;ROW()-1); [.U71])&gt;0; 1; 0)" office:value-type="float" office:value="1" calcext:value-type="float">
            <text:p>1</text:p>
          </table:table-cell>
          <table:table-cell table:formula="of:=[.T70]+1" office:value-type="float" office:value="71" calcext:value-type="float">
            <text:p>71</text:p>
          </table:table-cell>
          <table:table-cell table:formula="of:=[ML.C7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2]; [.R72:.U327]; 4; 0)); &quot;&quot;; VLOOKUP([.T72]; [.R72:.U327]; 4; 0))">
            <text:p/>
          </table:table-cell>
          <table:table-cell/>
          <table:table-cell table:formula="of:=IF(AND([.S72]=0; NOT([.U72]=0)); MAX(INDIRECT(&quot;R1:R&quot;&amp;ROW()-1))+1; &quot;&quot;)">
            <text:p/>
          </table:table-cell>
          <table:table-cell table:formula="of:=IF(COUNTIF(INDIRECT(&quot;U1:U&quot;&amp;ROW()-1); [.U72])&gt;0; 1; 0)" office:value-type="float" office:value="1" calcext:value-type="float">
            <text:p>1</text:p>
          </table:table-cell>
          <table:table-cell table:formula="of:=[.T71]+1" office:value-type="float" office:value="72" calcext:value-type="float">
            <text:p>72</text:p>
          </table:table-cell>
          <table:table-cell table:formula="of:=[ML.C7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3]; [.R73:.U328]; 4; 0)); &quot;&quot;; VLOOKUP([.T73]; [.R73:.U328]; 4; 0))">
            <text:p/>
          </table:table-cell>
          <table:table-cell/>
          <table:table-cell table:formula="of:=IF(AND([.S73]=0; NOT([.U73]=0)); MAX(INDIRECT(&quot;R1:R&quot;&amp;ROW()-1))+1; &quot;&quot;)">
            <text:p/>
          </table:table-cell>
          <table:table-cell table:formula="of:=IF(COUNTIF(INDIRECT(&quot;U1:U&quot;&amp;ROW()-1); [.U73])&gt;0; 1; 0)" office:value-type="float" office:value="1" calcext:value-type="float">
            <text:p>1</text:p>
          </table:table-cell>
          <table:table-cell table:formula="of:=[.T72]+1" office:value-type="float" office:value="73" calcext:value-type="float">
            <text:p>73</text:p>
          </table:table-cell>
          <table:table-cell table:formula="of:=[ML.C7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4]; [.R74:.U329]; 4; 0)); &quot;&quot;; VLOOKUP([.T74]; [.R74:.U329]; 4; 0))">
            <text:p/>
          </table:table-cell>
          <table:table-cell/>
          <table:table-cell table:formula="of:=IF(AND([.S74]=0; NOT([.U74]=0)); MAX(INDIRECT(&quot;R1:R&quot;&amp;ROW()-1))+1; &quot;&quot;)">
            <text:p/>
          </table:table-cell>
          <table:table-cell table:formula="of:=IF(COUNTIF(INDIRECT(&quot;U1:U&quot;&amp;ROW()-1); [.U74])&gt;0; 1; 0)" office:value-type="float" office:value="1" calcext:value-type="float">
            <text:p>1</text:p>
          </table:table-cell>
          <table:table-cell table:formula="of:=[.T73]+1" office:value-type="float" office:value="74" calcext:value-type="float">
            <text:p>74</text:p>
          </table:table-cell>
          <table:table-cell table:formula="of:=[ML.C7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5]; [.R75:.U330]; 4; 0)); &quot;&quot;; VLOOKUP([.T75]; [.R75:.U330]; 4; 0))">
            <text:p/>
          </table:table-cell>
          <table:table-cell/>
          <table:table-cell table:formula="of:=IF(AND([.S75]=0; NOT([.U75]=0)); MAX(INDIRECT(&quot;R1:R&quot;&amp;ROW()-1))+1; &quot;&quot;)">
            <text:p/>
          </table:table-cell>
          <table:table-cell table:formula="of:=IF(COUNTIF(INDIRECT(&quot;U1:U&quot;&amp;ROW()-1); [.U75])&gt;0; 1; 0)" office:value-type="float" office:value="1" calcext:value-type="float">
            <text:p>1</text:p>
          </table:table-cell>
          <table:table-cell table:formula="of:=[.T74]+1" office:value-type="float" office:value="75" calcext:value-type="float">
            <text:p>75</text:p>
          </table:table-cell>
          <table:table-cell table:formula="of:=[ML.C7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6]; [.R76:.U331]; 4; 0)); &quot;&quot;; VLOOKUP([.T76]; [.R76:.U331]; 4; 0))">
            <text:p/>
          </table:table-cell>
          <table:table-cell/>
          <table:table-cell table:formula="of:=IF(AND([.S76]=0; NOT([.U76]=0)); MAX(INDIRECT(&quot;R1:R&quot;&amp;ROW()-1))+1; &quot;&quot;)">
            <text:p/>
          </table:table-cell>
          <table:table-cell table:formula="of:=IF(COUNTIF(INDIRECT(&quot;U1:U&quot;&amp;ROW()-1); [.U76])&gt;0; 1; 0)" office:value-type="float" office:value="1" calcext:value-type="float">
            <text:p>1</text:p>
          </table:table-cell>
          <table:table-cell table:formula="of:=[.T75]+1" office:value-type="float" office:value="76" calcext:value-type="float">
            <text:p>76</text:p>
          </table:table-cell>
          <table:table-cell table:formula="of:=[ML.C7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7]; [.R77:.U332]; 4; 0)); &quot;&quot;; VLOOKUP([.T77]; [.R77:.U332]; 4; 0))">
            <text:p/>
          </table:table-cell>
          <table:table-cell/>
          <table:table-cell table:formula="of:=IF(AND([.S77]=0; NOT([.U77]=0)); MAX(INDIRECT(&quot;R1:R&quot;&amp;ROW()-1))+1; &quot;&quot;)">
            <text:p/>
          </table:table-cell>
          <table:table-cell table:formula="of:=IF(COUNTIF(INDIRECT(&quot;U1:U&quot;&amp;ROW()-1); [.U77])&gt;0; 1; 0)" office:value-type="float" office:value="1" calcext:value-type="float">
            <text:p>1</text:p>
          </table:table-cell>
          <table:table-cell table:formula="of:=[.T76]+1" office:value-type="float" office:value="77" calcext:value-type="float">
            <text:p>77</text:p>
          </table:table-cell>
          <table:table-cell table:formula="of:=[ML.C7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8]; [.R78:.U333]; 4; 0)); &quot;&quot;; VLOOKUP([.T78]; [.R78:.U333]; 4; 0))">
            <text:p/>
          </table:table-cell>
          <table:table-cell/>
          <table:table-cell table:formula="of:=IF(AND([.S78]=0; NOT([.U78]=0)); MAX(INDIRECT(&quot;R1:R&quot;&amp;ROW()-1))+1; &quot;&quot;)">
            <text:p/>
          </table:table-cell>
          <table:table-cell table:formula="of:=IF(COUNTIF(INDIRECT(&quot;U1:U&quot;&amp;ROW()-1); [.U78])&gt;0; 1; 0)" office:value-type="float" office:value="1" calcext:value-type="float">
            <text:p>1</text:p>
          </table:table-cell>
          <table:table-cell table:formula="of:=[.T77]+1" office:value-type="float" office:value="78" calcext:value-type="float">
            <text:p>78</text:p>
          </table:table-cell>
          <table:table-cell table:formula="of:=[ML.C8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79]; [.R79:.U334]; 4; 0)); &quot;&quot;; VLOOKUP([.T79]; [.R79:.U334]; 4; 0))">
            <text:p/>
          </table:table-cell>
          <table:table-cell/>
          <table:table-cell table:formula="of:=IF(AND([.S79]=0; NOT([.U79]=0)); MAX(INDIRECT(&quot;R1:R&quot;&amp;ROW()-1))+1; &quot;&quot;)">
            <text:p/>
          </table:table-cell>
          <table:table-cell table:formula="of:=IF(COUNTIF(INDIRECT(&quot;U1:U&quot;&amp;ROW()-1); [.U79])&gt;0; 1; 0)" office:value-type="float" office:value="1" calcext:value-type="float">
            <text:p>1</text:p>
          </table:table-cell>
          <table:table-cell table:formula="of:=[.T78]+1" office:value-type="float" office:value="79" calcext:value-type="float">
            <text:p>79</text:p>
          </table:table-cell>
          <table:table-cell table:formula="of:=[ML.C8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0]; [.R80:.U335]; 4; 0)); &quot;&quot;; VLOOKUP([.T80]; [.R80:.U335]; 4; 0))">
            <text:p/>
          </table:table-cell>
          <table:table-cell/>
          <table:table-cell table:formula="of:=IF(AND([.S80]=0; NOT([.U80]=0)); MAX(INDIRECT(&quot;R1:R&quot;&amp;ROW()-1))+1; &quot;&quot;)">
            <text:p/>
          </table:table-cell>
          <table:table-cell table:formula="of:=IF(COUNTIF(INDIRECT(&quot;U1:U&quot;&amp;ROW()-1); [.U80])&gt;0; 1; 0)" office:value-type="float" office:value="1" calcext:value-type="float">
            <text:p>1</text:p>
          </table:table-cell>
          <table:table-cell table:formula="of:=[.T79]+1" office:value-type="float" office:value="80" calcext:value-type="float">
            <text:p>80</text:p>
          </table:table-cell>
          <table:table-cell table:formula="of:=[ML.C8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1]; [.R81:.U336]; 4; 0)); &quot;&quot;; VLOOKUP([.T81]; [.R81:.U336]; 4; 0))">
            <text:p/>
          </table:table-cell>
          <table:table-cell/>
          <table:table-cell table:formula="of:=IF(AND([.S81]=0; NOT([.U81]=0)); MAX(INDIRECT(&quot;R1:R&quot;&amp;ROW()-1))+1; &quot;&quot;)">
            <text:p/>
          </table:table-cell>
          <table:table-cell table:formula="of:=IF(COUNTIF(INDIRECT(&quot;U1:U&quot;&amp;ROW()-1); [.U81])&gt;0; 1; 0)" office:value-type="float" office:value="1" calcext:value-type="float">
            <text:p>1</text:p>
          </table:table-cell>
          <table:table-cell table:formula="of:=[.T80]+1" office:value-type="float" office:value="81" calcext:value-type="float">
            <text:p>81</text:p>
          </table:table-cell>
          <table:table-cell table:formula="of:=[ML.C8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2]; [.R82:.U337]; 4; 0)); &quot;&quot;; VLOOKUP([.T82]; [.R82:.U337]; 4; 0))">
            <text:p/>
          </table:table-cell>
          <table:table-cell/>
          <table:table-cell table:formula="of:=IF(AND([.S82]=0; NOT([.U82]=0)); MAX(INDIRECT(&quot;R1:R&quot;&amp;ROW()-1))+1; &quot;&quot;)">
            <text:p/>
          </table:table-cell>
          <table:table-cell table:formula="of:=IF(COUNTIF(INDIRECT(&quot;U1:U&quot;&amp;ROW()-1); [.U82])&gt;0; 1; 0)" office:value-type="float" office:value="1" calcext:value-type="float">
            <text:p>1</text:p>
          </table:table-cell>
          <table:table-cell table:formula="of:=[.T81]+1" office:value-type="float" office:value="82" calcext:value-type="float">
            <text:p>82</text:p>
          </table:table-cell>
          <table:table-cell table:formula="of:=[ML.C8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3]; [.R83:.U338]; 4; 0)); &quot;&quot;; VLOOKUP([.T83]; [.R83:.U338]; 4; 0))">
            <text:p/>
          </table:table-cell>
          <table:table-cell/>
          <table:table-cell table:formula="of:=IF(AND([.S83]=0; NOT([.U83]=0)); MAX(INDIRECT(&quot;R1:R&quot;&amp;ROW()-1))+1; &quot;&quot;)">
            <text:p/>
          </table:table-cell>
          <table:table-cell table:formula="of:=IF(COUNTIF(INDIRECT(&quot;U1:U&quot;&amp;ROW()-1); [.U83])&gt;0; 1; 0)" office:value-type="float" office:value="1" calcext:value-type="float">
            <text:p>1</text:p>
          </table:table-cell>
          <table:table-cell table:formula="of:=[.T82]+1" office:value-type="float" office:value="83" calcext:value-type="float">
            <text:p>83</text:p>
          </table:table-cell>
          <table:table-cell table:formula="of:=[ML.C8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4]; [.R84:.U339]; 4; 0)); &quot;&quot;; VLOOKUP([.T84]; [.R84:.U339]; 4; 0))">
            <text:p/>
          </table:table-cell>
          <table:table-cell/>
          <table:table-cell table:formula="of:=IF(AND([.S84]=0; NOT([.U84]=0)); MAX(INDIRECT(&quot;R1:R&quot;&amp;ROW()-1))+1; &quot;&quot;)">
            <text:p/>
          </table:table-cell>
          <table:table-cell table:formula="of:=IF(COUNTIF(INDIRECT(&quot;U1:U&quot;&amp;ROW()-1); [.U84])&gt;0; 1; 0)" office:value-type="float" office:value="1" calcext:value-type="float">
            <text:p>1</text:p>
          </table:table-cell>
          <table:table-cell table:formula="of:=[.T83]+1" office:value-type="float" office:value="84" calcext:value-type="float">
            <text:p>84</text:p>
          </table:table-cell>
          <table:table-cell table:formula="of:=[ML.C8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5]; [.R85:.U340]; 4; 0)); &quot;&quot;; VLOOKUP([.T85]; [.R85:.U340]; 4; 0))">
            <text:p/>
          </table:table-cell>
          <table:table-cell/>
          <table:table-cell table:formula="of:=IF(AND([.S85]=0; NOT([.U85]=0)); MAX(INDIRECT(&quot;R1:R&quot;&amp;ROW()-1))+1; &quot;&quot;)">
            <text:p/>
          </table:table-cell>
          <table:table-cell table:formula="of:=IF(COUNTIF(INDIRECT(&quot;U1:U&quot;&amp;ROW()-1); [.U85])&gt;0; 1; 0)" office:value-type="float" office:value="1" calcext:value-type="float">
            <text:p>1</text:p>
          </table:table-cell>
          <table:table-cell table:formula="of:=[.T84]+1" office:value-type="float" office:value="85" calcext:value-type="float">
            <text:p>85</text:p>
          </table:table-cell>
          <table:table-cell table:formula="of:=[ML.C8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6]; [.R86:.U341]; 4; 0)); &quot;&quot;; VLOOKUP([.T86]; [.R86:.U341]; 4; 0))">
            <text:p/>
          </table:table-cell>
          <table:table-cell/>
          <table:table-cell table:formula="of:=IF(AND([.S86]=0; NOT([.U86]=0)); MAX(INDIRECT(&quot;R1:R&quot;&amp;ROW()-1))+1; &quot;&quot;)">
            <text:p/>
          </table:table-cell>
          <table:table-cell table:formula="of:=IF(COUNTIF(INDIRECT(&quot;U1:U&quot;&amp;ROW()-1); [.U86])&gt;0; 1; 0)" office:value-type="float" office:value="1" calcext:value-type="float">
            <text:p>1</text:p>
          </table:table-cell>
          <table:table-cell table:formula="of:=[.T85]+1" office:value-type="float" office:value="86" calcext:value-type="float">
            <text:p>86</text:p>
          </table:table-cell>
          <table:table-cell table:formula="of:=[ML.C8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7]; [.R87:.U342]; 4; 0)); &quot;&quot;; VLOOKUP([.T87]; [.R87:.U342]; 4; 0))">
            <text:p/>
          </table:table-cell>
          <table:table-cell/>
          <table:table-cell table:formula="of:=IF(AND([.S87]=0; NOT([.U87]=0)); MAX(INDIRECT(&quot;R1:R&quot;&amp;ROW()-1))+1; &quot;&quot;)">
            <text:p/>
          </table:table-cell>
          <table:table-cell table:formula="of:=IF(COUNTIF(INDIRECT(&quot;U1:U&quot;&amp;ROW()-1); [.U87])&gt;0; 1; 0)" office:value-type="float" office:value="1" calcext:value-type="float">
            <text:p>1</text:p>
          </table:table-cell>
          <table:table-cell table:formula="of:=[.T86]+1" office:value-type="float" office:value="87" calcext:value-type="float">
            <text:p>87</text:p>
          </table:table-cell>
          <table:table-cell table:formula="of:=[ML.C8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8]; [.R88:.U343]; 4; 0)); &quot;&quot;; VLOOKUP([.T88]; [.R88:.U343]; 4; 0))">
            <text:p/>
          </table:table-cell>
          <table:table-cell/>
          <table:table-cell table:formula="of:=IF(AND([.S88]=0; NOT([.U88]=0)); MAX(INDIRECT(&quot;R1:R&quot;&amp;ROW()-1))+1; &quot;&quot;)">
            <text:p/>
          </table:table-cell>
          <table:table-cell table:formula="of:=IF(COUNTIF(INDIRECT(&quot;U1:U&quot;&amp;ROW()-1); [.U88])&gt;0; 1; 0)" office:value-type="float" office:value="1" calcext:value-type="float">
            <text:p>1</text:p>
          </table:table-cell>
          <table:table-cell table:formula="of:=[.T87]+1" office:value-type="float" office:value="88" calcext:value-type="float">
            <text:p>88</text:p>
          </table:table-cell>
          <table:table-cell table:formula="of:=[ML.C9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89]; [.R89:.U344]; 4; 0)); &quot;&quot;; VLOOKUP([.T89]; [.R89:.U344]; 4; 0))">
            <text:p/>
          </table:table-cell>
          <table:table-cell/>
          <table:table-cell table:formula="of:=IF(AND([.S89]=0; NOT([.U89]=0)); MAX(INDIRECT(&quot;R1:R&quot;&amp;ROW()-1))+1; &quot;&quot;)">
            <text:p/>
          </table:table-cell>
          <table:table-cell table:formula="of:=IF(COUNTIF(INDIRECT(&quot;U1:U&quot;&amp;ROW()-1); [.U89])&gt;0; 1; 0)" office:value-type="float" office:value="1" calcext:value-type="float">
            <text:p>1</text:p>
          </table:table-cell>
          <table:table-cell table:formula="of:=[.T88]+1" office:value-type="float" office:value="89" calcext:value-type="float">
            <text:p>89</text:p>
          </table:table-cell>
          <table:table-cell table:formula="of:=[ML.C9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0]; [.R90:.U345]; 4; 0)); &quot;&quot;; VLOOKUP([.T90]; [.R90:.U345]; 4; 0))">
            <text:p/>
          </table:table-cell>
          <table:table-cell/>
          <table:table-cell table:formula="of:=IF(AND([.S90]=0; NOT([.U90]=0)); MAX(INDIRECT(&quot;R1:R&quot;&amp;ROW()-1))+1; &quot;&quot;)">
            <text:p/>
          </table:table-cell>
          <table:table-cell table:formula="of:=IF(COUNTIF(INDIRECT(&quot;U1:U&quot;&amp;ROW()-1); [.U90])&gt;0; 1; 0)" office:value-type="float" office:value="1" calcext:value-type="float">
            <text:p>1</text:p>
          </table:table-cell>
          <table:table-cell table:formula="of:=[.T89]+1" office:value-type="float" office:value="90" calcext:value-type="float">
            <text:p>90</text:p>
          </table:table-cell>
          <table:table-cell table:formula="of:=[ML.C9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1]; [.R91:.U346]; 4; 0)); &quot;&quot;; VLOOKUP([.T91]; [.R91:.U346]; 4; 0))">
            <text:p/>
          </table:table-cell>
          <table:table-cell/>
          <table:table-cell table:formula="of:=IF(AND([.S91]=0; NOT([.U91]=0)); MAX(INDIRECT(&quot;R1:R&quot;&amp;ROW()-1))+1; &quot;&quot;)">
            <text:p/>
          </table:table-cell>
          <table:table-cell table:formula="of:=IF(COUNTIF(INDIRECT(&quot;U1:U&quot;&amp;ROW()-1); [.U91])&gt;0; 1; 0)" office:value-type="float" office:value="1" calcext:value-type="float">
            <text:p>1</text:p>
          </table:table-cell>
          <table:table-cell table:formula="of:=[.T90]+1" office:value-type="float" office:value="91" calcext:value-type="float">
            <text:p>91</text:p>
          </table:table-cell>
          <table:table-cell table:formula="of:=[ML.C9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2]; [.R92:.U347]; 4; 0)); &quot;&quot;; VLOOKUP([.T92]; [.R92:.U347]; 4; 0))">
            <text:p/>
          </table:table-cell>
          <table:table-cell/>
          <table:table-cell table:formula="of:=IF(AND([.S92]=0; NOT([.U92]=0)); MAX(INDIRECT(&quot;R1:R&quot;&amp;ROW()-1))+1; &quot;&quot;)">
            <text:p/>
          </table:table-cell>
          <table:table-cell table:formula="of:=IF(COUNTIF(INDIRECT(&quot;U1:U&quot;&amp;ROW()-1); [.U92])&gt;0; 1; 0)" office:value-type="float" office:value="1" calcext:value-type="float">
            <text:p>1</text:p>
          </table:table-cell>
          <table:table-cell table:formula="of:=[.T91]+1" office:value-type="float" office:value="92" calcext:value-type="float">
            <text:p>92</text:p>
          </table:table-cell>
          <table:table-cell table:formula="of:=[ML.C9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3]; [.R93:.U348]; 4; 0)); &quot;&quot;; VLOOKUP([.T93]; [.R93:.U348]; 4; 0))">
            <text:p/>
          </table:table-cell>
          <table:table-cell/>
          <table:table-cell table:formula="of:=IF(AND([.S93]=0; NOT([.U93]=0)); MAX(INDIRECT(&quot;R1:R&quot;&amp;ROW()-1))+1; &quot;&quot;)">
            <text:p/>
          </table:table-cell>
          <table:table-cell table:formula="of:=IF(COUNTIF(INDIRECT(&quot;U1:U&quot;&amp;ROW()-1); [.U93])&gt;0; 1; 0)" office:value-type="float" office:value="1" calcext:value-type="float">
            <text:p>1</text:p>
          </table:table-cell>
          <table:table-cell table:formula="of:=[.T92]+1" office:value-type="float" office:value="93" calcext:value-type="float">
            <text:p>93</text:p>
          </table:table-cell>
          <table:table-cell table:formula="of:=[ML.C9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4]; [.R94:.U349]; 4; 0)); &quot;&quot;; VLOOKUP([.T94]; [.R94:.U349]; 4; 0))">
            <text:p/>
          </table:table-cell>
          <table:table-cell/>
          <table:table-cell table:formula="of:=IF(AND([.S94]=0; NOT([.U94]=0)); MAX(INDIRECT(&quot;R1:R&quot;&amp;ROW()-1))+1; &quot;&quot;)">
            <text:p/>
          </table:table-cell>
          <table:table-cell table:formula="of:=IF(COUNTIF(INDIRECT(&quot;U1:U&quot;&amp;ROW()-1); [.U94])&gt;0; 1; 0)" office:value-type="float" office:value="1" calcext:value-type="float">
            <text:p>1</text:p>
          </table:table-cell>
          <table:table-cell table:formula="of:=[.T93]+1" office:value-type="float" office:value="94" calcext:value-type="float">
            <text:p>94</text:p>
          </table:table-cell>
          <table:table-cell table:formula="of:=[ML.C9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5]; [.R95:.U350]; 4; 0)); &quot;&quot;; VLOOKUP([.T95]; [.R95:.U350]; 4; 0))">
            <text:p/>
          </table:table-cell>
          <table:table-cell/>
          <table:table-cell table:formula="of:=IF(AND([.S95]=0; NOT([.U95]=0)); MAX(INDIRECT(&quot;R1:R&quot;&amp;ROW()-1))+1; &quot;&quot;)">
            <text:p/>
          </table:table-cell>
          <table:table-cell table:formula="of:=IF(COUNTIF(INDIRECT(&quot;U1:U&quot;&amp;ROW()-1); [.U95])&gt;0; 1; 0)" office:value-type="float" office:value="1" calcext:value-type="float">
            <text:p>1</text:p>
          </table:table-cell>
          <table:table-cell table:formula="of:=[.T94]+1" office:value-type="float" office:value="95" calcext:value-type="float">
            <text:p>95</text:p>
          </table:table-cell>
          <table:table-cell table:formula="of:=[ML.C9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6]; [.R96:.U351]; 4; 0)); &quot;&quot;; VLOOKUP([.T96]; [.R96:.U351]; 4; 0))">
            <text:p/>
          </table:table-cell>
          <table:table-cell/>
          <table:table-cell table:formula="of:=IF(AND([.S96]=0; NOT([.U96]=0)); MAX(INDIRECT(&quot;R1:R&quot;&amp;ROW()-1))+1; &quot;&quot;)">
            <text:p/>
          </table:table-cell>
          <table:table-cell table:formula="of:=IF(COUNTIF(INDIRECT(&quot;U1:U&quot;&amp;ROW()-1); [.U96])&gt;0; 1; 0)" office:value-type="float" office:value="1" calcext:value-type="float">
            <text:p>1</text:p>
          </table:table-cell>
          <table:table-cell table:formula="of:=[.T95]+1" office:value-type="float" office:value="96" calcext:value-type="float">
            <text:p>96</text:p>
          </table:table-cell>
          <table:table-cell table:formula="of:=[ML.C9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7]; [.R97:.U352]; 4; 0)); &quot;&quot;; VLOOKUP([.T97]; [.R97:.U352]; 4; 0))">
            <text:p/>
          </table:table-cell>
          <table:table-cell/>
          <table:table-cell table:formula="of:=IF(AND([.S97]=0; NOT([.U97]=0)); MAX(INDIRECT(&quot;R1:R&quot;&amp;ROW()-1))+1; &quot;&quot;)">
            <text:p/>
          </table:table-cell>
          <table:table-cell table:formula="of:=IF(COUNTIF(INDIRECT(&quot;U1:U&quot;&amp;ROW()-1); [.U97])&gt;0; 1; 0)" office:value-type="float" office:value="1" calcext:value-type="float">
            <text:p>1</text:p>
          </table:table-cell>
          <table:table-cell table:formula="of:=[.T96]+1" office:value-type="float" office:value="97" calcext:value-type="float">
            <text:p>97</text:p>
          </table:table-cell>
          <table:table-cell table:formula="of:=[ML.C9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8]; [.R98:.U353]; 4; 0)); &quot;&quot;; VLOOKUP([.T98]; [.R98:.U353]; 4; 0))">
            <text:p/>
          </table:table-cell>
          <table:table-cell/>
          <table:table-cell table:formula="of:=IF(AND([.S98]=0; NOT([.U98]=0)); MAX(INDIRECT(&quot;R1:R&quot;&amp;ROW()-1))+1; &quot;&quot;)">
            <text:p/>
          </table:table-cell>
          <table:table-cell table:formula="of:=IF(COUNTIF(INDIRECT(&quot;U1:U&quot;&amp;ROW()-1); [.U98])&gt;0; 1; 0)" office:value-type="float" office:value="1" calcext:value-type="float">
            <text:p>1</text:p>
          </table:table-cell>
          <table:table-cell table:formula="of:=[.T97]+1" office:value-type="float" office:value="98" calcext:value-type="float">
            <text:p>98</text:p>
          </table:table-cell>
          <table:table-cell table:formula="of:=[ML.C10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99]; [.R99:.U354]; 4; 0)); &quot;&quot;; VLOOKUP([.T99]; [.R99:.U354]; 4; 0))">
            <text:p/>
          </table:table-cell>
          <table:table-cell/>
          <table:table-cell table:formula="of:=IF(AND([.S99]=0; NOT([.U99]=0)); MAX(INDIRECT(&quot;R1:R&quot;&amp;ROW()-1))+1; &quot;&quot;)">
            <text:p/>
          </table:table-cell>
          <table:table-cell table:formula="of:=IF(COUNTIF(INDIRECT(&quot;U1:U&quot;&amp;ROW()-1); [.U99])&gt;0; 1; 0)" office:value-type="float" office:value="1" calcext:value-type="float">
            <text:p>1</text:p>
          </table:table-cell>
          <table:table-cell table:formula="of:=[.T98]+1" office:value-type="float" office:value="99" calcext:value-type="float">
            <text:p>99</text:p>
          </table:table-cell>
          <table:table-cell table:formula="of:=[ML.C10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0]; [.R100:.U355]; 4; 0)); &quot;&quot;; VLOOKUP([.T100]; [.R100:.U355]; 4; 0))">
            <text:p/>
          </table:table-cell>
          <table:table-cell/>
          <table:table-cell table:formula="of:=IF(AND([.S100]=0; NOT([.U100]=0)); MAX(INDIRECT(&quot;R1:R&quot;&amp;ROW()-1))+1; &quot;&quot;)">
            <text:p/>
          </table:table-cell>
          <table:table-cell table:formula="of:=IF(COUNTIF(INDIRECT(&quot;U1:U&quot;&amp;ROW()-1); [.U100])&gt;0; 1; 0)" office:value-type="float" office:value="1" calcext:value-type="float">
            <text:p>1</text:p>
          </table:table-cell>
          <table:table-cell table:formula="of:=[.T99]+1" office:value-type="float" office:value="100" calcext:value-type="float">
            <text:p>100</text:p>
          </table:table-cell>
          <table:table-cell table:formula="of:=[ML.C10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1]; [.R101:.U356]; 4; 0)); &quot;&quot;; VLOOKUP([.T101]; [.R101:.U356]; 4; 0))">
            <text:p/>
          </table:table-cell>
          <table:table-cell/>
          <table:table-cell table:formula="of:=IF(AND([.S101]=0; NOT([.U101]=0)); MAX(INDIRECT(&quot;R1:R&quot;&amp;ROW()-1))+1; &quot;&quot;)">
            <text:p/>
          </table:table-cell>
          <table:table-cell table:formula="of:=IF(COUNTIF(INDIRECT(&quot;U1:U&quot;&amp;ROW()-1); [.U101])&gt;0; 1; 0)" office:value-type="float" office:value="1" calcext:value-type="float">
            <text:p>1</text:p>
          </table:table-cell>
          <table:table-cell table:formula="of:=[.T100]+1" office:value-type="float" office:value="101" calcext:value-type="float">
            <text:p>101</text:p>
          </table:table-cell>
          <table:table-cell table:formula="of:=[ML.C10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2]; [.R102:.U357]; 4; 0)); &quot;&quot;; VLOOKUP([.T102]; [.R102:.U357]; 4; 0))">
            <text:p/>
          </table:table-cell>
          <table:table-cell/>
          <table:table-cell table:formula="of:=IF(AND([.S102]=0; NOT([.U102]=0)); MAX(INDIRECT(&quot;R1:R&quot;&amp;ROW()-1))+1; &quot;&quot;)">
            <text:p/>
          </table:table-cell>
          <table:table-cell table:formula="of:=IF(COUNTIF(INDIRECT(&quot;U1:U&quot;&amp;ROW()-1); [.U102])&gt;0; 1; 0)" office:value-type="float" office:value="1" calcext:value-type="float">
            <text:p>1</text:p>
          </table:table-cell>
          <table:table-cell table:formula="of:=[.T101]+1" office:value-type="float" office:value="102" calcext:value-type="float">
            <text:p>102</text:p>
          </table:table-cell>
          <table:table-cell table:formula="of:=[ML.C10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3]; [.R103:.U358]; 4; 0)); &quot;&quot;; VLOOKUP([.T103]; [.R103:.U358]; 4; 0))">
            <text:p/>
          </table:table-cell>
          <table:table-cell/>
          <table:table-cell table:formula="of:=IF(AND([.S103]=0; NOT([.U103]=0)); MAX(INDIRECT(&quot;R1:R&quot;&amp;ROW()-1))+1; &quot;&quot;)">
            <text:p/>
          </table:table-cell>
          <table:table-cell table:formula="of:=IF(COUNTIF(INDIRECT(&quot;U1:U&quot;&amp;ROW()-1); [.U103])&gt;0; 1; 0)" office:value-type="float" office:value="1" calcext:value-type="float">
            <text:p>1</text:p>
          </table:table-cell>
          <table:table-cell table:formula="of:=[.T102]+1" office:value-type="float" office:value="103" calcext:value-type="float">
            <text:p>103</text:p>
          </table:table-cell>
          <table:table-cell table:formula="of:=[ML.C10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4]; [.R104:.U359]; 4; 0)); &quot;&quot;; VLOOKUP([.T104]; [.R104:.U359]; 4; 0))">
            <text:p/>
          </table:table-cell>
          <table:table-cell/>
          <table:table-cell table:formula="of:=IF(AND([.S104]=0; NOT([.U104]=0)); MAX(INDIRECT(&quot;R1:R&quot;&amp;ROW()-1))+1; &quot;&quot;)">
            <text:p/>
          </table:table-cell>
          <table:table-cell table:formula="of:=IF(COUNTIF(INDIRECT(&quot;U1:U&quot;&amp;ROW()-1); [.U104])&gt;0; 1; 0)" office:value-type="float" office:value="1" calcext:value-type="float">
            <text:p>1</text:p>
          </table:table-cell>
          <table:table-cell table:formula="of:=[.T103]+1" office:value-type="float" office:value="104" calcext:value-type="float">
            <text:p>104</text:p>
          </table:table-cell>
          <table:table-cell table:formula="of:=[ML.C10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5]; [.R105:.U360]; 4; 0)); &quot;&quot;; VLOOKUP([.T105]; [.R105:.U360]; 4; 0))">
            <text:p/>
          </table:table-cell>
          <table:table-cell/>
          <table:table-cell table:formula="of:=IF(AND([.S105]=0; NOT([.U105]=0)); MAX(INDIRECT(&quot;R1:R&quot;&amp;ROW()-1))+1; &quot;&quot;)">
            <text:p/>
          </table:table-cell>
          <table:table-cell table:formula="of:=IF(COUNTIF(INDIRECT(&quot;U1:U&quot;&amp;ROW()-1); [.U105])&gt;0; 1; 0)" office:value-type="float" office:value="1" calcext:value-type="float">
            <text:p>1</text:p>
          </table:table-cell>
          <table:table-cell table:formula="of:=[.T104]+1" office:value-type="float" office:value="105" calcext:value-type="float">
            <text:p>105</text:p>
          </table:table-cell>
          <table:table-cell table:formula="of:=[ML.C10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6]; [.R106:.U361]; 4; 0)); &quot;&quot;; VLOOKUP([.T106]; [.R106:.U361]; 4; 0))">
            <text:p/>
          </table:table-cell>
          <table:table-cell/>
          <table:table-cell table:formula="of:=IF(AND([.S106]=0; NOT([.U106]=0)); MAX(INDIRECT(&quot;R1:R&quot;&amp;ROW()-1))+1; &quot;&quot;)">
            <text:p/>
          </table:table-cell>
          <table:table-cell table:formula="of:=IF(COUNTIF(INDIRECT(&quot;U1:U&quot;&amp;ROW()-1); [.U106])&gt;0; 1; 0)" office:value-type="float" office:value="1" calcext:value-type="float">
            <text:p>1</text:p>
          </table:table-cell>
          <table:table-cell table:formula="of:=[.T105]+1" office:value-type="float" office:value="106" calcext:value-type="float">
            <text:p>106</text:p>
          </table:table-cell>
          <table:table-cell table:formula="of:=[ML.C10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7]; [.R107:.U362]; 4; 0)); &quot;&quot;; VLOOKUP([.T107]; [.R107:.U362]; 4; 0))">
            <text:p/>
          </table:table-cell>
          <table:table-cell/>
          <table:table-cell table:formula="of:=IF(AND([.S107]=0; NOT([.U107]=0)); MAX(INDIRECT(&quot;R1:R&quot;&amp;ROW()-1))+1; &quot;&quot;)">
            <text:p/>
          </table:table-cell>
          <table:table-cell table:formula="of:=IF(COUNTIF(INDIRECT(&quot;U1:U&quot;&amp;ROW()-1); [.U107])&gt;0; 1; 0)" office:value-type="float" office:value="1" calcext:value-type="float">
            <text:p>1</text:p>
          </table:table-cell>
          <table:table-cell table:formula="of:=[.T106]+1" office:value-type="float" office:value="107" calcext:value-type="float">
            <text:p>107</text:p>
          </table:table-cell>
          <table:table-cell table:formula="of:=[ML.C10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8]; [.R108:.U363]; 4; 0)); &quot;&quot;; VLOOKUP([.T108]; [.R108:.U363]; 4; 0))">
            <text:p/>
          </table:table-cell>
          <table:table-cell/>
          <table:table-cell table:formula="of:=IF(AND([.S108]=0; NOT([.U108]=0)); MAX(INDIRECT(&quot;R1:R&quot;&amp;ROW()-1))+1; &quot;&quot;)">
            <text:p/>
          </table:table-cell>
          <table:table-cell table:formula="of:=IF(COUNTIF(INDIRECT(&quot;U1:U&quot;&amp;ROW()-1); [.U108])&gt;0; 1; 0)" office:value-type="float" office:value="1" calcext:value-type="float">
            <text:p>1</text:p>
          </table:table-cell>
          <table:table-cell table:formula="of:=[.T107]+1" office:value-type="float" office:value="108" calcext:value-type="float">
            <text:p>108</text:p>
          </table:table-cell>
          <table:table-cell table:formula="of:=[ML.C11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09]; [.R109:.U364]; 4; 0)); &quot;&quot;; VLOOKUP([.T109]; [.R109:.U364]; 4; 0))">
            <text:p/>
          </table:table-cell>
          <table:table-cell/>
          <table:table-cell table:formula="of:=IF(AND([.S109]=0; NOT([.U109]=0)); MAX(INDIRECT(&quot;R1:R&quot;&amp;ROW()-1))+1; &quot;&quot;)">
            <text:p/>
          </table:table-cell>
          <table:table-cell table:formula="of:=IF(COUNTIF(INDIRECT(&quot;U1:U&quot;&amp;ROW()-1); [.U109])&gt;0; 1; 0)" office:value-type="float" office:value="1" calcext:value-type="float">
            <text:p>1</text:p>
          </table:table-cell>
          <table:table-cell table:formula="of:=[.T108]+1" office:value-type="float" office:value="109" calcext:value-type="float">
            <text:p>109</text:p>
          </table:table-cell>
          <table:table-cell table:formula="of:=[ML.C11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0]; [.R110:.U365]; 4; 0)); &quot;&quot;; VLOOKUP([.T110]; [.R110:.U365]; 4; 0))">
            <text:p/>
          </table:table-cell>
          <table:table-cell/>
          <table:table-cell table:formula="of:=IF(AND([.S110]=0; NOT([.U110]=0)); MAX(INDIRECT(&quot;R1:R&quot;&amp;ROW()-1))+1; &quot;&quot;)">
            <text:p/>
          </table:table-cell>
          <table:table-cell table:formula="of:=IF(COUNTIF(INDIRECT(&quot;U1:U&quot;&amp;ROW()-1); [.U110])&gt;0; 1; 0)" office:value-type="float" office:value="1" calcext:value-type="float">
            <text:p>1</text:p>
          </table:table-cell>
          <table:table-cell table:formula="of:=[.T109]+1" office:value-type="float" office:value="110" calcext:value-type="float">
            <text:p>110</text:p>
          </table:table-cell>
          <table:table-cell table:formula="of:=[ML.C11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1]; [.R111:.U366]; 4; 0)); &quot;&quot;; VLOOKUP([.T111]; [.R111:.U366]; 4; 0))">
            <text:p/>
          </table:table-cell>
          <table:table-cell/>
          <table:table-cell table:formula="of:=IF(AND([.S111]=0; NOT([.U111]=0)); MAX(INDIRECT(&quot;R1:R&quot;&amp;ROW()-1))+1; &quot;&quot;)">
            <text:p/>
          </table:table-cell>
          <table:table-cell table:formula="of:=IF(COUNTIF(INDIRECT(&quot;U1:U&quot;&amp;ROW()-1); [.U111])&gt;0; 1; 0)" office:value-type="float" office:value="1" calcext:value-type="float">
            <text:p>1</text:p>
          </table:table-cell>
          <table:table-cell table:formula="of:=[.T110]+1" office:value-type="float" office:value="111" calcext:value-type="float">
            <text:p>111</text:p>
          </table:table-cell>
          <table:table-cell table:formula="of:=[ML.C11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2]; [.R112:.U367]; 4; 0)); &quot;&quot;; VLOOKUP([.T112]; [.R112:.U367]; 4; 0))">
            <text:p/>
          </table:table-cell>
          <table:table-cell/>
          <table:table-cell table:formula="of:=IF(AND([.S112]=0; NOT([.U112]=0)); MAX(INDIRECT(&quot;R1:R&quot;&amp;ROW()-1))+1; &quot;&quot;)">
            <text:p/>
          </table:table-cell>
          <table:table-cell table:formula="of:=IF(COUNTIF(INDIRECT(&quot;U1:U&quot;&amp;ROW()-1); [.U112])&gt;0; 1; 0)" office:value-type="float" office:value="1" calcext:value-type="float">
            <text:p>1</text:p>
          </table:table-cell>
          <table:table-cell table:formula="of:=[.T111]+1" office:value-type="float" office:value="112" calcext:value-type="float">
            <text:p>112</text:p>
          </table:table-cell>
          <table:table-cell table:formula="of:=[ML.C11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3]; [.R113:.U368]; 4; 0)); &quot;&quot;; VLOOKUP([.T113]; [.R113:.U368]; 4; 0))">
            <text:p/>
          </table:table-cell>
          <table:table-cell/>
          <table:table-cell table:formula="of:=IF(AND([.S113]=0; NOT([.U113]=0)); MAX(INDIRECT(&quot;R1:R&quot;&amp;ROW()-1))+1; &quot;&quot;)">
            <text:p/>
          </table:table-cell>
          <table:table-cell table:formula="of:=IF(COUNTIF(INDIRECT(&quot;U1:U&quot;&amp;ROW()-1); [.U113])&gt;0; 1; 0)" office:value-type="float" office:value="1" calcext:value-type="float">
            <text:p>1</text:p>
          </table:table-cell>
          <table:table-cell table:formula="of:=[.T112]+1" office:value-type="float" office:value="113" calcext:value-type="float">
            <text:p>113</text:p>
          </table:table-cell>
          <table:table-cell table:formula="of:=[ML.C11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4]; [.R114:.U369]; 4; 0)); &quot;&quot;; VLOOKUP([.T114]; [.R114:.U369]; 4; 0))">
            <text:p/>
          </table:table-cell>
          <table:table-cell/>
          <table:table-cell table:formula="of:=IF(AND([.S114]=0; NOT([.U114]=0)); MAX(INDIRECT(&quot;R1:R&quot;&amp;ROW()-1))+1; &quot;&quot;)">
            <text:p/>
          </table:table-cell>
          <table:table-cell table:formula="of:=IF(COUNTIF(INDIRECT(&quot;U1:U&quot;&amp;ROW()-1); [.U114])&gt;0; 1; 0)" office:value-type="float" office:value="1" calcext:value-type="float">
            <text:p>1</text:p>
          </table:table-cell>
          <table:table-cell table:formula="of:=[.T113]+1" office:value-type="float" office:value="114" calcext:value-type="float">
            <text:p>114</text:p>
          </table:table-cell>
          <table:table-cell table:formula="of:=[ML.C11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5]; [.R115:.U370]; 4; 0)); &quot;&quot;; VLOOKUP([.T115]; [.R115:.U370]; 4; 0))">
            <text:p/>
          </table:table-cell>
          <table:table-cell/>
          <table:table-cell table:formula="of:=IF(AND([.S115]=0; NOT([.U115]=0)); MAX(INDIRECT(&quot;R1:R&quot;&amp;ROW()-1))+1; &quot;&quot;)">
            <text:p/>
          </table:table-cell>
          <table:table-cell table:formula="of:=IF(COUNTIF(INDIRECT(&quot;U1:U&quot;&amp;ROW()-1); [.U115])&gt;0; 1; 0)" office:value-type="float" office:value="1" calcext:value-type="float">
            <text:p>1</text:p>
          </table:table-cell>
          <table:table-cell table:formula="of:=[.T114]+1" office:value-type="float" office:value="115" calcext:value-type="float">
            <text:p>115</text:p>
          </table:table-cell>
          <table:table-cell table:formula="of:=[ML.C11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6]; [.R116:.U371]; 4; 0)); &quot;&quot;; VLOOKUP([.T116]; [.R116:.U371]; 4; 0))">
            <text:p/>
          </table:table-cell>
          <table:table-cell/>
          <table:table-cell table:formula="of:=IF(AND([.S116]=0; NOT([.U116]=0)); MAX(INDIRECT(&quot;R1:R&quot;&amp;ROW()-1))+1; &quot;&quot;)">
            <text:p/>
          </table:table-cell>
          <table:table-cell table:formula="of:=IF(COUNTIF(INDIRECT(&quot;U1:U&quot;&amp;ROW()-1); [.U116])&gt;0; 1; 0)" office:value-type="float" office:value="1" calcext:value-type="float">
            <text:p>1</text:p>
          </table:table-cell>
          <table:table-cell table:formula="of:=[.T115]+1" office:value-type="float" office:value="116" calcext:value-type="float">
            <text:p>116</text:p>
          </table:table-cell>
          <table:table-cell table:formula="of:=[ML.C11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7]; [.R117:.U372]; 4; 0)); &quot;&quot;; VLOOKUP([.T117]; [.R117:.U372]; 4; 0))">
            <text:p/>
          </table:table-cell>
          <table:table-cell/>
          <table:table-cell table:formula="of:=IF(AND([.S117]=0; NOT([.U117]=0)); MAX(INDIRECT(&quot;R1:R&quot;&amp;ROW()-1))+1; &quot;&quot;)">
            <text:p/>
          </table:table-cell>
          <table:table-cell table:formula="of:=IF(COUNTIF(INDIRECT(&quot;U1:U&quot;&amp;ROW()-1); [.U117])&gt;0; 1; 0)" office:value-type="float" office:value="1" calcext:value-type="float">
            <text:p>1</text:p>
          </table:table-cell>
          <table:table-cell table:formula="of:=[.T116]+1" office:value-type="float" office:value="117" calcext:value-type="float">
            <text:p>117</text:p>
          </table:table-cell>
          <table:table-cell table:formula="of:=[ML.C11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8]; [.R118:.U373]; 4; 0)); &quot;&quot;; VLOOKUP([.T118]; [.R118:.U373]; 4; 0))">
            <text:p/>
          </table:table-cell>
          <table:table-cell/>
          <table:table-cell table:formula="of:=IF(AND([.S118]=0; NOT([.U118]=0)); MAX(INDIRECT(&quot;R1:R&quot;&amp;ROW()-1))+1; &quot;&quot;)">
            <text:p/>
          </table:table-cell>
          <table:table-cell table:formula="of:=IF(COUNTIF(INDIRECT(&quot;U1:U&quot;&amp;ROW()-1); [.U118])&gt;0; 1; 0)" office:value-type="float" office:value="1" calcext:value-type="float">
            <text:p>1</text:p>
          </table:table-cell>
          <table:table-cell table:formula="of:=[.T117]+1" office:value-type="float" office:value="118" calcext:value-type="float">
            <text:p>118</text:p>
          </table:table-cell>
          <table:table-cell table:formula="of:=[ML.C12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19]; [.R119:.U374]; 4; 0)); &quot;&quot;; VLOOKUP([.T119]; [.R119:.U374]; 4; 0))">
            <text:p/>
          </table:table-cell>
          <table:table-cell/>
          <table:table-cell table:formula="of:=IF(AND([.S119]=0; NOT([.U119]=0)); MAX(INDIRECT(&quot;R1:R&quot;&amp;ROW()-1))+1; &quot;&quot;)">
            <text:p/>
          </table:table-cell>
          <table:table-cell table:formula="of:=IF(COUNTIF(INDIRECT(&quot;U1:U&quot;&amp;ROW()-1); [.U119])&gt;0; 1; 0)" office:value-type="float" office:value="1" calcext:value-type="float">
            <text:p>1</text:p>
          </table:table-cell>
          <table:table-cell table:formula="of:=[.T118]+1" office:value-type="float" office:value="119" calcext:value-type="float">
            <text:p>119</text:p>
          </table:table-cell>
          <table:table-cell table:formula="of:=[ML.C12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0]; [.R120:.U375]; 4; 0)); &quot;&quot;; VLOOKUP([.T120]; [.R120:.U375]; 4; 0))">
            <text:p/>
          </table:table-cell>
          <table:table-cell/>
          <table:table-cell table:formula="of:=IF(AND([.S120]=0; NOT([.U120]=0)); MAX(INDIRECT(&quot;R1:R&quot;&amp;ROW()-1))+1; &quot;&quot;)">
            <text:p/>
          </table:table-cell>
          <table:table-cell table:formula="of:=IF(COUNTIF(INDIRECT(&quot;U1:U&quot;&amp;ROW()-1); [.U120])&gt;0; 1; 0)" office:value-type="float" office:value="1" calcext:value-type="float">
            <text:p>1</text:p>
          </table:table-cell>
          <table:table-cell table:formula="of:=[.T119]+1" office:value-type="float" office:value="120" calcext:value-type="float">
            <text:p>120</text:p>
          </table:table-cell>
          <table:table-cell table:formula="of:=[ML.C12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1]; [.R121:.U376]; 4; 0)); &quot;&quot;; VLOOKUP([.T121]; [.R121:.U376]; 4; 0))">
            <text:p/>
          </table:table-cell>
          <table:table-cell/>
          <table:table-cell table:formula="of:=IF(AND([.S121]=0; NOT([.U121]=0)); MAX(INDIRECT(&quot;R1:R&quot;&amp;ROW()-1))+1; &quot;&quot;)">
            <text:p/>
          </table:table-cell>
          <table:table-cell table:formula="of:=IF(COUNTIF(INDIRECT(&quot;U1:U&quot;&amp;ROW()-1); [.U121])&gt;0; 1; 0)" office:value-type="float" office:value="1" calcext:value-type="float">
            <text:p>1</text:p>
          </table:table-cell>
          <table:table-cell table:formula="of:=[.T120]+1" office:value-type="float" office:value="121" calcext:value-type="float">
            <text:p>121</text:p>
          </table:table-cell>
          <table:table-cell table:formula="of:=[ML.C12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2]; [.R122:.U377]; 4; 0)); &quot;&quot;; VLOOKUP([.T122]; [.R122:.U377]; 4; 0))">
            <text:p/>
          </table:table-cell>
          <table:table-cell/>
          <table:table-cell table:formula="of:=IF(AND([.S122]=0; NOT([.U122]=0)); MAX(INDIRECT(&quot;R1:R&quot;&amp;ROW()-1))+1; &quot;&quot;)">
            <text:p/>
          </table:table-cell>
          <table:table-cell table:formula="of:=IF(COUNTIF(INDIRECT(&quot;U1:U&quot;&amp;ROW()-1); [.U122])&gt;0; 1; 0)" office:value-type="float" office:value="1" calcext:value-type="float">
            <text:p>1</text:p>
          </table:table-cell>
          <table:table-cell table:formula="of:=[.T121]+1" office:value-type="float" office:value="122" calcext:value-type="float">
            <text:p>122</text:p>
          </table:table-cell>
          <table:table-cell table:formula="of:=[ML.C12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3]; [.R123:.U378]; 4; 0)); &quot;&quot;; VLOOKUP([.T123]; [.R123:.U378]; 4; 0))">
            <text:p/>
          </table:table-cell>
          <table:table-cell/>
          <table:table-cell table:formula="of:=IF(AND([.S123]=0; NOT([.U123]=0)); MAX(INDIRECT(&quot;R1:R&quot;&amp;ROW()-1))+1; &quot;&quot;)">
            <text:p/>
          </table:table-cell>
          <table:table-cell table:formula="of:=IF(COUNTIF(INDIRECT(&quot;U1:U&quot;&amp;ROW()-1); [.U123])&gt;0; 1; 0)" office:value-type="float" office:value="1" calcext:value-type="float">
            <text:p>1</text:p>
          </table:table-cell>
          <table:table-cell table:formula="of:=[.T122]+1" office:value-type="float" office:value="123" calcext:value-type="float">
            <text:p>123</text:p>
          </table:table-cell>
          <table:table-cell table:formula="of:=[ML.C12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4]; [.R124:.U379]; 4; 0)); &quot;&quot;; VLOOKUP([.T124]; [.R124:.U379]; 4; 0))">
            <text:p/>
          </table:table-cell>
          <table:table-cell/>
          <table:table-cell table:formula="of:=IF(AND([.S124]=0; NOT([.U124]=0)); MAX(INDIRECT(&quot;R1:R&quot;&amp;ROW()-1))+1; &quot;&quot;)">
            <text:p/>
          </table:table-cell>
          <table:table-cell table:formula="of:=IF(COUNTIF(INDIRECT(&quot;U1:U&quot;&amp;ROW()-1); [.U124])&gt;0; 1; 0)" office:value-type="float" office:value="1" calcext:value-type="float">
            <text:p>1</text:p>
          </table:table-cell>
          <table:table-cell table:formula="of:=[.T123]+1" office:value-type="float" office:value="124" calcext:value-type="float">
            <text:p>124</text:p>
          </table:table-cell>
          <table:table-cell table:formula="of:=[ML.C12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5]; [.R125:.U380]; 4; 0)); &quot;&quot;; VLOOKUP([.T125]; [.R125:.U380]; 4; 0))">
            <text:p/>
          </table:table-cell>
          <table:table-cell/>
          <table:table-cell table:formula="of:=IF(AND([.S125]=0; NOT([.U125]=0)); MAX(INDIRECT(&quot;R1:R&quot;&amp;ROW()-1))+1; &quot;&quot;)">
            <text:p/>
          </table:table-cell>
          <table:table-cell table:formula="of:=IF(COUNTIF(INDIRECT(&quot;U1:U&quot;&amp;ROW()-1); [.U125])&gt;0; 1; 0)" office:value-type="float" office:value="1" calcext:value-type="float">
            <text:p>1</text:p>
          </table:table-cell>
          <table:table-cell table:formula="of:=[.T124]+1" office:value-type="float" office:value="125" calcext:value-type="float">
            <text:p>125</text:p>
          </table:table-cell>
          <table:table-cell table:formula="of:=[ML.C12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6]; [.R126:.U381]; 4; 0)); &quot;&quot;; VLOOKUP([.T126]; [.R126:.U381]; 4; 0))">
            <text:p/>
          </table:table-cell>
          <table:table-cell/>
          <table:table-cell table:formula="of:=IF(AND([.S126]=0; NOT([.U126]=0)); MAX(INDIRECT(&quot;R1:R&quot;&amp;ROW()-1))+1; &quot;&quot;)">
            <text:p/>
          </table:table-cell>
          <table:table-cell table:formula="of:=IF(COUNTIF(INDIRECT(&quot;U1:U&quot;&amp;ROW()-1); [.U126])&gt;0; 1; 0)" office:value-type="float" office:value="1" calcext:value-type="float">
            <text:p>1</text:p>
          </table:table-cell>
          <table:table-cell table:formula="of:=[.T125]+1" office:value-type="float" office:value="126" calcext:value-type="float">
            <text:p>126</text:p>
          </table:table-cell>
          <table:table-cell table:formula="of:=[ML.C12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7]; [.R127:.U382]; 4; 0)); &quot;&quot;; VLOOKUP([.T127]; [.R127:.U382]; 4; 0))">
            <text:p/>
          </table:table-cell>
          <table:table-cell/>
          <table:table-cell table:formula="of:=IF(AND([.S127]=0; NOT([.U127]=0)); MAX(INDIRECT(&quot;R1:R&quot;&amp;ROW()-1))+1; &quot;&quot;)">
            <text:p/>
          </table:table-cell>
          <table:table-cell table:formula="of:=IF(COUNTIF(INDIRECT(&quot;U1:U&quot;&amp;ROW()-1); [.U127])&gt;0; 1; 0)" office:value-type="float" office:value="1" calcext:value-type="float">
            <text:p>1</text:p>
          </table:table-cell>
          <table:table-cell table:formula="of:=[.T126]+1" office:value-type="float" office:value="127" calcext:value-type="float">
            <text:p>127</text:p>
          </table:table-cell>
          <table:table-cell table:formula="of:=[ML.C1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8]; [.R128:.U383]; 4; 0)); &quot;&quot;; VLOOKUP([.T128]; [.R128:.U383]; 4; 0))">
            <text:p/>
          </table:table-cell>
          <table:table-cell/>
          <table:table-cell table:formula="of:=IF(AND([.S128]=0; NOT([.U128]=0)); MAX(INDIRECT(&quot;R1:R&quot;&amp;ROW()-1))+1; &quot;&quot;)">
            <text:p/>
          </table:table-cell>
          <table:table-cell table:formula="of:=IF(COUNTIF(INDIRECT(&quot;U1:U&quot;&amp;ROW()-1); [.U128])&gt;0; 1; 0)" office:value-type="float" office:value="1" calcext:value-type="float">
            <text:p>1</text:p>
          </table:table-cell>
          <table:table-cell table:formula="of:=[.T127]+1" office:value-type="float" office:value="128" calcext:value-type="float">
            <text:p>128</text:p>
          </table:table-cell>
          <table:table-cell table:formula="of:=[ML.C13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29]; [.R129:.U384]; 4; 0)); &quot;&quot;; VLOOKUP([.T129]; [.R129:.U384]; 4; 0))">
            <text:p/>
          </table:table-cell>
          <table:table-cell/>
          <table:table-cell table:formula="of:=IF(AND([.S129]=0; NOT([.U129]=0)); MAX(INDIRECT(&quot;R1:R&quot;&amp;ROW()-1))+1; &quot;&quot;)">
            <text:p/>
          </table:table-cell>
          <table:table-cell table:formula="of:=IF(COUNTIF(INDIRECT(&quot;U1:U&quot;&amp;ROW()-1); [.U129])&gt;0; 1; 0)" office:value-type="float" office:value="1" calcext:value-type="float">
            <text:p>1</text:p>
          </table:table-cell>
          <table:table-cell table:formula="of:=[.T128]+1" office:value-type="float" office:value="129" calcext:value-type="float">
            <text:p>129</text:p>
          </table:table-cell>
          <table:table-cell table:formula="of:=[FL.C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0]; [.R130:.U385]; 4; 0)); &quot;&quot;; VLOOKUP([.T130]; [.R130:.U385]; 4; 0))">
            <text:p/>
          </table:table-cell>
          <table:table-cell/>
          <table:table-cell table:formula="of:=IF(AND([.S130]=0; NOT([.U130]=0)); MAX(INDIRECT(&quot;R1:R&quot;&amp;ROW()-1))+1; &quot;&quot;)">
            <text:p/>
          </table:table-cell>
          <table:table-cell table:formula="of:=IF(COUNTIF(INDIRECT(&quot;U1:U&quot;&amp;ROW()-1); [.U130])&gt;0; 1; 0)" office:value-type="float" office:value="1" calcext:value-type="float">
            <text:p>1</text:p>
          </table:table-cell>
          <table:table-cell table:formula="of:=[.T129]+1" office:value-type="float" office:value="130" calcext:value-type="float">
            <text:p>130</text:p>
          </table:table-cell>
          <table:table-cell table:formula="of:=[FL.C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1]; [.R131:.U386]; 4; 0)); &quot;&quot;; VLOOKUP([.T131]; [.R131:.U386]; 4; 0))">
            <text:p/>
          </table:table-cell>
          <table:table-cell/>
          <table:table-cell table:formula="of:=IF(AND([.S131]=0; NOT([.U131]=0)); MAX(INDIRECT(&quot;R1:R&quot;&amp;ROW()-1))+1; &quot;&quot;)">
            <text:p/>
          </table:table-cell>
          <table:table-cell table:formula="of:=IF(COUNTIF(INDIRECT(&quot;U1:U&quot;&amp;ROW()-1); [.U131])&gt;0; 1; 0)" office:value-type="float" office:value="1" calcext:value-type="float">
            <text:p>1</text:p>
          </table:table-cell>
          <table:table-cell table:formula="of:=[.T130]+1" office:value-type="float" office:value="131" calcext:value-type="float">
            <text:p>131</text:p>
          </table:table-cell>
          <table:table-cell table:formula="of:=[FL.C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2]; [.R132:.U387]; 4; 0)); &quot;&quot;; VLOOKUP([.T132]; [.R132:.U387]; 4; 0))">
            <text:p/>
          </table:table-cell>
          <table:table-cell/>
          <table:table-cell table:formula="of:=IF(AND([.S132]=0; NOT([.U132]=0)); MAX(INDIRECT(&quot;R1:R&quot;&amp;ROW()-1))+1; &quot;&quot;)">
            <text:p/>
          </table:table-cell>
          <table:table-cell table:formula="of:=IF(COUNTIF(INDIRECT(&quot;U1:U&quot;&amp;ROW()-1); [.U132])&gt;0; 1; 0)" office:value-type="float" office:value="1" calcext:value-type="float">
            <text:p>1</text:p>
          </table:table-cell>
          <table:table-cell table:formula="of:=[.T131]+1" office:value-type="float" office:value="132" calcext:value-type="float">
            <text:p>132</text:p>
          </table:table-cell>
          <table:table-cell table:formula="of:=[FL.C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3]; [.R133:.U388]; 4; 0)); &quot;&quot;; VLOOKUP([.T133]; [.R133:.U388]; 4; 0))">
            <text:p/>
          </table:table-cell>
          <table:table-cell/>
          <table:table-cell table:formula="of:=IF(AND([.S133]=0; NOT([.U133]=0)); MAX(INDIRECT(&quot;R1:R&quot;&amp;ROW()-1))+1; &quot;&quot;)">
            <text:p/>
          </table:table-cell>
          <table:table-cell table:formula="of:=IF(COUNTIF(INDIRECT(&quot;U1:U&quot;&amp;ROW()-1); [.U133])&gt;0; 1; 0)" office:value-type="float" office:value="1" calcext:value-type="float">
            <text:p>1</text:p>
          </table:table-cell>
          <table:table-cell table:formula="of:=[.T132]+1" office:value-type="float" office:value="133" calcext:value-type="float">
            <text:p>133</text:p>
          </table:table-cell>
          <table:table-cell table:formula="of:=[FL.C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4]; [.R134:.U389]; 4; 0)); &quot;&quot;; VLOOKUP([.T134]; [.R134:.U389]; 4; 0))">
            <text:p/>
          </table:table-cell>
          <table:table-cell/>
          <table:table-cell table:formula="of:=IF(AND([.S134]=0; NOT([.U134]=0)); MAX(INDIRECT(&quot;R1:R&quot;&amp;ROW()-1))+1; &quot;&quot;)">
            <text:p/>
          </table:table-cell>
          <table:table-cell table:formula="of:=IF(COUNTIF(INDIRECT(&quot;U1:U&quot;&amp;ROW()-1); [.U134])&gt;0; 1; 0)" office:value-type="float" office:value="1" calcext:value-type="float">
            <text:p>1</text:p>
          </table:table-cell>
          <table:table-cell table:formula="of:=[.T133]+1" office:value-type="float" office:value="134" calcext:value-type="float">
            <text:p>134</text:p>
          </table:table-cell>
          <table:table-cell table:formula="of:=[FL.C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5]; [.R135:.U390]; 4; 0)); &quot;&quot;; VLOOKUP([.T135]; [.R135:.U390]; 4; 0))">
            <text:p/>
          </table:table-cell>
          <table:table-cell/>
          <table:table-cell table:formula="of:=IF(AND([.S135]=0; NOT([.U135]=0)); MAX(INDIRECT(&quot;R1:R&quot;&amp;ROW()-1))+1; &quot;&quot;)">
            <text:p/>
          </table:table-cell>
          <table:table-cell table:formula="of:=IF(COUNTIF(INDIRECT(&quot;U1:U&quot;&amp;ROW()-1); [.U135])&gt;0; 1; 0)" office:value-type="float" office:value="1" calcext:value-type="float">
            <text:p>1</text:p>
          </table:table-cell>
          <table:table-cell table:formula="of:=[.T134]+1" office:value-type="float" office:value="135" calcext:value-type="float">
            <text:p>135</text:p>
          </table:table-cell>
          <table:table-cell table:formula="of:=[FL.C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6]; [.R136:.U391]; 4; 0)); &quot;&quot;; VLOOKUP([.T136]; [.R136:.U391]; 4; 0))">
            <text:p/>
          </table:table-cell>
          <table:table-cell/>
          <table:table-cell table:formula="of:=IF(AND([.S136]=0; NOT([.U136]=0)); MAX(INDIRECT(&quot;R1:R&quot;&amp;ROW()-1))+1; &quot;&quot;)">
            <text:p/>
          </table:table-cell>
          <table:table-cell table:formula="of:=IF(COUNTIF(INDIRECT(&quot;U1:U&quot;&amp;ROW()-1); [.U136])&gt;0; 1; 0)" office:value-type="float" office:value="1" calcext:value-type="float">
            <text:p>1</text:p>
          </table:table-cell>
          <table:table-cell table:formula="of:=[.T135]+1" office:value-type="float" office:value="136" calcext:value-type="float">
            <text:p>136</text:p>
          </table:table-cell>
          <table:table-cell table:formula="of:=[FL.C1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7]; [.R137:.U392]; 4; 0)); &quot;&quot;; VLOOKUP([.T137]; [.R137:.U392]; 4; 0))">
            <text:p/>
          </table:table-cell>
          <table:table-cell/>
          <table:table-cell table:formula="of:=IF(AND([.S137]=0; NOT([.U137]=0)); MAX(INDIRECT(&quot;R1:R&quot;&amp;ROW()-1))+1; &quot;&quot;)">
            <text:p/>
          </table:table-cell>
          <table:table-cell table:formula="of:=IF(COUNTIF(INDIRECT(&quot;U1:U&quot;&amp;ROW()-1); [.U137])&gt;0; 1; 0)" office:value-type="float" office:value="1" calcext:value-type="float">
            <text:p>1</text:p>
          </table:table-cell>
          <table:table-cell table:formula="of:=[.T136]+1" office:value-type="float" office:value="137" calcext:value-type="float">
            <text:p>137</text:p>
          </table:table-cell>
          <table:table-cell table:formula="of:=[FL.C1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8]; [.R138:.U393]; 4; 0)); &quot;&quot;; VLOOKUP([.T138]; [.R138:.U393]; 4; 0))">
            <text:p/>
          </table:table-cell>
          <table:table-cell/>
          <table:table-cell table:formula="of:=IF(AND([.S138]=0; NOT([.U138]=0)); MAX(INDIRECT(&quot;R1:R&quot;&amp;ROW()-1))+1; &quot;&quot;)">
            <text:p/>
          </table:table-cell>
          <table:table-cell table:formula="of:=IF(COUNTIF(INDIRECT(&quot;U1:U&quot;&amp;ROW()-1); [.U138])&gt;0; 1; 0)" office:value-type="float" office:value="1" calcext:value-type="float">
            <text:p>1</text:p>
          </table:table-cell>
          <table:table-cell table:formula="of:=[.T137]+1" office:value-type="float" office:value="138" calcext:value-type="float">
            <text:p>138</text:p>
          </table:table-cell>
          <table:table-cell table:formula="of:=[FL.C1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39]; [.R139:.U394]; 4; 0)); &quot;&quot;; VLOOKUP([.T139]; [.R139:.U394]; 4; 0))">
            <text:p/>
          </table:table-cell>
          <table:table-cell/>
          <table:table-cell table:formula="of:=IF(AND([.S139]=0; NOT([.U139]=0)); MAX(INDIRECT(&quot;R1:R&quot;&amp;ROW()-1))+1; &quot;&quot;)">
            <text:p/>
          </table:table-cell>
          <table:table-cell table:formula="of:=IF(COUNTIF(INDIRECT(&quot;U1:U&quot;&amp;ROW()-1); [.U139])&gt;0; 1; 0)" office:value-type="float" office:value="1" calcext:value-type="float">
            <text:p>1</text:p>
          </table:table-cell>
          <table:table-cell table:formula="of:=[.T138]+1" office:value-type="float" office:value="139" calcext:value-type="float">
            <text:p>139</text:p>
          </table:table-cell>
          <table:table-cell table:formula="of:=[FL.C1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0]; [.R140:.U395]; 4; 0)); &quot;&quot;; VLOOKUP([.T140]; [.R140:.U395]; 4; 0))">
            <text:p/>
          </table:table-cell>
          <table:table-cell/>
          <table:table-cell table:formula="of:=IF(AND([.S140]=0; NOT([.U140]=0)); MAX(INDIRECT(&quot;R1:R&quot;&amp;ROW()-1))+1; &quot;&quot;)">
            <text:p/>
          </table:table-cell>
          <table:table-cell table:formula="of:=IF(COUNTIF(INDIRECT(&quot;U1:U&quot;&amp;ROW()-1); [.U140])&gt;0; 1; 0)" office:value-type="float" office:value="1" calcext:value-type="float">
            <text:p>1</text:p>
          </table:table-cell>
          <table:table-cell table:formula="of:=[.T139]+1" office:value-type="float" office:value="140" calcext:value-type="float">
            <text:p>140</text:p>
          </table:table-cell>
          <table:table-cell table:formula="of:=[FL.C1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1]; [.R141:.U396]; 4; 0)); &quot;&quot;; VLOOKUP([.T141]; [.R141:.U396]; 4; 0))">
            <text:p/>
          </table:table-cell>
          <table:table-cell/>
          <table:table-cell table:formula="of:=IF(AND([.S141]=0; NOT([.U141]=0)); MAX(INDIRECT(&quot;R1:R&quot;&amp;ROW()-1))+1; &quot;&quot;)">
            <text:p/>
          </table:table-cell>
          <table:table-cell table:formula="of:=IF(COUNTIF(INDIRECT(&quot;U1:U&quot;&amp;ROW()-1); [.U141])&gt;0; 1; 0)" office:value-type="float" office:value="1" calcext:value-type="float">
            <text:p>1</text:p>
          </table:table-cell>
          <table:table-cell table:formula="of:=[.T140]+1" office:value-type="float" office:value="141" calcext:value-type="float">
            <text:p>141</text:p>
          </table:table-cell>
          <table:table-cell table:formula="of:=[FL.C1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2]; [.R142:.U397]; 4; 0)); &quot;&quot;; VLOOKUP([.T142]; [.R142:.U397]; 4; 0))">
            <text:p/>
          </table:table-cell>
          <table:table-cell/>
          <table:table-cell table:formula="of:=IF(AND([.S142]=0; NOT([.U142]=0)); MAX(INDIRECT(&quot;R1:R&quot;&amp;ROW()-1))+1; &quot;&quot;)">
            <text:p/>
          </table:table-cell>
          <table:table-cell table:formula="of:=IF(COUNTIF(INDIRECT(&quot;U1:U&quot;&amp;ROW()-1); [.U142])&gt;0; 1; 0)" office:value-type="float" office:value="1" calcext:value-type="float">
            <text:p>1</text:p>
          </table:table-cell>
          <table:table-cell table:formula="of:=[.T141]+1" office:value-type="float" office:value="142" calcext:value-type="float">
            <text:p>142</text:p>
          </table:table-cell>
          <table:table-cell table:formula="of:=[FL.C1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3]; [.R143:.U398]; 4; 0)); &quot;&quot;; VLOOKUP([.T143]; [.R143:.U398]; 4; 0))">
            <text:p/>
          </table:table-cell>
          <table:table-cell/>
          <table:table-cell table:formula="of:=IF(AND([.S143]=0; NOT([.U143]=0)); MAX(INDIRECT(&quot;R1:R&quot;&amp;ROW()-1))+1; &quot;&quot;)">
            <text:p/>
          </table:table-cell>
          <table:table-cell table:formula="of:=IF(COUNTIF(INDIRECT(&quot;U1:U&quot;&amp;ROW()-1); [.U143])&gt;0; 1; 0)" office:value-type="float" office:value="1" calcext:value-type="float">
            <text:p>1</text:p>
          </table:table-cell>
          <table:table-cell table:formula="of:=[.T142]+1" office:value-type="float" office:value="143" calcext:value-type="float">
            <text:p>143</text:p>
          </table:table-cell>
          <table:table-cell table:formula="of:=[FL.C1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4]; [.R144:.U399]; 4; 0)); &quot;&quot;; VLOOKUP([.T144]; [.R144:.U399]; 4; 0))">
            <text:p/>
          </table:table-cell>
          <table:table-cell/>
          <table:table-cell table:formula="of:=IF(AND([.S144]=0; NOT([.U144]=0)); MAX(INDIRECT(&quot;R1:R&quot;&amp;ROW()-1))+1; &quot;&quot;)">
            <text:p/>
          </table:table-cell>
          <table:table-cell table:formula="of:=IF(COUNTIF(INDIRECT(&quot;U1:U&quot;&amp;ROW()-1); [.U144])&gt;0; 1; 0)" office:value-type="float" office:value="1" calcext:value-type="float">
            <text:p>1</text:p>
          </table:table-cell>
          <table:table-cell table:formula="of:=[.T143]+1" office:value-type="float" office:value="144" calcext:value-type="float">
            <text:p>144</text:p>
          </table:table-cell>
          <table:table-cell table:formula="of:=[FL.C1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5]; [.R145:.U400]; 4; 0)); &quot;&quot;; VLOOKUP([.T145]; [.R145:.U400]; 4; 0))">
            <text:p/>
          </table:table-cell>
          <table:table-cell/>
          <table:table-cell table:formula="of:=IF(AND([.S145]=0; NOT([.U145]=0)); MAX(INDIRECT(&quot;R1:R&quot;&amp;ROW()-1))+1; &quot;&quot;)">
            <text:p/>
          </table:table-cell>
          <table:table-cell table:formula="of:=IF(COUNTIF(INDIRECT(&quot;U1:U&quot;&amp;ROW()-1); [.U145])&gt;0; 1; 0)" office:value-type="float" office:value="1" calcext:value-type="float">
            <text:p>1</text:p>
          </table:table-cell>
          <table:table-cell table:formula="of:=[.T144]+1" office:value-type="float" office:value="145" calcext:value-type="float">
            <text:p>145</text:p>
          </table:table-cell>
          <table:table-cell table:formula="of:=[FL.C1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6]; [.R146:.U401]; 4; 0)); &quot;&quot;; VLOOKUP([.T146]; [.R146:.U401]; 4; 0))">
            <text:p/>
          </table:table-cell>
          <table:table-cell/>
          <table:table-cell table:formula="of:=IF(AND([.S146]=0; NOT([.U146]=0)); MAX(INDIRECT(&quot;R1:R&quot;&amp;ROW()-1))+1; &quot;&quot;)">
            <text:p/>
          </table:table-cell>
          <table:table-cell table:formula="of:=IF(COUNTIF(INDIRECT(&quot;U1:U&quot;&amp;ROW()-1); [.U146])&gt;0; 1; 0)" office:value-type="float" office:value="1" calcext:value-type="float">
            <text:p>1</text:p>
          </table:table-cell>
          <table:table-cell table:formula="of:=[.T145]+1" office:value-type="float" office:value="146" calcext:value-type="float">
            <text:p>146</text:p>
          </table:table-cell>
          <table:table-cell table:formula="of:=[FL.C2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7]; [.R147:.U402]; 4; 0)); &quot;&quot;; VLOOKUP([.T147]; [.R147:.U402]; 4; 0))">
            <text:p/>
          </table:table-cell>
          <table:table-cell/>
          <table:table-cell table:formula="of:=IF(AND([.S147]=0; NOT([.U147]=0)); MAX(INDIRECT(&quot;R1:R&quot;&amp;ROW()-1))+1; &quot;&quot;)">
            <text:p/>
          </table:table-cell>
          <table:table-cell table:formula="of:=IF(COUNTIF(INDIRECT(&quot;U1:U&quot;&amp;ROW()-1); [.U147])&gt;0; 1; 0)" office:value-type="float" office:value="1" calcext:value-type="float">
            <text:p>1</text:p>
          </table:table-cell>
          <table:table-cell table:formula="of:=[.T146]+1" office:value-type="float" office:value="147" calcext:value-type="float">
            <text:p>147</text:p>
          </table:table-cell>
          <table:table-cell table:formula="of:=[FL.C2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8]; [.R148:.U403]; 4; 0)); &quot;&quot;; VLOOKUP([.T148]; [.R148:.U403]; 4; 0))">
            <text:p/>
          </table:table-cell>
          <table:table-cell/>
          <table:table-cell table:formula="of:=IF(AND([.S148]=0; NOT([.U148]=0)); MAX(INDIRECT(&quot;R1:R&quot;&amp;ROW()-1))+1; &quot;&quot;)">
            <text:p/>
          </table:table-cell>
          <table:table-cell table:formula="of:=IF(COUNTIF(INDIRECT(&quot;U1:U&quot;&amp;ROW()-1); [.U148])&gt;0; 1; 0)" office:value-type="float" office:value="1" calcext:value-type="float">
            <text:p>1</text:p>
          </table:table-cell>
          <table:table-cell table:formula="of:=[.T147]+1" office:value-type="float" office:value="148" calcext:value-type="float">
            <text:p>148</text:p>
          </table:table-cell>
          <table:table-cell table:formula="of:=[FL.C2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49]; [.R149:.U404]; 4; 0)); &quot;&quot;; VLOOKUP([.T149]; [.R149:.U404]; 4; 0))">
            <text:p/>
          </table:table-cell>
          <table:table-cell/>
          <table:table-cell table:formula="of:=IF(AND([.S149]=0; NOT([.U149]=0)); MAX(INDIRECT(&quot;R1:R&quot;&amp;ROW()-1))+1; &quot;&quot;)">
            <text:p/>
          </table:table-cell>
          <table:table-cell table:formula="of:=IF(COUNTIF(INDIRECT(&quot;U1:U&quot;&amp;ROW()-1); [.U149])&gt;0; 1; 0)" office:value-type="float" office:value="1" calcext:value-type="float">
            <text:p>1</text:p>
          </table:table-cell>
          <table:table-cell table:formula="of:=[.T148]+1" office:value-type="float" office:value="149" calcext:value-type="float">
            <text:p>149</text:p>
          </table:table-cell>
          <table:table-cell table:formula="of:=[FL.C2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0]; [.R150:.U405]; 4; 0)); &quot;&quot;; VLOOKUP([.T150]; [.R150:.U405]; 4; 0))">
            <text:p/>
          </table:table-cell>
          <table:table-cell/>
          <table:table-cell table:formula="of:=IF(AND([.S150]=0; NOT([.U150]=0)); MAX(INDIRECT(&quot;R1:R&quot;&amp;ROW()-1))+1; &quot;&quot;)">
            <text:p/>
          </table:table-cell>
          <table:table-cell table:formula="of:=IF(COUNTIF(INDIRECT(&quot;U1:U&quot;&amp;ROW()-1); [.U150])&gt;0; 1; 0)" office:value-type="float" office:value="1" calcext:value-type="float">
            <text:p>1</text:p>
          </table:table-cell>
          <table:table-cell table:formula="of:=[.T149]+1" office:value-type="float" office:value="150" calcext:value-type="float">
            <text:p>150</text:p>
          </table:table-cell>
          <table:table-cell table:formula="of:=[FL.C2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1]; [.R151:.U406]; 4; 0)); &quot;&quot;; VLOOKUP([.T151]; [.R151:.U406]; 4; 0))">
            <text:p/>
          </table:table-cell>
          <table:table-cell/>
          <table:table-cell table:formula="of:=IF(AND([.S151]=0; NOT([.U151]=0)); MAX(INDIRECT(&quot;R1:R&quot;&amp;ROW()-1))+1; &quot;&quot;)">
            <text:p/>
          </table:table-cell>
          <table:table-cell table:formula="of:=IF(COUNTIF(INDIRECT(&quot;U1:U&quot;&amp;ROW()-1); [.U151])&gt;0; 1; 0)" office:value-type="float" office:value="1" calcext:value-type="float">
            <text:p>1</text:p>
          </table:table-cell>
          <table:table-cell table:formula="of:=[.T150]+1" office:value-type="float" office:value="151" calcext:value-type="float">
            <text:p>151</text:p>
          </table:table-cell>
          <table:table-cell table:formula="of:=[FL.C2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2]; [.R152:.U407]; 4; 0)); &quot;&quot;; VLOOKUP([.T152]; [.R152:.U407]; 4; 0))">
            <text:p/>
          </table:table-cell>
          <table:table-cell/>
          <table:table-cell table:formula="of:=IF(AND([.S152]=0; NOT([.U152]=0)); MAX(INDIRECT(&quot;R1:R&quot;&amp;ROW()-1))+1; &quot;&quot;)">
            <text:p/>
          </table:table-cell>
          <table:table-cell table:formula="of:=IF(COUNTIF(INDIRECT(&quot;U1:U&quot;&amp;ROW()-1); [.U152])&gt;0; 1; 0)" office:value-type="float" office:value="1" calcext:value-type="float">
            <text:p>1</text:p>
          </table:table-cell>
          <table:table-cell table:formula="of:=[.T151]+1" office:value-type="float" office:value="152" calcext:value-type="float">
            <text:p>152</text:p>
          </table:table-cell>
          <table:table-cell table:formula="of:=[FL.C2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3]; [.R153:.U408]; 4; 0)); &quot;&quot;; VLOOKUP([.T153]; [.R153:.U408]; 4; 0))">
            <text:p/>
          </table:table-cell>
          <table:table-cell/>
          <table:table-cell table:formula="of:=IF(AND([.S153]=0; NOT([.U153]=0)); MAX(INDIRECT(&quot;R1:R&quot;&amp;ROW()-1))+1; &quot;&quot;)">
            <text:p/>
          </table:table-cell>
          <table:table-cell table:formula="of:=IF(COUNTIF(INDIRECT(&quot;U1:U&quot;&amp;ROW()-1); [.U153])&gt;0; 1; 0)" office:value-type="float" office:value="1" calcext:value-type="float">
            <text:p>1</text:p>
          </table:table-cell>
          <table:table-cell table:formula="of:=[.T152]+1" office:value-type="float" office:value="153" calcext:value-type="float">
            <text:p>153</text:p>
          </table:table-cell>
          <table:table-cell table:formula="of:=[FL.C2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4]; [.R154:.U409]; 4; 0)); &quot;&quot;; VLOOKUP([.T154]; [.R154:.U409]; 4; 0))">
            <text:p/>
          </table:table-cell>
          <table:table-cell/>
          <table:table-cell table:formula="of:=IF(AND([.S154]=0; NOT([.U154]=0)); MAX(INDIRECT(&quot;R1:R&quot;&amp;ROW()-1))+1; &quot;&quot;)">
            <text:p/>
          </table:table-cell>
          <table:table-cell table:formula="of:=IF(COUNTIF(INDIRECT(&quot;U1:U&quot;&amp;ROW()-1); [.U154])&gt;0; 1; 0)" office:value-type="float" office:value="1" calcext:value-type="float">
            <text:p>1</text:p>
          </table:table-cell>
          <table:table-cell table:formula="of:=[.T153]+1" office:value-type="float" office:value="154" calcext:value-type="float">
            <text:p>154</text:p>
          </table:table-cell>
          <table:table-cell table:formula="of:=[FL.C2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5]; [.R155:.U410]; 4; 0)); &quot;&quot;; VLOOKUP([.T155]; [.R155:.U410]; 4; 0))">
            <text:p/>
          </table:table-cell>
          <table:table-cell/>
          <table:table-cell table:formula="of:=IF(AND([.S155]=0; NOT([.U155]=0)); MAX(INDIRECT(&quot;R1:R&quot;&amp;ROW()-1))+1; &quot;&quot;)">
            <text:p/>
          </table:table-cell>
          <table:table-cell table:formula="of:=IF(COUNTIF(INDIRECT(&quot;U1:U&quot;&amp;ROW()-1); [.U155])&gt;0; 1; 0)" office:value-type="float" office:value="1" calcext:value-type="float">
            <text:p>1</text:p>
          </table:table-cell>
          <table:table-cell table:formula="of:=[.T154]+1" office:value-type="float" office:value="155" calcext:value-type="float">
            <text:p>155</text:p>
          </table:table-cell>
          <table:table-cell table:formula="of:=[FL.C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6]; [.R156:.U411]; 4; 0)); &quot;&quot;; VLOOKUP([.T156]; [.R156:.U411]; 4; 0))">
            <text:p/>
          </table:table-cell>
          <table:table-cell/>
          <table:table-cell table:formula="of:=IF(AND([.S156]=0; NOT([.U156]=0)); MAX(INDIRECT(&quot;R1:R&quot;&amp;ROW()-1))+1; &quot;&quot;)">
            <text:p/>
          </table:table-cell>
          <table:table-cell table:formula="of:=IF(COUNTIF(INDIRECT(&quot;U1:U&quot;&amp;ROW()-1); [.U156])&gt;0; 1; 0)" office:value-type="float" office:value="1" calcext:value-type="float">
            <text:p>1</text:p>
          </table:table-cell>
          <table:table-cell table:formula="of:=[.T155]+1" office:value-type="float" office:value="156" calcext:value-type="float">
            <text:p>156</text:p>
          </table:table-cell>
          <table:table-cell table:formula="of:=[FL.C3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7]; [.R157:.U412]; 4; 0)); &quot;&quot;; VLOOKUP([.T157]; [.R157:.U412]; 4; 0))">
            <text:p/>
          </table:table-cell>
          <table:table-cell/>
          <table:table-cell table:formula="of:=IF(AND([.S157]=0; NOT([.U157]=0)); MAX(INDIRECT(&quot;R1:R&quot;&amp;ROW()-1))+1; &quot;&quot;)">
            <text:p/>
          </table:table-cell>
          <table:table-cell table:formula="of:=IF(COUNTIF(INDIRECT(&quot;U1:U&quot;&amp;ROW()-1); [.U157])&gt;0; 1; 0)" office:value-type="float" office:value="1" calcext:value-type="float">
            <text:p>1</text:p>
          </table:table-cell>
          <table:table-cell table:formula="of:=[.T156]+1" office:value-type="float" office:value="157" calcext:value-type="float">
            <text:p>157</text:p>
          </table:table-cell>
          <table:table-cell table:formula="of:=[FL.C3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8]; [.R158:.U413]; 4; 0)); &quot;&quot;; VLOOKUP([.T158]; [.R158:.U413]; 4; 0))">
            <text:p/>
          </table:table-cell>
          <table:table-cell/>
          <table:table-cell table:formula="of:=IF(AND([.S158]=0; NOT([.U158]=0)); MAX(INDIRECT(&quot;R1:R&quot;&amp;ROW()-1))+1; &quot;&quot;)">
            <text:p/>
          </table:table-cell>
          <table:table-cell table:formula="of:=IF(COUNTIF(INDIRECT(&quot;U1:U&quot;&amp;ROW()-1); [.U158])&gt;0; 1; 0)" office:value-type="float" office:value="1" calcext:value-type="float">
            <text:p>1</text:p>
          </table:table-cell>
          <table:table-cell table:formula="of:=[.T157]+1" office:value-type="float" office:value="158" calcext:value-type="float">
            <text:p>158</text:p>
          </table:table-cell>
          <table:table-cell table:formula="of:=[FL.C3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59]; [.R159:.U414]; 4; 0)); &quot;&quot;; VLOOKUP([.T159]; [.R159:.U414]; 4; 0))">
            <text:p/>
          </table:table-cell>
          <table:table-cell/>
          <table:table-cell table:formula="of:=IF(AND([.S159]=0; NOT([.U159]=0)); MAX(INDIRECT(&quot;R1:R&quot;&amp;ROW()-1))+1; &quot;&quot;)">
            <text:p/>
          </table:table-cell>
          <table:table-cell table:formula="of:=IF(COUNTIF(INDIRECT(&quot;U1:U&quot;&amp;ROW()-1); [.U159])&gt;0; 1; 0)" office:value-type="float" office:value="1" calcext:value-type="float">
            <text:p>1</text:p>
          </table:table-cell>
          <table:table-cell table:formula="of:=[.T158]+1" office:value-type="float" office:value="159" calcext:value-type="float">
            <text:p>159</text:p>
          </table:table-cell>
          <table:table-cell table:formula="of:=[FL.C3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0]; [.R160:.U415]; 4; 0)); &quot;&quot;; VLOOKUP([.T160]; [.R160:.U415]; 4; 0))">
            <text:p/>
          </table:table-cell>
          <table:table-cell/>
          <table:table-cell table:formula="of:=IF(AND([.S160]=0; NOT([.U160]=0)); MAX(INDIRECT(&quot;R1:R&quot;&amp;ROW()-1))+1; &quot;&quot;)">
            <text:p/>
          </table:table-cell>
          <table:table-cell table:formula="of:=IF(COUNTIF(INDIRECT(&quot;U1:U&quot;&amp;ROW()-1); [.U160])&gt;0; 1; 0)" office:value-type="float" office:value="1" calcext:value-type="float">
            <text:p>1</text:p>
          </table:table-cell>
          <table:table-cell table:formula="of:=[.T159]+1" office:value-type="float" office:value="160" calcext:value-type="float">
            <text:p>160</text:p>
          </table:table-cell>
          <table:table-cell table:formula="of:=[FL.C3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1]; [.R161:.U416]; 4; 0)); &quot;&quot;; VLOOKUP([.T161]; [.R161:.U416]; 4; 0))">
            <text:p/>
          </table:table-cell>
          <table:table-cell/>
          <table:table-cell table:formula="of:=IF(AND([.S161]=0; NOT([.U161]=0)); MAX(INDIRECT(&quot;R1:R&quot;&amp;ROW()-1))+1; &quot;&quot;)">
            <text:p/>
          </table:table-cell>
          <table:table-cell table:formula="of:=IF(COUNTIF(INDIRECT(&quot;U1:U&quot;&amp;ROW()-1); [.U161])&gt;0; 1; 0)" office:value-type="float" office:value="1" calcext:value-type="float">
            <text:p>1</text:p>
          </table:table-cell>
          <table:table-cell table:formula="of:=[.T160]+1" office:value-type="float" office:value="161" calcext:value-type="float">
            <text:p>161</text:p>
          </table:table-cell>
          <table:table-cell table:formula="of:=[FL.C3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2]; [.R162:.U417]; 4; 0)); &quot;&quot;; VLOOKUP([.T162]; [.R162:.U417]; 4; 0))">
            <text:p/>
          </table:table-cell>
          <table:table-cell/>
          <table:table-cell table:formula="of:=IF(AND([.S162]=0; NOT([.U162]=0)); MAX(INDIRECT(&quot;R1:R&quot;&amp;ROW()-1))+1; &quot;&quot;)">
            <text:p/>
          </table:table-cell>
          <table:table-cell table:formula="of:=IF(COUNTIF(INDIRECT(&quot;U1:U&quot;&amp;ROW()-1); [.U162])&gt;0; 1; 0)" office:value-type="float" office:value="1" calcext:value-type="float">
            <text:p>1</text:p>
          </table:table-cell>
          <table:table-cell table:formula="of:=[.T161]+1" office:value-type="float" office:value="162" calcext:value-type="float">
            <text:p>162</text:p>
          </table:table-cell>
          <table:table-cell table:formula="of:=[FL.C3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3]; [.R163:.U418]; 4; 0)); &quot;&quot;; VLOOKUP([.T163]; [.R163:.U418]; 4; 0))">
            <text:p/>
          </table:table-cell>
          <table:table-cell/>
          <table:table-cell table:formula="of:=IF(AND([.S163]=0; NOT([.U163]=0)); MAX(INDIRECT(&quot;R1:R&quot;&amp;ROW()-1))+1; &quot;&quot;)">
            <text:p/>
          </table:table-cell>
          <table:table-cell table:formula="of:=IF(COUNTIF(INDIRECT(&quot;U1:U&quot;&amp;ROW()-1); [.U163])&gt;0; 1; 0)" office:value-type="float" office:value="1" calcext:value-type="float">
            <text:p>1</text:p>
          </table:table-cell>
          <table:table-cell table:formula="of:=[.T162]+1" office:value-type="float" office:value="163" calcext:value-type="float">
            <text:p>163</text:p>
          </table:table-cell>
          <table:table-cell table:formula="of:=[FL.C3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4]; [.R164:.U419]; 4; 0)); &quot;&quot;; VLOOKUP([.T164]; [.R164:.U419]; 4; 0))">
            <text:p/>
          </table:table-cell>
          <table:table-cell/>
          <table:table-cell table:formula="of:=IF(AND([.S164]=0; NOT([.U164]=0)); MAX(INDIRECT(&quot;R1:R&quot;&amp;ROW()-1))+1; &quot;&quot;)">
            <text:p/>
          </table:table-cell>
          <table:table-cell table:formula="of:=IF(COUNTIF(INDIRECT(&quot;U1:U&quot;&amp;ROW()-1); [.U164])&gt;0; 1; 0)" office:value-type="float" office:value="1" calcext:value-type="float">
            <text:p>1</text:p>
          </table:table-cell>
          <table:table-cell table:formula="of:=[.T163]+1" office:value-type="float" office:value="164" calcext:value-type="float">
            <text:p>164</text:p>
          </table:table-cell>
          <table:table-cell table:formula="of:=[FL.C3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5]; [.R165:.U420]; 4; 0)); &quot;&quot;; VLOOKUP([.T165]; [.R165:.U420]; 4; 0))">
            <text:p/>
          </table:table-cell>
          <table:table-cell/>
          <table:table-cell table:formula="of:=IF(AND([.S165]=0; NOT([.U165]=0)); MAX(INDIRECT(&quot;R1:R&quot;&amp;ROW()-1))+1; &quot;&quot;)">
            <text:p/>
          </table:table-cell>
          <table:table-cell table:formula="of:=IF(COUNTIF(INDIRECT(&quot;U1:U&quot;&amp;ROW()-1); [.U165])&gt;0; 1; 0)" office:value-type="float" office:value="1" calcext:value-type="float">
            <text:p>1</text:p>
          </table:table-cell>
          <table:table-cell table:formula="of:=[.T164]+1" office:value-type="float" office:value="165" calcext:value-type="float">
            <text:p>165</text:p>
          </table:table-cell>
          <table:table-cell table:formula="of:=[FL.C3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6]; [.R166:.U421]; 4; 0)); &quot;&quot;; VLOOKUP([.T166]; [.R166:.U421]; 4; 0))">
            <text:p/>
          </table:table-cell>
          <table:table-cell/>
          <table:table-cell table:formula="of:=IF(AND([.S166]=0; NOT([.U166]=0)); MAX(INDIRECT(&quot;R1:R&quot;&amp;ROW()-1))+1; &quot;&quot;)">
            <text:p/>
          </table:table-cell>
          <table:table-cell table:formula="of:=IF(COUNTIF(INDIRECT(&quot;U1:U&quot;&amp;ROW()-1); [.U166])&gt;0; 1; 0)" office:value-type="float" office:value="1" calcext:value-type="float">
            <text:p>1</text:p>
          </table:table-cell>
          <table:table-cell table:formula="of:=[.T165]+1" office:value-type="float" office:value="166" calcext:value-type="float">
            <text:p>166</text:p>
          </table:table-cell>
          <table:table-cell table:formula="of:=[FL.C4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7]; [.R167:.U422]; 4; 0)); &quot;&quot;; VLOOKUP([.T167]; [.R167:.U422]; 4; 0))">
            <text:p/>
          </table:table-cell>
          <table:table-cell/>
          <table:table-cell table:formula="of:=IF(AND([.S167]=0; NOT([.U167]=0)); MAX(INDIRECT(&quot;R1:R&quot;&amp;ROW()-1))+1; &quot;&quot;)">
            <text:p/>
          </table:table-cell>
          <table:table-cell table:formula="of:=IF(COUNTIF(INDIRECT(&quot;U1:U&quot;&amp;ROW()-1); [.U167])&gt;0; 1; 0)" office:value-type="float" office:value="1" calcext:value-type="float">
            <text:p>1</text:p>
          </table:table-cell>
          <table:table-cell table:formula="of:=[.T166]+1" office:value-type="float" office:value="167" calcext:value-type="float">
            <text:p>167</text:p>
          </table:table-cell>
          <table:table-cell table:formula="of:=[FL.C4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8]; [.R168:.U423]; 4; 0)); &quot;&quot;; VLOOKUP([.T168]; [.R168:.U423]; 4; 0))">
            <text:p/>
          </table:table-cell>
          <table:table-cell/>
          <table:table-cell table:formula="of:=IF(AND([.S168]=0; NOT([.U168]=0)); MAX(INDIRECT(&quot;R1:R&quot;&amp;ROW()-1))+1; &quot;&quot;)">
            <text:p/>
          </table:table-cell>
          <table:table-cell table:formula="of:=IF(COUNTIF(INDIRECT(&quot;U1:U&quot;&amp;ROW()-1); [.U168])&gt;0; 1; 0)" office:value-type="float" office:value="1" calcext:value-type="float">
            <text:p>1</text:p>
          </table:table-cell>
          <table:table-cell table:formula="of:=[.T167]+1" office:value-type="float" office:value="168" calcext:value-type="float">
            <text:p>168</text:p>
          </table:table-cell>
          <table:table-cell table:formula="of:=[FL.C4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69]; [.R169:.U424]; 4; 0)); &quot;&quot;; VLOOKUP([.T169]; [.R169:.U424]; 4; 0))">
            <text:p/>
          </table:table-cell>
          <table:table-cell/>
          <table:table-cell table:formula="of:=IF(AND([.S169]=0; NOT([.U169]=0)); MAX(INDIRECT(&quot;R1:R&quot;&amp;ROW()-1))+1; &quot;&quot;)">
            <text:p/>
          </table:table-cell>
          <table:table-cell table:formula="of:=IF(COUNTIF(INDIRECT(&quot;U1:U&quot;&amp;ROW()-1); [.U169])&gt;0; 1; 0)" office:value-type="float" office:value="1" calcext:value-type="float">
            <text:p>1</text:p>
          </table:table-cell>
          <table:table-cell table:formula="of:=[.T168]+1" office:value-type="float" office:value="169" calcext:value-type="float">
            <text:p>169</text:p>
          </table:table-cell>
          <table:table-cell table:formula="of:=[FL.C4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0]; [.R170:.U425]; 4; 0)); &quot;&quot;; VLOOKUP([.T170]; [.R170:.U425]; 4; 0))">
            <text:p/>
          </table:table-cell>
          <table:table-cell/>
          <table:table-cell table:formula="of:=IF(AND([.S170]=0; NOT([.U170]=0)); MAX(INDIRECT(&quot;R1:R&quot;&amp;ROW()-1))+1; &quot;&quot;)">
            <text:p/>
          </table:table-cell>
          <table:table-cell table:formula="of:=IF(COUNTIF(INDIRECT(&quot;U1:U&quot;&amp;ROW()-1); [.U170])&gt;0; 1; 0)" office:value-type="float" office:value="1" calcext:value-type="float">
            <text:p>1</text:p>
          </table:table-cell>
          <table:table-cell table:formula="of:=[.T169]+1" office:value-type="float" office:value="170" calcext:value-type="float">
            <text:p>170</text:p>
          </table:table-cell>
          <table:table-cell table:formula="of:=[FL.C4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1]; [.R171:.U426]; 4; 0)); &quot;&quot;; VLOOKUP([.T171]; [.R171:.U426]; 4; 0))">
            <text:p/>
          </table:table-cell>
          <table:table-cell/>
          <table:table-cell table:formula="of:=IF(AND([.S171]=0; NOT([.U171]=0)); MAX(INDIRECT(&quot;R1:R&quot;&amp;ROW()-1))+1; &quot;&quot;)">
            <text:p/>
          </table:table-cell>
          <table:table-cell table:formula="of:=IF(COUNTIF(INDIRECT(&quot;U1:U&quot;&amp;ROW()-1); [.U171])&gt;0; 1; 0)" office:value-type="float" office:value="1" calcext:value-type="float">
            <text:p>1</text:p>
          </table:table-cell>
          <table:table-cell table:formula="of:=[.T170]+1" office:value-type="float" office:value="171" calcext:value-type="float">
            <text:p>171</text:p>
          </table:table-cell>
          <table:table-cell table:formula="of:=[FL.C4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2]; [.R172:.U427]; 4; 0)); &quot;&quot;; VLOOKUP([.T172]; [.R172:.U427]; 4; 0))">
            <text:p/>
          </table:table-cell>
          <table:table-cell/>
          <table:table-cell table:formula="of:=IF(AND([.S172]=0; NOT([.U172]=0)); MAX(INDIRECT(&quot;R1:R&quot;&amp;ROW()-1))+1; &quot;&quot;)">
            <text:p/>
          </table:table-cell>
          <table:table-cell table:formula="of:=IF(COUNTIF(INDIRECT(&quot;U1:U&quot;&amp;ROW()-1); [.U172])&gt;0; 1; 0)" office:value-type="float" office:value="1" calcext:value-type="float">
            <text:p>1</text:p>
          </table:table-cell>
          <table:table-cell table:formula="of:=[.T171]+1" office:value-type="float" office:value="172" calcext:value-type="float">
            <text:p>172</text:p>
          </table:table-cell>
          <table:table-cell table:formula="of:=[FL.C4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3]; [.R173:.U428]; 4; 0)); &quot;&quot;; VLOOKUP([.T173]; [.R173:.U428]; 4; 0))">
            <text:p/>
          </table:table-cell>
          <table:table-cell/>
          <table:table-cell table:formula="of:=IF(AND([.S173]=0; NOT([.U173]=0)); MAX(INDIRECT(&quot;R1:R&quot;&amp;ROW()-1))+1; &quot;&quot;)">
            <text:p/>
          </table:table-cell>
          <table:table-cell table:formula="of:=IF(COUNTIF(INDIRECT(&quot;U1:U&quot;&amp;ROW()-1); [.U173])&gt;0; 1; 0)" office:value-type="float" office:value="1" calcext:value-type="float">
            <text:p>1</text:p>
          </table:table-cell>
          <table:table-cell table:formula="of:=[.T172]+1" office:value-type="float" office:value="173" calcext:value-type="float">
            <text:p>173</text:p>
          </table:table-cell>
          <table:table-cell table:formula="of:=[FL.C4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4]; [.R174:.U429]; 4; 0)); &quot;&quot;; VLOOKUP([.T174]; [.R174:.U429]; 4; 0))">
            <text:p/>
          </table:table-cell>
          <table:table-cell/>
          <table:table-cell table:formula="of:=IF(AND([.S174]=0; NOT([.U174]=0)); MAX(INDIRECT(&quot;R1:R&quot;&amp;ROW()-1))+1; &quot;&quot;)">
            <text:p/>
          </table:table-cell>
          <table:table-cell table:formula="of:=IF(COUNTIF(INDIRECT(&quot;U1:U&quot;&amp;ROW()-1); [.U174])&gt;0; 1; 0)" office:value-type="float" office:value="1" calcext:value-type="float">
            <text:p>1</text:p>
          </table:table-cell>
          <table:table-cell table:formula="of:=[.T173]+1" office:value-type="float" office:value="174" calcext:value-type="float">
            <text:p>174</text:p>
          </table:table-cell>
          <table:table-cell table:formula="of:=[FL.C4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5]; [.R175:.U430]; 4; 0)); &quot;&quot;; VLOOKUP([.T175]; [.R175:.U430]; 4; 0))">
            <text:p/>
          </table:table-cell>
          <table:table-cell/>
          <table:table-cell table:formula="of:=IF(AND([.S175]=0; NOT([.U175]=0)); MAX(INDIRECT(&quot;R1:R&quot;&amp;ROW()-1))+1; &quot;&quot;)">
            <text:p/>
          </table:table-cell>
          <table:table-cell table:formula="of:=IF(COUNTIF(INDIRECT(&quot;U1:U&quot;&amp;ROW()-1); [.U175])&gt;0; 1; 0)" office:value-type="float" office:value="1" calcext:value-type="float">
            <text:p>1</text:p>
          </table:table-cell>
          <table:table-cell table:formula="of:=[.T174]+1" office:value-type="float" office:value="175" calcext:value-type="float">
            <text:p>175</text:p>
          </table:table-cell>
          <table:table-cell table:formula="of:=[FL.C4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6]; [.R176:.U431]; 4; 0)); &quot;&quot;; VLOOKUP([.T176]; [.R176:.U431]; 4; 0))">
            <text:p/>
          </table:table-cell>
          <table:table-cell/>
          <table:table-cell table:formula="of:=IF(AND([.S176]=0; NOT([.U176]=0)); MAX(INDIRECT(&quot;R1:R&quot;&amp;ROW()-1))+1; &quot;&quot;)">
            <text:p/>
          </table:table-cell>
          <table:table-cell table:formula="of:=IF(COUNTIF(INDIRECT(&quot;U1:U&quot;&amp;ROW()-1); [.U176])&gt;0; 1; 0)" office:value-type="float" office:value="1" calcext:value-type="float">
            <text:p>1</text:p>
          </table:table-cell>
          <table:table-cell table:formula="of:=[.T175]+1" office:value-type="float" office:value="176" calcext:value-type="float">
            <text:p>176</text:p>
          </table:table-cell>
          <table:table-cell table:formula="of:=[FL.C5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7]; [.R177:.U432]; 4; 0)); &quot;&quot;; VLOOKUP([.T177]; [.R177:.U432]; 4; 0))">
            <text:p/>
          </table:table-cell>
          <table:table-cell/>
          <table:table-cell table:formula="of:=IF(AND([.S177]=0; NOT([.U177]=0)); MAX(INDIRECT(&quot;R1:R&quot;&amp;ROW()-1))+1; &quot;&quot;)">
            <text:p/>
          </table:table-cell>
          <table:table-cell table:formula="of:=IF(COUNTIF(INDIRECT(&quot;U1:U&quot;&amp;ROW()-1); [.U177])&gt;0; 1; 0)" office:value-type="float" office:value="1" calcext:value-type="float">
            <text:p>1</text:p>
          </table:table-cell>
          <table:table-cell table:formula="of:=[.T176]+1" office:value-type="float" office:value="177" calcext:value-type="float">
            <text:p>177</text:p>
          </table:table-cell>
          <table:table-cell table:formula="of:=[FL.C5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8]; [.R178:.U433]; 4; 0)); &quot;&quot;; VLOOKUP([.T178]; [.R178:.U433]; 4; 0))">
            <text:p/>
          </table:table-cell>
          <table:table-cell/>
          <table:table-cell table:formula="of:=IF(AND([.S178]=0; NOT([.U178]=0)); MAX(INDIRECT(&quot;R1:R&quot;&amp;ROW()-1))+1; &quot;&quot;)">
            <text:p/>
          </table:table-cell>
          <table:table-cell table:formula="of:=IF(COUNTIF(INDIRECT(&quot;U1:U&quot;&amp;ROW()-1); [.U178])&gt;0; 1; 0)" office:value-type="float" office:value="1" calcext:value-type="float">
            <text:p>1</text:p>
          </table:table-cell>
          <table:table-cell table:formula="of:=[.T177]+1" office:value-type="float" office:value="178" calcext:value-type="float">
            <text:p>178</text:p>
          </table:table-cell>
          <table:table-cell table:formula="of:=[FL.C5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79]; [.R179:.U434]; 4; 0)); &quot;&quot;; VLOOKUP([.T179]; [.R179:.U434]; 4; 0))">
            <text:p/>
          </table:table-cell>
          <table:table-cell/>
          <table:table-cell table:formula="of:=IF(AND([.S179]=0; NOT([.U179]=0)); MAX(INDIRECT(&quot;R1:R&quot;&amp;ROW()-1))+1; &quot;&quot;)">
            <text:p/>
          </table:table-cell>
          <table:table-cell table:formula="of:=IF(COUNTIF(INDIRECT(&quot;U1:U&quot;&amp;ROW()-1); [.U179])&gt;0; 1; 0)" office:value-type="float" office:value="1" calcext:value-type="float">
            <text:p>1</text:p>
          </table:table-cell>
          <table:table-cell table:formula="of:=[.T178]+1" office:value-type="float" office:value="179" calcext:value-type="float">
            <text:p>179</text:p>
          </table:table-cell>
          <table:table-cell table:formula="of:=[FL.C5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0]; [.R180:.U435]; 4; 0)); &quot;&quot;; VLOOKUP([.T180]; [.R180:.U435]; 4; 0))">
            <text:p/>
          </table:table-cell>
          <table:table-cell/>
          <table:table-cell table:formula="of:=IF(AND([.S180]=0; NOT([.U180]=0)); MAX(INDIRECT(&quot;R1:R&quot;&amp;ROW()-1))+1; &quot;&quot;)">
            <text:p/>
          </table:table-cell>
          <table:table-cell table:formula="of:=IF(COUNTIF(INDIRECT(&quot;U1:U&quot;&amp;ROW()-1); [.U180])&gt;0; 1; 0)" office:value-type="float" office:value="1" calcext:value-type="float">
            <text:p>1</text:p>
          </table:table-cell>
          <table:table-cell table:formula="of:=[.T179]+1" office:value-type="float" office:value="180" calcext:value-type="float">
            <text:p>180</text:p>
          </table:table-cell>
          <table:table-cell table:formula="of:=[FL.C5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1]; [.R181:.U436]; 4; 0)); &quot;&quot;; VLOOKUP([.T181]; [.R181:.U436]; 4; 0))">
            <text:p/>
          </table:table-cell>
          <table:table-cell/>
          <table:table-cell table:formula="of:=IF(AND([.S181]=0; NOT([.U181]=0)); MAX(INDIRECT(&quot;R1:R&quot;&amp;ROW()-1))+1; &quot;&quot;)">
            <text:p/>
          </table:table-cell>
          <table:table-cell table:formula="of:=IF(COUNTIF(INDIRECT(&quot;U1:U&quot;&amp;ROW()-1); [.U181])&gt;0; 1; 0)" office:value-type="float" office:value="1" calcext:value-type="float">
            <text:p>1</text:p>
          </table:table-cell>
          <table:table-cell table:formula="of:=[.T180]+1" office:value-type="float" office:value="181" calcext:value-type="float">
            <text:p>181</text:p>
          </table:table-cell>
          <table:table-cell table:formula="of:=[FL.C5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2]; [.R182:.U437]; 4; 0)); &quot;&quot;; VLOOKUP([.T182]; [.R182:.U437]; 4; 0))">
            <text:p/>
          </table:table-cell>
          <table:table-cell/>
          <table:table-cell table:formula="of:=IF(AND([.S182]=0; NOT([.U182]=0)); MAX(INDIRECT(&quot;R1:R&quot;&amp;ROW()-1))+1; &quot;&quot;)">
            <text:p/>
          </table:table-cell>
          <table:table-cell table:formula="of:=IF(COUNTIF(INDIRECT(&quot;U1:U&quot;&amp;ROW()-1); [.U182])&gt;0; 1; 0)" office:value-type="float" office:value="1" calcext:value-type="float">
            <text:p>1</text:p>
          </table:table-cell>
          <table:table-cell table:formula="of:=[.T181]+1" office:value-type="float" office:value="182" calcext:value-type="float">
            <text:p>182</text:p>
          </table:table-cell>
          <table:table-cell table:formula="of:=[FL.C5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3]; [.R183:.U438]; 4; 0)); &quot;&quot;; VLOOKUP([.T183]; [.R183:.U438]; 4; 0))">
            <text:p/>
          </table:table-cell>
          <table:table-cell/>
          <table:table-cell table:formula="of:=IF(AND([.S183]=0; NOT([.U183]=0)); MAX(INDIRECT(&quot;R1:R&quot;&amp;ROW()-1))+1; &quot;&quot;)">
            <text:p/>
          </table:table-cell>
          <table:table-cell table:formula="of:=IF(COUNTIF(INDIRECT(&quot;U1:U&quot;&amp;ROW()-1); [.U183])&gt;0; 1; 0)" office:value-type="float" office:value="1" calcext:value-type="float">
            <text:p>1</text:p>
          </table:table-cell>
          <table:table-cell table:formula="of:=[.T182]+1" office:value-type="float" office:value="183" calcext:value-type="float">
            <text:p>183</text:p>
          </table:table-cell>
          <table:table-cell table:formula="of:=[FL.C5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4]; [.R184:.U439]; 4; 0)); &quot;&quot;; VLOOKUP([.T184]; [.R184:.U439]; 4; 0))">
            <text:p/>
          </table:table-cell>
          <table:table-cell/>
          <table:table-cell table:formula="of:=IF(AND([.S184]=0; NOT([.U184]=0)); MAX(INDIRECT(&quot;R1:R&quot;&amp;ROW()-1))+1; &quot;&quot;)">
            <text:p/>
          </table:table-cell>
          <table:table-cell table:formula="of:=IF(COUNTIF(INDIRECT(&quot;U1:U&quot;&amp;ROW()-1); [.U184])&gt;0; 1; 0)" office:value-type="float" office:value="1" calcext:value-type="float">
            <text:p>1</text:p>
          </table:table-cell>
          <table:table-cell table:formula="of:=[.T183]+1" office:value-type="float" office:value="184" calcext:value-type="float">
            <text:p>184</text:p>
          </table:table-cell>
          <table:table-cell table:formula="of:=[FL.C5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5]; [.R185:.U440]; 4; 0)); &quot;&quot;; VLOOKUP([.T185]; [.R185:.U440]; 4; 0))">
            <text:p/>
          </table:table-cell>
          <table:table-cell/>
          <table:table-cell table:formula="of:=IF(AND([.S185]=0; NOT([.U185]=0)); MAX(INDIRECT(&quot;R1:R&quot;&amp;ROW()-1))+1; &quot;&quot;)">
            <text:p/>
          </table:table-cell>
          <table:table-cell table:formula="of:=IF(COUNTIF(INDIRECT(&quot;U1:U&quot;&amp;ROW()-1); [.U185])&gt;0; 1; 0)" office:value-type="float" office:value="1" calcext:value-type="float">
            <text:p>1</text:p>
          </table:table-cell>
          <table:table-cell table:formula="of:=[.T184]+1" office:value-type="float" office:value="185" calcext:value-type="float">
            <text:p>185</text:p>
          </table:table-cell>
          <table:table-cell table:formula="of:=[FL.C5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6]; [.R186:.U441]; 4; 0)); &quot;&quot;; VLOOKUP([.T186]; [.R186:.U441]; 4; 0))">
            <text:p/>
          </table:table-cell>
          <table:table-cell/>
          <table:table-cell table:formula="of:=IF(AND([.S186]=0; NOT([.U186]=0)); MAX(INDIRECT(&quot;R1:R&quot;&amp;ROW()-1))+1; &quot;&quot;)">
            <text:p/>
          </table:table-cell>
          <table:table-cell table:formula="of:=IF(COUNTIF(INDIRECT(&quot;U1:U&quot;&amp;ROW()-1); [.U186])&gt;0; 1; 0)" office:value-type="float" office:value="1" calcext:value-type="float">
            <text:p>1</text:p>
          </table:table-cell>
          <table:table-cell table:formula="of:=[.T185]+1" office:value-type="float" office:value="186" calcext:value-type="float">
            <text:p>186</text:p>
          </table:table-cell>
          <table:table-cell table:formula="of:=[FL.C6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7]; [.R187:.U442]; 4; 0)); &quot;&quot;; VLOOKUP([.T187]; [.R187:.U442]; 4; 0))">
            <text:p/>
          </table:table-cell>
          <table:table-cell/>
          <table:table-cell table:formula="of:=IF(AND([.S187]=0; NOT([.U187]=0)); MAX(INDIRECT(&quot;R1:R&quot;&amp;ROW()-1))+1; &quot;&quot;)">
            <text:p/>
          </table:table-cell>
          <table:table-cell table:formula="of:=IF(COUNTIF(INDIRECT(&quot;U1:U&quot;&amp;ROW()-1); [.U187])&gt;0; 1; 0)" office:value-type="float" office:value="1" calcext:value-type="float">
            <text:p>1</text:p>
          </table:table-cell>
          <table:table-cell table:formula="of:=[.T186]+1" office:value-type="float" office:value="187" calcext:value-type="float">
            <text:p>187</text:p>
          </table:table-cell>
          <table:table-cell table:formula="of:=[FL.C6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8]; [.R188:.U443]; 4; 0)); &quot;&quot;; VLOOKUP([.T188]; [.R188:.U443]; 4; 0))">
            <text:p/>
          </table:table-cell>
          <table:table-cell/>
          <table:table-cell table:formula="of:=IF(AND([.S188]=0; NOT([.U188]=0)); MAX(INDIRECT(&quot;R1:R&quot;&amp;ROW()-1))+1; &quot;&quot;)">
            <text:p/>
          </table:table-cell>
          <table:table-cell table:formula="of:=IF(COUNTIF(INDIRECT(&quot;U1:U&quot;&amp;ROW()-1); [.U188])&gt;0; 1; 0)" office:value-type="float" office:value="1" calcext:value-type="float">
            <text:p>1</text:p>
          </table:table-cell>
          <table:table-cell table:formula="of:=[.T187]+1" office:value-type="float" office:value="188" calcext:value-type="float">
            <text:p>188</text:p>
          </table:table-cell>
          <table:table-cell table:formula="of:=[FL.C6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89]; [.R189:.U444]; 4; 0)); &quot;&quot;; VLOOKUP([.T189]; [.R189:.U444]; 4; 0))">
            <text:p/>
          </table:table-cell>
          <table:table-cell/>
          <table:table-cell table:formula="of:=IF(AND([.S189]=0; NOT([.U189]=0)); MAX(INDIRECT(&quot;R1:R&quot;&amp;ROW()-1))+1; &quot;&quot;)">
            <text:p/>
          </table:table-cell>
          <table:table-cell table:formula="of:=IF(COUNTIF(INDIRECT(&quot;U1:U&quot;&amp;ROW()-1); [.U189])&gt;0; 1; 0)" office:value-type="float" office:value="1" calcext:value-type="float">
            <text:p>1</text:p>
          </table:table-cell>
          <table:table-cell table:formula="of:=[.T188]+1" office:value-type="float" office:value="189" calcext:value-type="float">
            <text:p>189</text:p>
          </table:table-cell>
          <table:table-cell table:formula="of:=[FL.C6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0]; [.R190:.U445]; 4; 0)); &quot;&quot;; VLOOKUP([.T190]; [.R190:.U445]; 4; 0))">
            <text:p/>
          </table:table-cell>
          <table:table-cell/>
          <table:table-cell table:formula="of:=IF(AND([.S190]=0; NOT([.U190]=0)); MAX(INDIRECT(&quot;R1:R&quot;&amp;ROW()-1))+1; &quot;&quot;)">
            <text:p/>
          </table:table-cell>
          <table:table-cell table:formula="of:=IF(COUNTIF(INDIRECT(&quot;U1:U&quot;&amp;ROW()-1); [.U190])&gt;0; 1; 0)" office:value-type="float" office:value="1" calcext:value-type="float">
            <text:p>1</text:p>
          </table:table-cell>
          <table:table-cell table:formula="of:=[.T189]+1" office:value-type="float" office:value="190" calcext:value-type="float">
            <text:p>190</text:p>
          </table:table-cell>
          <table:table-cell table:formula="of:=[FL.C6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1]; [.R191:.U446]; 4; 0)); &quot;&quot;; VLOOKUP([.T191]; [.R191:.U446]; 4; 0))">
            <text:p/>
          </table:table-cell>
          <table:table-cell/>
          <table:table-cell table:formula="of:=IF(AND([.S191]=0; NOT([.U191]=0)); MAX(INDIRECT(&quot;R1:R&quot;&amp;ROW()-1))+1; &quot;&quot;)">
            <text:p/>
          </table:table-cell>
          <table:table-cell table:formula="of:=IF(COUNTIF(INDIRECT(&quot;U1:U&quot;&amp;ROW()-1); [.U191])&gt;0; 1; 0)" office:value-type="float" office:value="1" calcext:value-type="float">
            <text:p>1</text:p>
          </table:table-cell>
          <table:table-cell table:formula="of:=[.T190]+1" office:value-type="float" office:value="191" calcext:value-type="float">
            <text:p>191</text:p>
          </table:table-cell>
          <table:table-cell table:formula="of:=[FL.C65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2]; [.R192:.U447]; 4; 0)); &quot;&quot;; VLOOKUP([.T192]; [.R192:.U447]; 4; 0))">
            <text:p/>
          </table:table-cell>
          <table:table-cell/>
          <table:table-cell table:formula="of:=IF(AND([.S192]=0; NOT([.U192]=0)); MAX(INDIRECT(&quot;R1:R&quot;&amp;ROW()-1))+1; &quot;&quot;)">
            <text:p/>
          </table:table-cell>
          <table:table-cell table:formula="of:=IF(COUNTIF(INDIRECT(&quot;U1:U&quot;&amp;ROW()-1); [.U192])&gt;0; 1; 0)" office:value-type="float" office:value="1" calcext:value-type="float">
            <text:p>1</text:p>
          </table:table-cell>
          <table:table-cell table:formula="of:=[.T191]+1" office:value-type="float" office:value="192" calcext:value-type="float">
            <text:p>192</text:p>
          </table:table-cell>
          <table:table-cell table:formula="of:=[FL.C66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3]; [.R193:.U448]; 4; 0)); &quot;&quot;; VLOOKUP([.T193]; [.R193:.U448]; 4; 0))">
            <text:p/>
          </table:table-cell>
          <table:table-cell/>
          <table:table-cell table:formula="of:=IF(AND([.S193]=0; NOT([.U193]=0)); MAX(INDIRECT(&quot;R1:R&quot;&amp;ROW()-1))+1; &quot;&quot;)">
            <text:p/>
          </table:table-cell>
          <table:table-cell table:formula="of:=IF(COUNTIF(INDIRECT(&quot;U1:U&quot;&amp;ROW()-1); [.U193])&gt;0; 1; 0)" office:value-type="float" office:value="1" calcext:value-type="float">
            <text:p>1</text:p>
          </table:table-cell>
          <table:table-cell table:formula="of:=[.T192]+1" office:value-type="float" office:value="193" calcext:value-type="float">
            <text:p>193</text:p>
          </table:table-cell>
          <table:table-cell table:formula="of:=[FL.C6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4]; [.R194:.U449]; 4; 0)); &quot;&quot;; VLOOKUP([.T194]; [.R194:.U449]; 4; 0))">
            <text:p/>
          </table:table-cell>
          <table:table-cell/>
          <table:table-cell table:formula="of:=IF(AND([.S194]=0; NOT([.U194]=0)); MAX(INDIRECT(&quot;R1:R&quot;&amp;ROW()-1))+1; &quot;&quot;)">
            <text:p/>
          </table:table-cell>
          <table:table-cell table:formula="of:=IF(COUNTIF(INDIRECT(&quot;U1:U&quot;&amp;ROW()-1); [.U194])&gt;0; 1; 0)" office:value-type="float" office:value="1" calcext:value-type="float">
            <text:p>1</text:p>
          </table:table-cell>
          <table:table-cell table:formula="of:=[.T193]+1" office:value-type="float" office:value="194" calcext:value-type="float">
            <text:p>194</text:p>
          </table:table-cell>
          <table:table-cell table:formula="of:=[FL.C68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5]; [.R195:.U450]; 4; 0)); &quot;&quot;; VLOOKUP([.T195]; [.R195:.U450]; 4; 0))">
            <text:p/>
          </table:table-cell>
          <table:table-cell/>
          <table:table-cell table:formula="of:=IF(AND([.S195]=0; NOT([.U195]=0)); MAX(INDIRECT(&quot;R1:R&quot;&amp;ROW()-1))+1; &quot;&quot;)">
            <text:p/>
          </table:table-cell>
          <table:table-cell table:formula="of:=IF(COUNTIF(INDIRECT(&quot;U1:U&quot;&amp;ROW()-1); [.U195])&gt;0; 1; 0)" office:value-type="float" office:value="1" calcext:value-type="float">
            <text:p>1</text:p>
          </table:table-cell>
          <table:table-cell table:formula="of:=[.T194]+1" office:value-type="float" office:value="195" calcext:value-type="float">
            <text:p>195</text:p>
          </table:table-cell>
          <table:table-cell table:formula="of:=[FL.C6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6]; [.R196:.U451]; 4; 0)); &quot;&quot;; VLOOKUP([.T196]; [.R196:.U451]; 4; 0))">
            <text:p/>
          </table:table-cell>
          <table:table-cell/>
          <table:table-cell table:formula="of:=IF(AND([.S196]=0; NOT([.U196]=0)); MAX(INDIRECT(&quot;R1:R&quot;&amp;ROW()-1))+1; &quot;&quot;)">
            <text:p/>
          </table:table-cell>
          <table:table-cell table:formula="of:=IF(COUNTIF(INDIRECT(&quot;U1:U&quot;&amp;ROW()-1); [.U196])&gt;0; 1; 0)" office:value-type="float" office:value="1" calcext:value-type="float">
            <text:p>1</text:p>
          </table:table-cell>
          <table:table-cell table:formula="of:=[.T195]+1" office:value-type="float" office:value="196" calcext:value-type="float">
            <text:p>196</text:p>
          </table:table-cell>
          <table:table-cell table:formula="of:=[FL.C70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7]; [.R197:.U452]; 4; 0)); &quot;&quot;; VLOOKUP([.T197]; [.R197:.U452]; 4; 0))">
            <text:p/>
          </table:table-cell>
          <table:table-cell/>
          <table:table-cell table:formula="of:=IF(AND([.S197]=0; NOT([.U197]=0)); MAX(INDIRECT(&quot;R1:R&quot;&amp;ROW()-1))+1; &quot;&quot;)">
            <text:p/>
          </table:table-cell>
          <table:table-cell table:formula="of:=IF(COUNTIF(INDIRECT(&quot;U1:U&quot;&amp;ROW()-1); [.U197])&gt;0; 1; 0)" office:value-type="float" office:value="1" calcext:value-type="float">
            <text:p>1</text:p>
          </table:table-cell>
          <table:table-cell table:formula="of:=[.T196]+1" office:value-type="float" office:value="197" calcext:value-type="float">
            <text:p>197</text:p>
          </table:table-cell>
          <table:table-cell table:formula="of:=[FL.C7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8]; [.R198:.U453]; 4; 0)); &quot;&quot;; VLOOKUP([.T198]; [.R198:.U453]; 4; 0))">
            <text:p/>
          </table:table-cell>
          <table:table-cell/>
          <table:table-cell table:formula="of:=IF(AND([.S198]=0; NOT([.U198]=0)); MAX(INDIRECT(&quot;R1:R&quot;&amp;ROW()-1))+1; &quot;&quot;)">
            <text:p/>
          </table:table-cell>
          <table:table-cell table:formula="of:=IF(COUNTIF(INDIRECT(&quot;U1:U&quot;&amp;ROW()-1); [.U198])&gt;0; 1; 0)" office:value-type="float" office:value="1" calcext:value-type="float">
            <text:p>1</text:p>
          </table:table-cell>
          <table:table-cell table:formula="of:=[.T197]+1" office:value-type="float" office:value="198" calcext:value-type="float">
            <text:p>198</text:p>
          </table:table-cell>
          <table:table-cell table:formula="of:=[FL.C72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199]; [.R199:.U454]; 4; 0)); &quot;&quot;; VLOOKUP([.T199]; [.R199:.U454]; 4; 0))">
            <text:p/>
          </table:table-cell>
          <table:table-cell/>
          <table:table-cell table:formula="of:=IF(AND([.S199]=0; NOT([.U199]=0)); MAX(INDIRECT(&quot;R1:R&quot;&amp;ROW()-1))+1; &quot;&quot;)">
            <text:p/>
          </table:table-cell>
          <table:table-cell table:formula="of:=IF(COUNTIF(INDIRECT(&quot;U1:U&quot;&amp;ROW()-1); [.U199])&gt;0; 1; 0)" office:value-type="float" office:value="1" calcext:value-type="float">
            <text:p>1</text:p>
          </table:table-cell>
          <table:table-cell table:formula="of:=[.T198]+1" office:value-type="float" office:value="199" calcext:value-type="float">
            <text:p>199</text:p>
          </table:table-cell>
          <table:table-cell table:formula="of:=[FL.C73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200]; [.R200:.U455]; 4; 0)); &quot;&quot;; VLOOKUP([.T200]; [.R200:.U455]; 4; 0))">
            <text:p/>
          </table:table-cell>
          <table:table-cell/>
          <table:table-cell table:formula="of:=IF(AND([.S200]=0; NOT([.U200]=0)); MAX(INDIRECT(&quot;R1:R&quot;&amp;ROW()-1))+1; &quot;&quot;)">
            <text:p/>
          </table:table-cell>
          <table:table-cell table:formula="of:=IF(COUNTIF(INDIRECT(&quot;U1:U&quot;&amp;ROW()-1); [.U200])&gt;0; 1; 0)" office:value-type="float" office:value="1" calcext:value-type="float">
            <text:p>1</text:p>
          </table:table-cell>
          <table:table-cell table:formula="of:=[.T199]+1" office:value-type="float" office:value="200" calcext:value-type="float">
            <text:p>200</text:p>
          </table:table-cell>
          <table:table-cell table:formula="of:=[FL.C7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IF(ISNA(VLOOKUP([.T201]; [.R201:.U456]; 4; 0)); &quot;&quot;; VLOOKUP([.T201]; [.R201:.U456]; 4; 0))">
            <text:p/>
          </table:table-cell>
          <table:table-cell/>
          <table:table-cell table:formula="of:=IF(AND([.S201]=0; NOT([.U201]=0)); MAX(INDIRECT(&quot;R1:R&quot;&amp;ROW()-1))+1; &quot;&quot;)">
            <text:p/>
          </table:table-cell>
          <table:table-cell table:formula="of:=IF(COUNTIF(INDIRECT(&quot;U1:U&quot;&amp;ROW()-1); [.U201])&gt;0; 1; 0)" office:value-type="float" office:value="1" calcext:value-type="float">
            <text:p>1</text:p>
          </table:table-cell>
          <table:table-cell table:formula="of:=[.T200]+1" office:value-type="float" office:value="201" calcext:value-type="float">
            <text:p>201</text:p>
          </table:table-cell>
          <table:table-cell table:formula="of:=[FL.C75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02]; [.R202:.U457]; 4; 0)); &quot;&quot;; VLOOKUP([.T202]; [.R202:.U457]; 4; 0))">
            <text:p/>
          </table:table-cell>
          <table:table-cell/>
          <table:table-cell table:formula="of:=IF(AND([.S202]=0; NOT([.U202]=0)); MAX(INDIRECT(&quot;R1:R&quot;&amp;ROW()-1))+1; &quot;&quot;)">
            <text:p/>
          </table:table-cell>
          <table:table-cell table:formula="of:=IF(COUNTIF(INDIRECT(&quot;U1:U&quot;&amp;ROW()-1); [.U202])&gt;0; 1; 0)" office:value-type="float" office:value="1" calcext:value-type="float">
            <text:p>1</text:p>
          </table:table-cell>
          <table:table-cell table:formula="of:=[.T201]+1" office:value-type="float" office:value="202" calcext:value-type="float">
            <text:p>202</text:p>
          </table:table-cell>
          <table:table-cell table:formula="of:=[FL.C76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03]; [.R203:.U458]; 4; 0)); &quot;&quot;; VLOOKUP([.T203]; [.R203:.U458]; 4; 0))">
            <text:p/>
          </table:table-cell>
          <table:table-cell/>
          <table:table-cell table:formula="of:=IF(AND([.S203]=0; NOT([.U203]=0)); MAX(INDIRECT(&quot;R1:R&quot;&amp;ROW()-1))+1; &quot;&quot;)">
            <text:p/>
          </table:table-cell>
          <table:table-cell table:formula="of:=IF(COUNTIF(INDIRECT(&quot;U1:U&quot;&amp;ROW()-1); [.U203])&gt;0; 1; 0)" office:value-type="float" office:value="1" calcext:value-type="float">
            <text:p>1</text:p>
          </table:table-cell>
          <table:table-cell table:formula="of:=[.T202]+1" office:value-type="float" office:value="203" calcext:value-type="float">
            <text:p>203</text:p>
          </table:table-cell>
          <table:table-cell table:formula="of:=[FL.C77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04]; [.R204:.U459]; 4; 0)); &quot;&quot;; VLOOKUP([.T204]; [.R204:.U459]; 4; 0))">
            <text:p/>
          </table:table-cell>
          <table:table-cell/>
          <table:table-cell table:formula="of:=IF(AND([.S204]=0; NOT([.U204]=0)); MAX(INDIRECT(&quot;R1:R&quot;&amp;ROW()-1))+1; &quot;&quot;)">
            <text:p/>
          </table:table-cell>
          <table:table-cell table:formula="of:=IF(COUNTIF(INDIRECT(&quot;U1:U&quot;&amp;ROW()-1); [.U204])&gt;0; 1; 0)" office:value-type="float" office:value="1" calcext:value-type="float">
            <text:p>1</text:p>
          </table:table-cell>
          <table:table-cell table:formula="of:=[.T203]+1" office:value-type="float" office:value="204" calcext:value-type="float">
            <text:p>204</text:p>
          </table:table-cell>
          <table:table-cell table:formula="of:=[FL.C78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05]; [.R205:.U460]; 4; 0)); &quot;&quot;; VLOOKUP([.T205]; [.R205:.U460]; 4; 0))">
            <text:p/>
          </table:table-cell>
          <table:table-cell/>
          <table:table-cell table:formula="of:=IF(AND([.S205]=0; NOT([.U205]=0)); MAX(INDIRECT(&quot;R1:R&quot;&amp;ROW()-1))+1; &quot;&quot;)">
            <text:p/>
          </table:table-cell>
          <table:table-cell table:formula="of:=IF(COUNTIF(INDIRECT(&quot;U1:U&quot;&amp;ROW()-1); [.U205])&gt;0; 1; 0)" office:value-type="float" office:value="1" calcext:value-type="float">
            <text:p>1</text:p>
          </table:table-cell>
          <table:table-cell table:formula="of:=[.T204]+1" office:value-type="float" office:value="205" calcext:value-type="float">
            <text:p>205</text:p>
          </table:table-cell>
          <table:table-cell table:formula="of:=[FL.C79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06]; [.R206:.U461]; 4; 0)); &quot;&quot;; VLOOKUP([.T206]; [.R206:.U461]; 4; 0))">
            <text:p/>
          </table:table-cell>
          <table:table-cell/>
          <table:table-cell table:formula="of:=IF(AND([.S206]=0; NOT([.U206]=0)); MAX(INDIRECT(&quot;R1:R&quot;&amp;ROW()-1))+1; &quot;&quot;)">
            <text:p/>
          </table:table-cell>
          <table:table-cell table:formula="of:=IF(COUNTIF(INDIRECT(&quot;U1:U&quot;&amp;ROW()-1); [.U206])&gt;0; 1; 0)" office:value-type="float" office:value="1" calcext:value-type="float">
            <text:p>1</text:p>
          </table:table-cell>
          <table:table-cell table:formula="of:=[.T205]+1" office:value-type="float" office:value="206" calcext:value-type="float">
            <text:p>206</text:p>
          </table:table-cell>
          <table:table-cell table:formula="of:=[FL.C80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07]; [.R207:.U462]; 4; 0)); &quot;&quot;; VLOOKUP([.T207]; [.R207:.U462]; 4; 0))">
            <text:p/>
          </table:table-cell>
          <table:table-cell/>
          <table:table-cell table:formula="of:=IF(AND([.S207]=0; NOT([.U207]=0)); MAX(INDIRECT(&quot;R1:R&quot;&amp;ROW()-1))+1; &quot;&quot;)">
            <text:p/>
          </table:table-cell>
          <table:table-cell table:formula="of:=IF(COUNTIF(INDIRECT(&quot;U1:U&quot;&amp;ROW()-1); [.U207])&gt;0; 1; 0)" office:value-type="float" office:value="1" calcext:value-type="float">
            <text:p>1</text:p>
          </table:table-cell>
          <table:table-cell table:formula="of:=[.T206]+1" office:value-type="float" office:value="207" calcext:value-type="float">
            <text:p>207</text:p>
          </table:table-cell>
          <table:table-cell table:formula="of:=[FL.C81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08]; [.R208:.U463]; 4; 0)); &quot;&quot;; VLOOKUP([.T208]; [.R208:.U463]; 4; 0))">
            <text:p/>
          </table:table-cell>
          <table:table-cell/>
          <table:table-cell table:formula="of:=IF(AND([.S208]=0; NOT([.U208]=0)); MAX(INDIRECT(&quot;R1:R&quot;&amp;ROW()-1))+1; &quot;&quot;)">
            <text:p/>
          </table:table-cell>
          <table:table-cell table:formula="of:=IF(COUNTIF(INDIRECT(&quot;U1:U&quot;&amp;ROW()-1); [.U208])&gt;0; 1; 0)" office:value-type="float" office:value="1" calcext:value-type="float">
            <text:p>1</text:p>
          </table:table-cell>
          <table:table-cell table:formula="of:=[.T207]+1" office:value-type="float" office:value="208" calcext:value-type="float">
            <text:p>208</text:p>
          </table:table-cell>
          <table:table-cell table:formula="of:=[FL.C82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09]; [.R209:.U464]; 4; 0)); &quot;&quot;; VLOOKUP([.T209]; [.R209:.U464]; 4; 0))">
            <text:p/>
          </table:table-cell>
          <table:table-cell/>
          <table:table-cell table:formula="of:=IF(AND([.S209]=0; NOT([.U209]=0)); MAX(INDIRECT(&quot;R1:R&quot;&amp;ROW()-1))+1; &quot;&quot;)">
            <text:p/>
          </table:table-cell>
          <table:table-cell table:formula="of:=IF(COUNTIF(INDIRECT(&quot;U1:U&quot;&amp;ROW()-1); [.U209])&gt;0; 1; 0)" office:value-type="float" office:value="1" calcext:value-type="float">
            <text:p>1</text:p>
          </table:table-cell>
          <table:table-cell table:formula="of:=[.T208]+1" office:value-type="float" office:value="209" calcext:value-type="float">
            <text:p>209</text:p>
          </table:table-cell>
          <table:table-cell table:formula="of:=[FL.C83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0]; [.R210:.U465]; 4; 0)); &quot;&quot;; VLOOKUP([.T210]; [.R210:.U465]; 4; 0))">
            <text:p/>
          </table:table-cell>
          <table:table-cell/>
          <table:table-cell table:formula="of:=IF(AND([.S210]=0; NOT([.U210]=0)); MAX(INDIRECT(&quot;R1:R&quot;&amp;ROW()-1))+1; &quot;&quot;)">
            <text:p/>
          </table:table-cell>
          <table:table-cell table:formula="of:=IF(COUNTIF(INDIRECT(&quot;U1:U&quot;&amp;ROW()-1); [.U210])&gt;0; 1; 0)" office:value-type="float" office:value="1" calcext:value-type="float">
            <text:p>1</text:p>
          </table:table-cell>
          <table:table-cell table:formula="of:=[.T209]+1" office:value-type="float" office:value="210" calcext:value-type="float">
            <text:p>210</text:p>
          </table:table-cell>
          <table:table-cell table:formula="of:=[FL.C84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1]; [.R211:.U466]; 4; 0)); &quot;&quot;; VLOOKUP([.T211]; [.R211:.U466]; 4; 0))">
            <text:p/>
          </table:table-cell>
          <table:table-cell/>
          <table:table-cell table:formula="of:=IF(AND([.S211]=0; NOT([.U211]=0)); MAX(INDIRECT(&quot;R1:R&quot;&amp;ROW()-1))+1; &quot;&quot;)">
            <text:p/>
          </table:table-cell>
          <table:table-cell table:formula="of:=IF(COUNTIF(INDIRECT(&quot;U1:U&quot;&amp;ROW()-1); [.U211])&gt;0; 1; 0)" office:value-type="float" office:value="1" calcext:value-type="float">
            <text:p>1</text:p>
          </table:table-cell>
          <table:table-cell table:formula="of:=[.T210]+1" office:value-type="float" office:value="211" calcext:value-type="float">
            <text:p>211</text:p>
          </table:table-cell>
          <table:table-cell table:formula="of:=[FL.C85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2]; [.R212:.U467]; 4; 0)); &quot;&quot;; VLOOKUP([.T212]; [.R212:.U467]; 4; 0))">
            <text:p/>
          </table:table-cell>
          <table:table-cell/>
          <table:table-cell table:formula="of:=IF(AND([.S212]=0; NOT([.U212]=0)); MAX(INDIRECT(&quot;R1:R&quot;&amp;ROW()-1))+1; &quot;&quot;)">
            <text:p/>
          </table:table-cell>
          <table:table-cell table:formula="of:=IF(COUNTIF(INDIRECT(&quot;U1:U&quot;&amp;ROW()-1); [.U212])&gt;0; 1; 0)" office:value-type="float" office:value="1" calcext:value-type="float">
            <text:p>1</text:p>
          </table:table-cell>
          <table:table-cell table:formula="of:=[.T211]+1" office:value-type="float" office:value="212" calcext:value-type="float">
            <text:p>212</text:p>
          </table:table-cell>
          <table:table-cell table:formula="of:=[FL.C86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3]; [.R213:.U468]; 4; 0)); &quot;&quot;; VLOOKUP([.T213]; [.R213:.U468]; 4; 0))">
            <text:p/>
          </table:table-cell>
          <table:table-cell/>
          <table:table-cell table:formula="of:=IF(AND([.S213]=0; NOT([.U213]=0)); MAX(INDIRECT(&quot;R1:R&quot;&amp;ROW()-1))+1; &quot;&quot;)">
            <text:p/>
          </table:table-cell>
          <table:table-cell table:formula="of:=IF(COUNTIF(INDIRECT(&quot;U1:U&quot;&amp;ROW()-1); [.U213])&gt;0; 1; 0)" office:value-type="float" office:value="1" calcext:value-type="float">
            <text:p>1</text:p>
          </table:table-cell>
          <table:table-cell table:formula="of:=[.T212]+1" office:value-type="float" office:value="213" calcext:value-type="float">
            <text:p>213</text:p>
          </table:table-cell>
          <table:table-cell table:formula="of:=[FL.C87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4]; [.R214:.U469]; 4; 0)); &quot;&quot;; VLOOKUP([.T214]; [.R214:.U469]; 4; 0))">
            <text:p/>
          </table:table-cell>
          <table:table-cell/>
          <table:table-cell table:formula="of:=IF(AND([.S214]=0; NOT([.U214]=0)); MAX(INDIRECT(&quot;R1:R&quot;&amp;ROW()-1))+1; &quot;&quot;)">
            <text:p/>
          </table:table-cell>
          <table:table-cell table:formula="of:=IF(COUNTIF(INDIRECT(&quot;U1:U&quot;&amp;ROW()-1); [.U214])&gt;0; 1; 0)" office:value-type="float" office:value="1" calcext:value-type="float">
            <text:p>1</text:p>
          </table:table-cell>
          <table:table-cell table:formula="of:=[.T213]+1" office:value-type="float" office:value="214" calcext:value-type="float">
            <text:p>214</text:p>
          </table:table-cell>
          <table:table-cell table:formula="of:=[FL.C88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5]; [.R215:.U470]; 4; 0)); &quot;&quot;; VLOOKUP([.T215]; [.R215:.U470]; 4; 0))">
            <text:p/>
          </table:table-cell>
          <table:table-cell/>
          <table:table-cell table:formula="of:=IF(AND([.S215]=0; NOT([.U215]=0)); MAX(INDIRECT(&quot;R1:R&quot;&amp;ROW()-1))+1; &quot;&quot;)">
            <text:p/>
          </table:table-cell>
          <table:table-cell table:formula="of:=IF(COUNTIF(INDIRECT(&quot;U1:U&quot;&amp;ROW()-1); [.U215])&gt;0; 1; 0)" office:value-type="float" office:value="1" calcext:value-type="float">
            <text:p>1</text:p>
          </table:table-cell>
          <table:table-cell table:formula="of:=[.T214]+1" office:value-type="float" office:value="215" calcext:value-type="float">
            <text:p>215</text:p>
          </table:table-cell>
          <table:table-cell table:formula="of:=[FL.C89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6]; [.R216:.U471]; 4; 0)); &quot;&quot;; VLOOKUP([.T216]; [.R216:.U471]; 4; 0))">
            <text:p/>
          </table:table-cell>
          <table:table-cell/>
          <table:table-cell table:formula="of:=IF(AND([.S216]=0; NOT([.U216]=0)); MAX(INDIRECT(&quot;R1:R&quot;&amp;ROW()-1))+1; &quot;&quot;)">
            <text:p/>
          </table:table-cell>
          <table:table-cell table:formula="of:=IF(COUNTIF(INDIRECT(&quot;U1:U&quot;&amp;ROW()-1); [.U216])&gt;0; 1; 0)" office:value-type="float" office:value="1" calcext:value-type="float">
            <text:p>1</text:p>
          </table:table-cell>
          <table:table-cell table:formula="of:=[.T215]+1" office:value-type="float" office:value="216" calcext:value-type="float">
            <text:p>216</text:p>
          </table:table-cell>
          <table:table-cell table:formula="of:=[FL.C90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7]; [.R217:.U472]; 4; 0)); &quot;&quot;; VLOOKUP([.T217]; [.R217:.U472]; 4; 0))">
            <text:p/>
          </table:table-cell>
          <table:table-cell/>
          <table:table-cell table:formula="of:=IF(AND([.S217]=0; NOT([.U217]=0)); MAX(INDIRECT(&quot;R1:R&quot;&amp;ROW()-1))+1; &quot;&quot;)">
            <text:p/>
          </table:table-cell>
          <table:table-cell table:formula="of:=IF(COUNTIF(INDIRECT(&quot;U1:U&quot;&amp;ROW()-1); [.U217])&gt;0; 1; 0)" office:value-type="float" office:value="1" calcext:value-type="float">
            <text:p>1</text:p>
          </table:table-cell>
          <table:table-cell table:formula="of:=[.T216]+1" office:value-type="float" office:value="217" calcext:value-type="float">
            <text:p>217</text:p>
          </table:table-cell>
          <table:table-cell table:formula="of:=[FL.C91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8]; [.R218:.U473]; 4; 0)); &quot;&quot;; VLOOKUP([.T218]; [.R218:.U473]; 4; 0))">
            <text:p/>
          </table:table-cell>
          <table:table-cell/>
          <table:table-cell table:formula="of:=IF(AND([.S218]=0; NOT([.U218]=0)); MAX(INDIRECT(&quot;R1:R&quot;&amp;ROW()-1))+1; &quot;&quot;)">
            <text:p/>
          </table:table-cell>
          <table:table-cell table:formula="of:=IF(COUNTIF(INDIRECT(&quot;U1:U&quot;&amp;ROW()-1); [.U218])&gt;0; 1; 0)" office:value-type="float" office:value="1" calcext:value-type="float">
            <text:p>1</text:p>
          </table:table-cell>
          <table:table-cell table:formula="of:=[.T217]+1" office:value-type="float" office:value="218" calcext:value-type="float">
            <text:p>218</text:p>
          </table:table-cell>
          <table:table-cell table:formula="of:=[FL.C92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19]; [.R219:.U474]; 4; 0)); &quot;&quot;; VLOOKUP([.T219]; [.R219:.U474]; 4; 0))">
            <text:p/>
          </table:table-cell>
          <table:table-cell/>
          <table:table-cell table:formula="of:=IF(AND([.S219]=0; NOT([.U219]=0)); MAX(INDIRECT(&quot;R1:R&quot;&amp;ROW()-1))+1; &quot;&quot;)">
            <text:p/>
          </table:table-cell>
          <table:table-cell table:formula="of:=IF(COUNTIF(INDIRECT(&quot;U1:U&quot;&amp;ROW()-1); [.U219])&gt;0; 1; 0)" office:value-type="float" office:value="1" calcext:value-type="float">
            <text:p>1</text:p>
          </table:table-cell>
          <table:table-cell table:formula="of:=[.T218]+1" office:value-type="float" office:value="219" calcext:value-type="float">
            <text:p>219</text:p>
          </table:table-cell>
          <table:table-cell table:formula="of:=[FL.C93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0]; [.R220:.U475]; 4; 0)); &quot;&quot;; VLOOKUP([.T220]; [.R220:.U475]; 4; 0))">
            <text:p/>
          </table:table-cell>
          <table:table-cell/>
          <table:table-cell table:formula="of:=IF(AND([.S220]=0; NOT([.U220]=0)); MAX(INDIRECT(&quot;R1:R&quot;&amp;ROW()-1))+1; &quot;&quot;)">
            <text:p/>
          </table:table-cell>
          <table:table-cell table:formula="of:=IF(COUNTIF(INDIRECT(&quot;U1:U&quot;&amp;ROW()-1); [.U220])&gt;0; 1; 0)" office:value-type="float" office:value="1" calcext:value-type="float">
            <text:p>1</text:p>
          </table:table-cell>
          <table:table-cell table:formula="of:=[.T219]+1" office:value-type="float" office:value="220" calcext:value-type="float">
            <text:p>220</text:p>
          </table:table-cell>
          <table:table-cell table:formula="of:=[FL.C94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1]; [.R221:.U476]; 4; 0)); &quot;&quot;; VLOOKUP([.T221]; [.R221:.U476]; 4; 0))">
            <text:p/>
          </table:table-cell>
          <table:table-cell/>
          <table:table-cell table:formula="of:=IF(AND([.S221]=0; NOT([.U221]=0)); MAX(INDIRECT(&quot;R1:R&quot;&amp;ROW()-1))+1; &quot;&quot;)">
            <text:p/>
          </table:table-cell>
          <table:table-cell table:formula="of:=IF(COUNTIF(INDIRECT(&quot;U1:U&quot;&amp;ROW()-1); [.U221])&gt;0; 1; 0)" office:value-type="float" office:value="1" calcext:value-type="float">
            <text:p>1</text:p>
          </table:table-cell>
          <table:table-cell table:formula="of:=[.T220]+1" office:value-type="float" office:value="221" calcext:value-type="float">
            <text:p>221</text:p>
          </table:table-cell>
          <table:table-cell table:formula="of:=[FL.C95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2]; [.R222:.U477]; 4; 0)); &quot;&quot;; VLOOKUP([.T222]; [.R222:.U477]; 4; 0))">
            <text:p/>
          </table:table-cell>
          <table:table-cell/>
          <table:table-cell table:formula="of:=IF(AND([.S222]=0; NOT([.U222]=0)); MAX(INDIRECT(&quot;R1:R&quot;&amp;ROW()-1))+1; &quot;&quot;)">
            <text:p/>
          </table:table-cell>
          <table:table-cell table:formula="of:=IF(COUNTIF(INDIRECT(&quot;U1:U&quot;&amp;ROW()-1); [.U222])&gt;0; 1; 0)" office:value-type="float" office:value="1" calcext:value-type="float">
            <text:p>1</text:p>
          </table:table-cell>
          <table:table-cell table:formula="of:=[.T221]+1" office:value-type="float" office:value="222" calcext:value-type="float">
            <text:p>222</text:p>
          </table:table-cell>
          <table:table-cell table:formula="of:=[FL.C96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3]; [.R223:.U478]; 4; 0)); &quot;&quot;; VLOOKUP([.T223]; [.R223:.U478]; 4; 0))">
            <text:p/>
          </table:table-cell>
          <table:table-cell/>
          <table:table-cell table:formula="of:=IF(AND([.S223]=0; NOT([.U223]=0)); MAX(INDIRECT(&quot;R1:R&quot;&amp;ROW()-1))+1; &quot;&quot;)">
            <text:p/>
          </table:table-cell>
          <table:table-cell table:formula="of:=IF(COUNTIF(INDIRECT(&quot;U1:U&quot;&amp;ROW()-1); [.U223])&gt;0; 1; 0)" office:value-type="float" office:value="1" calcext:value-type="float">
            <text:p>1</text:p>
          </table:table-cell>
          <table:table-cell table:formula="of:=[.T222]+1" office:value-type="float" office:value="223" calcext:value-type="float">
            <text:p>223</text:p>
          </table:table-cell>
          <table:table-cell table:formula="of:=[FL.C97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4]; [.R224:.U479]; 4; 0)); &quot;&quot;; VLOOKUP([.T224]; [.R224:.U479]; 4; 0))">
            <text:p/>
          </table:table-cell>
          <table:table-cell/>
          <table:table-cell table:formula="of:=IF(AND([.S224]=0; NOT([.U224]=0)); MAX(INDIRECT(&quot;R1:R&quot;&amp;ROW()-1))+1; &quot;&quot;)">
            <text:p/>
          </table:table-cell>
          <table:table-cell table:formula="of:=IF(COUNTIF(INDIRECT(&quot;U1:U&quot;&amp;ROW()-1); [.U224])&gt;0; 1; 0)" office:value-type="float" office:value="1" calcext:value-type="float">
            <text:p>1</text:p>
          </table:table-cell>
          <table:table-cell table:formula="of:=[.T223]+1" office:value-type="float" office:value="224" calcext:value-type="float">
            <text:p>224</text:p>
          </table:table-cell>
          <table:table-cell table:formula="of:=[FL.C98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5]; [.R225:.U480]; 4; 0)); &quot;&quot;; VLOOKUP([.T225]; [.R225:.U480]; 4; 0))">
            <text:p/>
          </table:table-cell>
          <table:table-cell/>
          <table:table-cell table:formula="of:=IF(AND([.S225]=0; NOT([.U225]=0)); MAX(INDIRECT(&quot;R1:R&quot;&amp;ROW()-1))+1; &quot;&quot;)">
            <text:p/>
          </table:table-cell>
          <table:table-cell table:formula="of:=IF(COUNTIF(INDIRECT(&quot;U1:U&quot;&amp;ROW()-1); [.U225])&gt;0; 1; 0)" office:value-type="float" office:value="1" calcext:value-type="float">
            <text:p>1</text:p>
          </table:table-cell>
          <table:table-cell table:formula="of:=[.T224]+1" office:value-type="float" office:value="225" calcext:value-type="float">
            <text:p>225</text:p>
          </table:table-cell>
          <table:table-cell table:formula="of:=[FL.C99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6]; [.R226:.U481]; 4; 0)); &quot;&quot;; VLOOKUP([.T226]; [.R226:.U481]; 4; 0))">
            <text:p/>
          </table:table-cell>
          <table:table-cell/>
          <table:table-cell table:formula="of:=IF(AND([.S226]=0; NOT([.U226]=0)); MAX(INDIRECT(&quot;R1:R&quot;&amp;ROW()-1))+1; &quot;&quot;)">
            <text:p/>
          </table:table-cell>
          <table:table-cell table:formula="of:=IF(COUNTIF(INDIRECT(&quot;U1:U&quot;&amp;ROW()-1); [.U226])&gt;0; 1; 0)" office:value-type="float" office:value="1" calcext:value-type="float">
            <text:p>1</text:p>
          </table:table-cell>
          <table:table-cell table:formula="of:=[.T225]+1" office:value-type="float" office:value="226" calcext:value-type="float">
            <text:p>226</text:p>
          </table:table-cell>
          <table:table-cell table:formula="of:=[FL.C100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7]; [.R227:.U482]; 4; 0)); &quot;&quot;; VLOOKUP([.T227]; [.R227:.U482]; 4; 0))">
            <text:p/>
          </table:table-cell>
          <table:table-cell/>
          <table:table-cell table:formula="of:=IF(AND([.S227]=0; NOT([.U227]=0)); MAX(INDIRECT(&quot;R1:R&quot;&amp;ROW()-1))+1; &quot;&quot;)">
            <text:p/>
          </table:table-cell>
          <table:table-cell table:formula="of:=IF(COUNTIF(INDIRECT(&quot;U1:U&quot;&amp;ROW()-1); [.U227])&gt;0; 1; 0)" office:value-type="float" office:value="1" calcext:value-type="float">
            <text:p>1</text:p>
          </table:table-cell>
          <table:table-cell table:formula="of:=[.T226]+1" office:value-type="float" office:value="227" calcext:value-type="float">
            <text:p>227</text:p>
          </table:table-cell>
          <table:table-cell table:formula="of:=[FL.C101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8]; [.R228:.U483]; 4; 0)); &quot;&quot;; VLOOKUP([.T228]; [.R228:.U483]; 4; 0))">
            <text:p/>
          </table:table-cell>
          <table:table-cell/>
          <table:table-cell table:formula="of:=IF(AND([.S228]=0; NOT([.U228]=0)); MAX(INDIRECT(&quot;R1:R&quot;&amp;ROW()-1))+1; &quot;&quot;)">
            <text:p/>
          </table:table-cell>
          <table:table-cell table:formula="of:=IF(COUNTIF(INDIRECT(&quot;U1:U&quot;&amp;ROW()-1); [.U228])&gt;0; 1; 0)" office:value-type="float" office:value="1" calcext:value-type="float">
            <text:p>1</text:p>
          </table:table-cell>
          <table:table-cell table:formula="of:=[.T227]+1" office:value-type="float" office:value="228" calcext:value-type="float">
            <text:p>228</text:p>
          </table:table-cell>
          <table:table-cell table:formula="of:=[FL.C102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29]; [.R229:.U484]; 4; 0)); &quot;&quot;; VLOOKUP([.T229]; [.R229:.U484]; 4; 0))">
            <text:p/>
          </table:table-cell>
          <table:table-cell/>
          <table:table-cell table:formula="of:=IF(AND([.S229]=0; NOT([.U229]=0)); MAX(INDIRECT(&quot;R1:R&quot;&amp;ROW()-1))+1; &quot;&quot;)">
            <text:p/>
          </table:table-cell>
          <table:table-cell table:formula="of:=IF(COUNTIF(INDIRECT(&quot;U1:U&quot;&amp;ROW()-1); [.U229])&gt;0; 1; 0)" office:value-type="float" office:value="1" calcext:value-type="float">
            <text:p>1</text:p>
          </table:table-cell>
          <table:table-cell table:formula="of:=[.T228]+1" office:value-type="float" office:value="229" calcext:value-type="float">
            <text:p>229</text:p>
          </table:table-cell>
          <table:table-cell table:formula="of:=[FL.C103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0]; [.R230:.U485]; 4; 0)); &quot;&quot;; VLOOKUP([.T230]; [.R230:.U485]; 4; 0))">
            <text:p/>
          </table:table-cell>
          <table:table-cell/>
          <table:table-cell table:formula="of:=IF(AND([.S230]=0; NOT([.U230]=0)); MAX(INDIRECT(&quot;R1:R&quot;&amp;ROW()-1))+1; &quot;&quot;)">
            <text:p/>
          </table:table-cell>
          <table:table-cell table:formula="of:=IF(COUNTIF(INDIRECT(&quot;U1:U&quot;&amp;ROW()-1); [.U230])&gt;0; 1; 0)" office:value-type="float" office:value="1" calcext:value-type="float">
            <text:p>1</text:p>
          </table:table-cell>
          <table:table-cell table:formula="of:=[.T229]+1" office:value-type="float" office:value="230" calcext:value-type="float">
            <text:p>230</text:p>
          </table:table-cell>
          <table:table-cell table:formula="of:=[FL.C104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1]; [.R231:.U486]; 4; 0)); &quot;&quot;; VLOOKUP([.T231]; [.R231:.U486]; 4; 0))">
            <text:p/>
          </table:table-cell>
          <table:table-cell/>
          <table:table-cell table:formula="of:=IF(AND([.S231]=0; NOT([.U231]=0)); MAX(INDIRECT(&quot;R1:R&quot;&amp;ROW()-1))+1; &quot;&quot;)">
            <text:p/>
          </table:table-cell>
          <table:table-cell table:formula="of:=IF(COUNTIF(INDIRECT(&quot;U1:U&quot;&amp;ROW()-1); [.U231])&gt;0; 1; 0)" office:value-type="float" office:value="1" calcext:value-type="float">
            <text:p>1</text:p>
          </table:table-cell>
          <table:table-cell table:formula="of:=[.T230]+1" office:value-type="float" office:value="231" calcext:value-type="float">
            <text:p>231</text:p>
          </table:table-cell>
          <table:table-cell table:formula="of:=[FL.C105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2]; [.R232:.U487]; 4; 0)); &quot;&quot;; VLOOKUP([.T232]; [.R232:.U487]; 4; 0))">
            <text:p/>
          </table:table-cell>
          <table:table-cell/>
          <table:table-cell table:formula="of:=IF(AND([.S232]=0; NOT([.U232]=0)); MAX(INDIRECT(&quot;R1:R&quot;&amp;ROW()-1))+1; &quot;&quot;)">
            <text:p/>
          </table:table-cell>
          <table:table-cell table:formula="of:=IF(COUNTIF(INDIRECT(&quot;U1:U&quot;&amp;ROW()-1); [.U232])&gt;0; 1; 0)" office:value-type="float" office:value="1" calcext:value-type="float">
            <text:p>1</text:p>
          </table:table-cell>
          <table:table-cell table:formula="of:=[.T231]+1" office:value-type="float" office:value="232" calcext:value-type="float">
            <text:p>232</text:p>
          </table:table-cell>
          <table:table-cell table:formula="of:=[FL.C106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3]; [.R233:.U488]; 4; 0)); &quot;&quot;; VLOOKUP([.T233]; [.R233:.U488]; 4; 0))">
            <text:p/>
          </table:table-cell>
          <table:table-cell/>
          <table:table-cell table:formula="of:=IF(AND([.S233]=0; NOT([.U233]=0)); MAX(INDIRECT(&quot;R1:R&quot;&amp;ROW()-1))+1; &quot;&quot;)">
            <text:p/>
          </table:table-cell>
          <table:table-cell table:formula="of:=IF(COUNTIF(INDIRECT(&quot;U1:U&quot;&amp;ROW()-1); [.U233])&gt;0; 1; 0)" office:value-type="float" office:value="1" calcext:value-type="float">
            <text:p>1</text:p>
          </table:table-cell>
          <table:table-cell table:formula="of:=[.T232]+1" office:value-type="float" office:value="233" calcext:value-type="float">
            <text:p>233</text:p>
          </table:table-cell>
          <table:table-cell table:formula="of:=[FL.C107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4]; [.R234:.U489]; 4; 0)); &quot;&quot;; VLOOKUP([.T234]; [.R234:.U489]; 4; 0))">
            <text:p/>
          </table:table-cell>
          <table:table-cell/>
          <table:table-cell table:formula="of:=IF(AND([.S234]=0; NOT([.U234]=0)); MAX(INDIRECT(&quot;R1:R&quot;&amp;ROW()-1))+1; &quot;&quot;)">
            <text:p/>
          </table:table-cell>
          <table:table-cell table:formula="of:=IF(COUNTIF(INDIRECT(&quot;U1:U&quot;&amp;ROW()-1); [.U234])&gt;0; 1; 0)" office:value-type="float" office:value="1" calcext:value-type="float">
            <text:p>1</text:p>
          </table:table-cell>
          <table:table-cell table:formula="of:=[.T233]+1" office:value-type="float" office:value="234" calcext:value-type="float">
            <text:p>234</text:p>
          </table:table-cell>
          <table:table-cell table:formula="of:=[FL.C108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5]; [.R235:.U490]; 4; 0)); &quot;&quot;; VLOOKUP([.T235]; [.R235:.U490]; 4; 0))">
            <text:p/>
          </table:table-cell>
          <table:table-cell/>
          <table:table-cell table:formula="of:=IF(AND([.S235]=0; NOT([.U235]=0)); MAX(INDIRECT(&quot;R1:R&quot;&amp;ROW()-1))+1; &quot;&quot;)">
            <text:p/>
          </table:table-cell>
          <table:table-cell table:formula="of:=IF(COUNTIF(INDIRECT(&quot;U1:U&quot;&amp;ROW()-1); [.U235])&gt;0; 1; 0)" office:value-type="float" office:value="1" calcext:value-type="float">
            <text:p>1</text:p>
          </table:table-cell>
          <table:table-cell table:formula="of:=[.T234]+1" office:value-type="float" office:value="235" calcext:value-type="float">
            <text:p>235</text:p>
          </table:table-cell>
          <table:table-cell table:formula="of:=[FL.C109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6]; [.R236:.U491]; 4; 0)); &quot;&quot;; VLOOKUP([.T236]; [.R236:.U491]; 4; 0))">
            <text:p/>
          </table:table-cell>
          <table:table-cell/>
          <table:table-cell table:formula="of:=IF(AND([.S236]=0; NOT([.U236]=0)); MAX(INDIRECT(&quot;R1:R&quot;&amp;ROW()-1))+1; &quot;&quot;)">
            <text:p/>
          </table:table-cell>
          <table:table-cell table:formula="of:=IF(COUNTIF(INDIRECT(&quot;U1:U&quot;&amp;ROW()-1); [.U236])&gt;0; 1; 0)" office:value-type="float" office:value="1" calcext:value-type="float">
            <text:p>1</text:p>
          </table:table-cell>
          <table:table-cell table:formula="of:=[.T235]+1" office:value-type="float" office:value="236" calcext:value-type="float">
            <text:p>236</text:p>
          </table:table-cell>
          <table:table-cell table:formula="of:=[FL.C110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7]; [.R237:.U492]; 4; 0)); &quot;&quot;; VLOOKUP([.T237]; [.R237:.U492]; 4; 0))">
            <text:p/>
          </table:table-cell>
          <table:table-cell/>
          <table:table-cell table:formula="of:=IF(AND([.S237]=0; NOT([.U237]=0)); MAX(INDIRECT(&quot;R1:R&quot;&amp;ROW()-1))+1; &quot;&quot;)">
            <text:p/>
          </table:table-cell>
          <table:table-cell table:formula="of:=IF(COUNTIF(INDIRECT(&quot;U1:U&quot;&amp;ROW()-1); [.U237])&gt;0; 1; 0)" office:value-type="float" office:value="1" calcext:value-type="float">
            <text:p>1</text:p>
          </table:table-cell>
          <table:table-cell table:formula="of:=[.T236]+1" office:value-type="float" office:value="237" calcext:value-type="float">
            <text:p>237</text:p>
          </table:table-cell>
          <table:table-cell table:formula="of:=[FL.C111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8]; [.R238:.U493]; 4; 0)); &quot;&quot;; VLOOKUP([.T238]; [.R238:.U493]; 4; 0))">
            <text:p/>
          </table:table-cell>
          <table:table-cell/>
          <table:table-cell table:formula="of:=IF(AND([.S238]=0; NOT([.U238]=0)); MAX(INDIRECT(&quot;R1:R&quot;&amp;ROW()-1))+1; &quot;&quot;)">
            <text:p/>
          </table:table-cell>
          <table:table-cell table:formula="of:=IF(COUNTIF(INDIRECT(&quot;U1:U&quot;&amp;ROW()-1); [.U238])&gt;0; 1; 0)" office:value-type="float" office:value="1" calcext:value-type="float">
            <text:p>1</text:p>
          </table:table-cell>
          <table:table-cell table:formula="of:=[.T237]+1" office:value-type="float" office:value="238" calcext:value-type="float">
            <text:p>238</text:p>
          </table:table-cell>
          <table:table-cell table:formula="of:=[FL.C112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39]; [.R239:.U494]; 4; 0)); &quot;&quot;; VLOOKUP([.T239]; [.R239:.U494]; 4; 0))">
            <text:p/>
          </table:table-cell>
          <table:table-cell/>
          <table:table-cell table:formula="of:=IF(AND([.S239]=0; NOT([.U239]=0)); MAX(INDIRECT(&quot;R1:R&quot;&amp;ROW()-1))+1; &quot;&quot;)">
            <text:p/>
          </table:table-cell>
          <table:table-cell table:formula="of:=IF(COUNTIF(INDIRECT(&quot;U1:U&quot;&amp;ROW()-1); [.U239])&gt;0; 1; 0)" office:value-type="float" office:value="1" calcext:value-type="float">
            <text:p>1</text:p>
          </table:table-cell>
          <table:table-cell table:formula="of:=[.T238]+1" office:value-type="float" office:value="239" calcext:value-type="float">
            <text:p>239</text:p>
          </table:table-cell>
          <table:table-cell table:formula="of:=[FL.C113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0]; [.R240:.U495]; 4; 0)); &quot;&quot;; VLOOKUP([.T240]; [.R240:.U495]; 4; 0))">
            <text:p/>
          </table:table-cell>
          <table:table-cell/>
          <table:table-cell table:formula="of:=IF(AND([.S240]=0; NOT([.U240]=0)); MAX(INDIRECT(&quot;R1:R&quot;&amp;ROW()-1))+1; &quot;&quot;)">
            <text:p/>
          </table:table-cell>
          <table:table-cell table:formula="of:=IF(COUNTIF(INDIRECT(&quot;U1:U&quot;&amp;ROW()-1); [.U240])&gt;0; 1; 0)" office:value-type="float" office:value="1" calcext:value-type="float">
            <text:p>1</text:p>
          </table:table-cell>
          <table:table-cell table:formula="of:=[.T239]+1" office:value-type="float" office:value="240" calcext:value-type="float">
            <text:p>240</text:p>
          </table:table-cell>
          <table:table-cell table:formula="of:=[FL.C114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1]; [.R241:.U496]; 4; 0)); &quot;&quot;; VLOOKUP([.T241]; [.R241:.U496]; 4; 0))">
            <text:p/>
          </table:table-cell>
          <table:table-cell/>
          <table:table-cell table:formula="of:=IF(AND([.S241]=0; NOT([.U241]=0)); MAX(INDIRECT(&quot;R1:R&quot;&amp;ROW()-1))+1; &quot;&quot;)">
            <text:p/>
          </table:table-cell>
          <table:table-cell table:formula="of:=IF(COUNTIF(INDIRECT(&quot;U1:U&quot;&amp;ROW()-1); [.U241])&gt;0; 1; 0)" office:value-type="float" office:value="1" calcext:value-type="float">
            <text:p>1</text:p>
          </table:table-cell>
          <table:table-cell table:formula="of:=[.T240]+1" office:value-type="float" office:value="241" calcext:value-type="float">
            <text:p>241</text:p>
          </table:table-cell>
          <table:table-cell table:formula="of:=[FL.C115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2]; [.R242:.U497]; 4; 0)); &quot;&quot;; VLOOKUP([.T242]; [.R242:.U497]; 4; 0))">
            <text:p/>
          </table:table-cell>
          <table:table-cell/>
          <table:table-cell table:formula="of:=IF(AND([.S242]=0; NOT([.U242]=0)); MAX(INDIRECT(&quot;R1:R&quot;&amp;ROW()-1))+1; &quot;&quot;)">
            <text:p/>
          </table:table-cell>
          <table:table-cell table:formula="of:=IF(COUNTIF(INDIRECT(&quot;U1:U&quot;&amp;ROW()-1); [.U242])&gt;0; 1; 0)" office:value-type="float" office:value="1" calcext:value-type="float">
            <text:p>1</text:p>
          </table:table-cell>
          <table:table-cell table:formula="of:=[.T241]+1" office:value-type="float" office:value="242" calcext:value-type="float">
            <text:p>242</text:p>
          </table:table-cell>
          <table:table-cell table:formula="of:=[FL.C116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3]; [.R243:.U498]; 4; 0)); &quot;&quot;; VLOOKUP([.T243]; [.R243:.U498]; 4; 0))">
            <text:p/>
          </table:table-cell>
          <table:table-cell/>
          <table:table-cell table:formula="of:=IF(AND([.S243]=0; NOT([.U243]=0)); MAX(INDIRECT(&quot;R1:R&quot;&amp;ROW()-1))+1; &quot;&quot;)">
            <text:p/>
          </table:table-cell>
          <table:table-cell table:formula="of:=IF(COUNTIF(INDIRECT(&quot;U1:U&quot;&amp;ROW()-1); [.U243])&gt;0; 1; 0)" office:value-type="float" office:value="1" calcext:value-type="float">
            <text:p>1</text:p>
          </table:table-cell>
          <table:table-cell table:formula="of:=[.T242]+1" office:value-type="float" office:value="243" calcext:value-type="float">
            <text:p>243</text:p>
          </table:table-cell>
          <table:table-cell table:formula="of:=[FL.C117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4]; [.R244:.U499]; 4; 0)); &quot;&quot;; VLOOKUP([.T244]; [.R244:.U499]; 4; 0))">
            <text:p/>
          </table:table-cell>
          <table:table-cell/>
          <table:table-cell table:formula="of:=IF(AND([.S244]=0; NOT([.U244]=0)); MAX(INDIRECT(&quot;R1:R&quot;&amp;ROW()-1))+1; &quot;&quot;)">
            <text:p/>
          </table:table-cell>
          <table:table-cell table:formula="of:=IF(COUNTIF(INDIRECT(&quot;U1:U&quot;&amp;ROW()-1); [.U244])&gt;0; 1; 0)" office:value-type="float" office:value="1" calcext:value-type="float">
            <text:p>1</text:p>
          </table:table-cell>
          <table:table-cell table:formula="of:=[.T243]+1" office:value-type="float" office:value="244" calcext:value-type="float">
            <text:p>244</text:p>
          </table:table-cell>
          <table:table-cell table:formula="of:=[FL.C118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5]; [.R245:.U500]; 4; 0)); &quot;&quot;; VLOOKUP([.T245]; [.R245:.U500]; 4; 0))">
            <text:p/>
          </table:table-cell>
          <table:table-cell/>
          <table:table-cell table:formula="of:=IF(AND([.S245]=0; NOT([.U245]=0)); MAX(INDIRECT(&quot;R1:R&quot;&amp;ROW()-1))+1; &quot;&quot;)">
            <text:p/>
          </table:table-cell>
          <table:table-cell table:formula="of:=IF(COUNTIF(INDIRECT(&quot;U1:U&quot;&amp;ROW()-1); [.U245])&gt;0; 1; 0)" office:value-type="float" office:value="1" calcext:value-type="float">
            <text:p>1</text:p>
          </table:table-cell>
          <table:table-cell table:formula="of:=[.T244]+1" office:value-type="float" office:value="245" calcext:value-type="float">
            <text:p>245</text:p>
          </table:table-cell>
          <table:table-cell table:formula="of:=[FL.C119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6]; [.R246:.U501]; 4; 0)); &quot;&quot;; VLOOKUP([.T246]; [.R246:.U501]; 4; 0))">
            <text:p/>
          </table:table-cell>
          <table:table-cell/>
          <table:table-cell table:formula="of:=IF(AND([.S246]=0; NOT([.U246]=0)); MAX(INDIRECT(&quot;R1:R&quot;&amp;ROW()-1))+1; &quot;&quot;)">
            <text:p/>
          </table:table-cell>
          <table:table-cell table:formula="of:=IF(COUNTIF(INDIRECT(&quot;U1:U&quot;&amp;ROW()-1); [.U246])&gt;0; 1; 0)" office:value-type="float" office:value="1" calcext:value-type="float">
            <text:p>1</text:p>
          </table:table-cell>
          <table:table-cell table:formula="of:=[.T245]+1" office:value-type="float" office:value="246" calcext:value-type="float">
            <text:p>246</text:p>
          </table:table-cell>
          <table:table-cell table:formula="of:=[FL.C120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7]; [.R247:.U502]; 4; 0)); &quot;&quot;; VLOOKUP([.T247]; [.R247:.U502]; 4; 0))">
            <text:p/>
          </table:table-cell>
          <table:table-cell/>
          <table:table-cell table:formula="of:=IF(AND([.S247]=0; NOT([.U247]=0)); MAX(INDIRECT(&quot;R1:R&quot;&amp;ROW()-1))+1; &quot;&quot;)">
            <text:p/>
          </table:table-cell>
          <table:table-cell table:formula="of:=IF(COUNTIF(INDIRECT(&quot;U1:U&quot;&amp;ROW()-1); [.U247])&gt;0; 1; 0)" office:value-type="float" office:value="1" calcext:value-type="float">
            <text:p>1</text:p>
          </table:table-cell>
          <table:table-cell table:formula="of:=[.T246]+1" office:value-type="float" office:value="247" calcext:value-type="float">
            <text:p>247</text:p>
          </table:table-cell>
          <table:table-cell table:formula="of:=[FL.C121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8]; [.R248:.U503]; 4; 0)); &quot;&quot;; VLOOKUP([.T248]; [.R248:.U503]; 4; 0))">
            <text:p/>
          </table:table-cell>
          <table:table-cell/>
          <table:table-cell table:formula="of:=IF(AND([.S248]=0; NOT([.U248]=0)); MAX(INDIRECT(&quot;R1:R&quot;&amp;ROW()-1))+1; &quot;&quot;)">
            <text:p/>
          </table:table-cell>
          <table:table-cell table:formula="of:=IF(COUNTIF(INDIRECT(&quot;U1:U&quot;&amp;ROW()-1); [.U248])&gt;0; 1; 0)" office:value-type="float" office:value="1" calcext:value-type="float">
            <text:p>1</text:p>
          </table:table-cell>
          <table:table-cell table:formula="of:=[.T247]+1" office:value-type="float" office:value="248" calcext:value-type="float">
            <text:p>248</text:p>
          </table:table-cell>
          <table:table-cell table:formula="of:=[FL.C122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49]; [.R249:.U504]; 4; 0)); &quot;&quot;; VLOOKUP([.T249]; [.R249:.U504]; 4; 0))">
            <text:p/>
          </table:table-cell>
          <table:table-cell/>
          <table:table-cell table:formula="of:=IF(AND([.S249]=0; NOT([.U249]=0)); MAX(INDIRECT(&quot;R1:R&quot;&amp;ROW()-1))+1; &quot;&quot;)">
            <text:p/>
          </table:table-cell>
          <table:table-cell table:formula="of:=IF(COUNTIF(INDIRECT(&quot;U1:U&quot;&amp;ROW()-1); [.U249])&gt;0; 1; 0)" office:value-type="float" office:value="1" calcext:value-type="float">
            <text:p>1</text:p>
          </table:table-cell>
          <table:table-cell table:formula="of:=[.T248]+1" office:value-type="float" office:value="249" calcext:value-type="float">
            <text:p>249</text:p>
          </table:table-cell>
          <table:table-cell table:formula="of:=[FL.C123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50]; [.R250:.U505]; 4; 0)); &quot;&quot;; VLOOKUP([.T250]; [.R250:.U505]; 4; 0))">
            <text:p/>
          </table:table-cell>
          <table:table-cell/>
          <table:table-cell table:formula="of:=IF(AND([.S250]=0; NOT([.U250]=0)); MAX(INDIRECT(&quot;R1:R&quot;&amp;ROW()-1))+1; &quot;&quot;)">
            <text:p/>
          </table:table-cell>
          <table:table-cell table:formula="of:=IF(COUNTIF(INDIRECT(&quot;U1:U&quot;&amp;ROW()-1); [.U250])&gt;0; 1; 0)" office:value-type="float" office:value="1" calcext:value-type="float">
            <text:p>1</text:p>
          </table:table-cell>
          <table:table-cell table:formula="of:=[.T249]+1" office:value-type="float" office:value="250" calcext:value-type="float">
            <text:p>250</text:p>
          </table:table-cell>
          <table:table-cell table:formula="of:=[FL.C124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51]; [.R251:.U506]; 4; 0)); &quot;&quot;; VLOOKUP([.T251]; [.R251:.U506]; 4; 0))">
            <text:p/>
          </table:table-cell>
          <table:table-cell/>
          <table:table-cell table:formula="of:=IF(AND([.S251]=0; NOT([.U251]=0)); MAX(INDIRECT(&quot;R1:R&quot;&amp;ROW()-1))+1; &quot;&quot;)">
            <text:p/>
          </table:table-cell>
          <table:table-cell table:formula="of:=IF(COUNTIF(INDIRECT(&quot;U1:U&quot;&amp;ROW()-1); [.U251])&gt;0; 1; 0)" office:value-type="float" office:value="1" calcext:value-type="float">
            <text:p>1</text:p>
          </table:table-cell>
          <table:table-cell table:formula="of:=[.T250]+1" office:value-type="float" office:value="251" calcext:value-type="float">
            <text:p>251</text:p>
          </table:table-cell>
          <table:table-cell table:formula="of:=[FL.C125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52]; [.R252:.U507]; 4; 0)); &quot;&quot;; VLOOKUP([.T252]; [.R252:.U507]; 4; 0))">
            <text:p/>
          </table:table-cell>
          <table:table-cell/>
          <table:table-cell table:formula="of:=IF(AND([.S252]=0; NOT([.U252]=0)); MAX(INDIRECT(&quot;R1:R&quot;&amp;ROW()-1))+1; &quot;&quot;)">
            <text:p/>
          </table:table-cell>
          <table:table-cell table:formula="of:=IF(COUNTIF(INDIRECT(&quot;U1:U&quot;&amp;ROW()-1); [.U252])&gt;0; 1; 0)" office:value-type="float" office:value="1" calcext:value-type="float">
            <text:p>1</text:p>
          </table:table-cell>
          <table:table-cell table:formula="of:=[.T251]+1" office:value-type="float" office:value="252" calcext:value-type="float">
            <text:p>252</text:p>
          </table:table-cell>
          <table:table-cell table:formula="of:=[FL.C126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53]; [.R253:.U508]; 4; 0)); &quot;&quot;; VLOOKUP([.T253]; [.R253:.U508]; 4; 0))">
            <text:p/>
          </table:table-cell>
          <table:table-cell/>
          <table:table-cell table:formula="of:=IF(AND([.S253]=0; NOT([.U253]=0)); MAX(INDIRECT(&quot;R1:R&quot;&amp;ROW()-1))+1; &quot;&quot;)">
            <text:p/>
          </table:table-cell>
          <table:table-cell table:formula="of:=IF(COUNTIF(INDIRECT(&quot;U1:U&quot;&amp;ROW()-1); [.U253])&gt;0; 1; 0)" office:value-type="float" office:value="1" calcext:value-type="float">
            <text:p>1</text:p>
          </table:table-cell>
          <table:table-cell table:formula="of:=[.T252]+1" office:value-type="float" office:value="253" calcext:value-type="float">
            <text:p>253</text:p>
          </table:table-cell>
          <table:table-cell table:formula="of:=[FL.C127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54]; [.R254:.U509]; 4; 0)); &quot;&quot;; VLOOKUP([.T254]; [.R254:.U509]; 4; 0))">
            <text:p/>
          </table:table-cell>
          <table:table-cell/>
          <table:table-cell table:formula="of:=IF(AND([.S254]=0; NOT([.U254]=0)); MAX(INDIRECT(&quot;R1:R&quot;&amp;ROW()-1))+1; &quot;&quot;)">
            <text:p/>
          </table:table-cell>
          <table:table-cell table:formula="of:=IF(COUNTIF(INDIRECT(&quot;U1:U&quot;&amp;ROW()-1); [.U254])&gt;0; 1; 0)" office:value-type="float" office:value="1" calcext:value-type="float">
            <text:p>1</text:p>
          </table:table-cell>
          <table:table-cell table:formula="of:=[.T253]+1" office:value-type="float" office:value="254" calcext:value-type="float">
            <text:p>254</text:p>
          </table:table-cell>
          <table:table-cell table:formula="of:=[FL.C128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55]; [.R255:.U510]; 4; 0)); &quot;&quot;; VLOOKUP([.T255]; [.R255:.U510]; 4; 0))">
            <text:p/>
          </table:table-cell>
          <table:table-cell/>
          <table:table-cell table:formula="of:=IF(AND([.S255]=0; NOT([.U255]=0)); MAX(INDIRECT(&quot;R1:R&quot;&amp;ROW()-1))+1; &quot;&quot;)">
            <text:p/>
          </table:table-cell>
          <table:table-cell table:formula="of:=IF(COUNTIF(INDIRECT(&quot;U1:U&quot;&amp;ROW()-1); [.U255])&gt;0; 1; 0)" office:value-type="float" office:value="1" calcext:value-type="float">
            <text:p>1</text:p>
          </table:table-cell>
          <table:table-cell table:formula="of:=[.T254]+1" office:value-type="float" office:value="255" calcext:value-type="float">
            <text:p>255</text:p>
          </table:table-cell>
          <table:table-cell table:formula="of:=[FL.C129]" office:value-type="float" office:value="0" calcext:value-type="float">
            <text:p>0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formula="of:=IF(ISNA(VLOOKUP([.T256]; [.R256:.U511]; 4; 0)); &quot;&quot;; VLOOKUP([.T256]; [.R256:.U511]; 4; 0))">
            <text:p/>
          </table:table-cell>
          <table:table-cell/>
          <table:table-cell table:formula="of:=IF(AND([.S256]=0; NOT([.U256]=0)); MAX(INDIRECT(&quot;R1:R&quot;&amp;ROW()-1))+1; &quot;&quot;)">
            <text:p/>
          </table:table-cell>
          <table:table-cell table:formula="of:=IF(COUNTIF(INDIRECT(&quot;U1:U&quot;&amp;ROW()-1); [.U256])&gt;0; 1; 0)" office:value-type="float" office:value="1" calcext:value-type="float">
            <text:p>1</text:p>
          </table:table-cell>
          <table:table-cell table:formula="of:=[.T255]+1" office:value-type="float" office:value="256" calcext:value-type="float">
            <text:p>256</text:p>
          </table:table-cell>
          <table:table-cell table:formula="of:=[FL.C130]" office:value-type="float" office:value="0" calcext:value-type="float">
            <text:p>0</text:p>
          </table:table-cell>
          <table:table-cell table:number-columns-repeated="25"/>
        </table:table-row>
        <table:table-row table:style-name="ro4" table:number-rows-repeated="65279">
          <table:table-cell table:number-columns-repeated="46"/>
        </table:table-row>
        <table:table-row table:style-name="ro4">
          <table:table-cell table:number-columns-repeated="46"/>
        </table:table-row>
      </table:table>
      <table:named-expressions/>
      <table:database-ranges>
        <table:database-range table:name="CountryFinalistsL" table:target-range-address="Finalists.D1:Finalists.D65536" table:display-filter-buttons="true"/>
        <table:database-range table:name="CountryFinalistsR" table:target-range-address="Finalists.K1:Finalists.K65536" table:display-filter-buttons="true"/>
        <table:database-range table:name="CountryRA" table:target-range-address="ML.C1:ML.C65443" table:display-filter-buttons="true"/>
        <table:database-range table:name="CountryRAW" table:target-range-address="FL.C1:FL.C65536" table:display-filter-buttons="true"/>
        <table:database-range table:name="CountryRB" table:target-range-address="ML.M1:ML.M65443" table:display-filter-buttons="true"/>
        <table:database-range table:name="CountryRBW" table:target-range-address="FL.K1:FL.K65536" table:display-filter-buttons="true"/>
        <table:database-range table:name="CountryRC" table:target-range-address="ML.W1:ML.W65443" table:display-filter-buttons="true"/>
        <table:database-range table:name="CountryRCW" table:target-range-address="FL.S1:FL.S65536" table:display-filter-buttons="true"/>
        <table:database-range table:name="CountryRD" table:target-range-address="ML.AG1:ML.AG65443" table:display-filter-buttons="true"/>
        <table:database-range table:name="CountryRDW" table:target-range-address="FL.AA1:FL.AA65536" table:display-filter-buttons="true"/>
        <table:database-range table:name="CountryRF" table:target-range-address="Finals.AG1:Finals.AG65536" table:display-filter-buttons="true"/>
        <table:database-range table:name="CountryRPQF" table:target-range-address="Finals.C1:Finals.C65536" table:display-filter-buttons="true"/>
        <table:database-range table:name="CountryRQF" table:target-range-address="Finals.M1:Finals.M65536" table:display-filter-buttons="true"/>
        <table:database-range table:name="CountryRSF" table:target-range-address="Finals.W1:Finals.W65536" table:display-filter-buttons="true"/>
        <table:database-range table:name="CountrySeedM" table:target-range-address="Seeds.C1:Seeds.C65536" table:display-filter-buttons="true"/>
        <table:database-range table:name="CountrySeedW" table:target-range-address="Seeds.N1:Seeds.N65536" table:display-filter-buttons="true"/>
        <table:database-range table:name="FinalistsRounds" table:target-range-address="Finalists.G1:Finalists.G65536" table:display-filter-buttons="true"/>
        <table:database-range table:name="OpponentFinalists" table:target-range-address="Finalists.J1:Finalists.J65536" table:display-filter-buttons="true"/>
        <table:database-range table:name="OpponentSeedM" table:target-range-address="Seeds.I1:Seeds.I65536" table:display-filter-buttons="true"/>
        <table:database-range table:name="OpponentSeedW" table:target-range-address="Seeds.T1:Seeds.T65536" table:display-filter-buttons="true"/>
        <table:database-range table:name="SelectFinals" table:target-range-address="Finals.AN1:Finals.AN65536" table:display-filter-buttons="true"/>
        <table:database-range table:name="SelectFL" table:target-range-address="FL.AF1:FL.AF65536" table:display-filter-buttons="true"/>
        <table:database-range table:name="SelectML" table:target-range-address="ML.AN1:ML.AN65443" table:display-filter-buttons="true"/>
        <table:database-range table:name="SelectSeeds" table:target-range-address="Seeds.W1:Seeds.W65536" table:display-filter-buttons="true"/>
        <table:database-range table:name="__Anonymous_Sheet_DB__2" table:target-range-address="FL.C1:FL.C6553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Nimbus Mono L" svg:font-family="'Nimbus Mono L'" style:font-family-generic="modern" style:font-pitch="fixed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U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/>
    </number:number-style>
    <number:number-style style:name="N131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31P0"/>
    </number:number-style>
    <number:number-style style:name="N133P0" style:volatile="true">
      <style:text-properties fo:color="#00ff00"/>
      <number:number number:decimal-places="0" number:min-decimal-places="0" number:min-integer-digits="1"/>
    </number:number-style>
    <number:number-style style:name="N133">
      <style:text-properties fo:color="#ff0000"/>
      <number:text>-</number:text>
      <number:number number:decimal-places="0" number:min-decimal-places="0" number:min-integer-digits="1"/>
      <style:map style:condition="value()&gt;=0" style:apply-style-name="N133P0"/>
    </number:number-style>
    <number:number-style style:name="N135P0" style:volatile="true">
      <style:text-properties fo:color="#00ff00"/>
      <number:text>+ </number:text>
      <number:number number:decimal-places="0" number:min-decimal-places="0" number:min-integer-digits="1"/>
    </number:number-style>
    <number:number-style style:name="N135">
      <style:text-properties fo:color="#ff0000"/>
      <number:text>-</number:text>
      <number:number number:decimal-places="0" number:min-decimal-places="0" number:min-integer-digits="1"/>
      <style:map style:condition="value()&gt;=0" style:apply-style-name="N135P0"/>
    </number:number-style>
    <number:number-style style:name="N137P0" style:volatile="true">
      <style:text-properties fo:color="#00ff00"/>
      <number:text>+</number:text>
      <number:number number:decimal-places="0" number:min-decimal-places="0" number:min-integer-digits="1"/>
    </number:number-style>
    <number:number-style style:name="N137">
      <style:text-properties fo:color="#ff0000"/>
      <number:text>-</number:text>
      <number:number number:decimal-places="0" number:min-decimal-places="0" number:min-integer-digits="1"/>
      <style:map style:condition="value()&gt;=0" style:apply-style-name="N137P0"/>
    </number:number-style>
    <number:number-style style:name="N139P0" style:volatile="true">
      <style:text-properties fo:color="#00ff00"/>
      <number:text>+</number:text>
      <number:number number:decimal-places="0" number:min-decimal-places="0" number:min-integer-digits="1"/>
    </number:number-style>
    <number:number-style style:name="N139P1" style:volatile="true">
      <style:text-properties fo:color="#ff0000"/>
      <number:text>-</number:text>
      <number:number number:decimal-places="0" number:min-decimal-places="0" number:min-integer-digits="1"/>
    </number:number-style>
    <number:number-style style:name="N139">
      <number:number number:decimal-places="0" number:min-decimal-places="0" number:min-integer-digits="1"/>
      <style:map style:condition="value()&gt;0" style:apply-style-name="N139P0"/>
      <style:map style:condition="value()&lt;0" style:apply-style-name="N139P1"/>
    </number:number-style>
    <number:number-style style:name="N141P0" style:volatile="true">
      <style:text-properties fo:color="#0000ff"/>
      <number:text>+</number:text>
      <number:number number:decimal-places="0" number:min-decimal-places="0" number:min-integer-digits="1"/>
    </number:number-style>
    <number:number-style style:name="N141P1" style:volatile="true">
      <style:text-properties fo:color="#ff0000"/>
      <number:text>-</number:text>
      <number:number number:decimal-places="0" number:min-decimal-places="0" number:min-integer-digits="1"/>
    </number:number-style>
    <number:number-style style:name="N141">
      <number:number number:decimal-places="0" number:min-decimal-places="0" number:min-integer-digits="1"/>
      <style:map style:condition="value()&gt;0" style:apply-style-name="N141P0"/>
      <style:map style:condition="value()&lt;0" style:apply-style-name="N141P1"/>
    </number:number-style>
    <number:number-style style:name="N142P0" style:volatile="true">
      <style:text-properties fo:color="#0000ff"/>
      <number:text>+</number:text>
      <number:number number:decimal-places="0" number:min-decimal-places="0" number:min-integer-digits="1"/>
    </number:number-style>
    <number:number-style style:name="N142P1" style:volatile="true">
      <style:text-properties fo:color="#ff0000"/>
      <number:text>-</number:text>
      <number:number number:decimal-places="0" number:min-decimal-places="0" number:min-integer-digits="1"/>
    </number:number-style>
    <number:number-style style:name="N142">
      <number:text/>
      <style:map style:condition="value()&gt;0" style:apply-style-name="N142P0"/>
      <style:map style:condition="value()&lt;0" style:apply-style-name="N142P1"/>
    </number:number-style>
    <number:number-style style:name="N145P0" style:volatile="true">
      <style:text-properties fo:color="#0000ff"/>
      <number:text>+</number:text>
      <number:number number:decimal-places="0" number:min-decimal-places="0" number:min-integer-digits="2"/>
    </number:number-style>
    <number:number-style style:name="N145P1" style:volatile="true">
      <style:text-properties fo:color="#ff0000"/>
      <number:text>-</number:text>
      <number:number number:decimal-places="0" number:min-decimal-places="0" number:min-integer-digits="2"/>
    </number:number-style>
    <number:number-style style:name="N145">
      <number:text>E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style:text-properties fo:color="#0000ff"/>
      <number:text>+</number:text>
      <number:number number:decimal-places="0" number:min-decimal-places="0" number:min-integer-digits="1"/>
    </number:number-style>
    <number:number-style style:name="N146P1" style:volatile="true">
      <style:text-properties fo:color="#ff0000"/>
      <number:text>-</number:text>
      <number:number number:decimal-places="0" number:min-decimal-places="0" number:min-integer-digits="1"/>
    </number:number-style>
    <number:number-style style:name="N146">
      <style:text-properties fo:color="#ffffff"/>
      <number:text>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style:text-properties fo:color="#ff0000"/>
      <number:text>OUT</number:text>
    </number:number-style>
    <number:number-style style:name="N148">
      <number:number number:min-integer-digits="1"/>
      <style:map style:condition="value()=0" style:apply-style-name="N148P0"/>
    </number:number-style>
    <number:number-style style:name="N150P0" style:volatile="true">
      <style:text-properties fo:color="#ff0000"/>
      <number:text>OUT</number:text>
    </number:number-style>
    <number:number-style style:name="N150P1" style:volatile="true">
      <number:text/>
    </number:number-style>
    <number:number-style style:name="N150">
      <number:text/>
      <style:map style:condition="value()=0" style:apply-style-name="N150P0"/>
      <style:map style:condition="value()=1" style:apply-style-name="N150P1"/>
    </number:number-style>
    <number:number-style style:name="N151P0" style:volatile="true">
      <style:text-properties fo:color="#ff0000"/>
      <number:text>OUT</number:text>
    </number:number-style>
    <number:number-style style:name="N151P1" style:volatile="true">
      <number:text/>
    </number:number-style>
    <number:number-style style:name="N151">
      <number:text/>
      <style:map style:condition="value()&gt;0" style:apply-style-name="N151P0"/>
      <style:map style:condition="value()=0" style:apply-style-name="N151P1"/>
    </number:number-style>
    <number:number-style style:name="N154P0" style:volatile="true">
      <style:text-properties fo:color="#ff0000"/>
      <number:text>Lost to</number:text>
    </number:number-style>
    <number:number-style style:name="N154P1" style:volatile="true">
      <number:text>Vs</number:text>
    </number:number-style>
    <number:number-style style:name="N154">
      <number:text/>
      <style:map style:condition="value()=0" style:apply-style-name="N154P0"/>
      <style:map style:condition="value()=1" style:apply-style-name="N154P1"/>
    </number:number-style>
    <number:number-style style:name="N156P0" style:volatile="true">
      <style:text-properties fo:color="#ff0000"/>
      <number:text>Lost to</number:text>
    </number:number-style>
    <number:number-style style:name="N156P1" style:volatile="true">
      <style:text-properties fo:color="#0000ff"/>
      <number:text>Vs</number:text>
    </number:number-style>
    <number:number-style style:name="N156" number:title="User-defined">
      <number:text/>
      <style:map style:condition="value()=0" style:apply-style-name="N156P0"/>
      <style:map style:condition="value()=1" style:apply-style-name="N156P1"/>
    </number:number-style>
    <number:number-style style:name="N158P0" style:volatile="true">
      <style:text-properties fo:color="#ff0000"/>
      <number:text>Lost to</number:text>
    </number:number-style>
    <number:number-style style:name="N158P1" style:volatile="true">
      <style:text-properties fo:color="#ffffff"/>
      <number:text>Vs</number:text>
    </number:number-style>
    <number:number-style style:name="N158">
      <number:text/>
      <style:map style:condition="value()=0" style:apply-style-name="N158P0"/>
      <style:map style:condition="value()=1" style:apply-style-name="N158P1"/>
    </number:number-style>
    <number:number-style style:name="N160P0" style:volatile="true">
      <style:text-properties fo:color="#ff0000"/>
      <number:text>Lost to</number:text>
    </number:number-style>
    <number:number-style style:name="N160P1" style:volatile="true">
      <style:text-properties fo:color="#ff00ff"/>
      <number:text>Vs</number:text>
    </number:number-style>
    <number:number-style style:name="N160">
      <number:text/>
      <style:map style:condition="value()=0" style:apply-style-name="N160P0"/>
      <style:map style:condition="value()=1" style:apply-style-name="N160P1"/>
    </number:number-style>
    <number:number-style style:name="N162P0" style:volatile="true">
      <style:text-properties fo:color="#ff0000"/>
      <number:text>Lost to</number:text>
    </number:number-style>
    <number:number-style style:name="N162P1" style:volatile="true">
      <style:text-properties fo:color="#00ffff"/>
      <number:text>Vs</number:text>
    </number:number-style>
    <number:number-style style:name="N162">
      <number:text/>
      <style:map style:condition="value()=0" style:apply-style-name="N162P0"/>
      <style:map style:condition="value()=1" style:apply-style-name="N162P1"/>
    </number:number-style>
    <number:number-style style:name="N163P0" style:volatile="true">
      <number:number number:decimal-places="0" number:min-decimal-places="0" number:min-integer-digits="1"/>
    </number:number-style>
    <number:number-style style:name="N163P1" style:volatile="true">
      <style:text-properties fo:color="#ff0000"/>
      <number:text>-</number:text>
      <number:number number:decimal-places="0" number:min-decimal-places="0" number:min-integer-digits="1"/>
    </number:number-style>
    <number:number-style style:name="N163">
      <number:text>E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style:text-properties fo:color="#0000ff"/>
      <number:text>+</number:text>
      <number:number number:decimal-places="0" number:min-decimal-places="0" number:min-integer-digits="1"/>
    </number:number-style>
    <number:number-style style:name="N164P1" style:volatile="true">
      <style:text-properties fo:color="#ff0000"/>
      <number:text>-</number:text>
      <number:number number:decimal-places="0" number:min-decimal-places="0" number:min-integer-digits="1"/>
    </number:number-style>
    <number:number-style style:name="N164">
      <number:text>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style:text-properties fo:color="#ff0000"/>
      <number:text>Lost to</number:text>
    </number:number-style>
    <number:number-style style:name="N165P1" style:volatile="true">
      <style:text-properties fo:color="#0000ff"/>
      <number:text>Vs</number:text>
    </number:number-style>
    <number:number-style style:name="N165">
      <number:text>Beat</number:text>
      <style:map style:condition="value()=0" style:apply-style-name="N165P0"/>
      <style:map style:condition="value()=1" style:apply-style-name="N165P1"/>
    </number:number-style>
    <number:number-style style:name="N166P0" style:volatile="true">
      <style:text-properties fo:color="#ff0000"/>
      <number:text>Lost to</number:text>
    </number:number-style>
    <number:number-style style:name="N166P1" style:volatile="true">
      <style:text-properties fo:color="#0000ff"/>
      <number:text>Vs</number:text>
    </number:number-style>
    <number:number-style style:name="N166">
      <style:text-properties fo:color="#00ff00"/>
      <number:text>Beat</number:text>
      <style:map style:condition="value()=0" style:apply-style-name="N166P0"/>
      <style:map style:condition="value()=1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MatchWinner" style:family="table-cell" style:parent-style-name="Default">
      <style:text-properties fo:color="#c5000b" fo:font-weight="bold"/>
    </style:style>
    <style:style style:name="SetWinner" style:family="table-cell" style:parent-style-name="Default">
      <style:text-properties fo:color="#0047ff" fo:font-weight="bold"/>
    </style:style>
    <style:style style:name="SeededVsSeeded" style:family="table-cell" style:parent-style-name="Default">
      <style:text-properties fo:color="#ff6633" fo:font-weight="bold"/>
    </style:style>
    <style:style style:name="AliveNWell" style:family="table-cell" style:parent-style-name="Default">
      <style:text-properties fo:color="#9966cc" fo:font-weight="bold"/>
    </style:style>
    <style:style style:name="DeadNBurried" style:family="table-cell" style:parent-style-name="Default">
      <style:text-properties fo:color="#808080" fo:font-style="italic"/>
    </style:style>
    <style:style style:name="DecidedEvenBeforeMatch" style:family="table-cell" style:parent-style-name="Default">
      <style:text-properties fo:color="#198a8a" fo:font-style="italic"/>
    </style:style>
    <style:style style:name="WLRWinner" style:family="table-cell" style:parent-style-name="Default">
      <style:text-properties fo:color="#0066cc" fo:font-weight="bold"/>
    </style:style>
    <style:style style:name="WLRRetired" style:family="table-cell" style:parent-style-name="Default">
      <style:text-properties fo:color="#ff0000" fo:font-weight="bold"/>
    </style:style>
    <style:style style:name="MatchInProgress" style:family="table-cell" style:parent-style-name="Default">
      <style:text-properties fo:color="#4700b8" fo:font-style="italic"/>
    </style:style>
    <style:style style:name="MatchStilltoStart" style:family="table-cell" style:parent-style-name="Default">
      <style:text-properties fo:color="#008000" fo:font-weight="bold"/>
    </style:style>
    <style:style style:name="StatMComplete" style:family="table-cell" style:parent-style-name="Default">
      <style:text-properties fo:color="#008000" fo:font-weight="bold"/>
    </style:style>
    <style:style style:name="StatMUncomplete" style:family="table-cell" style:parent-style-name="Default">
      <style:text-properties fo:color="#999999" fo:font-style="italic"/>
    </style:style>
    <style:style style:name="StatWComplete" style:family="table-cell" style:parent-style-name="Default">
      <style:text-properties fo:color="#b84700" fo:font-weight="bold"/>
    </style:style>
    <style:style style:name="StatWUncomplete" style:family="table-cell" style:parent-style-name="Default">
      <style:text-properties fo:color="#9966cc" fo:font-style="italic"/>
    </style:style>
    <style:style style:name="ColorBlue" style:family="table-cell" style:parent-style-name="Default">
      <style:text-properties fo:color="#0000ff" fo:font-weight="bold"/>
    </style:style>
    <style:style style:name="ColorRed" style:family="table-cell" style:parent-style-name="Default">
      <style:text-properties fo:color="#ff0000" fo:font-style="italic"/>
    </style:style>
    <draw:gradient draw:name="Square_20_yellow_2f_white" draw:display-name="Square yellow/white" draw:style="square" draw:cx="50%" draw:cy="50%" draw:start-color="#e6ff00" draw:end-color="#ffffff" draw:start-intensity="100%" draw:end-intensity="100%" draw:angle="270deg" draw:border="0%">
      <loext:gradient-stop svg:offset="0" loext:color-type="rgb" loext:color-value="#e6ff00"/>
      <loext:gradient-stop svg:offset="1" loext:color-type="rgb" loext:color-value="#ffffff"/>
    </draw:gradient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25-07-03">00/00/0000</text:date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11:57:33.720940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meta:initial-creator>Neeraj Jakhar</meta:initial-creator>
    <meta:creation-date>2008-06-19T14:59:00</meta:creation-date>
    <dc:date>2025-07-03T11:58:32.733918008</dc:date>
    <meta:editing-cycles>460</meta:editing-cycles>
    <meta:editing-duration>P7DT14H14M58S</meta:editing-duration>
    <dc:description>Template for tennis tournaments.</dc:description>
    <meta:keyword>tennis</meta:keyword>
    <dc:subject>Tennis</dc:subject>
    <dc:title>Tennis Template</dc:title>
    <meta:document-statistic meta:table-count="7" meta:cell-count="5487" meta:object-count="19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ISSETWINNER (s1, s2)
	ret = 0
	IF ((s1 = 6 AND s1 - s2 &gt;= 2) OR (s1 = 7 AND s2 = 6) OR (s1 &gt; 6 AND s1 - s2 = 2)) Then
		ret = 1
	Else
		ret = 0
	End If
	ISSETWINNER = ret
End Function

Function ISWINNERMEN (p1scores AS VARIANT, p2scores AS VARIANT)
	If ((NOT IsArray(p1scores)) OR (NOT IsArray(p2scores))) Then
		Err = 519
		ISWINNERMEN = "#VALUE"
	Else
		scount = 0
		lcount = 0
		For i = 0 to 4
			s1 = p1scores(1, LBound(p1scores)+i)
			s2 = p2scores(1, LBound(p2scores)+i)
			If (ISSETWINNER (s1, s2)) Then
				scount = scount + 1
			ElseIf (ISSETWINNER (s2, s1)) Then
				lcount = lcount + 1
			End If
		Next i
		If (scount = 3) Then
			ISWINNERMEN = "W"
		ElseIf (lcount = 3) Then
			ISWINNERMEN = "L"
		Else
			ISWINNERMEN = ""
		End If
	End If
End Function

Function ISWINNERWOMEN (p1scores AS VARIANT, p2scores AS VARIANT)
	If ((NOT IsArray(p1scores)) OR (NOT IsArray(p2scores))) Then
		Err = 519
		ISWINNERWOMEN = "#VALUE"
	Else
		scount = 0
		lcount = 0
		For i = 0 to 2
			s1 = p1scores(1, LBound(p1scores)+i)
			s2 = p2scores(1, LBound(p2scores)+i)
			If (ISSETWINNER (s1, s2)) Then
				scount = scount + 1
			ElseIf (ISSETWINNER (s2, s1)) Then
				lcount = lcount + 1
			End If
		Next i
		If (scount = 2) Then
			ISWINNERWOMEN = "W"
		ElseIf (lcount = 2) Then
			ISWINNERWOMEN = "L"
		Else
			ISWINNERWOMEN = ""
		End If
	End If
End Function

Function ISWINNERWOMENOLD (p1a, p2a, p1b, p2b, p1c, p2c)
	scount = 0
	If (ISSETWINNER (p1a, p2a)) Then
		scount = scount + 1
	End If
	If (ISSETWINNER (p1b, p2b)) Then
		scount = scount + 1
	End If
	If (ISSETWINNER (p1c, p2c)) Then
		scount = scount + 1
	End If
	If (scount = 2) Then
		ISWINNERMEN = 1
	Else
		ISWINNERMEN = 0
	End If
End Function

Function ISWINNERMENOLD (p1a, p2a, p1b, p2b, p1c, p2c, p1d, p2d, p1e, p2e)
	scount = 0
	If (ISSETWINNER (p1a, p2a)) Then
		scount = scount + 1
	End If
	If (ISSETWINNER (p1b, p2b)) Then
		scount = scount + 1
	End If
	If (ISSETWINNER (p1c, p2c)) Then
		scount = scount + 1
	End If
	If (ISSETWINNER (p1d, p2d)) Then
		scount = scount + 1
	End If
	If (ISSETWINNER (p1e, p2e)) Then
		scount = scount + 1
	End If
	If (scount = 3) Then
		ISWINNERMEN = 1
	Else
		ISWINNERMEN = 0
	End If
End Function

Function WHICHROUND (n)
	ret = ""
	If (n = 1) Then
		ret = "1st"
	ElseIf (n = 2) Then
		ret = "2nd"
	ElseIf (n = 3) Then
		ret = "3rd"
	ElseIf (n = 4) Then
		ret = "4th"
	ElseIf (n = 5) Then
		ret = "QF"
	ElseIf (n = 6) Then
		ret = "SF"
	ElseIf (n = 7) Then
		ret = "F"
	ElseIf (n = 8) Then
		ret = "W"
	Else
		ret = "D"
	End If
	WHICHROUND = ret
End Function

Function WHICHROUNDN (r)
	ret = 0
	If (r = "1st") Then
		ret = 1
	ElseIf (r = "2nd") Then
		ret = 2
	ElseIf (r = "3rd") Then
		ret = 3
	ElseIf (r = "4th") Then
		ret = 4
	ElseIf (r = "QF") Then
		ret = 5
	ElseIf (r = "SF") Then
		ret = 6
	ElseIf (r = "F") Then
		ret = 7
	ElseIf (r = "W") Then
		ret = 8
	ElseIf (r = "D") Then
		ret = 0
	End If
	WHICHROUNDN = ret
End Function

Function DIFFROUND (r1, r2)
	n1 = WHICHROUNDN (r1)
	n2 = WHICHROUNDN (r2)
	DIFFROUND = n2 - n1	
End Function

Function HASLOST (val)
	IF (val = "L" OR val = "R") Then
		HASLOST = 1
	Else
		HASLOST = 0
	End If
End Function

Function WHICHSHEET (male, rnd)
	ret = ""
	If (rnd &gt; 4) Then
		ret = "Finals."
	ElseIf (male = 1) Then
		ret = "ML."
	Else
		ret = "FL."
	End If
	WHICHSHEET = ret
End Function

Function WHICHROW1 (male, rnd)
	ret = "3"
	If (rnd &lt; 5) Then
		ret = "3"
	ElseIf (male = 1) Then
		ret = "3"
	Else
		ret = "21"
	End If
	WHICHROW1 = ret
End Function

Function WHICHROW2 (male, rnd)
	ret = "130"
	If (rnd &lt; 5) Then
		ret = "130"
	ElseIf (male = 1) Then
		ret = "18"
	Else 
		ret = "36"
	End If
	WHICHROW2 = ret
End Function

Function ROWOFFSETED (row, rnd)
	ret = row
	even = 0
	If (row = 2*INT(row/2)) Then
		even = 1
	End If
	If (rnd = 1 OR rnd = 4) Then
		If (even = 1) Then
			ret = row - 1
		Else
			ret = row + 1
		End If
	ElseIf (rnd = 2 OR rnd = 3 OR rnd = 5 OR rnd = 6 OR rnd = 7 OR rnd = 8) Then
		If (even = 1) Then
			ret = row + 1
		Else
			ret = row - 1
		End If
	End If
	ROWOFFSETED = ret
End Function

Function OFFSETFORWOMEN (rnd)
	ret = 0
	If (rnd &lt; 4) Then
		ret = 6
	Else
		ret = 8
	End If
	OFFSETFORWOMEN = ret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